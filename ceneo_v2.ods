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2cm"/>
    </style:style>
    <style:style style:name="co2" style:family="table-column">
      <style:table-column-properties fo:break-before="auto" style:column-width="6.586cm"/>
    </style:style>
    <style:style style:name="co3" style:family="table-column">
      <style:table-column-properties fo:break-before="auto" style:column-width="1.96cm"/>
    </style:style>
    <style:style style:name="co4" style:family="table-column">
      <style:table-column-properties fo:break-before="auto" style:column-width="3.106cm"/>
    </style:style>
    <style:style style:name="co5" style:family="table-column">
      <style:table-column-properties fo:break-before="auto" style:column-width="5.95cm"/>
    </style:style>
    <style:style style:name="co6" style:family="table-column">
      <style:table-column-properties fo:break-before="auto" style:column-width="13.557cm"/>
    </style:style>
    <style:style style:name="co7" style:family="table-column">
      <style:table-column-properties fo:break-before="auto" style:column-width="3.627cm"/>
    </style:style>
    <style:style style:name="co8" style:family="table-column">
      <style:table-column-properties fo:break-before="auto" style:column-width="3.366cm"/>
    </style:style>
    <style:style style:name="co9" style:family="table-column">
      <style:table-column-properties fo:break-before="auto" style:column-width="2.842cm"/>
    </style:style>
    <style:style style:name="co10" style:family="table-column">
      <style:table-column-properties fo:break-before="auto" style:column-width="2.813cm"/>
    </style:style>
    <style:style style:name="co11" style:family="table-column">
      <style:table-column-properties fo:break-before="auto" style:column-width="3.268cm"/>
    </style:style>
    <style:style style:name="co12" style:family="table-column">
      <style:table-column-properties fo:break-before="auto" style:column-width="2.875cm"/>
    </style:style>
    <style:style style:name="co13" style:family="table-column">
      <style:table-column-properties fo:break-before="auto" style:column-width="2.94cm"/>
    </style:style>
    <style:style style:name="co14" style:family="table-column">
      <style:table-column-properties fo:break-before="auto" style:column-width="1.637cm"/>
    </style:style>
    <style:style style:name="co15" style:family="table-column">
      <style:table-column-properties fo:break-before="auto" style:column-width="6.045cm"/>
    </style:style>
    <style:style style:name="co16" style:family="table-column">
      <style:table-column-properties fo:break-before="auto" style:column-width="6.429cm"/>
    </style:style>
    <style:style style:name="co17" style:family="table-column">
      <style:table-column-properties fo:break-before="auto" style:column-width="2.618cm"/>
    </style:style>
    <style:style style:name="co18" style:family="table-column">
      <style:table-column-properties fo:break-before="auto" style:column-width="3.205cm"/>
    </style:style>
    <style:style style:name="ro1" style:family="table-row">
      <style:table-row-properties style:row-height="0.459cm" fo:break-before="auto" style:use-optimal-row-height="false"/>
    </style:style>
    <style:style style:name="ro2" style:family="table-row">
      <style:table-row-properties style:row-height="1.764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0.714cm" fo:break-before="auto" style:use-optimal-row-height="false"/>
    </style:style>
    <style:style style:name="ro8" style:family="table-row">
      <style:table-row-properties style:row-height="0.707cm" fo:break-before="auto" style:use-optimal-row-height="false"/>
    </style:style>
    <style:style style:name="ro9" style:family="table-row">
      <style:table-row-properties style:row-height="0.702cm" fo:break-before="auto" style:use-optimal-row-height="false"/>
    </style:style>
    <style:style style:name="ro10" style:family="table-row">
      <style:table-row-properties style:row-height="0.453cm" fo:break-before="auto" style:use-optimal-row-height="false"/>
    </style:style>
    <style:style style:name="ro11" style:family="table-row">
      <style:table-row-properties style:row-height="0.975cm" fo:break-before="auto" style:use-optimal-row-height="false"/>
    </style:style>
    <style:style style:name="ro12" style:family="table-row">
      <style:table-row-properties style:row-height="0.718cm" fo:break-before="auto" style:use-optimal-row-height="false"/>
    </style:style>
    <style:style style:name="ro13" style:family="table-row">
      <style:table-row-properties style:row-height="1.141cm" fo:break-before="auto" style:use-optimal-row-height="false"/>
    </style:style>
    <style:style style:name="ro14" style:family="table-row">
      <style:table-row-properties style:row-height="1.565cm" fo:break-before="auto" style:use-optimal-row-height="false"/>
    </style:style>
    <style:style style:name="ro15" style:family="table-row">
      <style:table-row-properties style:row-height="1.988cm" fo:break-before="auto" style:use-optimal-row-height="false"/>
    </style:style>
    <style:style style:name="ro16" style:family="table-row">
      <style:table-row-properties style:row-height="1.138cm" fo:break-before="auto" style:use-optimal-row-height="false"/>
    </style:style>
    <style:style style:name="ro17" style:family="table-row">
      <style:table-row-properties style:row-height="1.561cm" fo:break-before="auto" style:use-optimal-row-height="false"/>
    </style:style>
    <style:style style:name="ro18" style:family="table-row">
      <style:table-row-properties style:row-height="1.131cm" fo:break-before="auto" style:use-optimal-row-height="false"/>
    </style:style>
    <style:style style:name="ro19" style:family="table-row">
      <style:table-row-properties style:row-height="1.977cm" fo:break-before="auto" style:use-optimal-row-height="false"/>
    </style:style>
    <style:style style:name="ro20" style:family="table-row">
      <style:table-row-properties style:row-height="2.401cm" fo:break-before="auto" style:use-optimal-row-height="false"/>
    </style:style>
    <style:style style:name="ro21" style:family="table-row">
      <style:table-row-properties style:row-height="1.554cm" fo:break-before="auto" style:use-optimal-row-height="false"/>
    </style:style>
    <style:style style:name="ro22" style:family="table-row">
      <style:table-row-properties style:row-height="4.094cm" fo:break-before="auto" style:use-optimal-row-height="false"/>
    </style:style>
    <style:style style:name="ro23" style:family="table-row">
      <style:table-row-properties style:row-height="2.824cm" fo:break-before="auto" style:use-optimal-row-height="false"/>
    </style:style>
    <style:style style:name="ro24" style:family="table-row">
      <style:table-row-properties style:row-height="3.671cm" fo:break-before="auto" style:use-optimal-row-height="false"/>
    </style:style>
    <style:style style:name="ro25" style:family="table-row">
      <style:table-row-properties style:row-height="3.247cm" fo:break-before="auto" style:use-optimal-row-height="false"/>
    </style:style>
    <style:style style:name="ta1" style:family="table" style:master-page-name="PageStyle_5f_Podsumowanie_20_eksportu">
      <style:table-properties table:display="true" style:writing-mode="lr-tb"/>
    </style:style>
    <style:style style:name="ta2" style:family="table" style:master-page-name="PageStyle_5f_ceneo_20_całosć_20__20_-_20_Raport_5f_przejsc_5f_">
      <style:table-properties table:display="true" style:writing-mode="lr-tb"/>
    </style:style>
    <style:style style:name="ta3" style:family="table" style:master-page-name="PageStyle_5f_Raport_5f_przejsc_5f_2026_5f_03_5f_15_5f_2026_5f_">
      <style:table-properties table:display="true" style:writing-mode="lr-tb"/>
    </style:style>
    <style:style style:name="ta4" style:family="table" style:master-page-name="PageStyle_5f_CENEO-obrobione_20_">
      <style:table-properties table:display="true" style:writing-mode="lr-tb"/>
    </style: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text-style style:name="N8100" number:language="pl" number:country="PL">
      <number:text-content/>
    </number:text-style>
    <style:style style:name="ce1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4pt" fo:font-style="normal" fo:text-shadow="none" style:text-underline-style="none" fo:font-weight="normal" style:font-size-asian="14pt" style:font-style-asian="normal" style:font-weight-asian="normal" style:font-name-complex="Helvetica Neue" style:font-size-complex="14pt" style:font-style-complex="normal" style:font-weight-complex="normal"/>
    </style:style>
    <style:style style:name="ce3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4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5" style:family="table-cell" style:parent-style-name="Excel_20_Built-in_20_Normal" style:data-style-name="N8100">
      <style:table-cell-properties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Excel_20_Built-in_20_Normal" style:data-style-name="N0">
      <style:table-cell-properties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Excel_20_Built-in_20_Normal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8" style:family="table-cell" style:parent-style-name="Excel_20_Built-in_20_Normal" style:data-style-name="N0">
      <style:table-cell-properties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9" style:family="table-cell" style:parent-style-name="Excel_20_Built-in_20_Normal" style:data-style-name="N8100">
      <style:table-cell-properties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0" style:family="table-cell" style:parent-style-name="Excel_20_Built-in_20_Normal" style:data-style-name="N107">
      <style:table-cell-properties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1" style:family="table-cell" style:parent-style-name="Excel_20_Built-in_20_Normal" style:data-style-name="N0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2" style:family="table-cell" style:parent-style-name="Pole_20_tabeli_20_przestawnej">
      <style:table-cell-properties fo:border-bottom="0.035cm solid #000000" fo:border-left="0.071cm solid #000000" fo:border-right="0.035cm solid #000000" fo:border-top="0.071cm solid #000000"/>
    </style:style>
    <style:style style:name="ce13" style:family="table-cell" style:parent-style-name="Kategoria_20_tabeli_20_przestawnej">
      <style:table-cell-properties fo:border-bottom="0.035cm solid #000000" fo:border-left="0.071cm solid #000000" fo:border-right="0.035cm solid #000000" fo:border-top="0.035cm solid #000000"/>
    </style:style>
    <style:style style:name="ce14" style:family="table-cell" style:parent-style-name="Tytul_20_tabeli_20_przestawnej">
      <style:table-cell-properties fo:border-bottom="0.035cm solid #000000" fo:border-left="0.071cm solid #000000" fo:border-right="none" fo:border-top="0.035cm solid #000000"/>
    </style:style>
    <style:style style:name="ce15" style:family="table-cell" style:parent-style-name="Kategoria_20_tabeli_20_przestawnej">
      <style:table-cell-properties fo:border-bottom="none" fo:border-left="0.071cm solid #000000" fo:border-right="0.035cm solid #000000" fo:border-top="0.035cm solid #000000"/>
    </style:style>
    <style:style style:name="ce16" style:family="table-cell" style:parent-style-name="Kategoria_20_tabeli_20_przestawnej">
      <style:table-cell-properties fo:border-bottom="0.035cm solid #000000" fo:border-left="0.071cm solid #000000" fo:border-right="0.035cm solid #000000" fo:border-top="none"/>
    </style:style>
    <style:style style:name="ce17" style:family="table-cell" style:parent-style-name="Tytul_20_tabeli_20_przestawnej">
      <style:table-cell-properties fo:border-bottom="0.071cm solid #000000" fo:border-left="0.071cm solid #000000" fo:border-right="none" fo:border-top="0.035cm solid #000000"/>
    </style:style>
    <style:style style:name="ce18" style:family="table-cell" style:parent-style-name="Excel_20_Built-in_20_Normal" style:data-style-name="N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9" style:family="table-cell" style:parent-style-name="Pole_20_tabeli_20_przestawnej">
      <style:table-cell-properties fo:border-bottom="0.035cm solid #000000" fo:border-left="0.035cm solid #000000" fo:border-right="0.035cm solid #000000" fo:border-top="0.071cm solid #000000"/>
    </style:style>
    <style:style style:name="ce20" style:family="table-cell" style:parent-style-name="Kategoria_20_tabeli_20_przestawnej">
      <style:table-cell-properties fo:border="0.035cm solid #000000"/>
    </style:style>
    <style:style style:name="ce21" style:family="table-cell" style:parent-style-name="Tytul_20_tabeli_20_przestawnej">
      <style:table-cell-properties fo:border-bottom="0.035cm solid #000000" fo:border-left="none" fo:border-right="0.035cm solid #000000" fo:border-top="0.035cm solid #000000"/>
    </style:style>
    <style:style style:name="ce22" style:family="table-cell" style:parent-style-name="Kategoria_20_tabeli_20_przestawnej">
      <style:table-cell-properties fo:border-bottom="none" fo:border-left="0.035cm solid #000000" fo:border-right="0.035cm solid #000000" fo:border-top="0.035cm solid #000000"/>
    </style:style>
    <style:style style:name="ce23" style:family="table-cell" style:parent-style-name="Kategoria_20_tabeli_20_przestawnej">
      <style:table-cell-properties fo:border-bottom="0.035cm solid #000000" fo:border-left="0.035cm solid #000000" fo:border-right="0.035cm solid #000000" fo:border-top="none"/>
    </style:style>
    <style:style style:name="ce24" style:family="table-cell" style:parent-style-name="Tytul_20_tabeli_20_przestawnej">
      <style:table-cell-properties fo:border-bottom="0.071cm solid #000000" fo:border-left="none" fo:border-right="0.035cm solid #000000" fo:border-top="0.035cm solid #000000"/>
    </style:style>
    <style:style style:name="ce25" style:family="table-cell" style:parent-style-name="Narożnik_20_tabeli_20_przestawnej">
      <style:table-cell-properties fo:border-bottom="0.035cm solid #000000" fo:border-left="0.035cm solid #000000" fo:border-right="0.071cm solid #000000" fo:border-top="0.071cm solid #000000"/>
    </style:style>
    <style:style style:name="ce26" style:family="table-cell" style:parent-style-name="Wartość_20_tabeli_20_przestawnej">
      <style:table-cell-properties fo:border-bottom="0.035cm solid #000000" fo:border-left="0.035cm solid #000000" fo:border-right="0.071cm solid #000000" fo:border-top="0.035cm solid #000000"/>
    </style:style>
    <style:style style:name="ce27" style:family="table-cell" style:parent-style-name="Wynik_20_tabeli_20_przestawnej">
      <style:table-cell-properties fo:border-bottom="0.035cm solid #000000" fo:border-left="0.035cm solid #000000" fo:border-right="0.071cm solid #000000" fo:border-top="0.035cm solid #000000"/>
    </style:style>
    <style:style style:name="ce28" style:family="table-cell" style:parent-style-name="Wartość_20_tabeli_20_przestawnej" style:data-style-name="N107">
      <style:table-cell-properties fo:border-bottom="0.035cm solid #000000" fo:border-left="0.035cm solid #000000" fo:border-right="0.071cm solid #000000" fo:border-top="0.035cm solid #000000"/>
    </style:style>
    <style:style style:name="ce29" style:family="table-cell" style:parent-style-name="Wynik_20_tabeli_20_przestawnej" style:data-style-name="N107">
      <style:table-cell-properties fo:border-bottom="0.035cm solid #000000" fo:border-left="0.035cm solid #000000" fo:border-right="0.071cm solid #000000" fo:border-top="0.035cm solid #000000"/>
    </style:style>
    <style:style style:name="ce30" style:family="table-cell" style:parent-style-name="Wartość_20_tabeli_20_przestawnej" style:data-style-name="N107">
      <style:table-cell-properties fo:border-bottom="none" fo:border-left="0.035cm solid #000000" fo:border-right="0.071cm solid #000000" fo:border-top="0.035cm solid #000000"/>
    </style:style>
    <style:style style:name="ce31" style:family="table-cell" style:parent-style-name="Wartość_20_tabeli_20_przestawnej" style:data-style-name="N107">
      <style:table-cell-properties fo:border-bottom="0.035cm solid #000000" fo:border-left="0.035cm solid #000000" fo:border-right="0.071cm solid #000000" fo:border-top="none"/>
    </style:style>
    <style:style style:name="ce32" style:family="table-cell" style:parent-style-name="Wynik_20_tabeli_20_przestawnej" style:data-style-name="N107">
      <style:table-cell-properties fo:border-bottom="0.071cm solid #000000" fo:border-left="0.035cm solid #000000" fo:border-right="0.071cm solid #000000" fo:border-top="0.035cm solid #000000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Podsumowanie eksportu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3" table:default-cell-style-name="Excel_20_Built-in_20_Normal"/>
        <table:table-column table:style-name="co3" table:number-columns-repeated="1020" table:default-cell-style-name="Excel_20_Built-in_20_Normal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3" table:number-rows-spanned="1">
            <text:p>Ten dokument został wyeksportowany z aplikacji Numbers. Każda z tabel została skonwertowana do arkusza aplikacji Excel. Pozostałe obiekty na każdym z arkuszy Numbers zostały umieszczone na osobnych arkuszach. Pamiętaj, że działanie formuł w aplikacji Excel może być inne.</text:p>
          </table:table-cell>
          <table:covered-table-cell table:number-columns-repeated="2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/>
          <table:table-cell table:style-name="ce2" office:value-type="string">
            <text:p>Nazwa arkusza Numbers</text:p>
          </table:table-cell>
          <table:table-cell table:style-name="ce2" office:value-type="string">
            <text:p>Nazwa tabeli Numbers</text:p>
          </table:table-cell>
          <table:table-cell table:style-name="ce2" office:value-type="string">
            <text:p>Nazwa arkusza aplikacji Exce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3" office:value-type="string">
            <text:p>ceneo całosć </text:p>
          </table:table-cell>
          <table:table-cell table:style-name="ce3" table:number-columns-repeated="2"/>
          <table:table-cell table:number-columns-repeated="1020"/>
        </table:table-row>
        <table:table-row table:style-name="ro5">
          <table:table-cell/>
          <table:table-cell table:style-name="ce3"/>
          <table:table-cell table:style-name="ce3" office:value-type="string">
            <text:p>Raport_przejsc_2026_03_15_2026_03_17</text:p>
          </table:table-cell>
          <table:table-cell table:style-name="ce4" office:value-type="string">
            <text:p><text:a xlink:href="#'ceneo całosć  - Raport_przejsc_'.R2C1">ceneo całosć  - Raport_przejsc_</text:a></text:p>
          </table:table-cell>
          <table:table-cell table:number-columns-repeated="1020"/>
        </table:table-row>
        <table:table-row table:style-name="ro6">
          <table:table-cell/>
          <table:table-cell table:style-name="ce3" office:value-type="string">
            <text:p>Raport_przejsc_2026_03_15_2026_03_17 — tabela przestawna</text:p>
          </table:table-cell>
          <table:table-cell table:style-name="ce3" table:number-columns-repeated="2"/>
          <table:table-cell table:number-columns-repeated="1020"/>
        </table:table-row>
        <table:table-row table:style-name="ro6">
          <table:table-cell/>
          <table:table-cell table:style-name="ce3"/>
          <table:table-cell table:style-name="ce3" office:value-type="string">
            <text:p>Raport_przejsc_2026_03_15_2026_03_17 — tabela przestawna</text:p>
          </table:table-cell>
          <table:table-cell table:style-name="ce4" office:value-type="string">
            <text:p><text:a xlink:href="#'Raport_przejsc_2026_03_15_2026_'.R2C1">Raport_przejsc_2026_03_15_2026_</text:a></text:p>
          </table:table-cell>
          <table:table-cell table:number-columns-repeated="1020"/>
        </table:table-row>
        <table:table-row table:style-name="ro4">
          <table:table-cell/>
          <table:table-cell table:style-name="ce3" office:value-type="string">
            <text:p>CENEO-obrobione </text:p>
          </table:table-cell>
          <table:table-cell table:style-name="ce3" table:number-columns-repeated="2"/>
          <table:table-cell table:number-columns-repeated="1020"/>
        </table:table-row>
        <table:table-row table:style-name="ro4">
          <table:table-cell/>
          <table:table-cell table:style-name="ce3"/>
          <table:table-cell table:style-name="ce3" office:value-type="string">
            <text:p>Tabela 1</text:p>
          </table:table-cell>
          <table:table-cell table:style-name="ce4" office:value-type="string">
            <text:p><text:a xlink:href="#'CENEO-obrobione '.R2C1">CENEO-obrobione </text:a></text:p>
          </table:table-cell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neo całosć  - Raport_przejsc_" table:style-name="ta2" table:print="false">
        <office:forms form:automatic-focus="false" form:apply-design-mode="false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7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number-columns-repeated="1013" table:default-cell-style-name="ce7"/>
        <table:table-row table:style-name="ro7">
          <table:table-cell table:style-name="ce5" office:value-type="string">
            <text:p>Kategoria</text:p>
          </table:table-cell>
          <table:table-cell table:style-name="ce5" office:value-type="string">
            <text:p><text:s/></text:p>
          </table:table-cell>
          <table:table-cell table:style-name="ce5" office:value-type="string">
            <text:p>Produkt</text:p>
          </table:table-cell>
          <table:table-cell table:style-name="ce5" office:value-type="string">
            <text:p>Id_produktu_w_sklepie</text:p>
          </table:table-cell>
          <table:table-cell table:style-name="ce5" office:value-type="string">
            <text:p><text:s/></text:p>
          </table:table-cell>
          <table:table-cell table:style-name="ce5" office:value-type="string">
            <text:p>Stawka_przekliku</text:p>
          </table:table-cell>
          <table:table-cell table:number-columns-repeated="5" table:style-name="ce5" office:value-type="string">
            <text:p><text:s/></text:p>
          </table:table-cell>
          <table:table-cell table:number-columns-repeated="1013"/>
        </table:table-row>
        <table:table-row table:style-name="ro7">
          <table:table-cell table:style-name="ce5" office:value-type="string">
            <text:p>Wszystkie</text:p>
          </table:table-cell>
          <table:table-cell table:style-name="ce8" table:number-columns-repeated="10"/>
          <table:table-cell table:number-columns-repeated="1013"/>
        </table:table-row>
        <table:table-row table:style-name="ro8">
          <table:table-cell table:style-name="ce6"/>
          <table:table-cell table:style-name="ce8" table:number-columns-repeated="10"/>
          <table:table-cell table:number-columns-repeated="1013"/>
        </table:table-row>
        <table:table-row table:style-name="ro8">
          <table:table-cell table:style-name="ce5" office:value-type="string">
            <text:p>Kategoria_glowna</text:p>
          </table:table-cell>
          <table:table-cell table:style-name="ce9" office:value-type="string">
            <text:p>Kategoria_najnizsza</text:p>
          </table:table-cell>
          <table:table-cell table:style-name="ce9" office:value-type="string">
            <text:p>Produkt</text:p>
          </table:table-cell>
          <table:table-cell table:style-name="ce9" office:value-type="string">
            <text:p>Id_produktu_w_sklepie</text:p>
          </table:table-cell>
          <table:table-cell table:style-name="ce9" office:value-type="string">
            <text:p>Data</text:p>
          </table:table-cell>
          <table:table-cell table:style-name="ce9" office:value-type="string">
            <text:p>Stawka_przekliku</text:p>
          </table:table-cell>
          <table:table-cell table:style-name="ce9" office:value-type="string">
            <text:p>Stawka_podbicia</text:p>
          </table:table-cell>
          <table:table-cell table:style-name="ce9" office:value-type="string">
            <text:p>Koszt_przekliku_razem</text:p>
          </table:table-cell>
          <table:table-cell table:style-name="ce9" office:value-type="string">
            <text:p>Zajmowana_pozycja</text:p>
          </table:table-cell>
          <table:table-cell table:style-name="ce9" office:value-type="string">
            <text:p>IP</text:p>
          </table:table-cell>
          <table:table-cell table:style-name="ce9" office:value-type="string">
            <text:p>Kampania_BidBot</text:p>
          </table:table-cell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Kremy do ciała</text:p>
          </table:table-cell>
          <table:table-cell table:style-name="ce9" office:value-type="string">
            <text:p>Proderma Mazidło Gojące Na Suchą Popękaną Skórę 30G</text:p>
          </table:table-cell>
          <table:table-cell table:style-name="ce8" office:value-type="float" office:value="14569">
            <text:p>14569</text:p>
          </table:table-cell>
          <table:table-cell table:style-name="ce9" office:value-type="string">
            <text:p>2026-03-15 00:09:11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10X.XXX.XXX.X4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Otrivin 1mg/ml 10ml</text:p>
          </table:table-cell>
          <table:table-cell table:style-name="ce8" office:value-type="float" office:value="72">
            <text:p>72</text:p>
          </table:table-cell>
          <table:table-cell table:style-name="ce9" office:value-type="string">
            <text:p>2026-03-15 00:13:27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45.XXX.XXX.X1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Paramedica Paraderm Forte Szampon Z Dziegciem Ichtiolem I Cyclopiroxem 150g</text:p>
          </table:table-cell>
          <table:table-cell table:style-name="ce8" office:value-type="float" office:value="15339">
            <text:p>15339</text:p>
          </table:table-cell>
          <table:table-cell table:style-name="ce9" office:value-type="string">
            <text:p>2026-03-15 00:44:00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83.XXX.XXX.8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Cetaphil Pro Redness Control krem nawilżający na noc 50ml</text:p>
          </table:table-cell>
          <table:table-cell table:style-name="ce8" office:value-type="float" office:value="10145">
            <text:p>10145</text:p>
          </table:table-cell>
          <table:table-cell table:style-name="ce9" office:value-type="string">
            <text:p>2026-03-15 00:49:31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31.XXX.XXX.4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nerały i witaminy</text:p>
          </table:table-cell>
          <table:table-cell table:style-name="ce9" office:value-type="string">
            <text:p>BODYMAX PLUS Multiwitamina Odporność Energia 200 tab.</text:p>
          </table:table-cell>
          <table:table-cell table:style-name="ce8" office:value-type="float" office:value="16252">
            <text:p>16252</text:p>
          </table:table-cell>
          <table:table-cell table:style-name="ce9" office:value-type="string">
            <text:p>2026-03-15 00:51:43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89.XXX.XXX.X0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Glukometry i akcesoria dla diabetyków</text:p>
          </table:table-cell>
          <table:table-cell table:style-name="ce9" office:value-type="string">
            <text:p>Roche Diabetes Care Paski Do Glukozy Accu Check Instant 100 szt</text:p>
          </table:table-cell>
          <table:table-cell table:style-name="ce8" office:value-type="float" office:value="3191">
            <text:p>3191</text:p>
          </table:table-cell>
          <table:table-cell table:style-name="ce9" office:value-type="string">
            <text:p>2026-03-15 00:54:46</text:p>
          </table:table-cell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9" office:value-type="string">
            <text:p>85.XXX.XXX.7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Dla dziecka</text:p>
          </table:table-cell>
          <table:table-cell table:style-name="ce9" office:value-type="string">
            <text:p>Mleka początkowe</text:p>
          </table:table-cell>
          <table:table-cell table:style-name="ce9" office:value-type="string">
            <text:p>NESTLE NAN OPTIPRO Plus 1 HM-O Mleko Początkowe dla niemowląt od urodzenia 400g</text:p>
          </table:table-cell>
          <table:table-cell table:style-name="ce8" office:value-type="float" office:value="17320">
            <text:p>17320</text:p>
          </table:table-cell>
          <table:table-cell table:style-name="ce9" office:value-type="string">
            <text:p>2026-03-15 00:54:59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21X.XXX.XXX.X8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Termometry</text:p>
          </table:table-cell>
          <table:table-cell table:style-name="ce9" office:value-type="string">
            <text:p>Microlife Termometr NC 200</text:p>
          </table:table-cell>
          <table:table-cell table:style-name="ce8" office:value-type="float" office:value="9262">
            <text:p>9262</text:p>
          </table:table-cell>
          <table:table-cell table:style-name="ce9" office:value-type="string">
            <text:p>2026-03-15 01:25:58</text:p>
          </table:table-cell>
          <table:table-cell table:style-name="ce10" office:value-type="currency" office:currency="PLN" office:value="1.03">
            <text:p>1,03 zł</text:p>
          </table:table-cell>
          <table:table-cell table:style-name="ce8"/>
          <table:table-cell table:style-name="ce10" office:value-type="currency" office:currency="PLN" office:value="1.03">
            <text:p>1,03 zł</text:p>
          </table:table-cell>
          <table:table-cell table:style-name="ce8"/>
          <table:table-cell table:style-name="ce9" office:value-type="string">
            <text:p>18X.XXX.XXX.X0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Opatrunki</text:p>
          </table:table-cell>
          <table:table-cell table:style-name="ce9" office:value-type="string">
            <text:p>Aqua Gel opatrunek hydrożelowy 10x12cm 1 szt.</text:p>
          </table:table-cell>
          <table:table-cell table:style-name="ce8" office:value-type="float" office:value="6772">
            <text:p>6772</text:p>
          </table:table-cell>
          <table:table-cell table:style-name="ce9" office:value-type="string">
            <text:p>2026-03-15 01:26:12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18X.XXX.XXX.X3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Avene Sunsimed Ka Bardzo Wysoka Ochrona 80ml</text:p>
          </table:table-cell>
          <table:table-cell table:style-name="ce8" office:value-type="float" office:value="28241">
            <text:p>28241</text:p>
          </table:table-cell>
          <table:table-cell table:style-name="ce9" office:value-type="string">
            <text:p>2026-03-15 02:00:58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19X.XXX.XXX.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Nizoral Krem 20mg/g 30 g</text:p>
          </table:table-cell>
          <table:table-cell table:style-name="ce8" office:value-type="float" office:value="9594">
            <text:p>9594</text:p>
          </table:table-cell>
          <table:table-cell table:style-name="ce9" office:value-type="string">
            <text:p>2026-03-15 02:29:58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83.XXX.XXX.5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Termometry</text:p>
          </table:table-cell>
          <table:table-cell table:style-name="ce9" office:value-type="string">
            <text:p>Microlife MT 16C2</text:p>
          </table:table-cell>
          <table:table-cell table:style-name="ce8" office:value-type="float" office:value="9695">
            <text:p>9695</text:p>
          </table:table-cell>
          <table:table-cell table:style-name="ce9" office:value-type="string">
            <text:p>2026-03-15 02:31:47</text:p>
          </table:table-cell>
          <table:table-cell table:style-name="ce10" office:value-type="currency" office:currency="PLN" office:value="1.03">
            <text:p>1,03 zł</text:p>
          </table:table-cell>
          <table:table-cell table:style-name="ce8"/>
          <table:table-cell table:style-name="ce10" office:value-type="currency" office:currency="PLN" office:value="1.03">
            <text:p>1,03 zł</text:p>
          </table:table-cell>
          <table:table-cell table:style-name="ce8"/>
          <table:table-cell table:style-name="ce9" office:value-type="string">
            <text:p>84.XXX.XXX.X3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Emolium INTENSIVE Krem specjalny 75ml</text:p>
          </table:table-cell>
          <table:table-cell table:style-name="ce8" office:value-type="float" office:value="3892">
            <text:p>3892</text:p>
          </table:table-cell>
          <table:table-cell table:style-name="ce9" office:value-type="string">
            <text:p>2026-03-15 02:51:04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37.XXX.XXX.X8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Nizoral Krem 20mg/g 30 g</text:p>
          </table:table-cell>
          <table:table-cell table:style-name="ce8" office:value-type="float" office:value="9594">
            <text:p>9594</text:p>
          </table:table-cell>
          <table:table-cell table:style-name="ce9" office:value-type="string">
            <text:p>2026-03-15 03:03:29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85.XXX.XXX.X5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Kremy do ciała</text:p>
          </table:table-cell>
          <table:table-cell table:style-name="ce9" office:value-type="string">
            <text:p>Proderma Mazidło Gojące Na Suchą Popękaną Skórę 30G</text:p>
          </table:table-cell>
          <table:table-cell table:style-name="ce8" office:value-type="float" office:value="14569">
            <text:p>14569</text:p>
          </table:table-cell>
          <table:table-cell table:style-name="ce9" office:value-type="string">
            <text:p>2026-03-15 03:33:42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77.XXX.XXX.X3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Kremy do ciała</text:p>
          </table:table-cell>
          <table:table-cell table:style-name="ce9" office:value-type="string">
            <text:p>Proderma Mazidło Gojące Na Suchą Popękaną Skórę 30G</text:p>
          </table:table-cell>
          <table:table-cell table:style-name="ce8" office:value-type="float" office:value="14569">
            <text:p>14569</text:p>
          </table:table-cell>
          <table:table-cell table:style-name="ce9" office:value-type="string">
            <text:p>2026-03-15 03:34:37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77.XXX.XXX.X3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Zestawy dermokosmetyków</text:p>
          </table:table-cell>
          <table:table-cell table:style-name="ce9" office:value-type="string">
            <text:p>Avene Hyaluron Activ B3 Krem Na Noc 50ml + Pod Oczy 15ml</text:p>
          </table:table-cell>
          <table:table-cell table:style-name="ce8" office:value-type="float" office:value="32646">
            <text:p>32646</text:p>
          </table:table-cell>
          <table:table-cell table:style-name="ce9" office:value-type="string">
            <text:p>2026-03-15 03:44:58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46.XXX.XXX.X3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</text:p>
          </table:table-cell>
          <table:table-cell table:style-name="ce9" office:value-type="string">
            <text:p>Dulcobis czopki na zaparcia 6 szt.</text:p>
          </table:table-cell>
          <table:table-cell table:style-name="ce8" office:value-type="float" office:value="8472">
            <text:p>8472</text:p>
          </table:table-cell>
          <table:table-cell table:style-name="ce9" office:value-type="string">
            <text:p>2026-03-15 03:45:43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89.XXX.XXX.X5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zieci i niemowlęta</text:p>
          </table:table-cell>
          <table:table-cell table:style-name="ce9" office:value-type="string">
            <text:p>Bebon Colica! kateter rektalny na kolkę dla niemowląt 5 szt.</text:p>
          </table:table-cell>
          <table:table-cell table:style-name="ce8" office:value-type="float" office:value="16508">
            <text:p>16508</text:p>
          </table:table-cell>
          <table:table-cell table:style-name="ce9" office:value-type="string">
            <text:p>2026-03-15 03:56:18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37.XXX.XXX.X5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Avene HYDRANCE Krem nawilżający bogata konsystencja 40ml</text:p>
          </table:table-cell>
          <table:table-cell table:style-name="ce8" office:value-type="float" office:value="8601">
            <text:p>8601</text:p>
          </table:table-cell>
          <table:table-cell table:style-name="ce9" office:value-type="string">
            <text:p>2026-03-15 04:03:58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37.XXX.XXX.X6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Dom i wnętrze</text:p>
          </table:table-cell>
          <table:table-cell table:style-name="ce9" office:value-type="string">
            <text:p>Olejki zapachowe</text:p>
          </table:table-cell>
          <table:table-cell table:style-name="ce9" office:value-type="string">
            <text:p>Pharmatech Olejek dla zakatarzonych 10ml</text:p>
          </table:table-cell>
          <table:table-cell table:style-name="ce8" office:value-type="float" office:value="19392">
            <text:p>19392</text:p>
          </table:table-cell>
          <table:table-cell table:style-name="ce9" office:value-type="string">
            <text:p>2026-03-15 05:42:13</text:p>
          </table:table-cell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9" office:value-type="string">
            <text:p>37.XXX.XXX.X1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</text:p>
          </table:table-cell>
          <table:table-cell table:style-name="ce9" office:value-type="string">
            <text:p>Proskin Lf 30szt.</text:p>
          </table:table-cell>
          <table:table-cell table:style-name="ce8" office:value-type="float" office:value="12932">
            <text:p>12932</text:p>
          </table:table-cell>
          <table:table-cell table:style-name="ce9" office:value-type="string">
            <text:p>2026-03-15 05:58:17</text:p>
          </table:table-cell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9" office:value-type="string">
            <text:p>31.XXX.XXX.X7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krążenia i serce</text:p>
          </table:table-cell>
          <table:table-cell table:style-name="ce9" office:value-type="string">
            <text:p>Berimal Forte 60kaps.</text:p>
          </table:table-cell>
          <table:table-cell table:style-name="ce8" office:value-type="float" office:value="19109">
            <text:p>19109</text:p>
          </table:table-cell>
          <table:table-cell table:style-name="ce9" office:value-type="string">
            <text:p>2026-03-15 06:12:43</text:p>
          </table:table-cell>
          <table:table-cell table:style-name="ce10" office:value-type="currency" office:currency="PLN" office:value="0.83">
            <text:p>0,83 zł</text:p>
          </table:table-cell>
          <table:table-cell table:style-name="ce8"/>
          <table:table-cell table:style-name="ce10" office:value-type="currency" office:currency="PLN" office:value="0.83">
            <text:p>0,83 zł</text:p>
          </table:table-cell>
          <table:table-cell table:style-name="ce8"/>
          <table:table-cell table:style-name="ce9" office:value-type="string">
            <text:p>95.XXX.XXX.X1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Termometry</text:p>
          </table:table-cell>
          <table:table-cell table:style-name="ce9" office:value-type="string">
            <text:p>Microlife MT 16C2</text:p>
          </table:table-cell>
          <table:table-cell table:style-name="ce8" office:value-type="float" office:value="9695">
            <text:p>9695</text:p>
          </table:table-cell>
          <table:table-cell table:style-name="ce9" office:value-type="string">
            <text:p>2026-03-15 06:23:07</text:p>
          </table:table-cell>
          <table:table-cell table:style-name="ce10" office:value-type="currency" office:currency="PLN" office:value="1.03">
            <text:p>1,03 zł</text:p>
          </table:table-cell>
          <table:table-cell table:style-name="ce8"/>
          <table:table-cell table:style-name="ce10" office:value-type="currency" office:currency="PLN" office:value="1.03">
            <text:p>1,03 zł</text:p>
          </table:table-cell>
          <table:table-cell table:style-name="ce8"/>
          <table:table-cell table:style-name="ce9" office:value-type="string">
            <text:p>83.XXX.XXX.X2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łyny i żele do dezynfekcji ran</text:p>
          </table:table-cell>
          <table:table-cell table:style-name="ce9" office:value-type="string">
            <text:p>Farmina Jodyna Hospital 800g</text:p>
          </table:table-cell>
          <table:table-cell table:style-name="ce8" office:value-type="float" office:value="8114">
            <text:p>8114</text:p>
          </table:table-cell>
          <table:table-cell table:style-name="ce9" office:value-type="string">
            <text:p>2026-03-15 06:26:58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37.XXX.XXX.2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Termometry</text:p>
          </table:table-cell>
          <table:table-cell table:style-name="ce9" office:value-type="string">
            <text:p>Microlife MT 16C2</text:p>
          </table:table-cell>
          <table:table-cell table:style-name="ce8" office:value-type="float" office:value="9695">
            <text:p>9695</text:p>
          </table:table-cell>
          <table:table-cell table:style-name="ce9" office:value-type="string">
            <text:p>2026-03-15 06:29:29</text:p>
          </table:table-cell>
          <table:table-cell table:style-name="ce10" office:value-type="currency" office:currency="PLN" office:value="1.03">
            <text:p>1,03 zł</text:p>
          </table:table-cell>
          <table:table-cell table:style-name="ce8"/>
          <table:table-cell table:style-name="ce10" office:value-type="currency" office:currency="PLN" office:value="1.03">
            <text:p>1,03 zł</text:p>
          </table:table-cell>
          <table:table-cell table:style-name="ce8"/>
          <table:table-cell table:style-name="ce9" office:value-type="string">
            <text:p>77.XXX.XXX.X9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Sole do stóp</text:p>
          </table:table-cell>
          <table:table-cell table:style-name="ce9" office:value-type="string">
            <text:p>FUSSBAD Gehwol Sól ziołowa z lawendą do kąpieli stóp 10x20 g</text:p>
          </table:table-cell>
          <table:table-cell table:style-name="ce8" office:value-type="float" office:value="4022">
            <text:p>4022</text:p>
          </table:table-cell>
          <table:table-cell table:style-name="ce9" office:value-type="string">
            <text:p>2026-03-15 06:32:01</text:p>
          </table:table-cell>
          <table:table-cell table:style-name="ce10" office:value-type="currency" office:currency="PLN" office:value="0.77">
            <text:p>0,77 zł</text:p>
          </table:table-cell>
          <table:table-cell table:style-name="ce8"/>
          <table:table-cell table:style-name="ce10" office:value-type="currency" office:currency="PLN" office:value="0.77">
            <text:p>0,77 zł</text:p>
          </table:table-cell>
          <table:table-cell table:style-name="ce8"/>
          <table:table-cell table:style-name="ce9" office:value-type="string">
            <text:p>91.XXX.XXX.X6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Sole do stóp</text:p>
          </table:table-cell>
          <table:table-cell table:style-name="ce9" office:value-type="string">
            <text:p>FUSSBAD Gehwol Sól ziołowa z lawendą do kąpieli stóp 10x20 g</text:p>
          </table:table-cell>
          <table:table-cell table:style-name="ce8" office:value-type="float" office:value="4022">
            <text:p>4022</text:p>
          </table:table-cell>
          <table:table-cell table:style-name="ce9" office:value-type="string">
            <text:p>2026-03-15 06:33:17</text:p>
          </table:table-cell>
          <table:table-cell table:style-name="ce10" office:value-type="currency" office:currency="PLN" office:value="0.77">
            <text:p>0,77 zł</text:p>
          </table:table-cell>
          <table:table-cell table:style-name="ce8"/>
          <table:table-cell table:style-name="ce10" office:value-type="currency" office:currency="PLN" office:value="0.77">
            <text:p>0,77 zł</text:p>
          </table:table-cell>
          <table:table-cell table:style-name="ce8"/>
          <table:table-cell table:style-name="ce9" office:value-type="string">
            <text:p>91.XXX.XXX.X6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łciowy i moczowy</text:p>
          </table:table-cell>
          <table:table-cell table:style-name="ce9" office:value-type="string">
            <text:p>Miovelia Nac 15 kaps.</text:p>
          </table:table-cell>
          <table:table-cell table:style-name="ce8" office:value-type="float" office:value="11821">
            <text:p>11821</text:p>
          </table:table-cell>
          <table:table-cell table:style-name="ce9" office:value-type="string">
            <text:p>2026-03-15 06:39:55</text:p>
          </table:table-cell>
          <table:table-cell table:style-name="ce10" office:value-type="currency" office:currency="PLN" office:value="0.75">
            <text:p>0,75 zł</text:p>
          </table:table-cell>
          <table:table-cell table:style-name="ce8"/>
          <table:table-cell table:style-name="ce10" office:value-type="currency" office:currency="PLN" office:value="0.75">
            <text:p>0,75 zł</text:p>
          </table:table-cell>
          <table:table-cell table:style-name="ce8"/>
          <table:table-cell table:style-name="ce9" office:value-type="string">
            <text:p>91.XXX.XXX.X9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Dla dziecka</text:p>
          </table:table-cell>
          <table:table-cell table:style-name="ce9" office:value-type="string">
            <text:p>Mleka początkowe</text:p>
          </table:table-cell>
          <table:table-cell table:style-name="ce9" office:value-type="string">
            <text:p>NESTLE NAN OPTIPRO Plus 1 HM-O Mleko Początkowe dla niemowląt od urodzenia 400g</text:p>
          </table:table-cell>
          <table:table-cell table:style-name="ce8" office:value-type="float" office:value="17320">
            <text:p>17320</text:p>
          </table:table-cell>
          <table:table-cell table:style-name="ce9" office:value-type="string">
            <text:p>2026-03-15 06:48:16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31.XXX.XXX.X8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 i trawienie</text:p>
          </table:table-cell>
          <table:table-cell table:style-name="ce9" office:value-type="string">
            <text:p>Daopro 30 Minitabl. Dojelitowych</text:p>
          </table:table-cell>
          <table:table-cell table:style-name="ce8" office:value-type="float" office:value="19374">
            <text:p>19374</text:p>
          </table:table-cell>
          <table:table-cell table:style-name="ce9" office:value-type="string">
            <text:p>2026-03-15 06:49:39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37.XXX.XXX.3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Pozostałe kosmetyki do włosów</text:p>
          </table:table-cell>
          <table:table-cell table:style-name="ce9" office:value-type="string">
            <text:p>Seboradin Spray Odsiwiający Do Włosów Forte 200ml</text:p>
          </table:table-cell>
          <table:table-cell table:style-name="ce8" office:value-type="float" office:value="26469">
            <text:p>26469</text:p>
          </table:table-cell>
          <table:table-cell table:style-name="ce9" office:value-type="string">
            <text:p>2026-03-15 06:51:30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37.XXX.XXX.X2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nerały i witaminy</text:p>
          </table:table-cell>
          <table:table-cell table:style-name="ce9" office:value-type="string">
            <text:p>Biofarm Vigalex D3 + K2 Max 60 tabl.</text:p>
          </table:table-cell>
          <table:table-cell table:style-name="ce8" office:value-type="float" office:value="18365">
            <text:p>18365</text:p>
          </table:table-cell>
          <table:table-cell table:style-name="ce9" office:value-type="string">
            <text:p>2026-03-15 06:52:16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37.XXX.XXX.X4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Emolium INTENSIVE Krem specjalny 75ml</text:p>
          </table:table-cell>
          <table:table-cell table:style-name="ce8" office:value-type="float" office:value="3892">
            <text:p>3892</text:p>
          </table:table-cell>
          <table:table-cell table:style-name="ce9" office:value-type="string">
            <text:p>2026-03-15 06:52:40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83.XXX.XXX.2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Emolium INTENSIVE Krem specjalny 75ml</text:p>
          </table:table-cell>
          <table:table-cell table:style-name="ce8" office:value-type="float" office:value="3892">
            <text:p>3892</text:p>
          </table:table-cell>
          <table:table-cell table:style-name="ce9" office:value-type="string">
            <text:p>2026-03-15 06:53:56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83.XXX.XXX.2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Glukometry i akcesoria dla diabetyków</text:p>
          </table:table-cell>
          <table:table-cell table:style-name="ce9" office:value-type="string">
            <text:p>Gensupen 2 wstrzykiwacz do insuliny <text:s/>turkusowy 1szt.</text:p>
          </table:table-cell>
          <table:table-cell table:style-name="ce8" office:value-type="float" office:value="16836">
            <text:p>16836</text:p>
          </table:table-cell>
          <table:table-cell table:style-name="ce9" office:value-type="string">
            <text:p>2026-03-15 06:55:05</text:p>
          </table:table-cell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9" office:value-type="string">
            <text:p>5.XXX.XXX.5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Suplementy na wzrok i słuch</text:p>
          </table:table-cell>
          <table:table-cell table:style-name="ce9" office:value-type="string">
            <text:p>OPTICall Plus maść na powieki 20 g</text:p>
          </table:table-cell>
          <table:table-cell table:style-name="ce8" office:value-type="float" office:value="14984">
            <text:p>14984</text:p>
          </table:table-cell>
          <table:table-cell table:style-name="ce9" office:value-type="string">
            <text:p>2026-03-15 06:55:50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91.XXX.XXX.X5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Suplementy na wzrok i słuch</text:p>
          </table:table-cell>
          <table:table-cell table:style-name="ce9" office:value-type="string">
            <text:p>Kropia Plus krople do oczu nawilżające 10ml</text:p>
          </table:table-cell>
          <table:table-cell table:style-name="ce8" office:value-type="float" office:value="29313">
            <text:p>29313</text:p>
          </table:table-cell>
          <table:table-cell table:style-name="ce9" office:value-type="string">
            <text:p>2026-03-15 07:00:11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19X.XXX.XXX.X7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Avene HYDRANCE Krem nawilżający bogata konsystencja 40ml</text:p>
          </table:table-cell>
          <table:table-cell table:style-name="ce8" office:value-type="float" office:value="8601">
            <text:p>8601</text:p>
          </table:table-cell>
          <table:table-cell table:style-name="ce9" office:value-type="string">
            <text:p>2026-03-15 07:01:08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83.XXX.XXX.X3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nerały i witaminy</text:p>
          </table:table-cell>
          <table:table-cell table:style-name="ce9" office:value-type="string">
            <text:p>Sufrin 60tabl.</text:p>
          </table:table-cell>
          <table:table-cell table:style-name="ce8" office:value-type="float" office:value="5345">
            <text:p>5345</text:p>
          </table:table-cell>
          <table:table-cell table:style-name="ce9" office:value-type="string">
            <text:p>2026-03-15 07:03:27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89.XXX.XXX.X0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zieci i niemowlęta</text:p>
          </table:table-cell>
          <table:table-cell table:style-name="ce9" office:value-type="string">
            <text:p>Juvit Multi krople doustne 10ml</text:p>
          </table:table-cell>
          <table:table-cell table:style-name="ce8" office:value-type="float" office:value="6099">
            <text:p>6099</text:p>
          </table:table-cell>
          <table:table-cell table:style-name="ce9" office:value-type="string">
            <text:p>2026-03-15 07:06:05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5.XXX.XXX.3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moczowy i płciowy</text:p>
          </table:table-cell>
          <table:table-cell table:style-name="ce9" office:value-type="string">
            <text:p>Gynoxin Optima 200mg 3kaps.</text:p>
          </table:table-cell>
          <table:table-cell table:style-name="ce8" office:value-type="float" office:value="9579">
            <text:p>9579</text:p>
          </table:table-cell>
          <table:table-cell table:style-name="ce9" office:value-type="string">
            <text:p>2026-03-15 07:14:25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18X.XXX.XXX.2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moczowy i płciowy</text:p>
          </table:table-cell>
          <table:table-cell table:style-name="ce9" office:value-type="string">
            <text:p>Gynoxin Optima 200mg 3kaps.</text:p>
          </table:table-cell>
          <table:table-cell table:style-name="ce8" office:value-type="float" office:value="9579">
            <text:p>9579</text:p>
          </table:table-cell>
          <table:table-cell table:style-name="ce9" office:value-type="string">
            <text:p>2026-03-15 07:14:36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18X.XXX.XXX.2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Zestawy dla kobiet</text:p>
          </table:table-cell>
          <table:table-cell table:style-name="ce9" office:value-type="string">
            <text:p>Caudalie Vinopure Zestaw Startowy dla Skóry Trądzikowej</text:p>
          </table:table-cell>
          <table:table-cell table:style-name="ce8" office:value-type="float" office:value="32416">
            <text:p>32416</text:p>
          </table:table-cell>
          <table:table-cell table:style-name="ce9" office:value-type="string">
            <text:p>2026-03-15 07:16:36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37.XXX.XXX.1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Suplementy dla dzieci</text:p>
          </table:table-cell>
          <table:table-cell table:style-name="ce9" office:value-type="string">
            <text:p>Vivomixx Mikrokapsułki 10 mld 30 kapsułek</text:p>
          </table:table-cell>
          <table:table-cell table:style-name="ce8" office:value-type="float" office:value="596">
            <text:p>596</text:p>
          </table:table-cell>
          <table:table-cell table:style-name="ce9" office:value-type="string">
            <text:p>2026-03-15 07:17:33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79.XXX.XXX.X0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nerwowy i pamięć</text:p>
          </table:table-cell>
          <table:table-cell table:style-name="ce9" office:value-type="string">
            <text:p>Tabletki MAGPRIM Skurcz 30 szt.</text:p>
          </table:table-cell>
          <table:table-cell table:style-name="ce8" office:value-type="float" office:value="32288">
            <text:p>32288</text:p>
          </table:table-cell>
          <table:table-cell table:style-name="ce9" office:value-type="string">
            <text:p>2026-03-15 07:17:59</text:p>
          </table:table-cell>
          <table:table-cell table:style-name="ce10" office:value-type="currency" office:currency="PLN" office:value="0.74">
            <text:p>0,74 zł</text:p>
          </table:table-cell>
          <table:table-cell table:style-name="ce8"/>
          <table:table-cell table:style-name="ce10" office:value-type="currency" office:currency="PLN" office:value="0.74">
            <text:p>0,74 zł</text:p>
          </table:table-cell>
          <table:table-cell table:style-name="ce8"/>
          <table:table-cell table:style-name="ce9" office:value-type="string">
            <text:p>94.XXX.XXX.X4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nerały i witaminy</text:p>
          </table:table-cell>
          <table:table-cell table:style-name="ce9" office:value-type="string">
            <text:p>BODYMAX PLUS Multiwitamina Odporność Energia 200 tab.</text:p>
          </table:table-cell>
          <table:table-cell table:style-name="ce8" office:value-type="float" office:value="16252">
            <text:p>16252</text:p>
          </table:table-cell>
          <table:table-cell table:style-name="ce9" office:value-type="string">
            <text:p>2026-03-15 07:18:43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85.XXX.XXX.X0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Zestawy dermokosmetyków</text:p>
          </table:table-cell>
          <table:table-cell table:style-name="ce9" office:value-type="string">
            <text:p>Krem Nuxe Prodigieuse Florale Zestaw z kosmetyczką podróżną 2024</text:p>
          </table:table-cell>
          <table:table-cell table:style-name="ce8" office:value-type="float" office:value="28311">
            <text:p>28311</text:p>
          </table:table-cell>
          <table:table-cell table:style-name="ce9" office:value-type="string">
            <text:p>2026-03-15 07:19:58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10X.XXX.XXX.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Zestawy dermokosmetyków</text:p>
          </table:table-cell>
          <table:table-cell table:style-name="ce9" office:value-type="string">
            <text:p>Krem Nuxe Prodigieuse Florale Zestaw z kosmetyczką podróżną 2024</text:p>
          </table:table-cell>
          <table:table-cell table:style-name="ce8" office:value-type="float" office:value="28311">
            <text:p>28311</text:p>
          </table:table-cell>
          <table:table-cell table:style-name="ce9" office:value-type="string">
            <text:p>2026-03-15 07:20:20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10X.XXX.XXX.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Suplementy na odchudzanie</text:p>
          </table:table-cell>
          <table:table-cell table:style-name="ce9" office:value-type="string">
            <text:p>HYDROSLIMMER 30 tabl.</text:p>
          </table:table-cell>
          <table:table-cell table:style-name="ce8" office:value-type="float" office:value="32282">
            <text:p>32282</text:p>
          </table:table-cell>
          <table:table-cell table:style-name="ce9" office:value-type="string">
            <text:p>2026-03-15 07:20:48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5.XXX.XXX.1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Delikatesy</text:p>
          </table:table-cell>
          <table:table-cell table:style-name="ce9" office:value-type="string">
            <text:p>Wody mineralne</text:p>
          </table:table-cell>
          <table:table-cell table:style-name="ce9" office:value-type="string">
            <text:p>Krynica Zdrój Kryniczanka Lekko Gazowana 18 x 1,5L</text:p>
          </table:table-cell>
          <table:table-cell table:style-name="ce8" office:value-type="float" office:value="18444">
            <text:p>18444</text:p>
          </table:table-cell>
          <table:table-cell table:style-name="ce9" office:value-type="string">
            <text:p>2026-03-15 07:26:09</text:p>
          </table:table-cell>
          <table:table-cell table:style-name="ce10" office:value-type="currency" office:currency="PLN" office:value="0.63">
            <text:p>0,63 zł</text:p>
          </table:table-cell>
          <table:table-cell table:style-name="ce8"/>
          <table:table-cell table:style-name="ce10" office:value-type="currency" office:currency="PLN" office:value="0.63">
            <text:p>0,63 zł</text:p>
          </table:table-cell>
          <table:table-cell table:style-name="ce8"/>
          <table:table-cell table:style-name="ce9" office:value-type="string">
            <text:p>37.XXX.XXX.X3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Opatrunki</text:p>
          </table:table-cell>
          <table:table-cell table:style-name="ce9" office:value-type="string">
            <text:p>Smith Nephew Bactigras z chlorhexyd. 15x20cm 10 szt.</text:p>
          </table:table-cell>
          <table:table-cell table:style-name="ce8" office:value-type="float" office:value="13551">
            <text:p>13551</text:p>
          </table:table-cell>
          <table:table-cell table:style-name="ce9" office:value-type="string">
            <text:p>2026-03-15 07:27:06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10X.XXX.XXX.3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łciowy i moczowy</text:p>
          </table:table-cell>
          <table:table-cell table:style-name="ce9" office:value-type="string">
            <text:p>CLIMAFEM Plus 30 tabl.</text:p>
          </table:table-cell>
          <table:table-cell table:style-name="ce8" office:value-type="float" office:value="32274">
            <text:p>32274</text:p>
          </table:table-cell>
          <table:table-cell table:style-name="ce9" office:value-type="string">
            <text:p>2026-03-15 07:29:52</text:p>
          </table:table-cell>
          <table:table-cell table:style-name="ce10" office:value-type="currency" office:currency="PLN" office:value="0.75">
            <text:p>0,75 zł</text:p>
          </table:table-cell>
          <table:table-cell table:style-name="ce8"/>
          <table:table-cell table:style-name="ce10" office:value-type="currency" office:currency="PLN" office:value="0.75">
            <text:p>0,75 zł</text:p>
          </table:table-cell>
          <table:table-cell table:style-name="ce8"/>
          <table:table-cell table:style-name="ce9" office:value-type="string">
            <text:p>88.XXX.XXX.X4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Delikatesy</text:p>
          </table:table-cell>
          <table:table-cell table:style-name="ce9" office:value-type="string">
            <text:p>Oliwy i oleje</text:p>
          </table:table-cell>
          <table:table-cell table:style-name="ce9" office:value-type="string">
            <text:p>Natuwit, Olej z czarnuszki egipskiej 250ml</text:p>
          </table:table-cell>
          <table:table-cell table:style-name="ce8" office:value-type="float" office:value="13502">
            <text:p>13502</text:p>
          </table:table-cell>
          <table:table-cell table:style-name="ce9" office:value-type="string">
            <text:p>2026-03-15 07:30:21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31.XXX.XXX.9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Otrivin Menthol 1mg/ml Aerozol do nosa 10 ml</text:p>
          </table:table-cell>
          <table:table-cell table:style-name="ce8" office:value-type="float" office:value="14886">
            <text:p>14886</text:p>
          </table:table-cell>
          <table:table-cell table:style-name="ce9" office:value-type="string">
            <text:p>2026-03-15 07:37:46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62.XXX.XXX.X4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</text:p>
          </table:table-cell>
          <table:table-cell table:style-name="ce9" office:value-type="string">
            <text:p>Dulcobis Lek Na Zaparcia 5mg 40tabl.</text:p>
          </table:table-cell>
          <table:table-cell table:style-name="ce8" office:value-type="float" office:value="10698">
            <text:p>10698</text:p>
          </table:table-cell>
          <table:table-cell table:style-name="ce9" office:value-type="string">
            <text:p>2026-03-15 07:40:19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89.XXX.XXX.7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Troxerutin żel 0,02 g/1g 30g</text:p>
          </table:table-cell>
          <table:table-cell table:style-name="ce8" office:value-type="float" office:value="18301">
            <text:p>18301</text:p>
          </table:table-cell>
          <table:table-cell table:style-name="ce9" office:value-type="string">
            <text:p>2026-03-15 07:41:34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10X.XXX.XXX.X0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Termometry</text:p>
          </table:table-cell>
          <table:table-cell table:style-name="ce9" office:value-type="string">
            <text:p>Microlife MT 16C2</text:p>
          </table:table-cell>
          <table:table-cell table:style-name="ce8" office:value-type="float" office:value="9695">
            <text:p>9695</text:p>
          </table:table-cell>
          <table:table-cell table:style-name="ce9" office:value-type="string">
            <text:p>2026-03-15 07:42:46</text:p>
          </table:table-cell>
          <table:table-cell table:style-name="ce10" office:value-type="currency" office:currency="PLN" office:value="1.03">
            <text:p>1,03 zł</text:p>
          </table:table-cell>
          <table:table-cell table:style-name="ce8"/>
          <table:table-cell table:style-name="ce10" office:value-type="currency" office:currency="PLN" office:value="1.03">
            <text:p>1,03 zł</text:p>
          </table:table-cell>
          <table:table-cell table:style-name="ce8"/>
          <table:table-cell table:style-name="ce9" office:value-type="string">
            <text:p>46.XXX.XXX.X2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zieci i niemowlęta</text:p>
          </table:table-cell>
          <table:table-cell table:style-name="ce9" office:value-type="string">
            <text:p>Juvit Multi krople doustne 10ml</text:p>
          </table:table-cell>
          <table:table-cell table:style-name="ce8" office:value-type="float" office:value="6099">
            <text:p>6099</text:p>
          </table:table-cell>
          <table:table-cell table:style-name="ce9" office:value-type="string">
            <text:p>2026-03-15 07:45:45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18X.XXX.XXX.1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Emolium DERMOCARE Krem przeciw odparzeniom 75ml</text:p>
          </table:table-cell>
          <table:table-cell table:style-name="ce8" office:value-type="float" office:value="337">
            <text:p>337</text:p>
          </table:table-cell>
          <table:table-cell table:style-name="ce9" office:value-type="string">
            <text:p>2026-03-15 07:46:03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5.XXX.XXX.3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zieci i niemowlęta</text:p>
          </table:table-cell>
          <table:table-cell table:style-name="ce9" office:value-type="string">
            <text:p>Juvit Multi krople doustne 10ml</text:p>
          </table:table-cell>
          <table:table-cell table:style-name="ce8" office:value-type="float" office:value="6099">
            <text:p>6099</text:p>
          </table:table-cell>
          <table:table-cell table:style-name="ce9" office:value-type="string">
            <text:p>2026-03-15 07:48:00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18X.XXX.XXX.1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Odchudzanie i ujędrnianie</text:p>
          </table:table-cell>
          <table:table-cell table:style-name="ce9" office:value-type="string">
            <text:p>Obesimed Forte 42 kaps</text:p>
          </table:table-cell>
          <table:table-cell table:style-name="ce8" office:value-type="float" office:value="24778">
            <text:p>24778</text:p>
          </table:table-cell>
          <table:table-cell table:style-name="ce9" office:value-type="string">
            <text:p>2026-03-15 07:49:02</text:p>
          </table:table-cell>
          <table:table-cell table:style-name="ce10" office:value-type="currency" office:currency="PLN" office:value="1.19">
            <text:p>1,19 zł</text:p>
          </table:table-cell>
          <table:table-cell table:style-name="ce8"/>
          <table:table-cell table:style-name="ce10" office:value-type="currency" office:currency="PLN" office:value="1.19">
            <text:p>1,19 zł</text:p>
          </table:table-cell>
          <table:table-cell table:style-name="ce8"/>
          <table:table-cell table:style-name="ce9" office:value-type="string">
            <text:p>31.XXX.XXX.7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ciała</text:p>
          </table:table-cell>
          <table:table-cell table:style-name="ce9" office:value-type="string">
            <text:p>AFLOFARM Nivelium med krem dermatologiczny 250ml</text:p>
          </table:table-cell>
          <table:table-cell table:style-name="ce8" office:value-type="float" office:value="8641">
            <text:p>8641</text:p>
          </table:table-cell>
          <table:table-cell table:style-name="ce9" office:value-type="string">
            <text:p>2026-03-15 07:50:31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91.XXX.XXX.X3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łciowy i moczowy</text:p>
          </table:table-cell>
          <table:table-cell table:style-name="ce9" office:value-type="string">
            <text:p>UROFEM Control 60 tabl.</text:p>
          </table:table-cell>
          <table:table-cell table:style-name="ce8" office:value-type="float" office:value="32306">
            <text:p>32306</text:p>
          </table:table-cell>
          <table:table-cell table:style-name="ce9" office:value-type="string">
            <text:p>2026-03-15 07:50:37</text:p>
          </table:table-cell>
          <table:table-cell table:style-name="ce10" office:value-type="currency" office:currency="PLN" office:value="0.75">
            <text:p>0,75 zł</text:p>
          </table:table-cell>
          <table:table-cell table:style-name="ce8"/>
          <table:table-cell table:style-name="ce10" office:value-type="currency" office:currency="PLN" office:value="0.75">
            <text:p>0,75 zł</text:p>
          </table:table-cell>
          <table:table-cell table:style-name="ce8"/>
          <table:table-cell table:style-name="ce9" office:value-type="string">
            <text:p>17X.XXX.XXX.3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lastry, przylepce i taśmy opatrunkowe</text:p>
          </table:table-cell>
          <table:table-cell table:style-name="ce9" office:value-type="string">
            <text:p>SIROWA POLAND SP. Z O.O. PIC OPTISOFT COMFORT PLASTER NA OKO 10 SZTUK</text:p>
          </table:table-cell>
          <table:table-cell table:style-name="ce8" office:value-type="float" office:value="11848">
            <text:p>11848</text:p>
          </table:table-cell>
          <table:table-cell table:style-name="ce9" office:value-type="string">
            <text:p>2026-03-15 07:50:43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83.XXX.XXX.X2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Zestawy dermokosmetyków</text:p>
          </table:table-cell>
          <table:table-cell table:style-name="ce9" office:value-type="string">
            <text:p>Krem Nuxe Prodigieuse Florale Zestaw z kosmetyczką podróżną 2024</text:p>
          </table:table-cell>
          <table:table-cell table:style-name="ce8" office:value-type="float" office:value="28311">
            <text:p>28311</text:p>
          </table:table-cell>
          <table:table-cell table:style-name="ce9" office:value-type="string">
            <text:p>2026-03-15 07:54:42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31.XXX.XXX.X6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Alfofarm Sora Med płyn do zwalczania wszawicy 100ml</text:p>
          </table:table-cell>
          <table:table-cell table:style-name="ce8" office:value-type="float" office:value="18130">
            <text:p>18130</text:p>
          </table:table-cell>
          <table:table-cell table:style-name="ce9" office:value-type="string">
            <text:p>2026-03-15 08:05:29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31.XXX.XXX.X1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Termometry</text:p>
          </table:table-cell>
          <table:table-cell table:style-name="ce9" office:value-type="string">
            <text:p>Microlife MT 16C2</text:p>
          </table:table-cell>
          <table:table-cell table:style-name="ce8" office:value-type="float" office:value="9695">
            <text:p>9695</text:p>
          </table:table-cell>
          <table:table-cell table:style-name="ce9" office:value-type="string">
            <text:p>2026-03-15 08:09:11</text:p>
          </table:table-cell>
          <table:table-cell table:style-name="ce10" office:value-type="currency" office:currency="PLN" office:value="1.03">
            <text:p>1,03 zł</text:p>
          </table:table-cell>
          <table:table-cell table:style-name="ce8"/>
          <table:table-cell table:style-name="ce10" office:value-type="currency" office:currency="PLN" office:value="1.03">
            <text:p>1,03 zł</text:p>
          </table:table-cell>
          <table:table-cell table:style-name="ce8"/>
          <table:table-cell table:style-name="ce9" office:value-type="string">
            <text:p>46.XXX.XXX.2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Alergia</text:p>
          </table:table-cell>
          <table:table-cell table:style-name="ce9" office:value-type="string">
            <text:p>Fenistil Krople doustne 1mg/1ml 20ml (Import równoległy)</text:p>
          </table:table-cell>
          <table:table-cell table:style-name="ce8" office:value-type="float" office:value="8335">
            <text:p>8335</text:p>
          </table:table-cell>
          <table:table-cell table:style-name="ce9" office:value-type="string">
            <text:p>2026-03-15 08:09:47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78.XXX.XXX.X5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nerały i witaminy</text:p>
          </table:table-cell>
          <table:table-cell table:style-name="ce9" office:value-type="string">
            <text:p>BODYMAX PLUS Multiwitamina Odporność Energia 200 tab.</text:p>
          </table:table-cell>
          <table:table-cell table:style-name="ce8" office:value-type="float" office:value="16252">
            <text:p>16252</text:p>
          </table:table-cell>
          <table:table-cell table:style-name="ce9" office:value-type="string">
            <text:p>2026-03-15 08:09:59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78.XXX.XXX.X3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Nexon Pharma Islandzki Medic+ Spray Do Gardła Z Nanosrebrem 30ml</text:p>
          </table:table-cell>
          <table:table-cell table:style-name="ce8" office:value-type="float" office:value="26817">
            <text:p>26817</text:p>
          </table:table-cell>
          <table:table-cell table:style-name="ce9" office:value-type="string">
            <text:p>2026-03-15 08:10:03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19X.XXX.XXX.X9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Termometry</text:p>
          </table:table-cell>
          <table:table-cell table:style-name="ce9" office:value-type="string">
            <text:p>Microlife MT 16C2</text:p>
          </table:table-cell>
          <table:table-cell table:style-name="ce8" office:value-type="float" office:value="9695">
            <text:p>9695</text:p>
          </table:table-cell>
          <table:table-cell table:style-name="ce9" office:value-type="string">
            <text:p>2026-03-15 08:10:18</text:p>
          </table:table-cell>
          <table:table-cell table:style-name="ce10" office:value-type="currency" office:currency="PLN" office:value="1.03">
            <text:p>1,03 zł</text:p>
          </table:table-cell>
          <table:table-cell table:style-name="ce8"/>
          <table:table-cell table:style-name="ce10" office:value-type="currency" office:currency="PLN" office:value="1.03">
            <text:p>1,03 zł</text:p>
          </table:table-cell>
          <table:table-cell table:style-name="ce8"/>
          <table:table-cell table:style-name="ce9" office:value-type="string">
            <text:p>46.XXX.XXX.2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ciała</text:p>
          </table:table-cell>
          <table:table-cell table:style-name="ce9" office:value-type="string">
            <text:p>Emolium DERMOCARE Emulsja na suchą skórę głowy 100ml</text:p>
          </table:table-cell>
          <table:table-cell table:style-name="ce8" office:value-type="float" office:value="335">
            <text:p>335</text:p>
          </table:table-cell>
          <table:table-cell table:style-name="ce9" office:value-type="string">
            <text:p>2026-03-15 08:13:47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89.XXX.XXX.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Kremy do ciała</text:p>
          </table:table-cell>
          <table:table-cell table:style-name="ce9" office:value-type="string">
            <text:p>Gorvita Żel żywokostowy z jałowcem i MSM 200ml</text:p>
          </table:table-cell>
          <table:table-cell table:style-name="ce8" office:value-type="float" office:value="11273">
            <text:p>11273</text:p>
          </table:table-cell>
          <table:table-cell table:style-name="ce9" office:value-type="string">
            <text:p>2026-03-15 08:14:18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79.XXX.XXX.9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nerwowy</text:p>
          </table:table-cell>
          <table:table-cell table:style-name="ce9" office:value-type="string">
            <text:p>Tabletki NervoCalm Forte 20 szt.</text:p>
          </table:table-cell>
          <table:table-cell table:style-name="ce8" office:value-type="float" office:value="12744">
            <text:p>12744</text:p>
          </table:table-cell>
          <table:table-cell table:style-name="ce9" office:value-type="string">
            <text:p>2026-03-15 08:16:24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18X.XXX.XXX.8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nerwowy</text:p>
          </table:table-cell>
          <table:table-cell table:style-name="ce9" office:value-type="string">
            <text:p>Tabletki NervoCalm Forte 20 szt.</text:p>
          </table:table-cell>
          <table:table-cell table:style-name="ce8" office:value-type="float" office:value="12744">
            <text:p>12744</text:p>
          </table:table-cell>
          <table:table-cell table:style-name="ce9" office:value-type="string">
            <text:p>2026-03-15 08:16:46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18X.XXX.XXX.8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La Roche-Posay Hyalu B5 Aquagel Żel Nawilżający Spf 30 50Ml</text:p>
          </table:table-cell>
          <table:table-cell table:style-name="ce8" office:value-type="float" office:value="18852">
            <text:p>18852</text:p>
          </table:table-cell>
          <table:table-cell table:style-name="ce9" office:value-type="string">
            <text:p>2026-03-15 08:18:28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10X.XXX.XXX.X0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łciowy i moczowy</text:p>
          </table:table-cell>
          <table:table-cell table:style-name="ce9" office:value-type="string">
            <text:p>CLIMAFEM Plus 30 tabl.</text:p>
          </table:table-cell>
          <table:table-cell table:style-name="ce8" office:value-type="float" office:value="32274">
            <text:p>32274</text:p>
          </table:table-cell>
          <table:table-cell table:style-name="ce9" office:value-type="string">
            <text:p>2026-03-15 08:20:21</text:p>
          </table:table-cell>
          <table:table-cell table:style-name="ce10" office:value-type="currency" office:currency="PLN" office:value="0.75">
            <text:p>0,75 zł</text:p>
          </table:table-cell>
          <table:table-cell table:style-name="ce8"/>
          <table:table-cell table:style-name="ce10" office:value-type="currency" office:currency="PLN" office:value="0.75">
            <text:p>0,75 zł</text:p>
          </table:table-cell>
          <table:table-cell table:style-name="ce8"/>
          <table:table-cell table:style-name="ce9" office:value-type="string">
            <text:p>91.XXX.XXX.X3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 i trawienie</text:p>
          </table:table-cell>
          <table:table-cell table:style-name="ce9" office:value-type="string">
            <text:p>Hepa Complex 60tabl.</text:p>
          </table:table-cell>
          <table:table-cell table:style-name="ce8" office:value-type="float" office:value="13776">
            <text:p>13776</text:p>
          </table:table-cell>
          <table:table-cell table:style-name="ce9" office:value-type="string">
            <text:p>2026-03-15 08:29:43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18X.XXX.XXX.X1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Maść Szałwiowa 25 G</text:p>
          </table:table-cell>
          <table:table-cell table:style-name="ce8" office:value-type="float" office:value="9164">
            <text:p>9164</text:p>
          </table:table-cell>
          <table:table-cell table:style-name="ce9" office:value-type="string">
            <text:p>2026-03-15 08:29:50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31.XXX.XXX.X3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krążenia i serce</text:p>
          </table:table-cell>
          <table:table-cell table:style-name="ce9" office:value-type="string">
            <text:p>WALMARK Omega 3-6-9 Kapsułki z kompleksem olejów rybiego, lnianego i z ogórecznika 30 szt.</text:p>
          </table:table-cell>
          <table:table-cell table:style-name="ce8" office:value-type="float" office:value="17493">
            <text:p>17493</text:p>
          </table:table-cell>
          <table:table-cell table:style-name="ce9" office:value-type="string">
            <text:p>2026-03-15 08:36:20</text:p>
          </table:table-cell>
          <table:table-cell table:style-name="ce10" office:value-type="currency" office:currency="PLN" office:value="0.83">
            <text:p>0,83 zł</text:p>
          </table:table-cell>
          <table:table-cell table:style-name="ce8"/>
          <table:table-cell table:style-name="ce10" office:value-type="currency" office:currency="PLN" office:value="0.83">
            <text:p>0,83 zł</text:p>
          </table:table-cell>
          <table:table-cell table:style-name="ce8"/>
          <table:table-cell table:style-name="ce9" office:value-type="string">
            <text:p>17X.XXX.XXX.X3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krążenia i serce</text:p>
          </table:table-cell>
          <table:table-cell table:style-name="ce9" office:value-type="string">
            <text:p>WALMARK Omega 3-6-9 Kapsułki z kompleksem olejów rybiego, lnianego i z ogórecznika 30 szt.</text:p>
          </table:table-cell>
          <table:table-cell table:style-name="ce8" office:value-type="float" office:value="17493">
            <text:p>17493</text:p>
          </table:table-cell>
          <table:table-cell table:style-name="ce9" office:value-type="string">
            <text:p>2026-03-15 08:36:57</text:p>
          </table:table-cell>
          <table:table-cell table:style-name="ce10" office:value-type="currency" office:currency="PLN" office:value="0.83">
            <text:p>0,83 zł</text:p>
          </table:table-cell>
          <table:table-cell table:style-name="ce8"/>
          <table:table-cell table:style-name="ce10" office:value-type="currency" office:currency="PLN" office:value="0.83">
            <text:p>0,83 zł</text:p>
          </table:table-cell>
          <table:table-cell table:style-name="ce8"/>
          <table:table-cell table:style-name="ce9" office:value-type="string">
            <text:p>17X.XXX.XXX.X3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</text:p>
          </table:table-cell>
          <table:table-cell table:style-name="ce9" office:value-type="string">
            <text:p>Bisacodyl VP 5 mg 30 tabletek dojelitowych</text:p>
          </table:table-cell>
          <table:table-cell table:style-name="ce8" office:value-type="float" office:value="3429">
            <text:p>3429</text:p>
          </table:table-cell>
          <table:table-cell table:style-name="ce9" office:value-type="string">
            <text:p>2026-03-15 08:38:56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21X.XXX.XXX.2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eparaty medycyny naturalnej</text:p>
          </table:table-cell>
          <table:table-cell table:style-name="ce9" office:value-type="string">
            <text:p>Tisane FARM Żel propolisowy 6g</text:p>
          </table:table-cell>
          <table:table-cell table:style-name="ce8" office:value-type="float" office:value="18277">
            <text:p>18277</text:p>
          </table:table-cell>
          <table:table-cell table:style-name="ce9" office:value-type="string">
            <text:p>2026-03-15 08:40:11</text:p>
          </table:table-cell>
          <table:table-cell table:style-name="ce10" office:value-type="currency" office:currency="PLN" office:value="0.88">
            <text:p>0,88 zł</text:p>
          </table:table-cell>
          <table:table-cell table:style-name="ce8"/>
          <table:table-cell table:style-name="ce10" office:value-type="currency" office:currency="PLN" office:value="0.88">
            <text:p>0,88 zł</text:p>
          </table:table-cell>
          <table:table-cell table:style-name="ce8"/>
          <table:table-cell table:style-name="ce9" office:value-type="string">
            <text:p>82.XXX.XXX.5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Termometry</text:p>
          </table:table-cell>
          <table:table-cell table:style-name="ce9" office:value-type="string">
            <text:p>Microlife MT 16C2</text:p>
          </table:table-cell>
          <table:table-cell table:style-name="ce8" office:value-type="float" office:value="9695">
            <text:p>9695</text:p>
          </table:table-cell>
          <table:table-cell table:style-name="ce9" office:value-type="string">
            <text:p>2026-03-15 08:45:13</text:p>
          </table:table-cell>
          <table:table-cell table:style-name="ce10" office:value-type="currency" office:currency="PLN" office:value="1.03">
            <text:p>1,03 zł</text:p>
          </table:table-cell>
          <table:table-cell table:style-name="ce8"/>
          <table:table-cell table:style-name="ce10" office:value-type="currency" office:currency="PLN" office:value="1.03">
            <text:p>1,03 zł</text:p>
          </table:table-cell>
          <table:table-cell table:style-name="ce8"/>
          <table:table-cell table:style-name="ce9" office:value-type="string">
            <text:p>83.XXX.XXX.X2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Termometry</text:p>
          </table:table-cell>
          <table:table-cell table:style-name="ce9" office:value-type="string">
            <text:p>Microlife MT 16C2</text:p>
          </table:table-cell>
          <table:table-cell table:style-name="ce8" office:value-type="float" office:value="9695">
            <text:p>9695</text:p>
          </table:table-cell>
          <table:table-cell table:style-name="ce9" office:value-type="string">
            <text:p>2026-03-15 08:48:38</text:p>
          </table:table-cell>
          <table:table-cell table:style-name="ce10" office:value-type="currency" office:currency="PLN" office:value="1.03">
            <text:p>1,03 zł</text:p>
          </table:table-cell>
          <table:table-cell table:style-name="ce8"/>
          <table:table-cell table:style-name="ce10" office:value-type="currency" office:currency="PLN" office:value="1.03">
            <text:p>1,03 zł</text:p>
          </table:table-cell>
          <table:table-cell table:style-name="ce8"/>
          <table:table-cell table:style-name="ce9" office:value-type="string">
            <text:p>91.XXX.XXX.X3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Emolium DERMOCARE Krem przeciw odparzeniom 75ml</text:p>
          </table:table-cell>
          <table:table-cell table:style-name="ce8" office:value-type="float" office:value="337">
            <text:p>337</text:p>
          </table:table-cell>
          <table:table-cell table:style-name="ce9" office:value-type="string">
            <text:p>2026-03-15 08:54:37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37.XXX.XXX.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Kremy do twarzy</text:p>
          </table:table-cell>
          <table:table-cell table:style-name="ce9" office:value-type="string">
            <text:p>Krem ANIDA odżywczo-regenerujący olejek arganowy na dzień i noc 100ml</text:p>
          </table:table-cell>
          <table:table-cell table:style-name="ce8" office:value-type="float" office:value="16033">
            <text:p>16033</text:p>
          </table:table-cell>
          <table:table-cell table:style-name="ce9" office:value-type="string">
            <text:p>2026-03-15 08:55:01</text:p>
          </table:table-cell>
          <table:table-cell table:style-name="ce10" office:value-type="currency" office:currency="PLN" office:value="1.02">
            <text:p>1,02 zł</text:p>
          </table:table-cell>
          <table:table-cell table:style-name="ce8"/>
          <table:table-cell table:style-name="ce10" office:value-type="currency" office:currency="PLN" office:value="1.02">
            <text:p>1,02 zł</text:p>
          </table:table-cell>
          <table:table-cell table:style-name="ce8"/>
          <table:table-cell table:style-name="ce9" office:value-type="string">
            <text:p>10X.XXX.XXX.X3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Kremy i maści medycyny naturalnej</text:p>
          </table:table-cell>
          <table:table-cell table:style-name="ce9" office:value-type="string">
            <text:p>Kailas Ajurwedyjski Krem Z Himalajskich Ziół Na Problemy Skórne 8 G</text:p>
          </table:table-cell>
          <table:table-cell table:style-name="ce8" office:value-type="float" office:value="12019">
            <text:p>12019</text:p>
          </table:table-cell>
          <table:table-cell table:style-name="ce9" office:value-type="string">
            <text:p>2026-03-15 08:55:54</text:p>
          </table:table-cell>
          <table:table-cell table:style-name="ce10" office:value-type="currency" office:currency="PLN" office:value="0.76">
            <text:p>0,76 zł</text:p>
          </table:table-cell>
          <table:table-cell table:style-name="ce8"/>
          <table:table-cell table:style-name="ce10" office:value-type="currency" office:currency="PLN" office:value="0.76">
            <text:p>0,76 zł</text:p>
          </table:table-cell>
          <table:table-cell table:style-name="ce8"/>
          <table:table-cell table:style-name="ce9" office:value-type="string">
            <text:p>31.XXX.XXX.X4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Jama ustna</text:p>
          </table:table-cell>
          <table:table-cell table:style-name="ce9" office:value-type="string">
            <text:p>Hevipoint Lek przeciw opryszczce warg i twarzy 30 tabletek</text:p>
          </table:table-cell>
          <table:table-cell table:style-name="ce8" office:value-type="float" office:value="4109">
            <text:p>4109</text:p>
          </table:table-cell>
          <table:table-cell table:style-name="ce9" office:value-type="string">
            <text:p>2026-03-15 09:09:36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31.XXX.XXX.5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Jama ustna</text:p>
          </table:table-cell>
          <table:table-cell table:style-name="ce9" office:value-type="string">
            <text:p>Hevipoint Lek przeciw opryszczce warg i twarzy 30 tabletek</text:p>
          </table:table-cell>
          <table:table-cell table:style-name="ce8" office:value-type="float" office:value="4109">
            <text:p>4109</text:p>
          </table:table-cell>
          <table:table-cell table:style-name="ce9" office:value-type="string">
            <text:p>2026-03-15 09:10:49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31.XXX.XXX.5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Jama ustna</text:p>
          </table:table-cell>
          <table:table-cell table:style-name="ce9" office:value-type="string">
            <text:p>Hevipoint Lek przeciw opryszczce warg i twarzy 30 tabletek</text:p>
          </table:table-cell>
          <table:table-cell table:style-name="ce8" office:value-type="float" office:value="4109">
            <text:p>4109</text:p>
          </table:table-cell>
          <table:table-cell table:style-name="ce9" office:value-type="string">
            <text:p>2026-03-15 09:11:27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31.XXX.XXX.5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</text:p>
          </table:table-cell>
          <table:table-cell table:style-name="ce9" office:value-type="string">
            <text:p>Dulcobis Lek Na Zaparcia 5mg 40tabl.</text:p>
          </table:table-cell>
          <table:table-cell table:style-name="ce8" office:value-type="float" office:value="10698">
            <text:p>10698</text:p>
          </table:table-cell>
          <table:table-cell table:style-name="ce9" office:value-type="string">
            <text:p>2026-03-15 09:12:20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37.XXX.XXX.X2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ęśnie, stawy i kości</text:p>
          </table:table-cell>
          <table:table-cell table:style-name="ce9" office:value-type="string">
            <text:p>Voltaren Emulgel 1% żel 0,01 g/g 100 g (Import równoległy)</text:p>
          </table:table-cell>
          <table:table-cell table:style-name="ce8" office:value-type="float" office:value="14669">
            <text:p>14669</text:p>
          </table:table-cell>
          <table:table-cell table:style-name="ce9" office:value-type="string">
            <text:p>2026-03-15 09:14:26</text:p>
          </table:table-cell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9" office:value-type="string">
            <text:p>18X.XXX.XXX.7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ciała</text:p>
          </table:table-cell>
          <table:table-cell table:style-name="ce9" office:value-type="string">
            <text:p>Emolium DERMOCARE Emulsja na suchą skórę głowy 100ml</text:p>
          </table:table-cell>
          <table:table-cell table:style-name="ce8" office:value-type="float" office:value="335">
            <text:p>335</text:p>
          </table:table-cell>
          <table:table-cell table:style-name="ce9" office:value-type="string">
            <text:p>2026-03-15 09:14:36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18X.XXX.XXX.1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Daktarin 20mg/g, krem 30g</text:p>
          </table:table-cell>
          <table:table-cell table:style-name="ce8" office:value-type="float" office:value="9326">
            <text:p>9326</text:p>
          </table:table-cell>
          <table:table-cell table:style-name="ce9" office:value-type="string">
            <text:p>2026-03-15 09:19:41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77.XXX.XXX.7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ciała</text:p>
          </table:table-cell>
          <table:table-cell table:style-name="ce9" office:value-type="string">
            <text:p>Emolium DERMOCARE Emulsja na suchą skórę głowy 100ml</text:p>
          </table:table-cell>
          <table:table-cell table:style-name="ce8" office:value-type="float" office:value="335">
            <text:p>335</text:p>
          </table:table-cell>
          <table:table-cell table:style-name="ce9" office:value-type="string">
            <text:p>2026-03-15 09:25:06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18X.XXX.XXX.1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eparaty medycyny naturalnej</text:p>
          </table:table-cell>
          <table:table-cell table:style-name="ce9" office:value-type="string">
            <text:p>Tisane FARM Żel propolisowy 6g</text:p>
          </table:table-cell>
          <table:table-cell table:style-name="ce8" office:value-type="float" office:value="18277">
            <text:p>18277</text:p>
          </table:table-cell>
          <table:table-cell table:style-name="ce9" office:value-type="string">
            <text:p>2026-03-15 09:28:29</text:p>
          </table:table-cell>
          <table:table-cell table:style-name="ce10" office:value-type="currency" office:currency="PLN" office:value="0.88">
            <text:p>0,88 zł</text:p>
          </table:table-cell>
          <table:table-cell table:style-name="ce8"/>
          <table:table-cell table:style-name="ce10" office:value-type="currency" office:currency="PLN" office:value="0.88">
            <text:p>0,88 zł</text:p>
          </table:table-cell>
          <table:table-cell table:style-name="ce8"/>
          <table:table-cell table:style-name="ce9" office:value-type="string">
            <text:p>18X.XXX.XXX.5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eparaty medycyny naturalnej</text:p>
          </table:table-cell>
          <table:table-cell table:style-name="ce9" office:value-type="string">
            <text:p>Tisane FARM Żel propolisowy 6g</text:p>
          </table:table-cell>
          <table:table-cell table:style-name="ce8" office:value-type="float" office:value="18277">
            <text:p>18277</text:p>
          </table:table-cell>
          <table:table-cell table:style-name="ce9" office:value-type="string">
            <text:p>2026-03-15 09:28:45</text:p>
          </table:table-cell>
          <table:table-cell table:style-name="ce10" office:value-type="currency" office:currency="PLN" office:value="0.88">
            <text:p>0,88 zł</text:p>
          </table:table-cell>
          <table:table-cell table:style-name="ce8"/>
          <table:table-cell table:style-name="ce10" office:value-type="currency" office:currency="PLN" office:value="0.88">
            <text:p>0,88 zł</text:p>
          </table:table-cell>
          <table:table-cell table:style-name="ce8"/>
          <table:table-cell table:style-name="ce9" office:value-type="string">
            <text:p>18X.XXX.XXX.5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Iwostin Hydro Sensitia Intensywnie nawilżające serum, 30 ml</text:p>
          </table:table-cell>
          <table:table-cell table:style-name="ce8" office:value-type="float" office:value="14083">
            <text:p>14083</text:p>
          </table:table-cell>
          <table:table-cell table:style-name="ce9" office:value-type="string">
            <text:p>2026-03-15 09:31:14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37.XXX.XXX.6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Akcesoria do inhalatorów</text:p>
          </table:table-cell>
          <table:table-cell table:style-name="ce9" office:value-type="string">
            <text:p>AeroChamber Plus Flow-Vu komora inhalacyjna z ustnikiem po 5 roku życia niebieska</text:p>
          </table:table-cell>
          <table:table-cell table:style-name="ce8" office:value-type="float" office:value="15983">
            <text:p>15983</text:p>
          </table:table-cell>
          <table:table-cell table:style-name="ce9" office:value-type="string">
            <text:p>2026-03-15 09:31:56</text:p>
          </table:table-cell>
          <table:table-cell table:style-name="ce10" office:value-type="currency" office:currency="PLN" office:value="0.76">
            <text:p>0,76 zł</text:p>
          </table:table-cell>
          <table:table-cell table:style-name="ce8"/>
          <table:table-cell table:style-name="ce10" office:value-type="currency" office:currency="PLN" office:value="0.76">
            <text:p>0,76 zł</text:p>
          </table:table-cell>
          <table:table-cell table:style-name="ce8"/>
          <table:table-cell table:style-name="ce9" office:value-type="string">
            <text:p>10X.XXX.XXX.3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La Roche-Posay Toleriane Ultra Dermallergo serum nawilżająco-kojące do skóry wrażliwej i alergicznej 20 ml</text:p>
          </table:table-cell>
          <table:table-cell table:style-name="ce8" office:value-type="float" office:value="10512">
            <text:p>10512</text:p>
          </table:table-cell>
          <table:table-cell table:style-name="ce9" office:value-type="string">
            <text:p>2026-03-15 09:32:43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83.XXX.XXX.X9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La Roche-Posay Toleriane Ultra Dermallergo serum nawilżająco-kojące do skóry wrażliwej i alergicznej 20 ml</text:p>
          </table:table-cell>
          <table:table-cell table:style-name="ce8" office:value-type="float" office:value="10512">
            <text:p>10512</text:p>
          </table:table-cell>
          <table:table-cell table:style-name="ce9" office:value-type="string">
            <text:p>2026-03-15 09:33:19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83.XXX.XXX.X9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Suplementy na wzrok i słuch</text:p>
          </table:table-cell>
          <table:table-cell table:style-name="ce9" office:value-type="string">
            <text:p>OPTICall Plus maść na powieki 20 g</text:p>
          </table:table-cell>
          <table:table-cell table:style-name="ce8" office:value-type="float" office:value="14984">
            <text:p>14984</text:p>
          </table:table-cell>
          <table:table-cell table:style-name="ce9" office:value-type="string">
            <text:p>2026-03-15 09:34:23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37.XXX.XXX.X3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eparaty medycyny naturalnej</text:p>
          </table:table-cell>
          <table:table-cell table:style-name="ce9" office:value-type="string">
            <text:p>Tisane FARM Żel propolisowy 6g</text:p>
          </table:table-cell>
          <table:table-cell table:style-name="ce8" office:value-type="float" office:value="18277">
            <text:p>18277</text:p>
          </table:table-cell>
          <table:table-cell table:style-name="ce9" office:value-type="string">
            <text:p>2026-03-15 09:36:59</text:p>
          </table:table-cell>
          <table:table-cell table:style-name="ce10" office:value-type="currency" office:currency="PLN" office:value="0.88">
            <text:p>0,88 zł</text:p>
          </table:table-cell>
          <table:table-cell table:style-name="ce8"/>
          <table:table-cell table:style-name="ce10" office:value-type="currency" office:currency="PLN" office:value="0.88">
            <text:p>0,88 zł</text:p>
          </table:table-cell>
          <table:table-cell table:style-name="ce8"/>
          <table:table-cell table:style-name="ce9" office:value-type="string">
            <text:p>17X.XXX.XXX.X2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Avene HYDRANCE UV Lekki krem nawilżający SPF 30 40ml</text:p>
          </table:table-cell>
          <table:table-cell table:style-name="ce8" office:value-type="float" office:value="9958">
            <text:p>9958</text:p>
          </table:table-cell>
          <table:table-cell table:style-name="ce9" office:value-type="string">
            <text:p>2026-03-15 09:38:40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83.XXX.XXX.2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nerały i witaminy</text:p>
          </table:table-cell>
          <table:table-cell table:style-name="ce9" office:value-type="string">
            <text:p>HYDROSAL 24 tabl. musujące</text:p>
          </table:table-cell>
          <table:table-cell table:style-name="ce8" office:value-type="float" office:value="32281">
            <text:p>32281</text:p>
          </table:table-cell>
          <table:table-cell table:style-name="ce9" office:value-type="string">
            <text:p>2026-03-15 09:40:16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31.XXX.XXX.4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La Roche-Posay Hyalu B5 Aquagel Żel Nawilżający Spf 30 50Ml</text:p>
          </table:table-cell>
          <table:table-cell table:style-name="ce8" office:value-type="float" office:value="18852">
            <text:p>18852</text:p>
          </table:table-cell>
          <table:table-cell table:style-name="ce9" office:value-type="string">
            <text:p>2026-03-15 09:41:41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37.XXX.XXX.X1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Inpharm Betadine Roztwór Na Skórę 0,1g/ml 30ml</text:p>
          </table:table-cell>
          <table:table-cell table:style-name="ce8" office:value-type="float" office:value="16180">
            <text:p>16180</text:p>
          </table:table-cell>
          <table:table-cell table:style-name="ce9" office:value-type="string">
            <text:p>2026-03-15 09:42:20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19X.XXX.XXX.X8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La Roche-Posay Hyalu B5 Aquagel Żel Nawilżający Spf 30 50Ml</text:p>
          </table:table-cell>
          <table:table-cell table:style-name="ce8" office:value-type="float" office:value="18852">
            <text:p>18852</text:p>
          </table:table-cell>
          <table:table-cell table:style-name="ce9" office:value-type="string">
            <text:p>2026-03-15 09:42:59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37.XXX.XXX.X1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włosów</text:p>
          </table:table-cell>
          <table:table-cell table:style-name="ce9" office:value-type="string">
            <text:p>Vichy Dercos Szampon Przeciwłupieżowy Włosy Suche Uzupełnienie 500ml</text:p>
          </table:table-cell>
          <table:table-cell table:style-name="ce8" office:value-type="float" office:value="35697">
            <text:p>35697</text:p>
          </table:table-cell>
          <table:table-cell table:style-name="ce9" office:value-type="string">
            <text:p>2026-03-15 09:43:28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37.XXX.XXX.1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Avene HYDRANCE UV Lekki krem nawilżający SPF 30 40ml</text:p>
          </table:table-cell>
          <table:table-cell table:style-name="ce8" office:value-type="float" office:value="9958">
            <text:p>9958</text:p>
          </table:table-cell>
          <table:table-cell table:style-name="ce9" office:value-type="string">
            <text:p>2026-03-15 09:45:42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83.XXX.XXX.2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Sora Protect - aerozol na włosy zapobiegający wszawicy 50ml</text:p>
          </table:table-cell>
          <table:table-cell table:style-name="ce8" office:value-type="float" office:value="6881">
            <text:p>6881</text:p>
          </table:table-cell>
          <table:table-cell table:style-name="ce9" office:value-type="string">
            <text:p>2026-03-15 09:51:22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80.XXX.XXX.4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nerały i witaminy</text:p>
          </table:table-cell>
          <table:table-cell table:style-name="ce9" office:value-type="string">
            <text:p>BODYMAX PLUS Multiwitamina Odporność Energia 200 tab.</text:p>
          </table:table-cell>
          <table:table-cell table:style-name="ce8" office:value-type="float" office:value="16252">
            <text:p>16252</text:p>
          </table:table-cell>
          <table:table-cell table:style-name="ce9" office:value-type="string">
            <text:p>2026-03-15 09:54:46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5.XXX.XXX.9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Avene Sunsimed Ka Bardzo Wysoka Ochrona 80ml</text:p>
          </table:table-cell>
          <table:table-cell table:style-name="ce8" office:value-type="float" office:value="28241">
            <text:p>28241</text:p>
          </table:table-cell>
          <table:table-cell table:style-name="ce9" office:value-type="string">
            <text:p>2026-03-15 09:54:55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18X.XXX.XXX.X0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Opatrunki</text:p>
          </table:table-cell>
          <table:table-cell table:style-name="ce9" office:value-type="string">
            <text:p>BACTIGRAS Opatrunek Gazowy Nasączony Parafiną I Chlorheksydyną 10cm x 10cm 10szt.</text:p>
          </table:table-cell>
          <table:table-cell table:style-name="ce8" office:value-type="float" office:value="9185">
            <text:p>9185</text:p>
          </table:table-cell>
          <table:table-cell table:style-name="ce9" office:value-type="string">
            <text:p>2026-03-15 09:56:24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91.XXX.XXX.7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Serum do twarzy</text:p>
          </table:table-cell>
          <table:table-cell table:style-name="ce9" office:value-type="string">
            <text:p>Caudalie Vinoperfect Radiance Serum Complexion Correcting Serum Rozjaśniające Przebarwienia 30 ml</text:p>
          </table:table-cell>
          <table:table-cell table:style-name="ce8" office:value-type="float" office:value="28345">
            <text:p>28345</text:p>
          </table:table-cell>
          <table:table-cell table:style-name="ce9" office:value-type="string">
            <text:p>2026-03-15 09:56:37</text:p>
          </table:table-cell>
          <table:table-cell table:style-name="ce10" office:value-type="currency" office:currency="PLN" office:value="1.03">
            <text:p>1,03 zł</text:p>
          </table:table-cell>
          <table:table-cell table:style-name="ce8"/>
          <table:table-cell table:style-name="ce10" office:value-type="currency" office:currency="PLN" office:value="1.03">
            <text:p>1,03 zł</text:p>
          </table:table-cell>
          <table:table-cell table:style-name="ce8"/>
          <table:table-cell table:style-name="ce9" office:value-type="string">
            <text:p>31.XXX.XXX.2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nerały i witaminy</text:p>
          </table:table-cell>
          <table:table-cell table:style-name="ce9" office:value-type="string">
            <text:p>Natur C Active 500mg 100 tabletek</text:p>
          </table:table-cell>
          <table:table-cell table:style-name="ce8" office:value-type="float" office:value="13834">
            <text:p>13834</text:p>
          </table:table-cell>
          <table:table-cell table:style-name="ce9" office:value-type="string">
            <text:p>2026-03-15 10:00:07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83.XXX.XXX.X1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Avene XERACALM NUTRITION Balsam nawilżający 200 ml</text:p>
          </table:table-cell>
          <table:table-cell table:style-name="ce8" office:value-type="float" office:value="19417">
            <text:p>19417</text:p>
          </table:table-cell>
          <table:table-cell table:style-name="ce9" office:value-type="string">
            <text:p>2026-03-15 10:00:23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91.XXX.XXX.6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Otrivin Ipra Max 0,5mg + 0,6mg Aerozol do nosa 10ml</text:p>
          </table:table-cell>
          <table:table-cell table:style-name="ce8" office:value-type="float" office:value="6211">
            <text:p>6211</text:p>
          </table:table-cell>
          <table:table-cell table:style-name="ce9" office:value-type="string">
            <text:p>2026-03-15 10:01:15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37.XXX.XXX.1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włosów</text:p>
          </table:table-cell>
          <table:table-cell table:style-name="ce9" office:value-type="string">
            <text:p>Vichy Dercos Szampon Przeciwłupieżowy Włosy Suche Uzupełnienie 500ml</text:p>
          </table:table-cell>
          <table:table-cell table:style-name="ce8" office:value-type="float" office:value="35697">
            <text:p>35697</text:p>
          </table:table-cell>
          <table:table-cell table:style-name="ce9" office:value-type="string">
            <text:p>2026-03-15 10:02:10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31.XXX.XXX.X1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Homeopatia</text:p>
          </table:table-cell>
          <table:table-cell table:style-name="ce9" office:value-type="string">
            <text:p>HEEL Nervoheel N 50 tabl.</text:p>
          </table:table-cell>
          <table:table-cell table:style-name="ce8" office:value-type="float" office:value="7939">
            <text:p>7939</text:p>
          </table:table-cell>
          <table:table-cell table:style-name="ce9" office:value-type="string">
            <text:p>2026-03-15 10:04:13</text:p>
          </table:table-cell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9" office:value-type="string">
            <text:p>5.XXX.XXX.1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Termometry</text:p>
          </table:table-cell>
          <table:table-cell table:style-name="ce9" office:value-type="string">
            <text:p>Microlife MT 16C2</text:p>
          </table:table-cell>
          <table:table-cell table:style-name="ce8" office:value-type="float" office:value="9695">
            <text:p>9695</text:p>
          </table:table-cell>
          <table:table-cell table:style-name="ce9" office:value-type="string">
            <text:p>2026-03-15 10:05:08</text:p>
          </table:table-cell>
          <table:table-cell table:style-name="ce10" office:value-type="currency" office:currency="PLN" office:value="1.03">
            <text:p>1,03 zł</text:p>
          </table:table-cell>
          <table:table-cell table:style-name="ce8"/>
          <table:table-cell table:style-name="ce10" office:value-type="currency" office:currency="PLN" office:value="1.03">
            <text:p>1,03 zł</text:p>
          </table:table-cell>
          <table:table-cell table:style-name="ce8"/>
          <table:table-cell table:style-name="ce9" office:value-type="string">
            <text:p>46.XXX.XXX.X3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Zestawy dermokosmetyków</text:p>
          </table:table-cell>
          <table:table-cell table:style-name="ce9" office:value-type="string">
            <text:p>Krem Nuxe Prodigieuse Florale Zestaw z kosmetyczką podróżną 2024</text:p>
          </table:table-cell>
          <table:table-cell table:style-name="ce8" office:value-type="float" office:value="28311">
            <text:p>28311</text:p>
          </table:table-cell>
          <table:table-cell table:style-name="ce9" office:value-type="string">
            <text:p>2026-03-15 10:05:14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84.XXX.XXX.X8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nerały i witaminy</text:p>
          </table:table-cell>
          <table:table-cell table:style-name="ce9" office:value-type="string">
            <text:p>Natur C Active 500mg 100 tabletek</text:p>
          </table:table-cell>
          <table:table-cell table:style-name="ce8" office:value-type="float" office:value="13834">
            <text:p>13834</text:p>
          </table:table-cell>
          <table:table-cell table:style-name="ce9" office:value-type="string">
            <text:p>2026-03-15 10:05:24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83.XXX.XXX.X1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Nizoral Krem 20mg/g 30 g</text:p>
          </table:table-cell>
          <table:table-cell table:style-name="ce8" office:value-type="float" office:value="9594">
            <text:p>9594</text:p>
          </table:table-cell>
          <table:table-cell table:style-name="ce9" office:value-type="string">
            <text:p>2026-03-15 10:07:25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37.XXX.XXX.6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Alergia</text:p>
          </table:table-cell>
          <table:table-cell table:style-name="ce9" office:value-type="string">
            <text:p>CLARITINE ALLERGY SYROP 60ML</text:p>
          </table:table-cell>
          <table:table-cell table:style-name="ce8" office:value-type="float" office:value="3574">
            <text:p>3574</text:p>
          </table:table-cell>
          <table:table-cell table:style-name="ce9" office:value-type="string">
            <text:p>2026-03-15 10:07:38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31.XXX.XXX.X5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włosów</text:p>
          </table:table-cell>
          <table:table-cell table:style-name="ce9" office:value-type="string">
            <text:p>Vichy Dercos Szampon Przeciwłupieżowy Włosy Suche Uzupełnienie 500ml</text:p>
          </table:table-cell>
          <table:table-cell table:style-name="ce8" office:value-type="float" office:value="35697">
            <text:p>35697</text:p>
          </table:table-cell>
          <table:table-cell table:style-name="ce9" office:value-type="string">
            <text:p>2026-03-15 10:08:08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77.XXX.XXX.X1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Zestawy dermokosmetyków</text:p>
          </table:table-cell>
          <table:table-cell table:style-name="ce9" office:value-type="string">
            <text:p>Krem Nuxe Prodigieuse Florale Zestaw z kosmetyczką podróżną 2024</text:p>
          </table:table-cell>
          <table:table-cell table:style-name="ce8" office:value-type="float" office:value="28311">
            <text:p>28311</text:p>
          </table:table-cell>
          <table:table-cell table:style-name="ce9" office:value-type="string">
            <text:p>2026-03-15 10:08:44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84.XXX.XXX.X8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Pozostałe kosmetyki do włosów</text:p>
          </table:table-cell>
          <table:table-cell table:style-name="ce9" office:value-type="string">
            <text:p>Seboradin Spray Odsiwiający Do Włosów Forte 200ml</text:p>
          </table:table-cell>
          <table:table-cell table:style-name="ce8" office:value-type="float" office:value="26469">
            <text:p>26469</text:p>
          </table:table-cell>
          <table:table-cell table:style-name="ce9" office:value-type="string">
            <text:p>2026-03-15 10:08:53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31.XXX.XXX.X5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włosów</text:p>
          </table:table-cell>
          <table:table-cell table:style-name="ce9" office:value-type="string">
            <text:p>Vichy Dercos Szampon Przeciwłupieżowy Włosy Suche Uzupełnienie 500ml</text:p>
          </table:table-cell>
          <table:table-cell table:style-name="ce8" office:value-type="float" office:value="35697">
            <text:p>35697</text:p>
          </table:table-cell>
          <table:table-cell table:style-name="ce9" office:value-type="string">
            <text:p>2026-03-15 10:10:45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77.XXX.XXX.X1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Emolium DERMOCARE Krem przeciw odparzeniom 75ml</text:p>
          </table:table-cell>
          <table:table-cell table:style-name="ce8" office:value-type="float" office:value="337">
            <text:p>337</text:p>
          </table:table-cell>
          <table:table-cell table:style-name="ce9" office:value-type="string">
            <text:p>2026-03-15 10:11:55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79.XXX.XXX.X3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Dla dziecka</text:p>
          </table:table-cell>
          <table:table-cell table:style-name="ce9" office:value-type="string">
            <text:p>Mleka początkowe</text:p>
          </table:table-cell>
          <table:table-cell table:style-name="ce9" office:value-type="string">
            <text:p>NESTLE NAN OPTIPRO Plus 1 HM-O Mleko Początkowe dla niemowląt od urodzenia 400g</text:p>
          </table:table-cell>
          <table:table-cell table:style-name="ce8" office:value-type="float" office:value="17320">
            <text:p>17320</text:p>
          </table:table-cell>
          <table:table-cell table:style-name="ce9" office:value-type="string">
            <text:p>2026-03-15 10:17:10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31.XXX.XXX.X7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Dla dziecka</text:p>
          </table:table-cell>
          <table:table-cell table:style-name="ce9" office:value-type="string">
            <text:p>Mleka początkowe</text:p>
          </table:table-cell>
          <table:table-cell table:style-name="ce9" office:value-type="string">
            <text:p>NESTLE NAN OPTIPRO Plus 1 HM-O Mleko Początkowe dla niemowląt od urodzenia 400g</text:p>
          </table:table-cell>
          <table:table-cell table:style-name="ce8" office:value-type="float" office:value="17320">
            <text:p>17320</text:p>
          </table:table-cell>
          <table:table-cell table:style-name="ce9" office:value-type="string">
            <text:p>2026-03-15 10:17:11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37.XXX.XXX.7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łciowy i moczowy</text:p>
          </table:table-cell>
          <table:table-cell table:style-name="ce9" office:value-type="string">
            <text:p>Pharmnew Urocal SD 40 tabletek</text:p>
          </table:table-cell>
          <table:table-cell table:style-name="ce8" office:value-type="float" office:value="18328">
            <text:p>18328</text:p>
          </table:table-cell>
          <table:table-cell table:style-name="ce9" office:value-type="string">
            <text:p>2026-03-15 10:17:31</text:p>
          </table:table-cell>
          <table:table-cell table:style-name="ce10" office:value-type="currency" office:currency="PLN" office:value="0.75">
            <text:p>0,75 zł</text:p>
          </table:table-cell>
          <table:table-cell table:style-name="ce8"/>
          <table:table-cell table:style-name="ce10" office:value-type="currency" office:currency="PLN" office:value="0.75">
            <text:p>0,75 zł</text:p>
          </table:table-cell>
          <table:table-cell table:style-name="ce8"/>
          <table:table-cell table:style-name="ce9" office:value-type="string">
            <text:p>5.XXX.XXX.3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 i trawienie</text:p>
          </table:table-cell>
          <table:table-cell table:style-name="ce9" office:value-type="string">
            <text:p>Estabiom Junior 20kaps.</text:p>
          </table:table-cell>
          <table:table-cell table:style-name="ce8" office:value-type="float" office:value="6953">
            <text:p>6953</text:p>
          </table:table-cell>
          <table:table-cell table:style-name="ce9" office:value-type="string">
            <text:p>2026-03-15 10:20:29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93.XXX.XXX.X2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moczowy i płciowy</text:p>
          </table:table-cell>
          <table:table-cell table:style-name="ce9" office:value-type="string">
            <text:p>Prurifem Kadefarm 30ml</text:p>
          </table:table-cell>
          <table:table-cell table:style-name="ce8" office:value-type="float" office:value="5129">
            <text:p>5129</text:p>
          </table:table-cell>
          <table:table-cell table:style-name="ce9" office:value-type="string">
            <text:p>2026-03-15 10:20:57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21X.XXX.XXX.5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ciała</text:p>
          </table:table-cell>
          <table:table-cell table:style-name="ce9" office:value-type="string">
            <text:p>Emolium Dermocare Nawilżający Olejek do mycia 400 ml</text:p>
          </table:table-cell>
          <table:table-cell table:style-name="ce8" office:value-type="float" office:value="7660">
            <text:p>7660</text:p>
          </table:table-cell>
          <table:table-cell table:style-name="ce9" office:value-type="string">
            <text:p>2026-03-15 10:23:57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31.XXX.XXX.X2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Bielizna lecznicza</text:p>
          </table:table-cell>
          <table:table-cell table:style-name="ce9" office:value-type="string">
            <text:p>PANI TERESA® CLASSIC PT 0403 Pończochy medyczne uciskowe 2 klasa kompresji (czubek otwarty, długie, beż, rozm. XL)</text:p>
          </table:table-cell>
          <table:table-cell table:style-name="ce8" office:value-type="float" office:value="15373">
            <text:p>15373</text:p>
          </table:table-cell>
          <table:table-cell table:style-name="ce9" office:value-type="string">
            <text:p>2026-03-15 10:26:05</text:p>
          </table:table-cell>
          <table:table-cell table:style-name="ce10" office:value-type="currency" office:currency="PLN" office:value="0.82">
            <text:p>0,82 zł</text:p>
          </table:table-cell>
          <table:table-cell table:style-name="ce8"/>
          <table:table-cell table:style-name="ce10" office:value-type="currency" office:currency="PLN" office:value="0.82">
            <text:p>0,82 zł</text:p>
          </table:table-cell>
          <table:table-cell table:style-name="ce8"/>
          <table:table-cell table:style-name="ce9" office:value-type="string">
            <text:p>31.XXX.XXX.X9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Jama ustna</text:p>
          </table:table-cell>
          <table:table-cell table:style-name="ce9" office:value-type="string">
            <text:p>PhytoPharm Dentosept PEN ulga w bólu żel 3,3ml</text:p>
          </table:table-cell>
          <table:table-cell table:style-name="ce8" office:value-type="float" office:value="10415">
            <text:p>10415</text:p>
          </table:table-cell>
          <table:table-cell table:style-name="ce9" office:value-type="string">
            <text:p>2026-03-15 10:26:30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89.XXX.XXX.X5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Suplementy na wzrok i słuch</text:p>
          </table:table-cell>
          <table:table-cell table:style-name="ce9" office:value-type="string">
            <text:p>Kropia Plus krople do oczu nawilżające 10ml</text:p>
          </table:table-cell>
          <table:table-cell table:style-name="ce8" office:value-type="float" office:value="29313">
            <text:p>29313</text:p>
          </table:table-cell>
          <table:table-cell table:style-name="ce9" office:value-type="string">
            <text:p>2026-03-15 10:35:15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83.XXX.XXX.X3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Aspirin 500mg 10 tabletek</text:p>
          </table:table-cell>
          <table:table-cell table:style-name="ce8" office:value-type="float" office:value="16095">
            <text:p>16095</text:p>
          </table:table-cell>
          <table:table-cell table:style-name="ce9" office:value-type="string">
            <text:p>2026-03-15 10:36:39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18X.XXX.XXX.X2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Emolium INTENSIVE Krem specjalny 75ml</text:p>
          </table:table-cell>
          <table:table-cell table:style-name="ce8" office:value-type="float" office:value="3892">
            <text:p>3892</text:p>
          </table:table-cell>
          <table:table-cell table:style-name="ce9" office:value-type="string">
            <text:p>2026-03-15 10:44:49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83.XXX.XXX.7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ciała</text:p>
          </table:table-cell>
          <table:table-cell table:style-name="ce9" office:value-type="string">
            <text:p>Avene Xeracalm A.D Krem uzupełniający lipidy 400ml</text:p>
          </table:table-cell>
          <table:table-cell table:style-name="ce8" office:value-type="float" office:value="19702">
            <text:p>19702</text:p>
          </table:table-cell>
          <table:table-cell table:style-name="ce9" office:value-type="string">
            <text:p>2026-03-15 10:46:30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77.XXX.XXX.1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nerały i witaminy</text:p>
          </table:table-cell>
          <table:table-cell table:style-name="ce9" office:value-type="string">
            <text:p>BODYMAX PLUS Multiwitamina Odporność Energia 200 tab.</text:p>
          </table:table-cell>
          <table:table-cell table:style-name="ce8" office:value-type="float" office:value="16252">
            <text:p>16252</text:p>
          </table:table-cell>
          <table:table-cell table:style-name="ce9" office:value-type="string">
            <text:p>2026-03-15 10:46:52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31.XXX.XXX.4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Alergia</text:p>
          </table:table-cell>
          <table:table-cell table:style-name="ce9" office:value-type="string">
            <text:p>CLARITINE ALLERGY SYROP 60ML</text:p>
          </table:table-cell>
          <table:table-cell table:style-name="ce8" office:value-type="float" office:value="3574">
            <text:p>3574</text:p>
          </table:table-cell>
          <table:table-cell table:style-name="ce9" office:value-type="string">
            <text:p>2026-03-15 10:47:04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18X.XXX.XXX.X7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Alergia</text:p>
          </table:table-cell>
          <table:table-cell table:style-name="ce9" office:value-type="string">
            <text:p>CLARITINE ALLERGY SYROP 60ML</text:p>
          </table:table-cell>
          <table:table-cell table:style-name="ce8" office:value-type="float" office:value="3574">
            <text:p>3574</text:p>
          </table:table-cell>
          <table:table-cell table:style-name="ce9" office:value-type="string">
            <text:p>2026-03-15 10:48:03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18X.XXX.XXX.X7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Daktarin 20mg/g, krem 30g</text:p>
          </table:table-cell>
          <table:table-cell table:style-name="ce8" office:value-type="float" office:value="9326">
            <text:p>9326</text:p>
          </table:table-cell>
          <table:table-cell table:style-name="ce9" office:value-type="string">
            <text:p>2026-03-15 10:48:33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83.XXX.XXX.7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Maść Szałwiowa 25 G</text:p>
          </table:table-cell>
          <table:table-cell table:style-name="ce8" office:value-type="float" office:value="9164">
            <text:p>9164</text:p>
          </table:table-cell>
          <table:table-cell table:style-name="ce9" office:value-type="string">
            <text:p>2026-03-15 10:50:56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94.XXX.XXX.X8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Suplementy na wzrok i słuch</text:p>
          </table:table-cell>
          <table:table-cell table:style-name="ce9" office:value-type="string">
            <text:p>Kropia Plus krople do oczu nawilżające 10ml</text:p>
          </table:table-cell>
          <table:table-cell table:style-name="ce8" office:value-type="float" office:value="29313">
            <text:p>29313</text:p>
          </table:table-cell>
          <table:table-cell table:style-name="ce9" office:value-type="string">
            <text:p>2026-03-15 10:52:37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18X.XXX.XXX.X1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ciała</text:p>
          </table:table-cell>
          <table:table-cell table:style-name="ce9" office:value-type="string">
            <text:p>Nuxe Zestaw - Huile Prodigieuse</text:p>
          </table:table-cell>
          <table:table-cell table:style-name="ce8" office:value-type="float" office:value="19670">
            <text:p>19670</text:p>
          </table:table-cell>
          <table:table-cell table:style-name="ce9" office:value-type="string">
            <text:p>2026-03-15 10:52:43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37.XXX.XXX.4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Pozostałe kosmetyki do pielęgnacji ciała</text:p>
          </table:table-cell>
          <table:table-cell table:style-name="ce9" office:value-type="string">
            <text:p>Gorvita Maść Rokitnikowa Z Ekstraktem Z Nagietka 140Ml</text:p>
          </table:table-cell>
          <table:table-cell table:style-name="ce8" office:value-type="float" office:value="17250">
            <text:p>17250</text:p>
          </table:table-cell>
          <table:table-cell table:style-name="ce9" office:value-type="string">
            <text:p>2026-03-15 10:53:40</text:p>
          </table:table-cell>
          <table:table-cell table:style-name="ce10" office:value-type="currency" office:currency="PLN" office:value="0.75">
            <text:p>0,75 zł</text:p>
          </table:table-cell>
          <table:table-cell table:style-name="ce8"/>
          <table:table-cell table:style-name="ce10" office:value-type="currency" office:currency="PLN" office:value="0.75">
            <text:p>0,75 zł</text:p>
          </table:table-cell>
          <table:table-cell table:style-name="ce8"/>
          <table:table-cell table:style-name="ce9" office:value-type="string">
            <text:p>17X.XXX.XXX.X1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Zioła</text:p>
          </table:table-cell>
          <table:table-cell table:style-name="ce9" office:value-type="string">
            <text:p>Zioła Mnicha Na odchudzanie 20tbx2g</text:p>
          </table:table-cell>
          <table:table-cell table:style-name="ce8" office:value-type="float" office:value="18545">
            <text:p>18545</text:p>
          </table:table-cell>
          <table:table-cell table:style-name="ce9" office:value-type="string">
            <text:p>2026-03-15 10:55:54</text:p>
          </table:table-cell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9" office:value-type="string">
            <text:p>37.XXX.XXX.X0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Zestawy dermokosmetyków</text:p>
          </table:table-cell>
          <table:table-cell table:style-name="ce9" office:value-type="string">
            <text:p>Krem Nuxe Prodigieuse Florale Zestaw z kosmetyczką podróżną 2024</text:p>
          </table:table-cell>
          <table:table-cell table:style-name="ce8" office:value-type="float" office:value="28311">
            <text:p>28311</text:p>
          </table:table-cell>
          <table:table-cell table:style-name="ce9" office:value-type="string">
            <text:p>2026-03-15 10:56:02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37.XXX.XXX.4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CLARVOX Complex Spray do gardła, 30ml</text:p>
          </table:table-cell>
          <table:table-cell table:style-name="ce8" office:value-type="float" office:value="32268">
            <text:p>32268</text:p>
          </table:table-cell>
          <table:table-cell table:style-name="ce9" office:value-type="string">
            <text:p>2026-03-15 10:56:32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89.XXX.XXX.X1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 i trawienie</text:p>
          </table:table-cell>
          <table:table-cell table:style-name="ce9" office:value-type="string">
            <text:p>Estabiom Junior 20kaps.</text:p>
          </table:table-cell>
          <table:table-cell table:style-name="ce8" office:value-type="float" office:value="6953">
            <text:p>6953</text:p>
          </table:table-cell>
          <table:table-cell table:style-name="ce9" office:value-type="string">
            <text:p>2026-03-15 11:02:20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10X.XXX.XXX.6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Glukometry i akcesoria dla diabetyków</text:p>
          </table:table-cell>
          <table:table-cell table:style-name="ce9" office:value-type="string">
            <text:p>Nakłuwacz AccuChek Softclix KIT + 25 lancetów</text:p>
          </table:table-cell>
          <table:table-cell table:style-name="ce8" office:value-type="float" office:value="13662">
            <text:p>13662</text:p>
          </table:table-cell>
          <table:table-cell table:style-name="ce9" office:value-type="string">
            <text:p>2026-03-15 11:07:04</text:p>
          </table:table-cell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9" office:value-type="string">
            <text:p>80.XXX.XXX.X4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nerwowy i pamięć</text:p>
          </table:table-cell>
          <table:table-cell table:style-name="ce9" office:value-type="string">
            <text:p>Tabletki Neurotynox D 30 szt.</text:p>
          </table:table-cell>
          <table:table-cell table:style-name="ce8" office:value-type="float" office:value="4684">
            <text:p>4684</text:p>
          </table:table-cell>
          <table:table-cell table:style-name="ce9" office:value-type="string">
            <text:p>2026-03-15 11:12:14</text:p>
          </table:table-cell>
          <table:table-cell table:style-name="ce10" office:value-type="currency" office:currency="PLN" office:value="0.74">
            <text:p>0,74 zł</text:p>
          </table:table-cell>
          <table:table-cell table:style-name="ce8"/>
          <table:table-cell table:style-name="ce10" office:value-type="currency" office:currency="PLN" office:value="0.74">
            <text:p>0,74 zł</text:p>
          </table:table-cell>
          <table:table-cell table:style-name="ce8"/>
          <table:table-cell table:style-name="ce9" office:value-type="string">
            <text:p>91.XXX.XXX.X6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Delikatesy</text:p>
          </table:table-cell>
          <table:table-cell table:style-name="ce9" office:value-type="string">
            <text:p>Wody mineralne</text:p>
          </table:table-cell>
          <table:table-cell table:style-name="ce9" office:value-type="string">
            <text:p>Uzdrowisko Krynica Zdrój Kryniczanka lekko gazowana 0,5l</text:p>
          </table:table-cell>
          <table:table-cell table:style-name="ce8" office:value-type="float" office:value="18442">
            <text:p>18442</text:p>
          </table:table-cell>
          <table:table-cell table:style-name="ce9" office:value-type="string">
            <text:p>2026-03-15 11:13:59</text:p>
          </table:table-cell>
          <table:table-cell table:style-name="ce10" office:value-type="currency" office:currency="PLN" office:value="0.63">
            <text:p>0,63 zł</text:p>
          </table:table-cell>
          <table:table-cell table:style-name="ce8"/>
          <table:table-cell table:style-name="ce10" office:value-type="currency" office:currency="PLN" office:value="0.63">
            <text:p>0,63 zł</text:p>
          </table:table-cell>
          <table:table-cell table:style-name="ce8"/>
          <table:table-cell table:style-name="ce9" office:value-type="string">
            <text:p>10X.XXX.XXX.X9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ciała</text:p>
          </table:table-cell>
          <table:table-cell table:style-name="ce9" office:value-type="string">
            <text:p>DUCRAY DEXYANE MED Wyrób medyczny krem kojąco-regenerujący 30ml</text:p>
          </table:table-cell>
          <table:table-cell table:style-name="ce8" office:value-type="float" office:value="31946">
            <text:p>31946</text:p>
          </table:table-cell>
          <table:table-cell table:style-name="ce9" office:value-type="string">
            <text:p>2026-03-15 11:15:58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18X.XXX.XXX.4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Stawy, mięśnie i kości</text:p>
          </table:table-cell>
          <table:table-cell table:style-name="ce9" office:value-type="string">
            <text:p>NordFarm Glukozamina 500 Plus 90tabl.</text:p>
          </table:table-cell>
          <table:table-cell table:style-name="ce8" office:value-type="float" office:value="4048">
            <text:p>4048</text:p>
          </table:table-cell>
          <table:table-cell table:style-name="ce9" office:value-type="string">
            <text:p>2026-03-15 11:18:32</text:p>
          </table:table-cell>
          <table:table-cell table:style-name="ce10" office:value-type="currency" office:currency="PLN" office:value="0.83">
            <text:p>0,83 zł</text:p>
          </table:table-cell>
          <table:table-cell table:style-name="ce8"/>
          <table:table-cell table:style-name="ce10" office:value-type="currency" office:currency="PLN" office:value="0.83">
            <text:p>0,83 zł</text:p>
          </table:table-cell>
          <table:table-cell table:style-name="ce8"/>
          <table:table-cell table:style-name="ce9" office:value-type="string">
            <text:p>21X.XXX.XXX.X6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ArgenTussin Gardło, smak miętowo-cytrynowy 16 pastylek</text:p>
          </table:table-cell>
          <table:table-cell table:style-name="ce8" office:value-type="float" office:value="13334">
            <text:p>13334</text:p>
          </table:table-cell>
          <table:table-cell table:style-name="ce9" office:value-type="string">
            <text:p>2026-03-15 11:19:25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21X.XXX.XXX.7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APAP Ból i Gorączka C Plus 10 tab. mus.</text:p>
          </table:table-cell>
          <table:table-cell table:style-name="ce8" office:value-type="float" office:value="11252">
            <text:p>11252</text:p>
          </table:table-cell>
          <table:table-cell table:style-name="ce9" office:value-type="string">
            <text:p>2026-03-15 11:19:43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18X.XXX.XXX.X8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DUCRAY KERACNYL Repair Balsam do ust 15ml</text:p>
          </table:table-cell>
          <table:table-cell table:style-name="ce8" office:value-type="float" office:value="32640">
            <text:p>32640</text:p>
          </table:table-cell>
          <table:table-cell table:style-name="ce9" office:value-type="string">
            <text:p>2026-03-15 11:22:41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18X.XXX.XXX.5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ciała</text:p>
          </table:table-cell>
          <table:table-cell table:style-name="ce9" office:value-type="string">
            <text:p>DUCRAY DEXYANE MED Wyrób medyczny krem kojąco-regenerujący 100ml</text:p>
          </table:table-cell>
          <table:table-cell table:style-name="ce8" office:value-type="float" office:value="31945">
            <text:p>31945</text:p>
          </table:table-cell>
          <table:table-cell table:style-name="ce9" office:value-type="string">
            <text:p>2026-03-15 11:23:48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91.XXX.XXX.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DUCRAY KERACNYL Repair Balsam do ust 15ml</text:p>
          </table:table-cell>
          <table:table-cell table:style-name="ce8" office:value-type="float" office:value="32640">
            <text:p>32640</text:p>
          </table:table-cell>
          <table:table-cell table:style-name="ce9" office:value-type="string">
            <text:p>2026-03-15 11:23:57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18X.XXX.XXX.5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ArgenTussin Gardło, smak miętowo-cytrynowy 16 pastylek</text:p>
          </table:table-cell>
          <table:table-cell table:style-name="ce8" office:value-type="float" office:value="13334">
            <text:p>13334</text:p>
          </table:table-cell>
          <table:table-cell table:style-name="ce9" office:value-type="string">
            <text:p>2026-03-15 11:24:27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21X.XXX.XXX.7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Alergia</text:p>
          </table:table-cell>
          <table:table-cell table:style-name="ce9" office:value-type="string">
            <text:p>EctoAlerg krople do oczu 10ml</text:p>
          </table:table-cell>
          <table:table-cell table:style-name="ce8" office:value-type="float" office:value="8340">
            <text:p>8340</text:p>
          </table:table-cell>
          <table:table-cell table:style-name="ce9" office:value-type="string">
            <text:p>2026-03-15 11:26:35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91.XXX.XXX.X5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Zioła</text:p>
          </table:table-cell>
          <table:table-cell table:style-name="ce9" office:value-type="string">
            <text:p>Verdin Fix Zioła Z Owocami Leśnymi 20 saszetek</text:p>
          </table:table-cell>
          <table:table-cell table:style-name="ce8" office:value-type="float" office:value="18355">
            <text:p>18355</text:p>
          </table:table-cell>
          <table:table-cell table:style-name="ce9" office:value-type="string">
            <text:p>2026-03-15 11:26:54</text:p>
          </table:table-cell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9" office:value-type="string">
            <text:p>10X.XXX.XXX.X2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moczowy i płciowy</text:p>
          </table:table-cell>
          <table:table-cell table:style-name="ce9" office:value-type="string">
            <text:p>Gynoxin Uno 0,6G 1kaps.</text:p>
          </table:table-cell>
          <table:table-cell table:style-name="ce8" office:value-type="float" office:value="10753">
            <text:p>10753</text:p>
          </table:table-cell>
          <table:table-cell table:style-name="ce9" office:value-type="string">
            <text:p>2026-03-15 11:28:28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79.XXX.XXX.X5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nerały i witaminy</text:p>
          </table:table-cell>
          <table:table-cell table:style-name="ce9" office:value-type="string">
            <text:p>BODYMAX PLUS Multiwitamina Odporność Energia 200 tab.</text:p>
          </table:table-cell>
          <table:table-cell table:style-name="ce8" office:value-type="float" office:value="16252">
            <text:p>16252</text:p>
          </table:table-cell>
          <table:table-cell table:style-name="ce9" office:value-type="string">
            <text:p>2026-03-15 11:33:20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37.XXX.XXX.X2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Avene Sunsimed Ka Bardzo Wysoka Ochrona 80ml</text:p>
          </table:table-cell>
          <table:table-cell table:style-name="ce8" office:value-type="float" office:value="28241">
            <text:p>28241</text:p>
          </table:table-cell>
          <table:table-cell table:style-name="ce9" office:value-type="string">
            <text:p>2026-03-15 11:35:49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91.XXX.XXX.1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zieci i niemowlęta</text:p>
          </table:table-cell>
          <table:table-cell table:style-name="ce9" office:value-type="string">
            <text:p>Juvit Multi krople doustne 10ml</text:p>
          </table:table-cell>
          <table:table-cell table:style-name="ce8" office:value-type="float" office:value="6099">
            <text:p>6099</text:p>
          </table:table-cell>
          <table:table-cell table:style-name="ce9" office:value-type="string">
            <text:p>2026-03-15 11:36:13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10X.XXX.XXX.9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Termometry</text:p>
          </table:table-cell>
          <table:table-cell table:style-name="ce9" office:value-type="string">
            <text:p>Microlife MT 16C2</text:p>
          </table:table-cell>
          <table:table-cell table:style-name="ce8" office:value-type="float" office:value="9695">
            <text:p>9695</text:p>
          </table:table-cell>
          <table:table-cell table:style-name="ce9" office:value-type="string">
            <text:p>2026-03-15 11:36:54</text:p>
          </table:table-cell>
          <table:table-cell table:style-name="ce10" office:value-type="currency" office:currency="PLN" office:value="1.03">
            <text:p>1,03 zł</text:p>
          </table:table-cell>
          <table:table-cell table:style-name="ce8"/>
          <table:table-cell table:style-name="ce10" office:value-type="currency" office:currency="PLN" office:value="1.03">
            <text:p>1,03 zł</text:p>
          </table:table-cell>
          <table:table-cell table:style-name="ce8"/>
          <table:table-cell table:style-name="ce9" office:value-type="string">
            <text:p>31.XXX.XXX.X6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Avene Sunsimed Ka Bardzo Wysoka Ochrona 80ml</text:p>
          </table:table-cell>
          <table:table-cell table:style-name="ce8" office:value-type="float" office:value="28241">
            <text:p>28241</text:p>
          </table:table-cell>
          <table:table-cell table:style-name="ce9" office:value-type="string">
            <text:p>2026-03-15 11:39:52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91.XXX.XXX.1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Sora Protect - aerozol na włosy zapobiegający wszawicy 50ml</text:p>
          </table:table-cell>
          <table:table-cell table:style-name="ce8" office:value-type="float" office:value="6881">
            <text:p>6881</text:p>
          </table:table-cell>
          <table:table-cell table:style-name="ce9" office:value-type="string">
            <text:p>2026-03-15 11:40:46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37.XXX.XXX.X4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</text:p>
          </table:table-cell>
          <table:table-cell table:style-name="ce9" office:value-type="string">
            <text:p>Infarma Trading Atoxil Enterosorbent 10sasz.</text:p>
          </table:table-cell>
          <table:table-cell table:style-name="ce8" office:value-type="float" office:value="32154">
            <text:p>32154</text:p>
          </table:table-cell>
          <table:table-cell table:style-name="ce9" office:value-type="string">
            <text:p>2026-03-15 11:41:09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17X.XXX.XXX.X5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Rzuć palenie</text:p>
          </table:table-cell>
          <table:table-cell table:style-name="ce9" office:value-type="string">
            <text:p>NIQUITIN przezroczysty, plastry transdermalne, 21 mg / 24 h, 7 szt</text:p>
          </table:table-cell>
          <table:table-cell table:style-name="ce8" office:value-type="float" office:value="9593">
            <text:p>9593</text:p>
          </table:table-cell>
          <table:table-cell table:style-name="ce9" office:value-type="string">
            <text:p>2026-03-15 11:41:41</text:p>
          </table:table-cell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9" office:value-type="string">
            <text:p>37.XXX.XXX.2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La Roche-Posay Toleriane Ultra Dermallergo serum nawilżająco-kojące do skóry wrażliwej i alergicznej 20 ml</text:p>
          </table:table-cell>
          <table:table-cell table:style-name="ce8" office:value-type="float" office:value="10512">
            <text:p>10512</text:p>
          </table:table-cell>
          <table:table-cell table:style-name="ce9" office:value-type="string">
            <text:p>2026-03-15 11:47:26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37.XXX.XXX.7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eparaty medycyny naturalnej</text:p>
          </table:table-cell>
          <table:table-cell table:style-name="ce9" office:value-type="string">
            <text:p>Tisane FARM Żel propolisowy 6g</text:p>
          </table:table-cell>
          <table:table-cell table:style-name="ce8" office:value-type="float" office:value="18277">
            <text:p>18277</text:p>
          </table:table-cell>
          <table:table-cell table:style-name="ce9" office:value-type="string">
            <text:p>2026-03-15 11:48:41</text:p>
          </table:table-cell>
          <table:table-cell table:style-name="ce10" office:value-type="currency" office:currency="PLN" office:value="0.88">
            <text:p>0,88 zł</text:p>
          </table:table-cell>
          <table:table-cell table:style-name="ce8"/>
          <table:table-cell table:style-name="ce10" office:value-type="currency" office:currency="PLN" office:value="0.88">
            <text:p>0,88 zł</text:p>
          </table:table-cell>
          <table:table-cell table:style-name="ce8"/>
          <table:table-cell table:style-name="ce9" office:value-type="string">
            <text:p>89.XXX.XXX.X9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ArgenTussin Gardło, smak miętowo-cytrynowy 16 pastylek</text:p>
          </table:table-cell>
          <table:table-cell table:style-name="ce8" office:value-type="float" office:value="13334">
            <text:p>13334</text:p>
          </table:table-cell>
          <table:table-cell table:style-name="ce9" office:value-type="string">
            <text:p>2026-03-15 11:48:55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31.XXX.XXX.X1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eparaty medycyny naturalnej</text:p>
          </table:table-cell>
          <table:table-cell table:style-name="ce9" office:value-type="string">
            <text:p>Tisane FARM Żel propolisowy 6g</text:p>
          </table:table-cell>
          <table:table-cell table:style-name="ce8" office:value-type="float" office:value="18277">
            <text:p>18277</text:p>
          </table:table-cell>
          <table:table-cell table:style-name="ce9" office:value-type="string">
            <text:p>2026-03-15 11:49:11</text:p>
          </table:table-cell>
          <table:table-cell table:style-name="ce10" office:value-type="currency" office:currency="PLN" office:value="0.88">
            <text:p>0,88 zł</text:p>
          </table:table-cell>
          <table:table-cell table:style-name="ce8"/>
          <table:table-cell table:style-name="ce10" office:value-type="currency" office:currency="PLN" office:value="0.88">
            <text:p>0,88 zł</text:p>
          </table:table-cell>
          <table:table-cell table:style-name="ce8"/>
          <table:table-cell table:style-name="ce9" office:value-type="string">
            <text:p>89.XXX.XXX.X9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Nizoral Krem 20mg/g 30 g</text:p>
          </table:table-cell>
          <table:table-cell table:style-name="ce8" office:value-type="float" office:value="9594">
            <text:p>9594</text:p>
          </table:table-cell>
          <table:table-cell table:style-name="ce9" office:value-type="string">
            <text:p>2026-03-15 11:50:34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93.XXX.XXX.X8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ciwbólowe</text:p>
          </table:table-cell>
          <table:table-cell table:style-name="ce9" office:value-type="string">
            <text:p>Alka-Seltzer 324 mg tabletki musujące 10 szt.</text:p>
          </table:table-cell>
          <table:table-cell table:style-name="ce8" office:value-type="float" office:value="15060">
            <text:p>15060</text:p>
          </table:table-cell>
          <table:table-cell table:style-name="ce9" office:value-type="string">
            <text:p>2026-03-15 11:51:37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31.XXX.XXX.4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 i trawienie</text:p>
          </table:table-cell>
          <table:table-cell table:style-name="ce9" office:value-type="string">
            <text:p>Estabiom Junior 20kaps.</text:p>
          </table:table-cell>
          <table:table-cell table:style-name="ce8" office:value-type="float" office:value="6953">
            <text:p>6953</text:p>
          </table:table-cell>
          <table:table-cell table:style-name="ce9" office:value-type="string">
            <text:p>2026-03-15 11:55:18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83.XXX.XXX.X2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Maść ichtiolowa 30g</text:p>
          </table:table-cell>
          <table:table-cell table:style-name="ce8" office:value-type="float" office:value="17225">
            <text:p>17225</text:p>
          </table:table-cell>
          <table:table-cell table:style-name="ce9" office:value-type="string">
            <text:p>2026-03-15 11:58:54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19X.XXX.XXX.X6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Otrivin Menthol 1mg/ml Aerozol do nosa 10 ml</text:p>
          </table:table-cell>
          <table:table-cell table:style-name="ce8" office:value-type="float" office:value="14886">
            <text:p>14886</text:p>
          </table:table-cell>
          <table:table-cell table:style-name="ce9" office:value-type="string">
            <text:p>2026-03-15 12:05:02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19X.XXX.XXX.X2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krążenia i serce</text:p>
          </table:table-cell>
          <table:table-cell table:style-name="ce9" office:value-type="string">
            <text:p>Berimal Forte 60kaps.</text:p>
          </table:table-cell>
          <table:table-cell table:style-name="ce8" office:value-type="float" office:value="19109">
            <text:p>19109</text:p>
          </table:table-cell>
          <table:table-cell table:style-name="ce9" office:value-type="string">
            <text:p>2026-03-15 12:05:59</text:p>
          </table:table-cell>
          <table:table-cell table:style-name="ce10" office:value-type="currency" office:currency="PLN" office:value="0.83">
            <text:p>0,83 zł</text:p>
          </table:table-cell>
          <table:table-cell table:style-name="ce8"/>
          <table:table-cell table:style-name="ce10" office:value-type="currency" office:currency="PLN" office:value="0.83">
            <text:p>0,83 zł</text:p>
          </table:table-cell>
          <table:table-cell table:style-name="ce8"/>
          <table:table-cell table:style-name="ce9" office:value-type="string">
            <text:p>83.XXX.XXX.9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Otrivin Menthol 1mg/ml Aerozol do nosa 10 ml</text:p>
          </table:table-cell>
          <table:table-cell table:style-name="ce8" office:value-type="float" office:value="14886">
            <text:p>14886</text:p>
          </table:table-cell>
          <table:table-cell table:style-name="ce9" office:value-type="string">
            <text:p>2026-03-15 12:06:38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17X.XXX.XXX.X1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Alergia</text:p>
          </table:table-cell>
          <table:table-cell table:style-name="ce9" office:value-type="string">
            <text:p>Cetip 10 tabl.</text:p>
          </table:table-cell>
          <table:table-cell table:style-name="ce8" office:value-type="float" office:value="394">
            <text:p>394</text:p>
          </table:table-cell>
          <table:table-cell table:style-name="ce9" office:value-type="string">
            <text:p>2026-03-15 12:07:02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37.XXX.XXX.X4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Avene HYDRANCE UV Lekki krem nawilżający SPF 30 40ml</text:p>
          </table:table-cell>
          <table:table-cell table:style-name="ce8" office:value-type="float" office:value="9958">
            <text:p>9958</text:p>
          </table:table-cell>
          <table:table-cell table:style-name="ce9" office:value-type="string">
            <text:p>2026-03-15 12:07:39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21X.XXX.XXX.X2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nerały i witaminy</text:p>
          </table:table-cell>
          <table:table-cell table:style-name="ce9" office:value-type="string">
            <text:p>BODYMAX PLUS Multiwitamina Odporność Energia 200 tab.</text:p>
          </table:table-cell>
          <table:table-cell table:style-name="ce8" office:value-type="float" office:value="16252">
            <text:p>16252</text:p>
          </table:table-cell>
          <table:table-cell table:style-name="ce9" office:value-type="string">
            <text:p>2026-03-15 12:11:33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83.XXX.XXX.3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łciowy i moczowy</text:p>
          </table:table-cell>
          <table:table-cell table:style-name="ce9" office:value-type="string">
            <text:p>Miovelia Nac 15 kaps.</text:p>
          </table:table-cell>
          <table:table-cell table:style-name="ce8" office:value-type="float" office:value="11821">
            <text:p>11821</text:p>
          </table:table-cell>
          <table:table-cell table:style-name="ce9" office:value-type="string">
            <text:p>2026-03-15 12:15:07</text:p>
          </table:table-cell>
          <table:table-cell table:style-name="ce10" office:value-type="currency" office:currency="PLN" office:value="0.75">
            <text:p>0,75 zł</text:p>
          </table:table-cell>
          <table:table-cell table:style-name="ce8"/>
          <table:table-cell table:style-name="ce10" office:value-type="currency" office:currency="PLN" office:value="0.75">
            <text:p>0,75 zł</text:p>
          </table:table-cell>
          <table:table-cell table:style-name="ce8"/>
          <table:table-cell table:style-name="ce9" office:value-type="string">
            <text:p>18X.XXX.XXX.X1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łciowy i moczowy</text:p>
          </table:table-cell>
          <table:table-cell table:style-name="ce9" office:value-type="string">
            <text:p>Miovelia Nac 15 kaps.</text:p>
          </table:table-cell>
          <table:table-cell table:style-name="ce8" office:value-type="float" office:value="11821">
            <text:p>11821</text:p>
          </table:table-cell>
          <table:table-cell table:style-name="ce9" office:value-type="string">
            <text:p>2026-03-15 12:16:33</text:p>
          </table:table-cell>
          <table:table-cell table:style-name="ce10" office:value-type="currency" office:currency="PLN" office:value="0.75">
            <text:p>0,75 zł</text:p>
          </table:table-cell>
          <table:table-cell table:style-name="ce8"/>
          <table:table-cell table:style-name="ce10" office:value-type="currency" office:currency="PLN" office:value="0.75">
            <text:p>0,75 zł</text:p>
          </table:table-cell>
          <table:table-cell table:style-name="ce8"/>
          <table:table-cell table:style-name="ce9" office:value-type="string">
            <text:p>18X.XXX.XXX.X1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ciała</text:p>
          </table:table-cell>
          <table:table-cell table:style-name="ce9" office:value-type="string">
            <text:p>Avene Xeracalm A.D Krem uzupełniający lipidy 400ml</text:p>
          </table:table-cell>
          <table:table-cell table:style-name="ce8" office:value-type="float" office:value="19702">
            <text:p>19702</text:p>
          </table:table-cell>
          <table:table-cell table:style-name="ce9" office:value-type="string">
            <text:p>2026-03-15 12:17:20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77.XXX.XXX.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Avene HYDRANCE UV Lekki krem nawilżający SPF 30 40ml</text:p>
          </table:table-cell>
          <table:table-cell table:style-name="ce8" office:value-type="float" office:value="9958">
            <text:p>9958</text:p>
          </table:table-cell>
          <table:table-cell table:style-name="ce9" office:value-type="string">
            <text:p>2026-03-15 12:17:32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21X.XXX.XXX.X2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Otrivin Menthol 1mg/ml Aerozol do nosa 10 ml</text:p>
          </table:table-cell>
          <table:table-cell table:style-name="ce8" office:value-type="float" office:value="14886">
            <text:p>14886</text:p>
          </table:table-cell>
          <table:table-cell table:style-name="ce9" office:value-type="string">
            <text:p>2026-03-15 12:22:50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37.XXX.XXX.1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Zestawy dla kobiet</text:p>
          </table:table-cell>
          <table:table-cell table:style-name="ce9" office:value-type="string">
            <text:p>Klorane Chinina Zestaw Przeciw Wypadaniu Włosów – Szampon, 400 ml + Odżywka, 200 ml</text:p>
          </table:table-cell>
          <table:table-cell table:style-name="ce8" office:value-type="float" office:value="32607">
            <text:p>32607</text:p>
          </table:table-cell>
          <table:table-cell table:style-name="ce9" office:value-type="string">
            <text:p>2026-03-15 12:24:29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5.XXX.XXX.3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Opaski elastyczne</text:p>
          </table:table-cell>
          <table:table-cell table:style-name="ce9" office:value-type="string">
            <text:p>Pani Teresa Opaska Elastyczna Nadgarstek Długa M</text:p>
          </table:table-cell>
          <table:table-cell table:style-name="ce8" office:value-type="float" office:value="4799">
            <text:p>4799</text:p>
          </table:table-cell>
          <table:table-cell table:style-name="ce9" office:value-type="string">
            <text:p>2026-03-15 12:24:34</text:p>
          </table:table-cell>
          <table:table-cell table:style-name="ce10" office:value-type="currency" office:currency="PLN" office:value="0.67">
            <text:p>0,67 zł</text:p>
          </table:table-cell>
          <table:table-cell table:style-name="ce8"/>
          <table:table-cell table:style-name="ce10" office:value-type="currency" office:currency="PLN" office:value="0.67">
            <text:p>0,67 zł</text:p>
          </table:table-cell>
          <table:table-cell table:style-name="ce8"/>
          <table:table-cell table:style-name="ce9" office:value-type="string">
            <text:p>46.XXX.XXX.1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nerwowy</text:p>
          </table:table-cell>
          <table:table-cell table:style-name="ce9" office:value-type="string">
            <text:p>Tabletki NervoCalm Forte 20 szt.</text:p>
          </table:table-cell>
          <table:table-cell table:style-name="ce8" office:value-type="float" office:value="12744">
            <text:p>12744</text:p>
          </table:table-cell>
          <table:table-cell table:style-name="ce9" office:value-type="string">
            <text:p>2026-03-15 12:24:48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91.XXX.XXX.X0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łciowy i moczowy</text:p>
          </table:table-cell>
          <table:table-cell table:style-name="ce9" office:value-type="string">
            <text:p>Miovelia Nac 15 kaps.</text:p>
          </table:table-cell>
          <table:table-cell table:style-name="ce8" office:value-type="float" office:value="11821">
            <text:p>11821</text:p>
          </table:table-cell>
          <table:table-cell table:style-name="ce9" office:value-type="string">
            <text:p>2026-03-15 12:25:10</text:p>
          </table:table-cell>
          <table:table-cell table:style-name="ce10" office:value-type="currency" office:currency="PLN" office:value="0.75">
            <text:p>0,75 zł</text:p>
          </table:table-cell>
          <table:table-cell table:style-name="ce8"/>
          <table:table-cell table:style-name="ce10" office:value-type="currency" office:currency="PLN" office:value="0.75">
            <text:p>0,75 zł</text:p>
          </table:table-cell>
          <table:table-cell table:style-name="ce8"/>
          <table:table-cell table:style-name="ce9" office:value-type="string">
            <text:p>18X.XXX.XXX.X2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AVENE BARDZO WYSOKA OCHRONA CLEANANCE Koloryzujący SPF50+ 50ml</text:p>
          </table:table-cell>
          <table:table-cell table:style-name="ce8" office:value-type="float" office:value="13971">
            <text:p>13971</text:p>
          </table:table-cell>
          <table:table-cell table:style-name="ce9" office:value-type="string">
            <text:p>2026-03-15 12:28:49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5.XXX.XXX.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Serum do twarzy</text:p>
          </table:table-cell>
          <table:table-cell table:style-name="ce9" office:value-type="string">
            <text:p>Niacynobaza 25% Skoncentrowane serum z niacynamidem 30g</text:p>
          </table:table-cell>
          <table:table-cell table:style-name="ce8" office:value-type="float" office:value="32421">
            <text:p>32421</text:p>
          </table:table-cell>
          <table:table-cell table:style-name="ce9" office:value-type="string">
            <text:p>2026-03-15 12:32:23</text:p>
          </table:table-cell>
          <table:table-cell table:style-name="ce10" office:value-type="currency" office:currency="PLN" office:value="1.03">
            <text:p>1,03 zł</text:p>
          </table:table-cell>
          <table:table-cell table:style-name="ce8"/>
          <table:table-cell table:style-name="ce10" office:value-type="currency" office:currency="PLN" office:value="1.03">
            <text:p>1,03 zł</text:p>
          </table:table-cell>
          <table:table-cell table:style-name="ce8"/>
          <table:table-cell table:style-name="ce9" office:value-type="string">
            <text:p>94.XXX.XXX.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zieci i niemowlęta</text:p>
          </table:table-cell>
          <table:table-cell table:style-name="ce9" office:value-type="string">
            <text:p>Reckitt Benckiser Nurofen Dla Dzieci Forte Trus 150ml</text:p>
          </table:table-cell>
          <table:table-cell table:style-name="ce8" office:value-type="float" office:value="10768">
            <text:p>10768</text:p>
          </table:table-cell>
          <table:table-cell table:style-name="ce9" office:value-type="string">
            <text:p>2026-03-15 12:32:41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31.XXX.XXX.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nerwowy</text:p>
          </table:table-cell>
          <table:table-cell table:style-name="ce9" office:value-type="string">
            <text:p>Tabletki NervoCalm Forte 20 szt.</text:p>
          </table:table-cell>
          <table:table-cell table:style-name="ce8" office:value-type="float" office:value="12744">
            <text:p>12744</text:p>
          </table:table-cell>
          <table:table-cell table:style-name="ce9" office:value-type="string">
            <text:p>2026-03-15 12:34:37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91.XXX.XXX.X0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nerwowy</text:p>
          </table:table-cell>
          <table:table-cell table:style-name="ce9" office:value-type="string">
            <text:p>Tabletki NervoCalm Forte 20 szt.</text:p>
          </table:table-cell>
          <table:table-cell table:style-name="ce8" office:value-type="float" office:value="12744">
            <text:p>12744</text:p>
          </table:table-cell>
          <table:table-cell table:style-name="ce9" office:value-type="string">
            <text:p>2026-03-15 12:34:37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31.XXX.XXX.4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Maść Szałwiowa 25 G</text:p>
          </table:table-cell>
          <table:table-cell table:style-name="ce8" office:value-type="float" office:value="9164">
            <text:p>9164</text:p>
          </table:table-cell>
          <table:table-cell table:style-name="ce9" office:value-type="string">
            <text:p>2026-03-15 12:36:16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18X.XXX.XXX.5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nerały i witaminy</text:p>
          </table:table-cell>
          <table:table-cell table:style-name="ce9" office:value-type="string">
            <text:p>BODYMAX PLUS Multiwitamina Odporność Energia 200 tab.</text:p>
          </table:table-cell>
          <table:table-cell table:style-name="ce8" office:value-type="float" office:value="16252">
            <text:p>16252</text:p>
          </table:table-cell>
          <table:table-cell table:style-name="ce9" office:value-type="string">
            <text:p>2026-03-15 12:36:59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83.XXX.XXX.3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Zioła</text:p>
          </table:table-cell>
          <table:table-cell table:style-name="ce9" office:value-type="string">
            <text:p>Zioł.Koszyczek Arniki zioło pojed. 25 g</text:p>
          </table:table-cell>
          <table:table-cell table:style-name="ce8" office:value-type="float" office:value="18460">
            <text:p>18460</text:p>
          </table:table-cell>
          <table:table-cell table:style-name="ce9" office:value-type="string">
            <text:p>2026-03-15 12:37:19</text:p>
          </table:table-cell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9" office:value-type="string">
            <text:p>78.XXX.XXX.8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Opatrunki</text:p>
          </table:table-cell>
          <table:table-cell table:style-name="ce9" office:value-type="string">
            <text:p>Opatr.Vliwazell wysoce chłonny 10x20 25szt</text:p>
          </table:table-cell>
          <table:table-cell table:style-name="ce8" office:value-type="float" office:value="12823">
            <text:p>12823</text:p>
          </table:table-cell>
          <table:table-cell table:style-name="ce9" office:value-type="string">
            <text:p>2026-03-15 12:43:33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37.XXX.XXX.X4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łciowy i moczowy</text:p>
          </table:table-cell>
          <table:table-cell table:style-name="ce9" office:value-type="string">
            <text:p>CLIMAFEM Plus 30 tabl.</text:p>
          </table:table-cell>
          <table:table-cell table:style-name="ce8" office:value-type="float" office:value="32274">
            <text:p>32274</text:p>
          </table:table-cell>
          <table:table-cell table:style-name="ce9" office:value-type="string">
            <text:p>2026-03-15 12:46:25</text:p>
          </table:table-cell>
          <table:table-cell table:style-name="ce10" office:value-type="currency" office:currency="PLN" office:value="0.75">
            <text:p>0,75 zł</text:p>
          </table:table-cell>
          <table:table-cell table:style-name="ce8"/>
          <table:table-cell table:style-name="ce10" office:value-type="currency" office:currency="PLN" office:value="0.75">
            <text:p>0,75 zł</text:p>
          </table:table-cell>
          <table:table-cell table:style-name="ce8"/>
          <table:table-cell table:style-name="ce9" office:value-type="string">
            <text:p>95.XXX.XXX.6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Opatrunki</text:p>
          </table:table-cell>
          <table:table-cell table:style-name="ce9" office:value-type="string">
            <text:p>BACTIGRAS Opatrunek Gazowy Nasączony Parafiną I Chlorheksydyną 10cm x 10cm 10szt.</text:p>
          </table:table-cell>
          <table:table-cell table:style-name="ce8" office:value-type="float" office:value="9185">
            <text:p>9185</text:p>
          </table:table-cell>
          <table:table-cell table:style-name="ce9" office:value-type="string">
            <text:p>2026-03-15 12:46:29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79.XXX.XXX.9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łciowy i moczowy</text:p>
          </table:table-cell>
          <table:table-cell table:style-name="ce9" office:value-type="string">
            <text:p>UROFEM Control 60 tabl.</text:p>
          </table:table-cell>
          <table:table-cell table:style-name="ce8" office:value-type="float" office:value="32306">
            <text:p>32306</text:p>
          </table:table-cell>
          <table:table-cell table:style-name="ce9" office:value-type="string">
            <text:p>2026-03-15 12:48:45</text:p>
          </table:table-cell>
          <table:table-cell table:style-name="ce10" office:value-type="currency" office:currency="PLN" office:value="0.75">
            <text:p>0,75 zł</text:p>
          </table:table-cell>
          <table:table-cell table:style-name="ce8"/>
          <table:table-cell table:style-name="ce10" office:value-type="currency" office:currency="PLN" office:value="0.75">
            <text:p>0,75 zł</text:p>
          </table:table-cell>
          <table:table-cell table:style-name="ce8"/>
          <table:table-cell table:style-name="ce9" office:value-type="string">
            <text:p>83.XXX.XXX.1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Otrivin Ipra Max 0,5mg + 0,6mg Aerozol do nosa 10ml</text:p>
          </table:table-cell>
          <table:table-cell table:style-name="ce8" office:value-type="float" office:value="6211">
            <text:p>6211</text:p>
          </table:table-cell>
          <table:table-cell table:style-name="ce9" office:value-type="string">
            <text:p>2026-03-15 12:50:12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83.XXX.XXX.X9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Uniben Silver aerozol 30ml</text:p>
          </table:table-cell>
          <table:table-cell table:style-name="ce8" office:value-type="float" office:value="6908">
            <text:p>6908</text:p>
          </table:table-cell>
          <table:table-cell table:style-name="ce9" office:value-type="string">
            <text:p>2026-03-15 12:51:30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16X.XXX.XXX.7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Emolium INTENSIVE Krem specjalny 75ml</text:p>
          </table:table-cell>
          <table:table-cell table:style-name="ce8" office:value-type="float" office:value="3892">
            <text:p>3892</text:p>
          </table:table-cell>
          <table:table-cell table:style-name="ce9" office:value-type="string">
            <text:p>2026-03-15 12:53:52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37.XXX.XXX.7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włosów</text:p>
          </table:table-cell>
          <table:table-cell table:style-name="ce9" office:value-type="string">
            <text:p>Vichy Dercos Szampon Przeciwłupieżowy Włosy Suche Uzupełnienie 500ml</text:p>
          </table:table-cell>
          <table:table-cell table:style-name="ce8" office:value-type="float" office:value="35697">
            <text:p>35697</text:p>
          </table:table-cell>
          <table:table-cell table:style-name="ce9" office:value-type="string">
            <text:p>2026-03-15 12:54:28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37.XXX.XXX.8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Glukometry i akcesoria dla diabetyków</text:p>
          </table:table-cell>
          <table:table-cell table:style-name="ce9" office:value-type="string">
            <text:p>Accu-Chek Nakłuwacz FastClix + 6 lancetów</text:p>
          </table:table-cell>
          <table:table-cell table:style-name="ce8" office:value-type="float" office:value="8385">
            <text:p>8385</text:p>
          </table:table-cell>
          <table:table-cell table:style-name="ce9" office:value-type="string">
            <text:p>2026-03-15 13:05:12</text:p>
          </table:table-cell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9" office:value-type="string">
            <text:p>83.XXX.XXX.X9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Balsamy do ust</text:p>
          </table:table-cell>
          <table:table-cell table:style-name="ce9" office:value-type="string">
            <text:p>Rada Blistex Balsam Do Ust Nourish sztyft 3,7G</text:p>
          </table:table-cell>
          <table:table-cell table:style-name="ce8" office:value-type="float" office:value="16242">
            <text:p>16242</text:p>
          </table:table-cell>
          <table:table-cell table:style-name="ce9" office:value-type="string">
            <text:p>2026-03-15 13:09:16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79.XXX.XXX.X8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nerwowy i pamięć</text:p>
          </table:table-cell>
          <table:table-cell table:style-name="ce9" office:value-type="string">
            <text:p>Tabletki uspokajające AMS 30 szt.</text:p>
          </table:table-cell>
          <table:table-cell table:style-name="ce8" office:value-type="float" office:value="18200">
            <text:p>18200</text:p>
          </table:table-cell>
          <table:table-cell table:style-name="ce9" office:value-type="string">
            <text:p>2026-03-15 13:12:24</text:p>
          </table:table-cell>
          <table:table-cell table:style-name="ce10" office:value-type="currency" office:currency="PLN" office:value="0.74">
            <text:p>0,74 zł</text:p>
          </table:table-cell>
          <table:table-cell table:style-name="ce8"/>
          <table:table-cell table:style-name="ce10" office:value-type="currency" office:currency="PLN" office:value="0.74">
            <text:p>0,74 zł</text:p>
          </table:table-cell>
          <table:table-cell table:style-name="ce8"/>
          <table:table-cell table:style-name="ce9" office:value-type="string">
            <text:p>37.XXX.XXX.X9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Dla dziecka</text:p>
          </table:table-cell>
          <table:table-cell table:style-name="ce9" office:value-type="string">
            <text:p>Mleka początkowe</text:p>
          </table:table-cell>
          <table:table-cell table:style-name="ce9" office:value-type="string">
            <text:p>NESTLE NAN OPTIPRO Plus 1 HM-O Mleko Początkowe dla niemowląt od urodzenia 400g</text:p>
          </table:table-cell>
          <table:table-cell table:style-name="ce8" office:value-type="float" office:value="17320">
            <text:p>17320</text:p>
          </table:table-cell>
          <table:table-cell table:style-name="ce9" office:value-type="string">
            <text:p>2026-03-15 13:16:30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93.XXX.XXX.X2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</text:p>
          </table:table-cell>
          <table:table-cell table:style-name="ce9" office:value-type="string">
            <text:p>Rennie Antiacidum o smaku miętowym 48 tabletek do ssania</text:p>
          </table:table-cell>
          <table:table-cell table:style-name="ce8" office:value-type="float" office:value="15795">
            <text:p>15795</text:p>
          </table:table-cell>
          <table:table-cell table:style-name="ce9" office:value-type="string">
            <text:p>2026-03-15 13:18:34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5.XXX.XXX.X1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Otrivin Menthol 1mg/ml Aerozol do nosa 10 ml</text:p>
          </table:table-cell>
          <table:table-cell table:style-name="ce8" office:value-type="float" office:value="14886">
            <text:p>14886</text:p>
          </table:table-cell>
          <table:table-cell table:style-name="ce9" office:value-type="string">
            <text:p>2026-03-15 13:19:25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77.XXX.XXX.X4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nerały i witaminy</text:p>
          </table:table-cell>
          <table:table-cell table:style-name="ce9" office:value-type="string">
            <text:p>MULTIVITAMINUM AMS FORTE Tabletki zwiększony niedobór witamin 90tabl.</text:p>
          </table:table-cell>
          <table:table-cell table:style-name="ce8" office:value-type="float" office:value="17354">
            <text:p>17354</text:p>
          </table:table-cell>
          <table:table-cell table:style-name="ce9" office:value-type="string">
            <text:p>2026-03-15 13:20:04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46.XXX.XXX.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krążenia i serce</text:p>
          </table:table-cell>
          <table:table-cell table:style-name="ce9" office:value-type="string">
            <text:p>Berimal Forte 60kaps.</text:p>
          </table:table-cell>
          <table:table-cell table:style-name="ce8" office:value-type="float" office:value="19109">
            <text:p>19109</text:p>
          </table:table-cell>
          <table:table-cell table:style-name="ce9" office:value-type="string">
            <text:p>2026-03-15 13:23:52</text:p>
          </table:table-cell>
          <table:table-cell table:style-name="ce10" office:value-type="currency" office:currency="PLN" office:value="0.83">
            <text:p>0,83 zł</text:p>
          </table:table-cell>
          <table:table-cell table:style-name="ce8"/>
          <table:table-cell table:style-name="ce10" office:value-type="currency" office:currency="PLN" office:value="0.83">
            <text:p>0,83 zł</text:p>
          </table:table-cell>
          <table:table-cell table:style-name="ce8"/>
          <table:table-cell table:style-name="ce9" office:value-type="string">
            <text:p>91.XXX.XXX.6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Zestawy dermokosmetyków</text:p>
          </table:table-cell>
          <table:table-cell table:style-name="ce9" office:value-type="string">
            <text:p>Avene Hyaluron Activ B3 Krem Na Noc 50ml + Pod Oczy 15ml</text:p>
          </table:table-cell>
          <table:table-cell table:style-name="ce8" office:value-type="float" office:value="32646">
            <text:p>32646</text:p>
          </table:table-cell>
          <table:table-cell table:style-name="ce9" office:value-type="string">
            <text:p>2026-03-15 13:24:58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83.XXX.XXX.X4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Zestawy dermokosmetyków</text:p>
          </table:table-cell>
          <table:table-cell table:style-name="ce9" office:value-type="string">
            <text:p>Avene Dermabsolu Krem Na Noc 50ml + Pod Oczy 15ml</text:p>
          </table:table-cell>
          <table:table-cell table:style-name="ce8" office:value-type="float" office:value="32643">
            <text:p>32643</text:p>
          </table:table-cell>
          <table:table-cell table:style-name="ce9" office:value-type="string">
            <text:p>2026-03-15 13:26:00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5.XXX.XXX.1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nerwowy</text:p>
          </table:table-cell>
          <table:table-cell table:style-name="ce9" office:value-type="string">
            <text:p>Tabletki NervoCalm Forte 20 szt.</text:p>
          </table:table-cell>
          <table:table-cell table:style-name="ce8" office:value-type="float" office:value="12744">
            <text:p>12744</text:p>
          </table:table-cell>
          <table:table-cell table:style-name="ce9" office:value-type="string">
            <text:p>2026-03-15 13:28:18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17X.XXX.XXX.X2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ciała</text:p>
          </table:table-cell>
          <table:table-cell table:style-name="ce9" office:value-type="string">
            <text:p>Emolium DERMOCARE Emulsja na suchą skórę głowy 100ml</text:p>
          </table:table-cell>
          <table:table-cell table:style-name="ce8" office:value-type="float" office:value="335">
            <text:p>335</text:p>
          </table:table-cell>
          <table:table-cell table:style-name="ce9" office:value-type="string">
            <text:p>2026-03-15 13:34:06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37.XXX.XXX.5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zieci i niemowlęta</text:p>
          </table:table-cell>
          <table:table-cell table:style-name="ce9" office:value-type="string">
            <text:p>Juvit Multi krople doustne 10ml</text:p>
          </table:table-cell>
          <table:table-cell table:style-name="ce8" office:value-type="float" office:value="6099">
            <text:p>6099</text:p>
          </table:table-cell>
          <table:table-cell table:style-name="ce9" office:value-type="string">
            <text:p>2026-03-15 13:35:13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21X.XXX.XXX.1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 i trawienie</text:p>
          </table:table-cell>
          <table:table-cell table:style-name="ce9" office:value-type="string">
            <text:p>Puwer Slim Liver 30tabl.</text:p>
          </table:table-cell>
          <table:table-cell table:style-name="ce8" office:value-type="float" office:value="11857">
            <text:p>11857</text:p>
          </table:table-cell>
          <table:table-cell table:style-name="ce9" office:value-type="string">
            <text:p>2026-03-15 13:36:13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46.XXX.XXX.X0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nerwowy</text:p>
          </table:table-cell>
          <table:table-cell table:style-name="ce9" office:value-type="string">
            <text:p>Tabletki NervoCalm Forte 20 szt.</text:p>
          </table:table-cell>
          <table:table-cell table:style-name="ce8" office:value-type="float" office:value="12744">
            <text:p>12744</text:p>
          </table:table-cell>
          <table:table-cell table:style-name="ce9" office:value-type="string">
            <text:p>2026-03-15 13:37:57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18X.XXX.XXX.X6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Nizoral Krem 20mg/g 30 g</text:p>
          </table:table-cell>
          <table:table-cell table:style-name="ce8" office:value-type="float" office:value="9594">
            <text:p>9594</text:p>
          </table:table-cell>
          <table:table-cell table:style-name="ce9" office:value-type="string">
            <text:p>2026-03-15 13:38:41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46.XXX.XXX.X8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DUCRAY KERACNYL Repair Balsam do ust 15ml</text:p>
          </table:table-cell>
          <table:table-cell table:style-name="ce8" office:value-type="float" office:value="32640">
            <text:p>32640</text:p>
          </table:table-cell>
          <table:table-cell table:style-name="ce9" office:value-type="string">
            <text:p>2026-03-15 13:42:06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37.XXX.XXX.X1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nerwowy i pamięć</text:p>
          </table:table-cell>
          <table:table-cell table:style-name="ce9" office:value-type="string">
            <text:p>Tabletki NEOSEN Forte 30 szt.</text:p>
          </table:table-cell>
          <table:table-cell table:style-name="ce8" office:value-type="float" office:value="32291">
            <text:p>32291</text:p>
          </table:table-cell>
          <table:table-cell table:style-name="ce9" office:value-type="string">
            <text:p>2026-03-15 13:42:38</text:p>
          </table:table-cell>
          <table:table-cell table:style-name="ce10" office:value-type="currency" office:currency="PLN" office:value="0.74">
            <text:p>0,74 zł</text:p>
          </table:table-cell>
          <table:table-cell table:style-name="ce8"/>
          <table:table-cell table:style-name="ce10" office:value-type="currency" office:currency="PLN" office:value="0.74">
            <text:p>0,74 zł</text:p>
          </table:table-cell>
          <table:table-cell table:style-name="ce8"/>
          <table:table-cell table:style-name="ce9" office:value-type="string">
            <text:p>93.XXX.XXX.X7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Kosmetyki do opalania</text:p>
          </table:table-cell>
          <table:table-cell table:style-name="ce9" office:value-type="string">
            <text:p>Ziaja Sopot Sun Krem Przeciw Zmarszczkom Spf30 60 ml</text:p>
          </table:table-cell>
          <table:table-cell table:style-name="ce8" office:value-type="float" office:value="5749">
            <text:p>5749</text:p>
          </table:table-cell>
          <table:table-cell table:style-name="ce9" office:value-type="string">
            <text:p>2026-03-15 13:47:40</text:p>
          </table:table-cell>
          <table:table-cell table:style-name="ce10" office:value-type="currency" office:currency="PLN" office:value="0.89">
            <text:p>0,89 zł</text:p>
          </table:table-cell>
          <table:table-cell table:style-name="ce8"/>
          <table:table-cell table:style-name="ce10" office:value-type="currency" office:currency="PLN" office:value="0.89">
            <text:p>0,89 zł</text:p>
          </table:table-cell>
          <table:table-cell table:style-name="ce8"/>
          <table:table-cell table:style-name="ce9" office:value-type="string">
            <text:p>91.XXX.XXX.7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 i trawienie</text:p>
          </table:table-cell>
          <table:table-cell table:style-name="ce9" office:value-type="string">
            <text:p>Daopro 30 Minitabl. Dojelitowych</text:p>
          </table:table-cell>
          <table:table-cell table:style-name="ce8" office:value-type="float" office:value="19374">
            <text:p>19374</text:p>
          </table:table-cell>
          <table:table-cell table:style-name="ce9" office:value-type="string">
            <text:p>2026-03-15 13:47:53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37.XXX.XXX.X6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eparaty medycyny naturalnej</text:p>
          </table:table-cell>
          <table:table-cell table:style-name="ce9" office:value-type="string">
            <text:p>Tisane FARM Żel propolisowy 6g</text:p>
          </table:table-cell>
          <table:table-cell table:style-name="ce8" office:value-type="float" office:value="18277">
            <text:p>18277</text:p>
          </table:table-cell>
          <table:table-cell table:style-name="ce9" office:value-type="string">
            <text:p>2026-03-15 13:48:27</text:p>
          </table:table-cell>
          <table:table-cell table:style-name="ce10" office:value-type="currency" office:currency="PLN" office:value="0.88">
            <text:p>0,88 zł</text:p>
          </table:table-cell>
          <table:table-cell table:style-name="ce8"/>
          <table:table-cell table:style-name="ce10" office:value-type="currency" office:currency="PLN" office:value="0.88">
            <text:p>0,88 zł</text:p>
          </table:table-cell>
          <table:table-cell table:style-name="ce8"/>
          <table:table-cell table:style-name="ce9" office:value-type="string">
            <text:p>19X.XXX.XXX.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Biovena Health Panthenol Krem 30g</text:p>
          </table:table-cell>
          <table:table-cell table:style-name="ce8" office:value-type="float" office:value="14209">
            <text:p>14209</text:p>
          </table:table-cell>
          <table:table-cell table:style-name="ce9" office:value-type="string">
            <text:p>2026-03-15 13:49:59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84.XXX.XXX.X7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Zioła</text:p>
          </table:table-cell>
          <table:table-cell table:style-name="ce9" office:value-type="string">
            <text:p>Zioła Mnicha Na odchudzanie 20tbx2g</text:p>
          </table:table-cell>
          <table:table-cell table:style-name="ce8" office:value-type="float" office:value="18545">
            <text:p>18545</text:p>
          </table:table-cell>
          <table:table-cell table:style-name="ce9" office:value-type="string">
            <text:p>2026-03-15 13:50:22</text:p>
          </table:table-cell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9" office:value-type="string">
            <text:p>31.XXX.XXX.6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moczowy i płciowy</text:p>
          </table:table-cell>
          <table:table-cell table:style-name="ce9" office:value-type="string">
            <text:p>Gynoxin Optima 200mg 3kaps.</text:p>
          </table:table-cell>
          <table:table-cell table:style-name="ce8" office:value-type="float" office:value="9579">
            <text:p>9579</text:p>
          </table:table-cell>
          <table:table-cell table:style-name="ce9" office:value-type="string">
            <text:p>2026-03-15 13:55:21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46.XXX.XXX.1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moczowy i płciowy</text:p>
          </table:table-cell>
          <table:table-cell table:style-name="ce9" office:value-type="string">
            <text:p>Gynoxin Optima 200mg 3kaps.</text:p>
          </table:table-cell>
          <table:table-cell table:style-name="ce8" office:value-type="float" office:value="9579">
            <text:p>9579</text:p>
          </table:table-cell>
          <table:table-cell table:style-name="ce9" office:value-type="string">
            <text:p>2026-03-15 13:56:04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46.XXX.XXX.1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Dla dziecka</text:p>
          </table:table-cell>
          <table:table-cell table:style-name="ce9" office:value-type="string">
            <text:p>Mleka początkowe</text:p>
          </table:table-cell>
          <table:table-cell table:style-name="ce9" office:value-type="string">
            <text:p>NESTLE NAN OPTIPRO Plus 1 HM-O Mleko Początkowe dla niemowląt od urodzenia W Płynie 32x70ml</text:p>
          </table:table-cell>
          <table:table-cell table:style-name="ce8" office:value-type="float" office:value="17321">
            <text:p>17321</text:p>
          </table:table-cell>
          <table:table-cell table:style-name="ce9" office:value-type="string">
            <text:p>2026-03-15 13:57:53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37.XXX.XXX.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Dermedic Sunbrella Fotostabilny Krem Ochronny Do Twarzy SPF50+ Skóra tłusta i mieszana 50 g</text:p>
          </table:table-cell>
          <table:table-cell table:style-name="ce8" office:value-type="float" office:value="3703">
            <text:p>3703</text:p>
          </table:table-cell>
          <table:table-cell table:style-name="ce9" office:value-type="string">
            <text:p>2026-03-15 14:05:05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46.XXX.XXX.X8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Nizoral Krem 20mg/g 30 g</text:p>
          </table:table-cell>
          <table:table-cell table:style-name="ce8" office:value-type="float" office:value="9594">
            <text:p>9594</text:p>
          </table:table-cell>
          <table:table-cell table:style-name="ce9" office:value-type="string">
            <text:p>2026-03-15 14:07:16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83.XXX.XXX.5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ciała</text:p>
          </table:table-cell>
          <table:table-cell table:style-name="ce9" office:value-type="string">
            <text:p>AFLOFARM Nivelium med krem dermatologiczny 250ml</text:p>
          </table:table-cell>
          <table:table-cell table:style-name="ce8" office:value-type="float" office:value="8641">
            <text:p>8641</text:p>
          </table:table-cell>
          <table:table-cell table:style-name="ce9" office:value-type="string">
            <text:p>2026-03-15 14:08:50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17X.XXX.XXX.2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ęśnie, stawy i kości</text:p>
          </table:table-cell>
          <table:table-cell table:style-name="ce9" office:value-type="string">
            <text:p>Borowina Lecznicza Pasta 1 Kg</text:p>
          </table:table-cell>
          <table:table-cell table:style-name="ce8" office:value-type="float" office:value="4899">
            <text:p>4899</text:p>
          </table:table-cell>
          <table:table-cell table:style-name="ce9" office:value-type="string">
            <text:p>2026-03-15 14:10:12</text:p>
          </table:table-cell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9" office:value-type="string">
            <text:p>18X.XXX.XXX.X4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Dla dziecka</text:p>
          </table:table-cell>
          <table:table-cell table:style-name="ce9" office:value-type="string">
            <text:p>Kosmetyki dla dzieci i niemowląt</text:p>
          </table:table-cell>
          <table:table-cell table:style-name="ce9" office:value-type="string">
            <text:p>Biobaby Dentinox Żel Na Ząbkowanie Łagodzący</text:p>
          </table:table-cell>
          <table:table-cell table:style-name="ce8" office:value-type="float" office:value="9256">
            <text:p>9256</text:p>
          </table:table-cell>
          <table:table-cell table:style-name="ce9" office:value-type="string">
            <text:p>2026-03-15 14:10:18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18X.XXX.XXX.8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Glukometry i akcesoria dla diabetyków</text:p>
          </table:table-cell>
          <table:table-cell table:style-name="ce9" office:value-type="string">
            <text:p>Accu-Chek Nakłuwacz FastClix + 6 lancetów</text:p>
          </table:table-cell>
          <table:table-cell table:style-name="ce8" office:value-type="float" office:value="8385">
            <text:p>8385</text:p>
          </table:table-cell>
          <table:table-cell table:style-name="ce9" office:value-type="string">
            <text:p>2026-03-15 14:11:31</text:p>
          </table:table-cell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9" office:value-type="string">
            <text:p>18X.XXX.XXX.1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Opatrunki</text:p>
          </table:table-cell>
          <table:table-cell table:style-name="ce9" office:value-type="string">
            <text:p>Stop Hemo Tampony hemostatyczne <text:s/>5szt.</text:p>
          </table:table-cell>
          <table:table-cell table:style-name="ce8" office:value-type="float" office:value="11602">
            <text:p>11602</text:p>
          </table:table-cell>
          <table:table-cell table:style-name="ce9" office:value-type="string">
            <text:p>2026-03-15 14:11:56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10X.XXX.XXX.4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Suplementy na wzrok i słuch</text:p>
          </table:table-cell>
          <table:table-cell table:style-name="ce9" office:value-type="string">
            <text:p>Aronta 30 tabl</text:p>
          </table:table-cell>
          <table:table-cell table:style-name="ce8" office:value-type="float" office:value="658">
            <text:p>658</text:p>
          </table:table-cell>
          <table:table-cell table:style-name="ce9" office:value-type="string">
            <text:p>2026-03-15 14:12:28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15X.XXX.XXX.1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Akcesoria do inhalatorów</text:p>
          </table:table-cell>
          <table:table-cell table:style-name="ce9" office:value-type="string">
            <text:p>Diagnosis Zestaw Akcesoriów Do Inhalacji Dla Dorosłych Z Regulacją Wielkości Cząsteczek</text:p>
          </table:table-cell>
          <table:table-cell table:style-name="ce8" office:value-type="float" office:value="18525">
            <text:p>18525</text:p>
          </table:table-cell>
          <table:table-cell table:style-name="ce9" office:value-type="string">
            <text:p>2026-03-15 14:14:37</text:p>
          </table:table-cell>
          <table:table-cell table:style-name="ce10" office:value-type="currency" office:currency="PLN" office:value="0.76">
            <text:p>0,76 zł</text:p>
          </table:table-cell>
          <table:table-cell table:style-name="ce8"/>
          <table:table-cell table:style-name="ce10" office:value-type="currency" office:currency="PLN" office:value="0.76">
            <text:p>0,76 zł</text:p>
          </table:table-cell>
          <table:table-cell table:style-name="ce8"/>
          <table:table-cell table:style-name="ce9" office:value-type="string">
            <text:p>84.XXX.XXX.X4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Zestawy dermokosmetyków</text:p>
          </table:table-cell>
          <table:table-cell table:style-name="ce9" office:value-type="string">
            <text:p>Krem Nuxe Prodigieuse Florale Zestaw z kosmetyczką podróżną 2024</text:p>
          </table:table-cell>
          <table:table-cell table:style-name="ce8" office:value-type="float" office:value="28311">
            <text:p>28311</text:p>
          </table:table-cell>
          <table:table-cell table:style-name="ce9" office:value-type="string">
            <text:p>2026-03-15 14:17:15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17X.XXX.XXX.X4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Dla dziecka</text:p>
          </table:table-cell>
          <table:table-cell table:style-name="ce9" office:value-type="string">
            <text:p>Mleka początkowe</text:p>
          </table:table-cell>
          <table:table-cell table:style-name="ce9" office:value-type="string">
            <text:p>NESTLE NAN OPTIPRO Plus 1 HM-O Mleko Początkowe dla niemowląt od urodzenia 400g</text:p>
          </table:table-cell>
          <table:table-cell table:style-name="ce8" office:value-type="float" office:value="17320">
            <text:p>17320</text:p>
          </table:table-cell>
          <table:table-cell table:style-name="ce9" office:value-type="string">
            <text:p>2026-03-15 14:18:26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10X.XXX.XXX.X3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krążenia i serce</text:p>
          </table:table-cell>
          <table:table-cell table:style-name="ce9" office:value-type="string">
            <text:p>Berimal Forte 60kaps.</text:p>
          </table:table-cell>
          <table:table-cell table:style-name="ce8" office:value-type="float" office:value="19109">
            <text:p>19109</text:p>
          </table:table-cell>
          <table:table-cell table:style-name="ce9" office:value-type="string">
            <text:p>2026-03-15 14:18:35</text:p>
          </table:table-cell>
          <table:table-cell table:style-name="ce10" office:value-type="currency" office:currency="PLN" office:value="0.83">
            <text:p>0,83 zł</text:p>
          </table:table-cell>
          <table:table-cell table:style-name="ce8"/>
          <table:table-cell table:style-name="ce10" office:value-type="currency" office:currency="PLN" office:value="0.83">
            <text:p>0,83 zł</text:p>
          </table:table-cell>
          <table:table-cell table:style-name="ce8"/>
          <table:table-cell table:style-name="ce9" office:value-type="string">
            <text:p>91.XXX.XXX.6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Termometry</text:p>
          </table:table-cell>
          <table:table-cell table:style-name="ce9" office:value-type="string">
            <text:p>Microlife MT 16C2</text:p>
          </table:table-cell>
          <table:table-cell table:style-name="ce8" office:value-type="float" office:value="9695">
            <text:p>9695</text:p>
          </table:table-cell>
          <table:table-cell table:style-name="ce9" office:value-type="string">
            <text:p>2026-03-15 14:19:04</text:p>
          </table:table-cell>
          <table:table-cell table:style-name="ce10" office:value-type="currency" office:currency="PLN" office:value="1.03">
            <text:p>1,03 zł</text:p>
          </table:table-cell>
          <table:table-cell table:style-name="ce8"/>
          <table:table-cell table:style-name="ce10" office:value-type="currency" office:currency="PLN" office:value="1.03">
            <text:p>1,03 zł</text:p>
          </table:table-cell>
          <table:table-cell table:style-name="ce8"/>
          <table:table-cell table:style-name="ce9" office:value-type="string">
            <text:p>31.XXX.XXX.X5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Emolium INTENSIVE Krem specjalny 75ml</text:p>
          </table:table-cell>
          <table:table-cell table:style-name="ce8" office:value-type="float" office:value="3892">
            <text:p>3892</text:p>
          </table:table-cell>
          <table:table-cell table:style-name="ce9" office:value-type="string">
            <text:p>2026-03-15 14:21:41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18X.XXX.XXX.X5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Opatrunki</text:p>
          </table:table-cell>
          <table:table-cell table:style-name="ce9" office:value-type="string">
            <text:p>Aqua Gel opatrunek hydrożelowy 10x12cm 1 szt.</text:p>
          </table:table-cell>
          <table:table-cell table:style-name="ce8" office:value-type="float" office:value="6772">
            <text:p>6772</text:p>
          </table:table-cell>
          <table:table-cell table:style-name="ce9" office:value-type="string">
            <text:p>2026-03-15 14:21:53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31.XXX.XXX.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ciała</text:p>
          </table:table-cell>
          <table:table-cell table:style-name="ce9" office:value-type="string">
            <text:p>Emolium DERMOCARE Emulsja na suchą skórę głowy 100ml</text:p>
          </table:table-cell>
          <table:table-cell table:style-name="ce8" office:value-type="float" office:value="335">
            <text:p>335</text:p>
          </table:table-cell>
          <table:table-cell table:style-name="ce9" office:value-type="string">
            <text:p>2026-03-15 14:25:33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37.XXX.XXX.1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Alergia</text:p>
          </table:table-cell>
          <table:table-cell table:style-name="ce9" office:value-type="string">
            <text:p>Zatoxin Katar I Alergia Spray Do Nosa 30Ml</text:p>
          </table:table-cell>
          <table:table-cell table:style-name="ce8" office:value-type="float" office:value="15846">
            <text:p>15846</text:p>
          </table:table-cell>
          <table:table-cell table:style-name="ce9" office:value-type="string">
            <text:p>2026-03-15 14:25:40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21X.XXX.XXX.X3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ęśnie, stawy i kości</text:p>
          </table:table-cell>
          <table:table-cell table:style-name="ce9" office:value-type="string">
            <text:p>Borowina Lecznicza Pasta 1 Kg</text:p>
          </table:table-cell>
          <table:table-cell table:style-name="ce8" office:value-type="float" office:value="4899">
            <text:p>4899</text:p>
          </table:table-cell>
          <table:table-cell table:style-name="ce9" office:value-type="string">
            <text:p>2026-03-15 14:31:04</text:p>
          </table:table-cell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9" office:value-type="string">
            <text:p>18X.XXX.XXX.X4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łciowy i moczowy</text:p>
          </table:table-cell>
          <table:table-cell table:style-name="ce9" office:value-type="string">
            <text:p>UROFEM Control 60 tabl.</text:p>
          </table:table-cell>
          <table:table-cell table:style-name="ce8" office:value-type="float" office:value="32306">
            <text:p>32306</text:p>
          </table:table-cell>
          <table:table-cell table:style-name="ce9" office:value-type="string">
            <text:p>2026-03-15 14:31:32</text:p>
          </table:table-cell>
          <table:table-cell table:style-name="ce10" office:value-type="currency" office:currency="PLN" office:value="0.75">
            <text:p>0,75 zł</text:p>
          </table:table-cell>
          <table:table-cell table:style-name="ce8"/>
          <table:table-cell table:style-name="ce10" office:value-type="currency" office:currency="PLN" office:value="0.75">
            <text:p>0,75 zł</text:p>
          </table:table-cell>
          <table:table-cell table:style-name="ce8"/>
          <table:table-cell table:style-name="ce9" office:value-type="string">
            <text:p>45.XXX.XXX.8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DUCRAY KERACNYL Repair Balsam do ust 15ml</text:p>
          </table:table-cell>
          <table:table-cell table:style-name="ce8" office:value-type="float" office:value="32640">
            <text:p>32640</text:p>
          </table:table-cell>
          <table:table-cell table:style-name="ce9" office:value-type="string">
            <text:p>2026-03-15 14:35:01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37.XXX.XXX.X1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Pozostałe kosmetyki do włosów</text:p>
          </table:table-cell>
          <table:table-cell table:style-name="ce9" office:value-type="string">
            <text:p>DUCRAY ANACAPS Reactiv, 3x30kapsułek</text:p>
          </table:table-cell>
          <table:table-cell table:style-name="ce8" office:value-type="float" office:value="18922">
            <text:p>18922</text:p>
          </table:table-cell>
          <table:table-cell table:style-name="ce9" office:value-type="string">
            <text:p>2026-03-15 14:36:12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79.XXX.XXX.2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Avene Sunsimed Ka Bardzo Wysoka Ochrona 80ml</text:p>
          </table:table-cell>
          <table:table-cell table:style-name="ce8" office:value-type="float" office:value="28241">
            <text:p>28241</text:p>
          </table:table-cell>
          <table:table-cell table:style-name="ce9" office:value-type="string">
            <text:p>2026-03-15 14:36:21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14X.XXX.XXX.6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łciowy i moczowy</text:p>
          </table:table-cell>
          <table:table-cell table:style-name="ce9" office:value-type="string">
            <text:p>Miovelia Nac 15 kaps.</text:p>
          </table:table-cell>
          <table:table-cell table:style-name="ce8" office:value-type="float" office:value="11821">
            <text:p>11821</text:p>
          </table:table-cell>
          <table:table-cell table:style-name="ce9" office:value-type="string">
            <text:p>2026-03-15 14:39:31</text:p>
          </table:table-cell>
          <table:table-cell table:style-name="ce10" office:value-type="currency" office:currency="PLN" office:value="0.75">
            <text:p>0,75 zł</text:p>
          </table:table-cell>
          <table:table-cell table:style-name="ce8"/>
          <table:table-cell table:style-name="ce10" office:value-type="currency" office:currency="PLN" office:value="0.75">
            <text:p>0,75 zł</text:p>
          </table:table-cell>
          <table:table-cell table:style-name="ce8"/>
          <table:table-cell table:style-name="ce9" office:value-type="string">
            <text:p>10X.XXX.XXX.X0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moczowy i płciowy</text:p>
          </table:table-cell>
          <table:table-cell table:style-name="ce9" office:value-type="string">
            <text:p>Gynauxil 10 Globulek Dopochwowych</text:p>
          </table:table-cell>
          <table:table-cell table:style-name="ce8" office:value-type="float" office:value="30023">
            <text:p>30023</text:p>
          </table:table-cell>
          <table:table-cell table:style-name="ce9" office:value-type="string">
            <text:p>2026-03-15 14:40:47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83.XXX.XXX.8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krążenia i serce</text:p>
          </table:table-cell>
          <table:table-cell table:style-name="ce9" office:value-type="string">
            <text:p>Berimal Forte 60kaps.</text:p>
          </table:table-cell>
          <table:table-cell table:style-name="ce8" office:value-type="float" office:value="19109">
            <text:p>19109</text:p>
          </table:table-cell>
          <table:table-cell table:style-name="ce9" office:value-type="string">
            <text:p>2026-03-15 14:41:33</text:p>
          </table:table-cell>
          <table:table-cell table:style-name="ce10" office:value-type="currency" office:currency="PLN" office:value="0.83">
            <text:p>0,83 zł</text:p>
          </table:table-cell>
          <table:table-cell table:style-name="ce8"/>
          <table:table-cell table:style-name="ce10" office:value-type="currency" office:currency="PLN" office:value="0.83">
            <text:p>0,83 zł</text:p>
          </table:table-cell>
          <table:table-cell table:style-name="ce8"/>
          <table:table-cell table:style-name="ce9" office:value-type="string">
            <text:p>10X.XXX.XXX.X0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Serce i układ krążenia</text:p>
          </table:table-cell>
          <table:table-cell table:style-name="ce9" office:value-type="string">
            <text:p>Venoruton Gel 40 g</text:p>
          </table:table-cell>
          <table:table-cell table:style-name="ce8" office:value-type="float" office:value="11789">
            <text:p>11789</text:p>
          </table:table-cell>
          <table:table-cell table:style-name="ce9" office:value-type="string">
            <text:p>2026-03-15 14:42:14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88.XXX.XXX.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Otrivin Menthol 1mg/ml Aerozol do nosa 10 ml</text:p>
          </table:table-cell>
          <table:table-cell table:style-name="ce8" office:value-type="float" office:value="14886">
            <text:p>14886</text:p>
          </table:table-cell>
          <table:table-cell table:style-name="ce9" office:value-type="string">
            <text:p>2026-03-15 14:42:43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37.XXX.XXX.X1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Pasty do zębów</text:p>
          </table:table-cell>
          <table:table-cell table:style-name="ce9" office:value-type="string">
            <text:p>Pierre Fabre Elgydium Pasta Do Zębów Z Kompleksem Fluorinol Protect + 75ml</text:p>
          </table:table-cell>
          <table:table-cell table:style-name="ce8" office:value-type="float" office:value="29833">
            <text:p>29833</text:p>
          </table:table-cell>
          <table:table-cell table:style-name="ce9" office:value-type="string">
            <text:p>2026-03-15 14:44:01</text:p>
          </table:table-cell>
          <table:table-cell table:style-name="ce10" office:value-type="currency" office:currency="PLN" office:value="0.67">
            <text:p>0,67 zł</text:p>
          </table:table-cell>
          <table:table-cell table:style-name="ce8"/>
          <table:table-cell table:style-name="ce10" office:value-type="currency" office:currency="PLN" office:value="0.67">
            <text:p>0,67 zł</text:p>
          </table:table-cell>
          <table:table-cell table:style-name="ce8"/>
          <table:table-cell table:style-name="ce9" office:value-type="string">
            <text:p>78.XXX.XXX.7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Uniben Silver aerozol 30ml</text:p>
          </table:table-cell>
          <table:table-cell table:style-name="ce8" office:value-type="float" office:value="6908">
            <text:p>6908</text:p>
          </table:table-cell>
          <table:table-cell table:style-name="ce9" office:value-type="string">
            <text:p>2026-03-15 14:46:36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21X.XXX.XXX.5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</text:p>
          </table:table-cell>
          <table:table-cell table:style-name="ce9" office:value-type="string">
            <text:p>Eva/Qu czopki przeciw zaparciom 6 czopków</text:p>
          </table:table-cell>
          <table:table-cell table:style-name="ce8" office:value-type="float" office:value="3918">
            <text:p>3918</text:p>
          </table:table-cell>
          <table:table-cell table:style-name="ce9" office:value-type="string">
            <text:p>2026-03-15 14:50:11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18X.XXX.XXX.X0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nerwowy i pamięć</text:p>
          </table:table-cell>
          <table:table-cell table:style-name="ce9" office:value-type="string">
            <text:p>Tabletki Neurotynox D 30 szt.</text:p>
          </table:table-cell>
          <table:table-cell table:style-name="ce8" office:value-type="float" office:value="4684">
            <text:p>4684</text:p>
          </table:table-cell>
          <table:table-cell table:style-name="ce9" office:value-type="string">
            <text:p>2026-03-15 14:50:51</text:p>
          </table:table-cell>
          <table:table-cell table:style-name="ce10" office:value-type="currency" office:currency="PLN" office:value="0.74">
            <text:p>0,74 zł</text:p>
          </table:table-cell>
          <table:table-cell table:style-name="ce8"/>
          <table:table-cell table:style-name="ce10" office:value-type="currency" office:currency="PLN" office:value="0.74">
            <text:p>0,74 zł</text:p>
          </table:table-cell>
          <table:table-cell table:style-name="ce8"/>
          <table:table-cell table:style-name="ce9" office:value-type="string">
            <text:p>37.XXX.XXX.X5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Glukometry i akcesoria dla diabetyków</text:p>
          </table:table-cell>
          <table:table-cell table:style-name="ce9" office:value-type="string">
            <text:p>Paski One Touch Select test 50szt.</text:p>
          </table:table-cell>
          <table:table-cell table:style-name="ce8" office:value-type="float" office:value="7681">
            <text:p>7681</text:p>
          </table:table-cell>
          <table:table-cell table:style-name="ce9" office:value-type="string">
            <text:p>2026-03-15 14:53:20</text:p>
          </table:table-cell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9" office:value-type="string">
            <text:p>46.XXX.XXX.X2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Zestawy dermokosmetyków</text:p>
          </table:table-cell>
          <table:table-cell table:style-name="ce9" office:value-type="string">
            <text:p>Krem Nuxe Prodigieuse Florale Zestaw z kosmetyczką podróżną 2024</text:p>
          </table:table-cell>
          <table:table-cell table:style-name="ce8" office:value-type="float" office:value="28311">
            <text:p>28311</text:p>
          </table:table-cell>
          <table:table-cell table:style-name="ce9" office:value-type="string">
            <text:p>2026-03-15 14:53:52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10X.XXX.XXX.1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Opatrunki</text:p>
          </table:table-cell>
          <table:table-cell table:style-name="ce9" office:value-type="string">
            <text:p>ALLEVYN NON-ADHESIVE opatrunek 10x10cm - 1 sztuka</text:p>
          </table:table-cell>
          <table:table-cell table:style-name="ce8" office:value-type="float" office:value="7852">
            <text:p>7852</text:p>
          </table:table-cell>
          <table:table-cell table:style-name="ce9" office:value-type="string">
            <text:p>2026-03-15 14:55:41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91.XXX.XXX.X4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Otrivin Menthol 1mg/ml Aerozol do nosa 10 ml</text:p>
          </table:table-cell>
          <table:table-cell table:style-name="ce8" office:value-type="float" office:value="14886">
            <text:p>14886</text:p>
          </table:table-cell>
          <table:table-cell table:style-name="ce9" office:value-type="string">
            <text:p>2026-03-15 14:56:58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37.XXX.XXX.X1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UPSARIN C, 20 tabletek musujących</text:p>
          </table:table-cell>
          <table:table-cell table:style-name="ce8" office:value-type="float" office:value="6364">
            <text:p>6364</text:p>
          </table:table-cell>
          <table:table-cell table:style-name="ce9" office:value-type="string">
            <text:p>2026-03-15 14:57:44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31.XXX.XXX.X0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włosów</text:p>
          </table:table-cell>
          <table:table-cell table:style-name="ce9" office:value-type="string">
            <text:p>Vichy Dercos Szampon Przeciwłupieżowy Włosy Suche Uzupełnienie 500ml</text:p>
          </table:table-cell>
          <table:table-cell table:style-name="ce8" office:value-type="float" office:value="35697">
            <text:p>35697</text:p>
          </table:table-cell>
          <table:table-cell table:style-name="ce9" office:value-type="string">
            <text:p>2026-03-15 15:00:34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37.XXX.XXX.1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ciała</text:p>
          </table:table-cell>
          <table:table-cell table:style-name="ce9" office:value-type="string">
            <text:p>Emolium Dermocare Nawilżający Olejek do mycia 400 ml</text:p>
          </table:table-cell>
          <table:table-cell table:style-name="ce8" office:value-type="float" office:value="7660">
            <text:p>7660</text:p>
          </table:table-cell>
          <table:table-cell table:style-name="ce9" office:value-type="string">
            <text:p>2026-03-15 15:02:06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90.XXX.XXX.X5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eparaty medycyny naturalnej</text:p>
          </table:table-cell>
          <table:table-cell table:style-name="ce9" office:value-type="string">
            <text:p>BONIMED Pectobonisol 40gram</text:p>
          </table:table-cell>
          <table:table-cell table:style-name="ce8" office:value-type="float" office:value="19230">
            <text:p>19230</text:p>
          </table:table-cell>
          <table:table-cell table:style-name="ce9" office:value-type="string">
            <text:p>2026-03-15 15:02:25</text:p>
          </table:table-cell>
          <table:table-cell table:style-name="ce10" office:value-type="currency" office:currency="PLN" office:value="0.88">
            <text:p>0,88 zł</text:p>
          </table:table-cell>
          <table:table-cell table:style-name="ce8"/>
          <table:table-cell table:style-name="ce10" office:value-type="currency" office:currency="PLN" office:value="0.88">
            <text:p>0,88 zł</text:p>
          </table:table-cell>
          <table:table-cell table:style-name="ce8"/>
          <table:table-cell table:style-name="ce9" office:value-type="string">
            <text:p>37.XXX.XXX.X4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ciała</text:p>
          </table:table-cell>
          <table:table-cell table:style-name="ce9" office:value-type="string">
            <text:p>Emolium Dermocare Nawilżający Olejek do mycia 400 ml</text:p>
          </table:table-cell>
          <table:table-cell table:style-name="ce8" office:value-type="float" office:value="7660">
            <text:p>7660</text:p>
          </table:table-cell>
          <table:table-cell table:style-name="ce9" office:value-type="string">
            <text:p>2026-03-15 15:03:06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90.XXX.XXX.X5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</text:p>
          </table:table-cell>
          <table:table-cell table:style-name="ce9" office:value-type="string">
            <text:p>Eva/Qu czopki przeciw zaparciom 6 czopków</text:p>
          </table:table-cell>
          <table:table-cell table:style-name="ce8" office:value-type="float" office:value="3918">
            <text:p>3918</text:p>
          </table:table-cell>
          <table:table-cell table:style-name="ce9" office:value-type="string">
            <text:p>2026-03-15 15:04:12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21X.XXX.XXX.X2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Otrivin Ipra Max 0,5mg + 0,6mg Aerozol do nosa 10ml</text:p>
          </table:table-cell>
          <table:table-cell table:style-name="ce8" office:value-type="float" office:value="6211">
            <text:p>6211</text:p>
          </table:table-cell>
          <table:table-cell table:style-name="ce9" office:value-type="string">
            <text:p>2026-03-15 15:04:59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31.XXX.XXX.X4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</text:p>
          </table:table-cell>
          <table:table-cell table:style-name="ce9" office:value-type="string">
            <text:p>Eva/Qu czopki przeciw zaparciom 6 czopków</text:p>
          </table:table-cell>
          <table:table-cell table:style-name="ce8" office:value-type="float" office:value="3918">
            <text:p>3918</text:p>
          </table:table-cell>
          <table:table-cell table:style-name="ce9" office:value-type="string">
            <text:p>2026-03-15 15:05:23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93.XXX.XXX.3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Dla dziecka</text:p>
          </table:table-cell>
          <table:table-cell table:style-name="ce9" office:value-type="string">
            <text:p>Mleka początkowe</text:p>
          </table:table-cell>
          <table:table-cell table:style-name="ce9" office:value-type="string">
            <text:p>NESTLE NAN OPTIPRO Plus 1 HM-O Mleko Początkowe dla niemowląt od urodzenia W Płynie 32x70ml</text:p>
          </table:table-cell>
          <table:table-cell table:style-name="ce8" office:value-type="float" office:value="17321">
            <text:p>17321</text:p>
          </table:table-cell>
          <table:table-cell table:style-name="ce9" office:value-type="string">
            <text:p>2026-03-15 15:05:40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45.XXX.XXX.X1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Suplementy dla dzieci</text:p>
          </table:table-cell>
          <table:table-cell table:style-name="ce9" office:value-type="string">
            <text:p>Vivomixx Mikrokapsułki 10 mld 30 kapsułek</text:p>
          </table:table-cell>
          <table:table-cell table:style-name="ce8" office:value-type="float" office:value="596">
            <text:p>596</text:p>
          </table:table-cell>
          <table:table-cell table:style-name="ce9" office:value-type="string">
            <text:p>2026-03-15 15:10:39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89.XXX.XXX.X5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</text:p>
          </table:table-cell>
          <table:table-cell table:style-name="ce9" office:value-type="string">
            <text:p>Dulcobis czopki na zaparcia 6 szt.</text:p>
          </table:table-cell>
          <table:table-cell table:style-name="ce8" office:value-type="float" office:value="8472">
            <text:p>8472</text:p>
          </table:table-cell>
          <table:table-cell table:style-name="ce9" office:value-type="string">
            <text:p>2026-03-15 15:14:09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95.XXX.XXX.6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Testy diagnostyczne</text:p>
          </table:table-cell>
          <table:table-cell table:style-name="ce9" office:value-type="string">
            <text:p>Test OraQuick na obecność wirusa HIV</text:p>
          </table:table-cell>
          <table:table-cell table:style-name="ce8" office:value-type="float" office:value="19586">
            <text:p>19586</text:p>
          </table:table-cell>
          <table:table-cell table:style-name="ce9" office:value-type="string">
            <text:p>2026-03-15 15:16:22</text:p>
          </table:table-cell>
          <table:table-cell table:style-name="ce10" office:value-type="currency" office:currency="PLN" office:value="0.74">
            <text:p>0,74 zł</text:p>
          </table:table-cell>
          <table:table-cell table:style-name="ce8"/>
          <table:table-cell table:style-name="ce10" office:value-type="currency" office:currency="PLN" office:value="0.74">
            <text:p>0,74 zł</text:p>
          </table:table-cell>
          <table:table-cell table:style-name="ce8"/>
          <table:table-cell table:style-name="ce9" office:value-type="string">
            <text:p>10X.XXX.XXX.2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Glukometry i akcesoria dla diabetyków</text:p>
          </table:table-cell>
          <table:table-cell table:style-name="ce9" office:value-type="string">
            <text:p>Nakłuwacz AccuChek Softclix KIT + 25 lancetów</text:p>
          </table:table-cell>
          <table:table-cell table:style-name="ce8" office:value-type="float" office:value="13662">
            <text:p>13662</text:p>
          </table:table-cell>
          <table:table-cell table:style-name="ce9" office:value-type="string">
            <text:p>2026-03-15 15:17:20</text:p>
          </table:table-cell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9" office:value-type="string">
            <text:p>91.XXX.XXX.X6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Paraderm Psoric D krem 85 g</text:p>
          </table:table-cell>
          <table:table-cell table:style-name="ce8" office:value-type="float" office:value="9499">
            <text:p>9499</text:p>
          </table:table-cell>
          <table:table-cell table:style-name="ce9" office:value-type="string">
            <text:p>2026-03-15 15:20:28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46.XXX.XXX.X6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Paraderm Psoric D krem 85 g</text:p>
          </table:table-cell>
          <table:table-cell table:style-name="ce8" office:value-type="float" office:value="9499">
            <text:p>9499</text:p>
          </table:table-cell>
          <table:table-cell table:style-name="ce9" office:value-type="string">
            <text:p>2026-03-15 15:21:35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46.XXX.XXX.X6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ozostałe wyposażenie apteczek</text:p>
          </table:table-cell>
          <table:table-cell table:style-name="ce9" office:value-type="string">
            <text:p>Tecweld Icemix sztuczny lód w aerozolu 400ml</text:p>
          </table:table-cell>
          <table:table-cell table:style-name="ce8" office:value-type="float" office:value="4136">
            <text:p>4136</text:p>
          </table:table-cell>
          <table:table-cell table:style-name="ce9" office:value-type="string">
            <text:p>2026-03-15 15:24:10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91.XXX.XXX.X1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Zioła</text:p>
          </table:table-cell>
          <table:table-cell table:style-name="ce9" office:value-type="string">
            <text:p>Zioła Mnicha Na odchudzanie 20tbx2g</text:p>
          </table:table-cell>
          <table:table-cell table:style-name="ce8" office:value-type="float" office:value="18545">
            <text:p>18545</text:p>
          </table:table-cell>
          <table:table-cell table:style-name="ce9" office:value-type="string">
            <text:p>2026-03-15 15:28:01</text:p>
          </table:table-cell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9" office:value-type="string">
            <text:p>31.XXX.XXX.X3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 i trawienie</text:p>
          </table:table-cell>
          <table:table-cell table:style-name="ce9" office:value-type="string">
            <text:p>Estabiom Junior 20kaps.</text:p>
          </table:table-cell>
          <table:table-cell table:style-name="ce8" office:value-type="float" office:value="6953">
            <text:p>6953</text:p>
          </table:table-cell>
          <table:table-cell table:style-name="ce9" office:value-type="string">
            <text:p>2026-03-15 15:28:19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84.XXX.XXX.X1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 i trawienie</text:p>
          </table:table-cell>
          <table:table-cell table:style-name="ce9" office:value-type="string">
            <text:p>Estabiom Junior 20kaps.</text:p>
          </table:table-cell>
          <table:table-cell table:style-name="ce8" office:value-type="float" office:value="6953">
            <text:p>6953</text:p>
          </table:table-cell>
          <table:table-cell table:style-name="ce9" office:value-type="string">
            <text:p>2026-03-15 15:28:40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84.XXX.XXX.X1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 i trawienie</text:p>
          </table:table-cell>
          <table:table-cell table:style-name="ce9" office:value-type="string">
            <text:p>Estabiom Junior 20kaps.</text:p>
          </table:table-cell>
          <table:table-cell table:style-name="ce8" office:value-type="float" office:value="6953">
            <text:p>6953</text:p>
          </table:table-cell>
          <table:table-cell table:style-name="ce9" office:value-type="string">
            <text:p>2026-03-15 15:29:34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84.XXX.XXX.X1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ciała</text:p>
          </table:table-cell>
          <table:table-cell table:style-name="ce9" office:value-type="string">
            <text:p>Emolium Dermocare Nawilżający Olejek do mycia 400 ml</text:p>
          </table:table-cell>
          <table:table-cell table:style-name="ce8" office:value-type="float" office:value="7660">
            <text:p>7660</text:p>
          </table:table-cell>
          <table:table-cell table:style-name="ce9" office:value-type="string">
            <text:p>2026-03-15 15:30:44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94.XXX.XXX.6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La Roche-Posay Hyalu B5 Aquagel Żel Nawilżający Spf 30 50Ml</text:p>
          </table:table-cell>
          <table:table-cell table:style-name="ce8" office:value-type="float" office:value="18852">
            <text:p>18852</text:p>
          </table:table-cell>
          <table:table-cell table:style-name="ce9" office:value-type="string">
            <text:p>2026-03-15 15:32:03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83.XXX.XXX.X3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Sora Protect - aerozol na włosy zapobiegający wszawicy 50ml</text:p>
          </table:table-cell>
          <table:table-cell table:style-name="ce8" office:value-type="float" office:value="6881">
            <text:p>6881</text:p>
          </table:table-cell>
          <table:table-cell table:style-name="ce9" office:value-type="string">
            <text:p>2026-03-15 15:32:34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94.XXX.XXX.X3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Mydła</text:p>
          </table:table-cell>
          <table:table-cell table:style-name="ce9" office:value-type="string">
            <text:p>Vinsvin Mydełko naturalne z nanosrebrem w płynie 500Ml</text:p>
          </table:table-cell>
          <table:table-cell table:style-name="ce8" office:value-type="float" office:value="4626">
            <text:p>4626</text:p>
          </table:table-cell>
          <table:table-cell table:style-name="ce9" office:value-type="string">
            <text:p>2026-03-15 15:33:19</text:p>
          </table:table-cell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9" office:value-type="string">
            <text:p>79.XXX.XXX.1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Środki na przeziębienie</text:p>
          </table:table-cell>
          <table:table-cell table:style-name="ce9" office:value-type="string">
            <text:p>NOVATIV Grinotussan syrop 120ml</text:p>
          </table:table-cell>
          <table:table-cell table:style-name="ce8" office:value-type="float" office:value="19736">
            <text:p>19736</text:p>
          </table:table-cell>
          <table:table-cell table:style-name="ce9" office:value-type="string">
            <text:p>2026-03-15 15:35:06</text:p>
          </table:table-cell>
          <table:table-cell table:style-name="ce10" office:value-type="currency" office:currency="PLN" office:value="0.83">
            <text:p>0,83 zł</text:p>
          </table:table-cell>
          <table:table-cell table:style-name="ce8"/>
          <table:table-cell table:style-name="ce10" office:value-type="currency" office:currency="PLN" office:value="0.83">
            <text:p>0,83 zł</text:p>
          </table:table-cell>
          <table:table-cell table:style-name="ce8"/>
          <table:table-cell table:style-name="ce9" office:value-type="string">
            <text:p>88.XXX.XXX.X5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ciała</text:p>
          </table:table-cell>
          <table:table-cell table:style-name="ce9" office:value-type="string">
            <text:p>Emolium Dermocare Nawilżający Olejek do mycia 400 ml</text:p>
          </table:table-cell>
          <table:table-cell table:style-name="ce8" office:value-type="float" office:value="7660">
            <text:p>7660</text:p>
          </table:table-cell>
          <table:table-cell table:style-name="ce9" office:value-type="string">
            <text:p>2026-03-15 15:36:28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37.XXX.XXX.7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Opatrunki</text:p>
          </table:table-cell>
          <table:table-cell table:style-name="ce9" office:value-type="string">
            <text:p>Opatr.BACTIGRAS z chlorhex. 15x20 1 szt.</text:p>
          </table:table-cell>
          <table:table-cell table:style-name="ce8" office:value-type="float" office:value="15330">
            <text:p>15330</text:p>
          </table:table-cell>
          <table:table-cell table:style-name="ce9" office:value-type="string">
            <text:p>2026-03-15 15:38:33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46.XXX.XXX.3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Otrivin Ipra Max 0,5mg + 0,6mg Aerozol do nosa 10ml</text:p>
          </table:table-cell>
          <table:table-cell table:style-name="ce8" office:value-type="float" office:value="6211">
            <text:p>6211</text:p>
          </table:table-cell>
          <table:table-cell table:style-name="ce9" office:value-type="string">
            <text:p>2026-03-15 15:40:49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91.XXX.XXX.3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włosów</text:p>
          </table:table-cell>
          <table:table-cell table:style-name="ce9" office:value-type="string">
            <text:p>Vichy Dercos Szampon Przeciwłupieżowy Włosy Suche Uzupełnienie 500ml</text:p>
          </table:table-cell>
          <table:table-cell table:style-name="ce8" office:value-type="float" office:value="35697">
            <text:p>35697</text:p>
          </table:table-cell>
          <table:table-cell table:style-name="ce9" office:value-type="string">
            <text:p>2026-03-15 15:42:24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31.XXX.XXX.2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Biovena Health Panthenol Krem 30g</text:p>
          </table:table-cell>
          <table:table-cell table:style-name="ce8" office:value-type="float" office:value="14209">
            <text:p>14209</text:p>
          </table:table-cell>
          <table:table-cell table:style-name="ce9" office:value-type="string">
            <text:p>2026-03-15 15:44:39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83.XXX.XXX.3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Emolium DERMOCARE Krem przeciw odparzeniom 75ml</text:p>
          </table:table-cell>
          <table:table-cell table:style-name="ce8" office:value-type="float" office:value="337">
            <text:p>337</text:p>
          </table:table-cell>
          <table:table-cell table:style-name="ce9" office:value-type="string">
            <text:p>2026-03-15 15:45:03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86.XXX.XXX.X3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Emolium INTENSIVE Krem specjalny 75ml</text:p>
          </table:table-cell>
          <table:table-cell table:style-name="ce8" office:value-type="float" office:value="3892">
            <text:p>3892</text:p>
          </table:table-cell>
          <table:table-cell table:style-name="ce9" office:value-type="string">
            <text:p>2026-03-15 15:47:20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79.XXX.XXX.8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moczowy i płciowy</text:p>
          </table:table-cell>
          <table:table-cell table:style-name="ce9" office:value-type="string">
            <text:p>Gynoxin Optima 200mg 3kaps.</text:p>
          </table:table-cell>
          <table:table-cell table:style-name="ce8" office:value-type="float" office:value="9579">
            <text:p>9579</text:p>
          </table:table-cell>
          <table:table-cell table:style-name="ce9" office:value-type="string">
            <text:p>2026-03-15 15:49:18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88.XXX.XXX.X7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Zioła</text:p>
          </table:table-cell>
          <table:table-cell table:style-name="ce9" office:value-type="string">
            <text:p>Verdin Fix Zioła Z Owocami Leśnymi 20 saszetek</text:p>
          </table:table-cell>
          <table:table-cell table:style-name="ce8" office:value-type="float" office:value="18355">
            <text:p>18355</text:p>
          </table:table-cell>
          <table:table-cell table:style-name="ce9" office:value-type="string">
            <text:p>2026-03-15 15:49:40</text:p>
          </table:table-cell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9" office:value-type="string">
            <text:p>83.XXX.XXX.3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Pozostałe kosmetyki do pielęgnacji ust</text:p>
          </table:table-cell>
          <table:table-cell table:style-name="ce9" office:value-type="string">
            <text:p>ANNA Wazelina kosmetyczna z witaminami A+E 50g</text:p>
          </table:table-cell>
          <table:table-cell table:style-name="ce8" office:value-type="float" office:value="9548">
            <text:p>9548</text:p>
          </table:table-cell>
          <table:table-cell table:style-name="ce9" office:value-type="string">
            <text:p>2026-03-15 15:52:13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18X.XXX.XXX.X6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Alergia</text:p>
          </table:table-cell>
          <table:table-cell table:style-name="ce9" office:value-type="string">
            <text:p>EctoAlerg krople do oczu 10ml</text:p>
          </table:table-cell>
          <table:table-cell table:style-name="ce8" office:value-type="float" office:value="8340">
            <text:p>8340</text:p>
          </table:table-cell>
          <table:table-cell table:style-name="ce9" office:value-type="string">
            <text:p>2026-03-15 15:56:40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37.XXX.XXX.X1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ciała</text:p>
          </table:table-cell>
          <table:table-cell table:style-name="ce9" office:value-type="string">
            <text:p>Emolium DERMOCARE Emulsja na suchą skórę głowy 100ml</text:p>
          </table:table-cell>
          <table:table-cell table:style-name="ce8" office:value-type="float" office:value="335">
            <text:p>335</text:p>
          </table:table-cell>
          <table:table-cell table:style-name="ce9" office:value-type="string">
            <text:p>2026-03-15 15:58:21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77.XXX.XXX.2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Emolium INTENSIVE Krem specjalny 75ml</text:p>
          </table:table-cell>
          <table:table-cell table:style-name="ce8" office:value-type="float" office:value="3892">
            <text:p>3892</text:p>
          </table:table-cell>
          <table:table-cell table:style-name="ce9" office:value-type="string">
            <text:p>2026-03-15 16:02:33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79.XXX.XXX.8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krążenia i serce</text:p>
          </table:table-cell>
          <table:table-cell table:style-name="ce9" office:value-type="string">
            <text:p>Berimal Forte 60kaps.</text:p>
          </table:table-cell>
          <table:table-cell table:style-name="ce8" office:value-type="float" office:value="19109">
            <text:p>19109</text:p>
          </table:table-cell>
          <table:table-cell table:style-name="ce9" office:value-type="string">
            <text:p>2026-03-15 16:05:18</text:p>
          </table:table-cell>
          <table:table-cell table:style-name="ce10" office:value-type="currency" office:currency="PLN" office:value="0.83">
            <text:p>0,83 zł</text:p>
          </table:table-cell>
          <table:table-cell table:style-name="ce8"/>
          <table:table-cell table:style-name="ce10" office:value-type="currency" office:currency="PLN" office:value="0.83">
            <text:p>0,83 zł</text:p>
          </table:table-cell>
          <table:table-cell table:style-name="ce8"/>
          <table:table-cell table:style-name="ce9" office:value-type="string">
            <text:p>21X.XXX.XXX.X9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moczowy i płciowy</text:p>
          </table:table-cell>
          <table:table-cell table:style-name="ce9" office:value-type="string">
            <text:p>Nova T 380 Cu380Ag Wkładka Antykoncepcyjna 1szt.</text:p>
          </table:table-cell>
          <table:table-cell table:style-name="ce8" office:value-type="float" office:value="10602">
            <text:p>10602</text:p>
          </table:table-cell>
          <table:table-cell table:style-name="ce9" office:value-type="string">
            <text:p>2026-03-15 16:05:29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91.XXX.XXX.4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ciała</text:p>
          </table:table-cell>
          <table:table-cell table:style-name="ce9" office:value-type="string">
            <text:p>Emolium Dermocare Nawilżający Olejek do mycia 400 ml</text:p>
          </table:table-cell>
          <table:table-cell table:style-name="ce8" office:value-type="float" office:value="7660">
            <text:p>7660</text:p>
          </table:table-cell>
          <table:table-cell table:style-name="ce9" office:value-type="string">
            <text:p>2026-03-15 16:06:00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21X.XXX.XXX.X3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ciała</text:p>
          </table:table-cell>
          <table:table-cell table:style-name="ce9" office:value-type="string">
            <text:p>Emolium Dermocare Nawilżający Olejek do mycia 400 ml</text:p>
          </table:table-cell>
          <table:table-cell table:style-name="ce8" office:value-type="float" office:value="7660">
            <text:p>7660</text:p>
          </table:table-cell>
          <table:table-cell table:style-name="ce9" office:value-type="string">
            <text:p>2026-03-15 16:06:33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21X.XXX.XXX.X3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Opatrunki</text:p>
          </table:table-cell>
          <table:table-cell table:style-name="ce9" office:value-type="string">
            <text:p>Aqua Gel opatrunek hydrożelowy 10x12cm 1 szt.</text:p>
          </table:table-cell>
          <table:table-cell table:style-name="ce8" office:value-type="float" office:value="6772">
            <text:p>6772</text:p>
          </table:table-cell>
          <table:table-cell table:style-name="ce9" office:value-type="string">
            <text:p>2026-03-15 16:06:44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94.XXX.XXX.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Avene COLD CREAM Krem 40ml</text:p>
          </table:table-cell>
          <table:table-cell table:style-name="ce8" office:value-type="float" office:value="3813">
            <text:p>3813</text:p>
          </table:table-cell>
          <table:table-cell table:style-name="ce9" office:value-type="string">
            <text:p>2026-03-15 16:06:55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18X.XXX.XXX.X5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Avene COLD CREAM Krem 40ml</text:p>
          </table:table-cell>
          <table:table-cell table:style-name="ce8" office:value-type="float" office:value="3813">
            <text:p>3813</text:p>
          </table:table-cell>
          <table:table-cell table:style-name="ce9" office:value-type="string">
            <text:p>2026-03-15 16:07:22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18X.XXX.XXX.X5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Avene Sunsimed Ka Bardzo Wysoka Ochrona 80ml</text:p>
          </table:table-cell>
          <table:table-cell table:style-name="ce8" office:value-type="float" office:value="28241">
            <text:p>28241</text:p>
          </table:table-cell>
          <table:table-cell table:style-name="ce9" office:value-type="string">
            <text:p>2026-03-15 16:08:30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89.XXX.XXX.4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włosów</text:p>
          </table:table-cell>
          <table:table-cell table:style-name="ce9" office:value-type="string">
            <text:p>Vichy Dercos Szampon Przeciwłupieżowy Włosy Suche Uzupełnienie 500ml</text:p>
          </table:table-cell>
          <table:table-cell table:style-name="ce8" office:value-type="float" office:value="35697">
            <text:p>35697</text:p>
          </table:table-cell>
          <table:table-cell table:style-name="ce9" office:value-type="string">
            <text:p>2026-03-15 16:10:16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17X.XXX.XXX.X1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Mydła</text:p>
          </table:table-cell>
          <table:table-cell table:style-name="ce9" office:value-type="string">
            <text:p>Vinsvin Mydełko naturalne z nanosrebrem w płynie 500Ml</text:p>
          </table:table-cell>
          <table:table-cell table:style-name="ce8" office:value-type="float" office:value="4626">
            <text:p>4626</text:p>
          </table:table-cell>
          <table:table-cell table:style-name="ce9" office:value-type="string">
            <text:p>2026-03-15 16:11:58</text:p>
          </table:table-cell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9" office:value-type="string">
            <text:p>37.XXX.XXX.6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Kremy do ciała</text:p>
          </table:table-cell>
          <table:table-cell table:style-name="ce9" office:value-type="string">
            <text:p>Gorvita Żel żywokostowy z jałowcem i MSM 200ml</text:p>
          </table:table-cell>
          <table:table-cell table:style-name="ce8" office:value-type="float" office:value="11273">
            <text:p>11273</text:p>
          </table:table-cell>
          <table:table-cell table:style-name="ce9" office:value-type="string">
            <text:p>2026-03-15 16:18:35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79.XXX.XXX.X1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Rzuć palenie</text:p>
          </table:table-cell>
          <table:table-cell table:style-name="ce9" office:value-type="string">
            <text:p>NIQUITIN przezroczysty, plastry transdermalne, 21 mg / 24 h, 7 szt</text:p>
          </table:table-cell>
          <table:table-cell table:style-name="ce8" office:value-type="float" office:value="9593">
            <text:p>9593</text:p>
          </table:table-cell>
          <table:table-cell table:style-name="ce9" office:value-type="string">
            <text:p>2026-03-15 16:20:22</text:p>
          </table:table-cell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9" office:value-type="string">
            <text:p>83.XXX.XXX.X5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Stawy, mięśnie i kości</text:p>
          </table:table-cell>
          <table:table-cell table:style-name="ce9" office:value-type="string">
            <text:p>NordFarm Glukozamina 500 Plus 90tabl.</text:p>
          </table:table-cell>
          <table:table-cell table:style-name="ce8" office:value-type="float" office:value="4048">
            <text:p>4048</text:p>
          </table:table-cell>
          <table:table-cell table:style-name="ce9" office:value-type="string">
            <text:p>2026-03-15 16:21:23</text:p>
          </table:table-cell>
          <table:table-cell table:style-name="ce10" office:value-type="currency" office:currency="PLN" office:value="0.83">
            <text:p>0,83 zł</text:p>
          </table:table-cell>
          <table:table-cell table:style-name="ce8"/>
          <table:table-cell table:style-name="ce10" office:value-type="currency" office:currency="PLN" office:value="0.83">
            <text:p>0,83 zł</text:p>
          </table:table-cell>
          <table:table-cell table:style-name="ce8"/>
          <table:table-cell table:style-name="ce9" office:value-type="string">
            <text:p>31.XXX.XXX.5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Stawy, mięśnie i kości</text:p>
          </table:table-cell>
          <table:table-cell table:style-name="ce9" office:value-type="string">
            <text:p>Trb Chemedica Artivit 2x15 Fiolek</text:p>
          </table:table-cell>
          <table:table-cell table:style-name="ce8" office:value-type="float" office:value="28278">
            <text:p>28278</text:p>
          </table:table-cell>
          <table:table-cell table:style-name="ce9" office:value-type="string">
            <text:p>2026-03-15 16:25:18</text:p>
          </table:table-cell>
          <table:table-cell table:style-name="ce10" office:value-type="currency" office:currency="PLN" office:value="0.83">
            <text:p>0,83 zł</text:p>
          </table:table-cell>
          <table:table-cell table:style-name="ce8"/>
          <table:table-cell table:style-name="ce10" office:value-type="currency" office:currency="PLN" office:value="0.83">
            <text:p>0,83 zł</text:p>
          </table:table-cell>
          <table:table-cell table:style-name="ce8"/>
          <table:table-cell table:style-name="ce9" office:value-type="string">
            <text:p>89.XXX.XXX.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nerały i witaminy</text:p>
          </table:table-cell>
          <table:table-cell table:style-name="ce9" office:value-type="string">
            <text:p>Sufrin 60tabl.</text:p>
          </table:table-cell>
          <table:table-cell table:style-name="ce8" office:value-type="float" office:value="5345">
            <text:p>5345</text:p>
          </table:table-cell>
          <table:table-cell table:style-name="ce9" office:value-type="string">
            <text:p>2026-03-15 16:34:33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17X.XXX.XXX.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Dermedic Sunbrella Fotostabilny Krem Ochronny Do Twarzy SPF50+ Skóra tłusta i mieszana 50 g</text:p>
          </table:table-cell>
          <table:table-cell table:style-name="ce8" office:value-type="float" office:value="3703">
            <text:p>3703</text:p>
          </table:table-cell>
          <table:table-cell table:style-name="ce9" office:value-type="string">
            <text:p>2026-03-15 16:34:49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5.XXX.XXX.6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eparaty medycyny naturalnej</text:p>
          </table:table-cell>
          <table:table-cell table:style-name="ce9" office:value-type="string">
            <text:p>Tisane FARM Żel propolisowy 6g</text:p>
          </table:table-cell>
          <table:table-cell table:style-name="ce8" office:value-type="float" office:value="18277">
            <text:p>18277</text:p>
          </table:table-cell>
          <table:table-cell table:style-name="ce9" office:value-type="string">
            <text:p>2026-03-15 16:36:08</text:p>
          </table:table-cell>
          <table:table-cell table:style-name="ce10" office:value-type="currency" office:currency="PLN" office:value="0.88">
            <text:p>0,88 zł</text:p>
          </table:table-cell>
          <table:table-cell table:style-name="ce8"/>
          <table:table-cell table:style-name="ce10" office:value-type="currency" office:currency="PLN" office:value="0.88">
            <text:p>0,88 zł</text:p>
          </table:table-cell>
          <table:table-cell table:style-name="ce8"/>
          <table:table-cell table:style-name="ce9" office:value-type="string">
            <text:p>46.XXX.XXX.X5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Dla dziecka</text:p>
          </table:table-cell>
          <table:table-cell table:style-name="ce9" office:value-type="string">
            <text:p>Mleka początkowe</text:p>
          </table:table-cell>
          <table:table-cell table:style-name="ce9" office:value-type="string">
            <text:p>NESTLE NAN OPTIPRO Plus 1 HM-O Mleko Początkowe dla niemowląt od urodzenia 400g</text:p>
          </table:table-cell>
          <table:table-cell table:style-name="ce8" office:value-type="float" office:value="17320">
            <text:p>17320</text:p>
          </table:table-cell>
          <table:table-cell table:style-name="ce9" office:value-type="string">
            <text:p>2026-03-15 16:37:20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87.XXX.XXX.X7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Mydła</text:p>
          </table:table-cell>
          <table:table-cell table:style-name="ce9" office:value-type="string">
            <text:p>Vinsvin Mydełko naturalne z nanosrebrem w płynie 500Ml</text:p>
          </table:table-cell>
          <table:table-cell table:style-name="ce8" office:value-type="float" office:value="4626">
            <text:p>4626</text:p>
          </table:table-cell>
          <table:table-cell table:style-name="ce9" office:value-type="string">
            <text:p>2026-03-15 16:38:38</text:p>
          </table:table-cell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9" office:value-type="string">
            <text:p>37.XXX.XXX.6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Jama ustna</text:p>
          </table:table-cell>
          <table:table-cell table:style-name="ce9" office:value-type="string">
            <text:p>Hevipoint Lek przeciw opryszczce warg i twarzy 30 tabletek</text:p>
          </table:table-cell>
          <table:table-cell table:style-name="ce8" office:value-type="float" office:value="4109">
            <text:p>4109</text:p>
          </table:table-cell>
          <table:table-cell table:style-name="ce9" office:value-type="string">
            <text:p>2026-03-15 16:42:24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31.XXX.XXX.X4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</text:p>
          </table:table-cell>
          <table:table-cell table:style-name="ce9" office:value-type="string">
            <text:p>Rennie Antacidum Smak Miętowy 24 Tabl. Do Rozgryzania I Żucia Inpharm</text:p>
          </table:table-cell>
          <table:table-cell table:style-name="ce8" office:value-type="float" office:value="17996">
            <text:p>17996</text:p>
          </table:table-cell>
          <table:table-cell table:style-name="ce9" office:value-type="string">
            <text:p>2026-03-15 16:47:44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18X.XXX.XXX.1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</text:p>
          </table:table-cell>
          <table:table-cell table:style-name="ce9" office:value-type="string">
            <text:p>Rennie Antacidum Smak Miętowy 24 Tabl. Do Rozgryzania I Żucia Inpharm</text:p>
          </table:table-cell>
          <table:table-cell table:style-name="ce8" office:value-type="float" office:value="17996">
            <text:p>17996</text:p>
          </table:table-cell>
          <table:table-cell table:style-name="ce9" office:value-type="string">
            <text:p>2026-03-15 16:49:14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18X.XXX.XXX.1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ęśnie, stawy i kości</text:p>
          </table:table-cell>
          <table:table-cell table:style-name="ce9" office:value-type="string">
            <text:p>Voltaren Emulgel 1% żel 0,01 g/g 100 g (Import równoległy)</text:p>
          </table:table-cell>
          <table:table-cell table:style-name="ce8" office:value-type="float" office:value="14669">
            <text:p>14669</text:p>
          </table:table-cell>
          <table:table-cell table:style-name="ce9" office:value-type="string">
            <text:p>2026-03-15 16:51:09</text:p>
          </table:table-cell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9" office:value-type="string">
            <text:p>31.XXX.XXX.X4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łyny i żele do dezynfekcji ran</text:p>
          </table:table-cell>
          <table:table-cell table:style-name="ce9" office:value-type="string">
            <text:p>Farmina Jodyna Hospital 800g</text:p>
          </table:table-cell>
          <table:table-cell table:style-name="ce8" office:value-type="float" office:value="8114">
            <text:p>8114</text:p>
          </table:table-cell>
          <table:table-cell table:style-name="ce9" office:value-type="string">
            <text:p>2026-03-15 16:51:50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21X.XXX.XXX.X4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Nizoral Krem 20mg/g 30 g</text:p>
          </table:table-cell>
          <table:table-cell table:style-name="ce8" office:value-type="float" office:value="9594">
            <text:p>9594</text:p>
          </table:table-cell>
          <table:table-cell table:style-name="ce9" office:value-type="string">
            <text:p>2026-03-15 16:53:43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83.XXX.XXX.X2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ciała</text:p>
          </table:table-cell>
          <table:table-cell table:style-name="ce9" office:value-type="string">
            <text:p>AFLOFARM Nivelium med krem dermatologiczny 250ml</text:p>
          </table:table-cell>
          <table:table-cell table:style-name="ce8" office:value-type="float" office:value="8641">
            <text:p>8641</text:p>
          </table:table-cell>
          <table:table-cell table:style-name="ce9" office:value-type="string">
            <text:p>2026-03-15 16:59:03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77.XXX.XXX.2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ciała</text:p>
          </table:table-cell>
          <table:table-cell table:style-name="ce9" office:value-type="string">
            <text:p>AFLOFARM Nivelium med krem dermatologiczny 250ml</text:p>
          </table:table-cell>
          <table:table-cell table:style-name="ce8" office:value-type="float" office:value="8641">
            <text:p>8641</text:p>
          </table:table-cell>
          <table:table-cell table:style-name="ce9" office:value-type="string">
            <text:p>2026-03-15 16:59:54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77.XXX.XXX.2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włosów</text:p>
          </table:table-cell>
          <table:table-cell table:style-name="ce9" office:value-type="string">
            <text:p>Nuxe Hair Prodigieux Odżywcza Maska 30ml + Nabłyszczający Szampon 50ml + Nabłyszczająca Odżywka 30ml</text:p>
          </table:table-cell>
          <table:table-cell table:style-name="ce8" office:value-type="float" office:value="28305">
            <text:p>28305</text:p>
          </table:table-cell>
          <table:table-cell table:style-name="ce9" office:value-type="string">
            <text:p>2026-03-15 17:03:42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84.XXX.XXX.X2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łciowy i moczowy</text:p>
          </table:table-cell>
          <table:table-cell table:style-name="ce9" office:value-type="string">
            <text:p>Miovelia Nac 15 kaps.</text:p>
          </table:table-cell>
          <table:table-cell table:style-name="ce8" office:value-type="float" office:value="11821">
            <text:p>11821</text:p>
          </table:table-cell>
          <table:table-cell table:style-name="ce9" office:value-type="string">
            <text:p>2026-03-15 17:03:46</text:p>
          </table:table-cell>
          <table:table-cell table:style-name="ce10" office:value-type="currency" office:currency="PLN" office:value="0.75">
            <text:p>0,75 zł</text:p>
          </table:table-cell>
          <table:table-cell table:style-name="ce8"/>
          <table:table-cell table:style-name="ce10" office:value-type="currency" office:currency="PLN" office:value="0.75">
            <text:p>0,75 zł</text:p>
          </table:table-cell>
          <table:table-cell table:style-name="ce8"/>
          <table:table-cell table:style-name="ce9" office:value-type="string">
            <text:p>89.XXX.XXX.4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Zioła</text:p>
          </table:table-cell>
          <table:table-cell table:style-name="ce9" office:value-type="string">
            <text:p>Zioła Mnicha Na cholesterol 20tbx2g</text:p>
          </table:table-cell>
          <table:table-cell table:style-name="ce8" office:value-type="float" office:value="14716">
            <text:p>14716</text:p>
          </table:table-cell>
          <table:table-cell table:style-name="ce9" office:value-type="string">
            <text:p>2026-03-15 17:07:19</text:p>
          </table:table-cell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9" office:value-type="string">
            <text:p>37.XXX.XXX.7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APAP Ból i Gorączka C Plus 10 tab. mus.</text:p>
          </table:table-cell>
          <table:table-cell table:style-name="ce8" office:value-type="float" office:value="11252">
            <text:p>11252</text:p>
          </table:table-cell>
          <table:table-cell table:style-name="ce9" office:value-type="string">
            <text:p>2026-03-15 17:07:22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79.XXX.XXX.X4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ciała</text:p>
          </table:table-cell>
          <table:table-cell table:style-name="ce9" office:value-type="string">
            <text:p>Emolium DERMOCARE Emulsja na suchą skórę głowy 100ml</text:p>
          </table:table-cell>
          <table:table-cell table:style-name="ce8" office:value-type="float" office:value="335">
            <text:p>335</text:p>
          </table:table-cell>
          <table:table-cell table:style-name="ce9" office:value-type="string">
            <text:p>2026-03-15 17:07:43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10X.XXX.XXX.9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Termometry</text:p>
          </table:table-cell>
          <table:table-cell table:style-name="ce9" office:value-type="string">
            <text:p>Microlife MT 16C2</text:p>
          </table:table-cell>
          <table:table-cell table:style-name="ce8" office:value-type="float" office:value="9695">
            <text:p>9695</text:p>
          </table:table-cell>
          <table:table-cell table:style-name="ce9" office:value-type="string">
            <text:p>2026-03-15 17:07:59</text:p>
          </table:table-cell>
          <table:table-cell table:style-name="ce10" office:value-type="currency" office:currency="PLN" office:value="1.03">
            <text:p>1,03 zł</text:p>
          </table:table-cell>
          <table:table-cell table:style-name="ce8"/>
          <table:table-cell table:style-name="ce10" office:value-type="currency" office:currency="PLN" office:value="1.03">
            <text:p>1,03 zł</text:p>
          </table:table-cell>
          <table:table-cell table:style-name="ce8"/>
          <table:table-cell table:style-name="ce9" office:value-type="string">
            <text:p>37.XXX.XXX.2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Termometry</text:p>
          </table:table-cell>
          <table:table-cell table:style-name="ce9" office:value-type="string">
            <text:p>Microlife MT 16C2</text:p>
          </table:table-cell>
          <table:table-cell table:style-name="ce8" office:value-type="float" office:value="9695">
            <text:p>9695</text:p>
          </table:table-cell>
          <table:table-cell table:style-name="ce9" office:value-type="string">
            <text:p>2026-03-15 17:10:16</text:p>
          </table:table-cell>
          <table:table-cell table:style-name="ce10" office:value-type="currency" office:currency="PLN" office:value="1.03">
            <text:p>1,03 zł</text:p>
          </table:table-cell>
          <table:table-cell table:style-name="ce8"/>
          <table:table-cell table:style-name="ce10" office:value-type="currency" office:currency="PLN" office:value="1.03">
            <text:p>1,03 zł</text:p>
          </table:table-cell>
          <table:table-cell table:style-name="ce8"/>
          <table:table-cell table:style-name="ce9" office:value-type="string">
            <text:p>10X.XXX.XXX.X0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Otrivin Ipra Max 0,5mg + 0,6mg Aerozol do nosa 10ml</text:p>
          </table:table-cell>
          <table:table-cell table:style-name="ce8" office:value-type="float" office:value="6211">
            <text:p>6211</text:p>
          </table:table-cell>
          <table:table-cell table:style-name="ce9" office:value-type="string">
            <text:p>2026-03-15 17:11:34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37.XXX.XXX.X0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Homeopatia</text:p>
          </table:table-cell>
          <table:table-cell table:style-name="ce9" office:value-type="string">
            <text:p>LEHNING Urarthone krople 250 ml</text:p>
          </table:table-cell>
          <table:table-cell table:style-name="ce8" office:value-type="float" office:value="12034">
            <text:p>12034</text:p>
          </table:table-cell>
          <table:table-cell table:style-name="ce9" office:value-type="string">
            <text:p>2026-03-15 17:15:59</text:p>
          </table:table-cell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9" office:value-type="string">
            <text:p>17X.XXX.XXX.3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Zioła</text:p>
          </table:table-cell>
          <table:table-cell table:style-name="ce9" office:value-type="string">
            <text:p>Verdin Fix Zioła Z Owocami Leśnymi 20 saszetek</text:p>
          </table:table-cell>
          <table:table-cell table:style-name="ce8" office:value-type="float" office:value="18355">
            <text:p>18355</text:p>
          </table:table-cell>
          <table:table-cell table:style-name="ce9" office:value-type="string">
            <text:p>2026-03-15 17:17:12</text:p>
          </table:table-cell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9" office:value-type="string">
            <text:p>37.XXX.XXX.X2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Zioła</text:p>
          </table:table-cell>
          <table:table-cell table:style-name="ce9" office:value-type="string">
            <text:p>Zioła Mnicha Na cholesterol 20tbx2g</text:p>
          </table:table-cell>
          <table:table-cell table:style-name="ce8" office:value-type="float" office:value="14716">
            <text:p>14716</text:p>
          </table:table-cell>
          <table:table-cell table:style-name="ce9" office:value-type="string">
            <text:p>2026-03-15 17:20:38</text:p>
          </table:table-cell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9" office:value-type="string">
            <text:p>37.XXX.XXX.7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Sora Protect - aerozol na włosy zapobiegający wszawicy 50ml</text:p>
          </table:table-cell>
          <table:table-cell table:style-name="ce8" office:value-type="float" office:value="6881">
            <text:p>6881</text:p>
          </table:table-cell>
          <table:table-cell table:style-name="ce9" office:value-type="string">
            <text:p>2026-03-15 17:20:59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46.XXX.XXX.X8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</text:p>
          </table:table-cell>
          <table:table-cell table:style-name="ce9" office:value-type="string">
            <text:p>Eva/Qu czopki przeciw zaparciom 6 czopków</text:p>
          </table:table-cell>
          <table:table-cell table:style-name="ce8" office:value-type="float" office:value="3918">
            <text:p>3918</text:p>
          </table:table-cell>
          <table:table-cell table:style-name="ce9" office:value-type="string">
            <text:p>2026-03-15 17:22:52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37.XXX.XXX.X8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Allergika Krem na powieki MED 15ml</text:p>
          </table:table-cell>
          <table:table-cell table:style-name="ce8" office:value-type="float" office:value="11734">
            <text:p>11734</text:p>
          </table:table-cell>
          <table:table-cell table:style-name="ce9" office:value-type="string">
            <text:p>2026-03-15 17:23:35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37.XXX.XXX.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Akcesoria do inhalatorów</text:p>
          </table:table-cell>
          <table:table-cell table:style-name="ce9" office:value-type="string">
            <text:p>Intec Medical Zestaw Akcesoriów Do Inhalatora Pro Intec Z Maską Dla Dzieci</text:p>
          </table:table-cell>
          <table:table-cell table:style-name="ce8" office:value-type="float" office:value="4164">
            <text:p>4164</text:p>
          </table:table-cell>
          <table:table-cell table:style-name="ce9" office:value-type="string">
            <text:p>2026-03-15 17:23:49</text:p>
          </table:table-cell>
          <table:table-cell table:style-name="ce10" office:value-type="currency" office:currency="PLN" office:value="0.76">
            <text:p>0,76 zł</text:p>
          </table:table-cell>
          <table:table-cell table:style-name="ce8"/>
          <table:table-cell table:style-name="ce10" office:value-type="currency" office:currency="PLN" office:value="0.76">
            <text:p>0,76 zł</text:p>
          </table:table-cell>
          <table:table-cell table:style-name="ce8"/>
          <table:table-cell table:style-name="ce9" office:value-type="string">
            <text:p>84.XXX.XXX.6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UPSARIN C, 20 tabletek musujących</text:p>
          </table:table-cell>
          <table:table-cell table:style-name="ce8" office:value-type="float" office:value="6364">
            <text:p>6364</text:p>
          </table:table-cell>
          <table:table-cell table:style-name="ce9" office:value-type="string">
            <text:p>2026-03-15 17:24:12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85.XXX.XXX.X1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Termometry</text:p>
          </table:table-cell>
          <table:table-cell table:style-name="ce9" office:value-type="string">
            <text:p>Depan 01004011</text:p>
          </table:table-cell>
          <table:table-cell table:style-name="ce8" office:value-type="float" office:value="18210">
            <text:p>18210</text:p>
          </table:table-cell>
          <table:table-cell table:style-name="ce9" office:value-type="string">
            <text:p>2026-03-15 17:31:51</text:p>
          </table:table-cell>
          <table:table-cell table:style-name="ce10" office:value-type="currency" office:currency="PLN" office:value="1.03">
            <text:p>1,03 zł</text:p>
          </table:table-cell>
          <table:table-cell table:style-name="ce8"/>
          <table:table-cell table:style-name="ce10" office:value-type="currency" office:currency="PLN" office:value="1.03">
            <text:p>1,03 zł</text:p>
          </table:table-cell>
          <table:table-cell table:style-name="ce8"/>
          <table:table-cell table:style-name="ce9" office:value-type="string">
            <text:p>78.XXX.XXX.X3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nerały i witaminy</text:p>
          </table:table-cell>
          <table:table-cell table:style-name="ce9" office:value-type="string">
            <text:p>BODYMAX PLUS Multiwitamina Odporność Energia 200 tab.</text:p>
          </table:table-cell>
          <table:table-cell table:style-name="ce8" office:value-type="float" office:value="16252">
            <text:p>16252</text:p>
          </table:table-cell>
          <table:table-cell table:style-name="ce9" office:value-type="string">
            <text:p>2026-03-15 17:31:55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37.XXX.XXX.8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Opatrunki</text:p>
          </table:table-cell>
          <table:table-cell table:style-name="ce9" office:value-type="string">
            <text:p>Aqua Gel opatrunek hydrożelowy 10x12cm 1 szt.</text:p>
          </table:table-cell>
          <table:table-cell table:style-name="ce8" office:value-type="float" office:value="6772">
            <text:p>6772</text:p>
          </table:table-cell>
          <table:table-cell table:style-name="ce9" office:value-type="string">
            <text:p>2026-03-15 17:32:11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18X.XXX.XXX.3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moczowy i płciowy</text:p>
          </table:table-cell>
          <table:table-cell table:style-name="ce9" office:value-type="string">
            <text:p>Gynoxin Optima 200mg 3kaps.</text:p>
          </table:table-cell>
          <table:table-cell table:style-name="ce8" office:value-type="float" office:value="9579">
            <text:p>9579</text:p>
          </table:table-cell>
          <table:table-cell table:style-name="ce9" office:value-type="string">
            <text:p>2026-03-15 17:33:47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18X.XXX.XXX.X0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ozostałe artykuły medyczne i rehabilitacyjne</text:p>
          </table:table-cell>
          <table:table-cell table:style-name="ce9" office:value-type="string">
            <text:p>TZMO Pojemnik do dobowej zbiórki moczu tulipan 2,5 l</text:p>
          </table:table-cell>
          <table:table-cell table:style-name="ce8" office:value-type="float" office:value="6579">
            <text:p>6579</text:p>
          </table:table-cell>
          <table:table-cell table:style-name="ce9" office:value-type="string">
            <text:p>2026-03-15 17:33:48</text:p>
          </table:table-cell>
          <table:table-cell table:style-name="ce10" office:value-type="currency" office:currency="PLN" office:value="0.92">
            <text:p>0,92 zł</text:p>
          </table:table-cell>
          <table:table-cell table:style-name="ce8"/>
          <table:table-cell table:style-name="ce10" office:value-type="currency" office:currency="PLN" office:value="0.92">
            <text:p>0,92 zł</text:p>
          </table:table-cell>
          <table:table-cell table:style-name="ce8"/>
          <table:table-cell table:style-name="ce9" office:value-type="string">
            <text:p>94.XXX.XXX.9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</text:p>
          </table:table-cell>
          <table:table-cell table:style-name="ce9" office:value-type="string">
            <text:p>Dulcobis czopki na zaparcia 6 szt.</text:p>
          </table:table-cell>
          <table:table-cell table:style-name="ce8" office:value-type="float" office:value="8472">
            <text:p>8472</text:p>
          </table:table-cell>
          <table:table-cell table:style-name="ce9" office:value-type="string">
            <text:p>2026-03-15 17:34:19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37.XXX.XXX.X1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Glukometry i akcesoria dla diabetyków</text:p>
          </table:table-cell>
          <table:table-cell table:style-name="ce9" office:value-type="string">
            <text:p>Accu-Chek Nakłuwacz FastClix + 6 lancetów</text:p>
          </table:table-cell>
          <table:table-cell table:style-name="ce8" office:value-type="float" office:value="8385">
            <text:p>8385</text:p>
          </table:table-cell>
          <table:table-cell table:style-name="ce9" office:value-type="string">
            <text:p>2026-03-15 17:37:40</text:p>
          </table:table-cell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9" office:value-type="string">
            <text:p>21X.XXX.XXX.5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Alfofarm Sora Med płyn do zwalczania wszawicy 100ml</text:p>
          </table:table-cell>
          <table:table-cell table:style-name="ce8" office:value-type="float" office:value="18130">
            <text:p>18130</text:p>
          </table:table-cell>
          <table:table-cell table:style-name="ce9" office:value-type="string">
            <text:p>2026-03-15 17:37:51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37.XXX.XXX.X4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Alfofarm Sora Med płyn do zwalczania wszawicy 100ml</text:p>
          </table:table-cell>
          <table:table-cell table:style-name="ce8" office:value-type="float" office:value="18130">
            <text:p>18130</text:p>
          </table:table-cell>
          <table:table-cell table:style-name="ce9" office:value-type="string">
            <text:p>2026-03-15 17:38:16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37.XXX.XXX.X4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Opatrunki</text:p>
          </table:table-cell>
          <table:table-cell table:style-name="ce9" office:value-type="string">
            <text:p>Hartmann Atrauman Ag opatrunek z maścią 5cm x 5cm 1szt.</text:p>
          </table:table-cell>
          <table:table-cell table:style-name="ce8" office:value-type="float" office:value="7724">
            <text:p>7724</text:p>
          </table:table-cell>
          <table:table-cell table:style-name="ce9" office:value-type="string">
            <text:p>2026-03-15 17:39:23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31.XXX.XXX.X9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Inpharm Betadine Roztwór Na Skórę 0,1g/ml 30ml</text:p>
          </table:table-cell>
          <table:table-cell table:style-name="ce8" office:value-type="float" office:value="16180">
            <text:p>16180</text:p>
          </table:table-cell>
          <table:table-cell table:style-name="ce9" office:value-type="string">
            <text:p>2026-03-15 17:41:58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31.XXX.XXX.X3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Glukometry i akcesoria dla diabetyków</text:p>
          </table:table-cell>
          <table:table-cell table:style-name="ce9" office:value-type="string">
            <text:p>Accu-Chek Nakłuwacz FastClix + 6 lancetów</text:p>
          </table:table-cell>
          <table:table-cell table:style-name="ce8" office:value-type="float" office:value="8385">
            <text:p>8385</text:p>
          </table:table-cell>
          <table:table-cell table:style-name="ce9" office:value-type="string">
            <text:p>2026-03-15 17:43:32</text:p>
          </table:table-cell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9" office:value-type="string">
            <text:p>21X.XXX.XXX.5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Dla dziecka</text:p>
          </table:table-cell>
          <table:table-cell table:style-name="ce9" office:value-type="string">
            <text:p>Mleka początkowe</text:p>
          </table:table-cell>
          <table:table-cell table:style-name="ce9" office:value-type="string">
            <text:p>Bebilon Nenatal Premium Płyn 24X70Ml</text:p>
          </table:table-cell>
          <table:table-cell table:style-name="ce8" office:value-type="float" office:value="12210">
            <text:p>12210</text:p>
          </table:table-cell>
          <table:table-cell table:style-name="ce9" office:value-type="string">
            <text:p>2026-03-15 17:44:24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17X.XXX.XXX.6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Termometry</text:p>
          </table:table-cell>
          <table:table-cell table:style-name="ce9" office:value-type="string">
            <text:p>Microlife MT 16C2</text:p>
          </table:table-cell>
          <table:table-cell table:style-name="ce8" office:value-type="float" office:value="9695">
            <text:p>9695</text:p>
          </table:table-cell>
          <table:table-cell table:style-name="ce9" office:value-type="string">
            <text:p>2026-03-15 17:46:53</text:p>
          </table:table-cell>
          <table:table-cell table:style-name="ce10" office:value-type="currency" office:currency="PLN" office:value="1.03">
            <text:p>1,03 zł</text:p>
          </table:table-cell>
          <table:table-cell table:style-name="ce8"/>
          <table:table-cell table:style-name="ce10" office:value-type="currency" office:currency="PLN" office:value="1.03">
            <text:p>1,03 zł</text:p>
          </table:table-cell>
          <table:table-cell table:style-name="ce8"/>
          <table:table-cell table:style-name="ce9" office:value-type="string">
            <text:p>95.XXX.XXX.X2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UPSARIN C, 20 tabletek musujących</text:p>
          </table:table-cell>
          <table:table-cell table:style-name="ce8" office:value-type="float" office:value="6364">
            <text:p>6364</text:p>
          </table:table-cell>
          <table:table-cell table:style-name="ce9" office:value-type="string">
            <text:p>2026-03-15 17:46:56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31.XXX.XXX.2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nerwowy i pamięć</text:p>
          </table:table-cell>
          <table:table-cell table:style-name="ce9" office:value-type="string">
            <text:p>Tabletki NEOSEN Forte 30 szt.</text:p>
          </table:table-cell>
          <table:table-cell table:style-name="ce8" office:value-type="float" office:value="32291">
            <text:p>32291</text:p>
          </table:table-cell>
          <table:table-cell table:style-name="ce9" office:value-type="string">
            <text:p>2026-03-15 17:49:32</text:p>
          </table:table-cell>
          <table:table-cell table:style-name="ce10" office:value-type="currency" office:currency="PLN" office:value="0.74">
            <text:p>0,74 zł</text:p>
          </table:table-cell>
          <table:table-cell table:style-name="ce8"/>
          <table:table-cell table:style-name="ce10" office:value-type="currency" office:currency="PLN" office:value="0.74">
            <text:p>0,74 zł</text:p>
          </table:table-cell>
          <table:table-cell table:style-name="ce8"/>
          <table:table-cell table:style-name="ce9" office:value-type="string">
            <text:p>31.XXX.XXX.X3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Iwostin Hydro Sensitia Intensywnie nawilżające serum, 30 ml</text:p>
          </table:table-cell>
          <table:table-cell table:style-name="ce8" office:value-type="float" office:value="14083">
            <text:p>14083</text:p>
          </table:table-cell>
          <table:table-cell table:style-name="ce9" office:value-type="string">
            <text:p>2026-03-15 17:50:38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46.XXX.XXX.8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 i trawienie</text:p>
          </table:table-cell>
          <table:table-cell table:style-name="ce9" office:value-type="string">
            <text:p>4 Liver 45kaps. Colfarm</text:p>
          </table:table-cell>
          <table:table-cell table:style-name="ce8" office:value-type="float" office:value="15926">
            <text:p>15926</text:p>
          </table:table-cell>
          <table:table-cell table:style-name="ce9" office:value-type="string">
            <text:p>2026-03-15 17:51:54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88.XXX.XXX.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</text:p>
          </table:table-cell>
          <table:table-cell table:style-name="ce9" office:value-type="string">
            <text:p>Rennie Antiacidum o smaku miętowym 48 tabletek do ssania</text:p>
          </table:table-cell>
          <table:table-cell table:style-name="ce8" office:value-type="float" office:value="15795">
            <text:p>15795</text:p>
          </table:table-cell>
          <table:table-cell table:style-name="ce9" office:value-type="string">
            <text:p>2026-03-15 17:54:15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83.XXX.XXX.X5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nerały i witaminy</text:p>
          </table:table-cell>
          <table:table-cell table:style-name="ce9" office:value-type="string">
            <text:p>Sufrin 60tabl.</text:p>
          </table:table-cell>
          <table:table-cell table:style-name="ce8" office:value-type="float" office:value="5345">
            <text:p>5345</text:p>
          </table:table-cell>
          <table:table-cell table:style-name="ce9" office:value-type="string">
            <text:p>2026-03-15 17:56:38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17X.XXX.XXX.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Avene HYDRANCE UV Lekki krem nawilżający SPF 30 40ml</text:p>
          </table:table-cell>
          <table:table-cell table:style-name="ce8" office:value-type="float" office:value="9958">
            <text:p>9958</text:p>
          </table:table-cell>
          <table:table-cell table:style-name="ce9" office:value-type="string">
            <text:p>2026-03-15 17:59:20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31.XXX.XXX.5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Kremy do ciała</text:p>
          </table:table-cell>
          <table:table-cell table:style-name="ce9" office:value-type="string">
            <text:p>Gorvita Żel żywokostowy z jałowcem i MSM 200ml</text:p>
          </table:table-cell>
          <table:table-cell table:style-name="ce8" office:value-type="float" office:value="11273">
            <text:p>11273</text:p>
          </table:table-cell>
          <table:table-cell table:style-name="ce9" office:value-type="string">
            <text:p>2026-03-15 18:01:01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91.XXX.XXX.X5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Emolium INTENSIVE Krem specjalny 75ml</text:p>
          </table:table-cell>
          <table:table-cell table:style-name="ce8" office:value-type="float" office:value="3892">
            <text:p>3892</text:p>
          </table:table-cell>
          <table:table-cell table:style-name="ce9" office:value-type="string">
            <text:p>2026-03-15 18:03:09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21X.XXX.XXX.X0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 i trawienie</text:p>
          </table:table-cell>
          <table:table-cell table:style-name="ce9" office:value-type="string">
            <text:p>Daopro 30 Minitabl. Dojelitowych</text:p>
          </table:table-cell>
          <table:table-cell table:style-name="ce8" office:value-type="float" office:value="19374">
            <text:p>19374</text:p>
          </table:table-cell>
          <table:table-cell table:style-name="ce9" office:value-type="string">
            <text:p>2026-03-15 18:03:39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21X.XXX.XXX.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</text:p>
          </table:table-cell>
          <table:table-cell table:style-name="ce9" office:value-type="string">
            <text:p>Pantoprazol Teva 20 mg 14 tabl.</text:p>
          </table:table-cell>
          <table:table-cell table:style-name="ce8" office:value-type="float" office:value="9938">
            <text:p>9938</text:p>
          </table:table-cell>
          <table:table-cell table:style-name="ce9" office:value-type="string">
            <text:p>2026-03-15 18:04:14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91.XXX.XXX.X4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</text:p>
          </table:table-cell>
          <table:table-cell table:style-name="ce9" office:value-type="string">
            <text:p>Pantoprazol Teva 20 mg 14 tabl.</text:p>
          </table:table-cell>
          <table:table-cell table:style-name="ce8" office:value-type="float" office:value="9938">
            <text:p>9938</text:p>
          </table:table-cell>
          <table:table-cell table:style-name="ce9" office:value-type="string">
            <text:p>2026-03-15 18:05:47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91.XXX.XXX.X4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moczowy i płciowy</text:p>
          </table:table-cell>
          <table:table-cell table:style-name="ce9" office:value-type="string">
            <text:p>Prurifem Kadefarm 30ml</text:p>
          </table:table-cell>
          <table:table-cell table:style-name="ce8" office:value-type="float" office:value="5129">
            <text:p>5129</text:p>
          </table:table-cell>
          <table:table-cell table:style-name="ce9" office:value-type="string">
            <text:p>2026-03-15 18:10:46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94.XXX.XXX.9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ęśnie, stawy i kości</text:p>
          </table:table-cell>
          <table:table-cell table:style-name="ce9" office:value-type="string">
            <text:p>Borowina Lecznicza Pasta 1 Kg</text:p>
          </table:table-cell>
          <table:table-cell table:style-name="ce8" office:value-type="float" office:value="4899">
            <text:p>4899</text:p>
          </table:table-cell>
          <table:table-cell table:style-name="ce9" office:value-type="string">
            <text:p>2026-03-15 18:10:58</text:p>
          </table:table-cell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9" office:value-type="string">
            <text:p>89.XXX.XXX.X2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Testy diagnostyczne</text:p>
          </table:table-cell>
          <table:table-cell table:style-name="ce9" office:value-type="string">
            <text:p>Test OraQuick na obecność wirusa HIV</text:p>
          </table:table-cell>
          <table:table-cell table:style-name="ce8" office:value-type="float" office:value="19586">
            <text:p>19586</text:p>
          </table:table-cell>
          <table:table-cell table:style-name="ce9" office:value-type="string">
            <text:p>2026-03-15 18:12:59</text:p>
          </table:table-cell>
          <table:table-cell table:style-name="ce10" office:value-type="currency" office:currency="PLN" office:value="0.74">
            <text:p>0,74 zł</text:p>
          </table:table-cell>
          <table:table-cell table:style-name="ce8"/>
          <table:table-cell table:style-name="ce10" office:value-type="currency" office:currency="PLN" office:value="0.74">
            <text:p>0,74 zł</text:p>
          </table:table-cell>
          <table:table-cell table:style-name="ce8"/>
          <table:table-cell table:style-name="ce9" office:value-type="string">
            <text:p>46.XXX.XXX.X5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Dla dziecka</text:p>
          </table:table-cell>
          <table:table-cell table:style-name="ce9" office:value-type="string">
            <text:p>Mleka początkowe</text:p>
          </table:table-cell>
          <table:table-cell table:style-name="ce9" office:value-type="string">
            <text:p>NESTLE NAN OPTIPRO Plus 1 HM-O Mleko Początkowe dla niemowląt od urodzenia 400g</text:p>
          </table:table-cell>
          <table:table-cell table:style-name="ce8" office:value-type="float" office:value="17320">
            <text:p>17320</text:p>
          </table:table-cell>
          <table:table-cell table:style-name="ce9" office:value-type="string">
            <text:p>2026-03-15 18:13:12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93.XXX.XXX.X4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Skinoren Krem 30g</text:p>
          </table:table-cell>
          <table:table-cell table:style-name="ce8" office:value-type="float" office:value="10861">
            <text:p>10861</text:p>
          </table:table-cell>
          <table:table-cell table:style-name="ce9" office:value-type="string">
            <text:p>2026-03-15 18:19:28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37.XXX.XXX.X3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Otrivin Ipra Max 0,5mg + 0,6mg Aerozol do nosa 10ml</text:p>
          </table:table-cell>
          <table:table-cell table:style-name="ce8" office:value-type="float" office:value="6211">
            <text:p>6211</text:p>
          </table:table-cell>
          <table:table-cell table:style-name="ce9" office:value-type="string">
            <text:p>2026-03-15 18:22:41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31.XXX.XXX.X1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Opatrunki</text:p>
          </table:table-cell>
          <table:table-cell table:style-name="ce9" office:value-type="string">
            <text:p>BACTIGRAS Opatrunek Gazowy Nasączony Parafiną I Chlorheksydyną 10cm x 10cm 10szt.</text:p>
          </table:table-cell>
          <table:table-cell table:style-name="ce8" office:value-type="float" office:value="9185">
            <text:p>9185</text:p>
          </table:table-cell>
          <table:table-cell table:style-name="ce9" office:value-type="string">
            <text:p>2026-03-15 18:23:28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10X.XXX.XXX.7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Rabka Spa Minerale Spray Mgiełka Solankowa 200 ml</text:p>
          </table:table-cell>
          <table:table-cell table:style-name="ce8" office:value-type="float" office:value="17911">
            <text:p>17911</text:p>
          </table:table-cell>
          <table:table-cell table:style-name="ce9" office:value-type="string">
            <text:p>2026-03-15 18:23:51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5.XXX.XXX.X2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Kremy do twarzy</text:p>
          </table:table-cell>
          <table:table-cell table:style-name="ce9" office:value-type="string">
            <text:p>Krem Naturalis Wiesiołkowy Półtłusty na dzień i noc 50ml</text:p>
          </table:table-cell>
          <table:table-cell table:style-name="ce8" office:value-type="float" office:value="17394">
            <text:p>17394</text:p>
          </table:table-cell>
          <table:table-cell table:style-name="ce9" office:value-type="string">
            <text:p>2026-03-15 18:25:06</text:p>
          </table:table-cell>
          <table:table-cell table:style-name="ce10" office:value-type="currency" office:currency="PLN" office:value="1.02">
            <text:p>1,02 zł</text:p>
          </table:table-cell>
          <table:table-cell table:style-name="ce8"/>
          <table:table-cell table:style-name="ce10" office:value-type="currency" office:currency="PLN" office:value="1.02">
            <text:p>1,02 zł</text:p>
          </table:table-cell>
          <table:table-cell table:style-name="ce8"/>
          <table:table-cell table:style-name="ce9" office:value-type="string">
            <text:p>83.XXX.XXX.8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Chema-Elektromet Atopigo koncentrat do koncentrat do kąpieli 100g</text:p>
          </table:table-cell>
          <table:table-cell table:style-name="ce8" office:value-type="float" office:value="13988">
            <text:p>13988</text:p>
          </table:table-cell>
          <table:table-cell table:style-name="ce9" office:value-type="string">
            <text:p>2026-03-15 18:30:48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80.XXX.XXX.6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Testy diagnostyczne</text:p>
          </table:table-cell>
          <table:table-cell table:style-name="ce9" office:value-type="string">
            <text:p>Test OraQuick na obecność wirusa HIV</text:p>
          </table:table-cell>
          <table:table-cell table:style-name="ce8" office:value-type="float" office:value="19586">
            <text:p>19586</text:p>
          </table:table-cell>
          <table:table-cell table:style-name="ce9" office:value-type="string">
            <text:p>2026-03-15 18:33:07</text:p>
          </table:table-cell>
          <table:table-cell table:style-name="ce10" office:value-type="currency" office:currency="PLN" office:value="0.74">
            <text:p>0,74 zł</text:p>
          </table:table-cell>
          <table:table-cell table:style-name="ce8"/>
          <table:table-cell table:style-name="ce10" office:value-type="currency" office:currency="PLN" office:value="0.74">
            <text:p>0,74 zł</text:p>
          </table:table-cell>
          <table:table-cell table:style-name="ce8"/>
          <table:table-cell table:style-name="ce9" office:value-type="string">
            <text:p>46.XXX.XXX.X5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Testy diagnostyczne</text:p>
          </table:table-cell>
          <table:table-cell table:style-name="ce9" office:value-type="string">
            <text:p>Test OraQuick na obecność wirusa HIV</text:p>
          </table:table-cell>
          <table:table-cell table:style-name="ce8" office:value-type="float" office:value="19586">
            <text:p>19586</text:p>
          </table:table-cell>
          <table:table-cell table:style-name="ce9" office:value-type="string">
            <text:p>2026-03-15 18:35:52</text:p>
          </table:table-cell>
          <table:table-cell table:style-name="ce10" office:value-type="currency" office:currency="PLN" office:value="0.74">
            <text:p>0,74 zł</text:p>
          </table:table-cell>
          <table:table-cell table:style-name="ce8"/>
          <table:table-cell table:style-name="ce10" office:value-type="currency" office:currency="PLN" office:value="0.74">
            <text:p>0,74 zł</text:p>
          </table:table-cell>
          <table:table-cell table:style-name="ce8"/>
          <table:table-cell table:style-name="ce9" office:value-type="string">
            <text:p>46.XXX.XXX.X5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Opatrunki</text:p>
          </table:table-cell>
          <table:table-cell table:style-name="ce9" office:value-type="string">
            <text:p>Aqua Gel opatrunek hydrożelowy 10x12cm 1 szt.</text:p>
          </table:table-cell>
          <table:table-cell table:style-name="ce8" office:value-type="float" office:value="6772">
            <text:p>6772</text:p>
          </table:table-cell>
          <table:table-cell table:style-name="ce9" office:value-type="string">
            <text:p>2026-03-15 18:39:49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17X.XXX.XXX.X0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Avène Dermabsolu Redensifying Day Cream Krem <text:s/>Modelujący Na Dzień Przeciw Zmarszczkom 50Ml</text:p>
          </table:table-cell>
          <table:table-cell table:style-name="ce8" office:value-type="float" office:value="31926">
            <text:p>31926</text:p>
          </table:table-cell>
          <table:table-cell table:style-name="ce9" office:value-type="string">
            <text:p>2026-03-15 18:49:29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21X.XXX.XXX.X4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Avène Dermabsolu Redensifying Day Cream Krem <text:s/>Modelujący Na Dzień Przeciw Zmarszczkom 50Ml</text:p>
          </table:table-cell>
          <table:table-cell table:style-name="ce8" office:value-type="float" office:value="31926">
            <text:p>31926</text:p>
          </table:table-cell>
          <table:table-cell table:style-name="ce9" office:value-type="string">
            <text:p>2026-03-15 18:49:30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21X.XXX.XXX.X4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Glukometry i akcesoria dla diabetyków</text:p>
          </table:table-cell>
          <table:table-cell table:style-name="ce9" office:value-type="string">
            <text:p>Accu-Check Active</text:p>
          </table:table-cell>
          <table:table-cell table:style-name="ce8" office:value-type="float" office:value="19537">
            <text:p>19537</text:p>
          </table:table-cell>
          <table:table-cell table:style-name="ce9" office:value-type="string">
            <text:p>2026-03-15 19:02:43</text:p>
          </table:table-cell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9" office:value-type="string">
            <text:p>37.XXX.XXX.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ciała</text:p>
          </table:table-cell>
          <table:table-cell table:style-name="ce9" office:value-type="string">
            <text:p>A-DERMA DERMALIBOUR+ CICA- Krem regenerujący 100ml</text:p>
          </table:table-cell>
          <table:table-cell table:style-name="ce8" office:value-type="float" office:value="10516">
            <text:p>10516</text:p>
          </table:table-cell>
          <table:table-cell table:style-name="ce9" office:value-type="string">
            <text:p>2026-03-15 19:03:24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37.XXX.XXX.X8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Avene Sunsimed Ka Bardzo Wysoka Ochrona 80ml</text:p>
          </table:table-cell>
          <table:table-cell table:style-name="ce8" office:value-type="float" office:value="28241">
            <text:p>28241</text:p>
          </table:table-cell>
          <table:table-cell table:style-name="ce9" office:value-type="string">
            <text:p>2026-03-15 19:07:19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78.XXX.XXX.6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nerwowy i pamięć</text:p>
          </table:table-cell>
          <table:table-cell table:style-name="ce9" office:value-type="string">
            <text:p>Tabletki Neurotynox D 30 szt.</text:p>
          </table:table-cell>
          <table:table-cell table:style-name="ce8" office:value-type="float" office:value="4684">
            <text:p>4684</text:p>
          </table:table-cell>
          <table:table-cell table:style-name="ce9" office:value-type="string">
            <text:p>2026-03-15 19:08:19</text:p>
          </table:table-cell>
          <table:table-cell table:style-name="ce10" office:value-type="currency" office:currency="PLN" office:value="0.74">
            <text:p>0,74 zł</text:p>
          </table:table-cell>
          <table:table-cell table:style-name="ce8"/>
          <table:table-cell table:style-name="ce10" office:value-type="currency" office:currency="PLN" office:value="0.74">
            <text:p>0,74 zł</text:p>
          </table:table-cell>
          <table:table-cell table:style-name="ce8"/>
          <table:table-cell table:style-name="ce9" office:value-type="string">
            <text:p>5.XXX.XXX.6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Zestawy dermokosmetyków</text:p>
          </table:table-cell>
          <table:table-cell table:style-name="ce9" office:value-type="string">
            <text:p>Krem Nuxe Prodigieuse Florale Zestaw z kosmetyczką podróżną 2024</text:p>
          </table:table-cell>
          <table:table-cell table:style-name="ce8" office:value-type="float" office:value="28311">
            <text:p>28311</text:p>
          </table:table-cell>
          <table:table-cell table:style-name="ce9" office:value-type="string">
            <text:p>2026-03-15 19:12:09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37.XXX.XXX.X3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ciała</text:p>
          </table:table-cell>
          <table:table-cell table:style-name="ce9" office:value-type="string">
            <text:p>A-DERMA DERMALIBOUR+ CICA- Krem regenerujący 50ml</text:p>
          </table:table-cell>
          <table:table-cell table:style-name="ce8" office:value-type="float" office:value="10517">
            <text:p>10517</text:p>
          </table:table-cell>
          <table:table-cell table:style-name="ce9" office:value-type="string">
            <text:p>2026-03-15 19:14:15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31.XXX.XXX.2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Otrivin Menthol 1mg/ml Aerozol do nosa 10 ml</text:p>
          </table:table-cell>
          <table:table-cell table:style-name="ce8" office:value-type="float" office:value="14886">
            <text:p>14886</text:p>
          </table:table-cell>
          <table:table-cell table:style-name="ce9" office:value-type="string">
            <text:p>2026-03-15 19:14:35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83.XXX.XXX.X2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Suplementy na wzrok i słuch</text:p>
          </table:table-cell>
          <table:table-cell table:style-name="ce9" office:value-type="string">
            <text:p>Kropia Plus krople do oczu nawilżające 10ml</text:p>
          </table:table-cell>
          <table:table-cell table:style-name="ce8" office:value-type="float" office:value="29313">
            <text:p>29313</text:p>
          </table:table-cell>
          <table:table-cell table:style-name="ce9" office:value-type="string">
            <text:p>2026-03-15 19:16:25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45.XXX.XXX.X3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Nizoral Krem 20mg/g 30 g</text:p>
          </table:table-cell>
          <table:table-cell table:style-name="ce8" office:value-type="float" office:value="9594">
            <text:p>9594</text:p>
          </table:table-cell>
          <table:table-cell table:style-name="ce9" office:value-type="string">
            <text:p>2026-03-15 19:21:47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17X.XXX.XXX.X1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łyny i żele do dezynfekcji ran</text:p>
          </table:table-cell>
          <table:table-cell table:style-name="ce9" office:value-type="string">
            <text:p>Skinsept Pur Płyn do odkażania skóry 350ml</text:p>
          </table:table-cell>
          <table:table-cell table:style-name="ce8" office:value-type="float" office:value="5291">
            <text:p>5291</text:p>
          </table:table-cell>
          <table:table-cell table:style-name="ce9" office:value-type="string">
            <text:p>2026-03-15 19:22:30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83.XXX.XXX.7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krążenia i serce</text:p>
          </table:table-cell>
          <table:table-cell table:style-name="ce9" office:value-type="string">
            <text:p>Berimal Forte 60kaps.</text:p>
          </table:table-cell>
          <table:table-cell table:style-name="ce8" office:value-type="float" office:value="19109">
            <text:p>19109</text:p>
          </table:table-cell>
          <table:table-cell table:style-name="ce9" office:value-type="string">
            <text:p>2026-03-15 19:23:09</text:p>
          </table:table-cell>
          <table:table-cell table:style-name="ce10" office:value-type="currency" office:currency="PLN" office:value="0.83">
            <text:p>0,83 zł</text:p>
          </table:table-cell>
          <table:table-cell table:style-name="ce8"/>
          <table:table-cell table:style-name="ce10" office:value-type="currency" office:currency="PLN" office:value="0.83">
            <text:p>0,83 zł</text:p>
          </table:table-cell>
          <table:table-cell table:style-name="ce8"/>
          <table:table-cell table:style-name="ce9" office:value-type="string">
            <text:p>18X.XXX.XXX.3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</text:p>
          </table:table-cell>
          <table:table-cell table:style-name="ce9" office:value-type="string">
            <text:p>trilac 20 kaps</text:p>
          </table:table-cell>
          <table:table-cell table:style-name="ce8" office:value-type="float" office:value="5438">
            <text:p>5438</text:p>
          </table:table-cell>
          <table:table-cell table:style-name="ce9" office:value-type="string">
            <text:p>2026-03-15 19:24:33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46.XXX.XXX.X3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eparaty medycyny naturalnej</text:p>
          </table:table-cell>
          <table:table-cell table:style-name="ce9" office:value-type="string">
            <text:p>Tisane FARM Żel propolisowy 6g</text:p>
          </table:table-cell>
          <table:table-cell table:style-name="ce8" office:value-type="float" office:value="18277">
            <text:p>18277</text:p>
          </table:table-cell>
          <table:table-cell table:style-name="ce9" office:value-type="string">
            <text:p>2026-03-15 19:25:18</text:p>
          </table:table-cell>
          <table:table-cell table:style-name="ce10" office:value-type="currency" office:currency="PLN" office:value="0.88">
            <text:p>0,88 zł</text:p>
          </table:table-cell>
          <table:table-cell table:style-name="ce8"/>
          <table:table-cell table:style-name="ce10" office:value-type="currency" office:currency="PLN" office:value="0.88">
            <text:p>0,88 zł</text:p>
          </table:table-cell>
          <table:table-cell table:style-name="ce8"/>
          <table:table-cell table:style-name="ce9" office:value-type="string">
            <text:p>17X.XXX.XXX.X0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Avene COLD CREAM Krem 40ml</text:p>
          </table:table-cell>
          <table:table-cell table:style-name="ce8" office:value-type="float" office:value="3813">
            <text:p>3813</text:p>
          </table:table-cell>
          <table:table-cell table:style-name="ce9" office:value-type="string">
            <text:p>2026-03-15 19:25:36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79.XXX.XXX.6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</text:p>
          </table:table-cell>
          <table:table-cell table:style-name="ce9" office:value-type="string">
            <text:p>trilac 20 kaps</text:p>
          </table:table-cell>
          <table:table-cell table:style-name="ce8" office:value-type="float" office:value="5438">
            <text:p>5438</text:p>
          </table:table-cell>
          <table:table-cell table:style-name="ce9" office:value-type="string">
            <text:p>2026-03-15 19:25:58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46.XXX.XXX.X3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</text:p>
          </table:table-cell>
          <table:table-cell table:style-name="ce9" office:value-type="string">
            <text:p>trilac 20 kaps</text:p>
          </table:table-cell>
          <table:table-cell table:style-name="ce8" office:value-type="float" office:value="5438">
            <text:p>5438</text:p>
          </table:table-cell>
          <table:table-cell table:style-name="ce9" office:value-type="string">
            <text:p>2026-03-15 19:26:01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17X.XXX.XXX.X4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Glukometry i akcesoria dla diabetyków</text:p>
          </table:table-cell>
          <table:table-cell table:style-name="ce9" office:value-type="string">
            <text:p>Accu-Check Active</text:p>
          </table:table-cell>
          <table:table-cell table:style-name="ce8" office:value-type="float" office:value="19537">
            <text:p>19537</text:p>
          </table:table-cell>
          <table:table-cell table:style-name="ce9" office:value-type="string">
            <text:p>2026-03-15 19:30:32</text:p>
          </table:table-cell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9" office:value-type="string">
            <text:p>37.XXX.XXX.X9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Biuro i firma</text:p>
          </table:table-cell>
          <table:table-cell table:style-name="ce9" office:value-type="string">
            <text:p>Wyposażenie medyczne</text:p>
          </table:table-cell>
          <table:table-cell table:style-name="ce9" office:value-type="string">
            <text:p>Van Oostveen Medical Strzykawka Tuberkulinowa 1ml + Igła 0,3x13 Szt</text:p>
          </table:table-cell>
          <table:table-cell table:style-name="ce8" office:value-type="float" office:value="11603">
            <text:p>11603</text:p>
          </table:table-cell>
          <table:table-cell table:style-name="ce9" office:value-type="string">
            <text:p>2026-03-15 19:31:04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89.XXX.XXX.8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Kremy do ciała</text:p>
          </table:table-cell>
          <table:table-cell table:style-name="ce9" office:value-type="string">
            <text:p>Gorvita Żel żywokostowy z jałowcem i MSM 200ml</text:p>
          </table:table-cell>
          <table:table-cell table:style-name="ce8" office:value-type="float" office:value="11273">
            <text:p>11273</text:p>
          </table:table-cell>
          <table:table-cell table:style-name="ce9" office:value-type="string">
            <text:p>2026-03-15 19:32:23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37.XXX.XXX.X6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Emolium DERMOCARE Krem przeciw odparzeniom 75ml</text:p>
          </table:table-cell>
          <table:table-cell table:style-name="ce8" office:value-type="float" office:value="337">
            <text:p>337</text:p>
          </table:table-cell>
          <table:table-cell table:style-name="ce9" office:value-type="string">
            <text:p>2026-03-15 19:32:27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10X.XXX.XXX.1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Zestawy dermokosmetyków</text:p>
          </table:table-cell>
          <table:table-cell table:style-name="ce9" office:value-type="string">
            <text:p>Krem Nuxe Prodigieuse Florale Zestaw z kosmetyczką podróżną 2024</text:p>
          </table:table-cell>
          <table:table-cell table:style-name="ce8" office:value-type="float" office:value="28311">
            <text:p>28311</text:p>
          </table:table-cell>
          <table:table-cell table:style-name="ce9" office:value-type="string">
            <text:p>2026-03-15 19:32:54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83.XXX.XXX.X1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Pozostałe kosmetyki do pielęgnacji ciała</text:p>
          </table:table-cell>
          <table:table-cell table:style-name="ce9" office:value-type="string">
            <text:p>Gorvita Maść Rokitnikowa Z Ekstraktem Z Nagietka 140Ml</text:p>
          </table:table-cell>
          <table:table-cell table:style-name="ce8" office:value-type="float" office:value="17250">
            <text:p>17250</text:p>
          </table:table-cell>
          <table:table-cell table:style-name="ce9" office:value-type="string">
            <text:p>2026-03-15 19:34:02</text:p>
          </table:table-cell>
          <table:table-cell table:style-name="ce10" office:value-type="currency" office:currency="PLN" office:value="0.75">
            <text:p>0,75 zł</text:p>
          </table:table-cell>
          <table:table-cell table:style-name="ce8"/>
          <table:table-cell table:style-name="ce10" office:value-type="currency" office:currency="PLN" office:value="0.75">
            <text:p>0,75 zł</text:p>
          </table:table-cell>
          <table:table-cell table:style-name="ce8"/>
          <table:table-cell table:style-name="ce9" office:value-type="string">
            <text:p>31.XXX.XXX.X4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</text:p>
          </table:table-cell>
          <table:table-cell table:style-name="ce9" office:value-type="string">
            <text:p>Rennie Antiacidum o smaku miętowym 48 tabletek do ssania</text:p>
          </table:table-cell>
          <table:table-cell table:style-name="ce8" office:value-type="float" office:value="15795">
            <text:p>15795</text:p>
          </table:table-cell>
          <table:table-cell table:style-name="ce9" office:value-type="string">
            <text:p>2026-03-15 19:34:12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31.XXX.XXX.3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zieci i niemowlęta</text:p>
          </table:table-cell>
          <table:table-cell table:style-name="ce9" office:value-type="string">
            <text:p>Juvit Multi krople doustne 10ml</text:p>
          </table:table-cell>
          <table:table-cell table:style-name="ce8" office:value-type="float" office:value="6099">
            <text:p>6099</text:p>
          </table:table-cell>
          <table:table-cell table:style-name="ce9" office:value-type="string">
            <text:p>2026-03-15 19:35:29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18X.XXX.XXX.1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moczowy i płciowy</text:p>
          </table:table-cell>
          <table:table-cell table:style-name="ce9" office:value-type="string">
            <text:p>Gynoxin Uno 0,6G 1kaps.</text:p>
          </table:table-cell>
          <table:table-cell table:style-name="ce8" office:value-type="float" office:value="10753">
            <text:p>10753</text:p>
          </table:table-cell>
          <table:table-cell table:style-name="ce9" office:value-type="string">
            <text:p>2026-03-15 19:36:49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46.XXX.XXX.7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Suplementy na odchudzanie</text:p>
          </table:table-cell>
          <table:table-cell table:style-name="ce9" office:value-type="string">
            <text:p>HYDROSLIMMER 30 tabl.</text:p>
          </table:table-cell>
          <table:table-cell table:style-name="ce8" office:value-type="float" office:value="32282">
            <text:p>32282</text:p>
          </table:table-cell>
          <table:table-cell table:style-name="ce9" office:value-type="string">
            <text:p>2026-03-15 19:38:00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93.XXX.XXX.X1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</text:p>
          </table:table-cell>
          <table:table-cell table:style-name="ce9" office:value-type="string">
            <text:p>trilac 20 kaps</text:p>
          </table:table-cell>
          <table:table-cell table:style-name="ce8" office:value-type="float" office:value="5438">
            <text:p>5438</text:p>
          </table:table-cell>
          <table:table-cell table:style-name="ce9" office:value-type="string">
            <text:p>2026-03-15 19:40:04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77.XXX.XXX.X0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ozostałe artykuły medyczne i rehabilitacyjne</text:p>
          </table:table-cell>
          <table:table-cell table:style-name="ce9" office:value-type="string">
            <text:p>Cewnik Foleya urologiczny silikonowy CH 16/10ml Romed</text:p>
          </table:table-cell>
          <table:table-cell table:style-name="ce8" office:value-type="float" office:value="12347">
            <text:p>12347</text:p>
          </table:table-cell>
          <table:table-cell table:style-name="ce9" office:value-type="string">
            <text:p>2026-03-15 19:40:07</text:p>
          </table:table-cell>
          <table:table-cell table:style-name="ce10" office:value-type="currency" office:currency="PLN" office:value="0.92">
            <text:p>0,92 zł</text:p>
          </table:table-cell>
          <table:table-cell table:style-name="ce8"/>
          <table:table-cell table:style-name="ce10" office:value-type="currency" office:currency="PLN" office:value="0.92">
            <text:p>0,92 zł</text:p>
          </table:table-cell>
          <table:table-cell table:style-name="ce8"/>
          <table:table-cell table:style-name="ce9" office:value-type="string">
            <text:p>91.XXX.XXX.1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Glukometry i akcesoria dla diabetyków</text:p>
          </table:table-cell>
          <table:table-cell table:style-name="ce9" office:value-type="string">
            <text:p>Abbott Freestyle Libre 2 Sensor 1szt.</text:p>
          </table:table-cell>
          <table:table-cell table:style-name="ce8" office:value-type="float" office:value="32071">
            <text:p>32071</text:p>
          </table:table-cell>
          <table:table-cell table:style-name="ce9" office:value-type="string">
            <text:p>2026-03-15 19:41:05</text:p>
          </table:table-cell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9" office:value-type="string">
            <text:p>18X.XXX.XXX.X3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ęśnie, stawy i kości</text:p>
          </table:table-cell>
          <table:table-cell table:style-name="ce9" office:value-type="string">
            <text:p>Voltaren Emulgel 1% żel 0,01 g/g 100 g (Import równoległy)</text:p>
          </table:table-cell>
          <table:table-cell table:style-name="ce8" office:value-type="float" office:value="14669">
            <text:p>14669</text:p>
          </table:table-cell>
          <table:table-cell table:style-name="ce9" office:value-type="string">
            <text:p>2026-03-15 19:42:41</text:p>
          </table:table-cell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9" office:value-type="string">
            <text:p>31.XXX.XXX.X2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 i trawienie</text:p>
          </table:table-cell>
          <table:table-cell table:style-name="ce9" office:value-type="string">
            <text:p>Estabiom Junior 20kaps.</text:p>
          </table:table-cell>
          <table:table-cell table:style-name="ce8" office:value-type="float" office:value="6953">
            <text:p>6953</text:p>
          </table:table-cell>
          <table:table-cell table:style-name="ce9" office:value-type="string">
            <text:p>2026-03-15 19:42:45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18X.XXX.XXX.8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Suplementy na odchudzanie</text:p>
          </table:table-cell>
          <table:table-cell table:style-name="ce9" office:value-type="string">
            <text:p>HYDROSLIMMER 30 tabl.</text:p>
          </table:table-cell>
          <table:table-cell table:style-name="ce8" office:value-type="float" office:value="32282">
            <text:p>32282</text:p>
          </table:table-cell>
          <table:table-cell table:style-name="ce9" office:value-type="string">
            <text:p>2026-03-15 19:43:15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93.XXX.XXX.X1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Suplementy na odchudzanie</text:p>
          </table:table-cell>
          <table:table-cell table:style-name="ce9" office:value-type="string">
            <text:p>HYDROSLIMMER 30 tabl.</text:p>
          </table:table-cell>
          <table:table-cell table:style-name="ce8" office:value-type="float" office:value="32282">
            <text:p>32282</text:p>
          </table:table-cell>
          <table:table-cell table:style-name="ce9" office:value-type="string">
            <text:p>2026-03-15 19:44:01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93.XXX.XXX.X1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ciała</text:p>
          </table:table-cell>
          <table:table-cell table:style-name="ce9" office:value-type="string">
            <text:p>Emolium Dermocare Nawilżający Olejek do mycia 400 ml</text:p>
          </table:table-cell>
          <table:table-cell table:style-name="ce8" office:value-type="float" office:value="7660">
            <text:p>7660</text:p>
          </table:table-cell>
          <table:table-cell table:style-name="ce9" office:value-type="string">
            <text:p>2026-03-15 19:44:02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91.XXX.XXX.X3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Suplementy na wzrok i słuch</text:p>
          </table:table-cell>
          <table:table-cell table:style-name="ce9" office:value-type="string">
            <text:p>Kropia Plus krople do oczu nawilżające 10ml</text:p>
          </table:table-cell>
          <table:table-cell table:style-name="ce8" office:value-type="float" office:value="29313">
            <text:p>29313</text:p>
          </table:table-cell>
          <table:table-cell table:style-name="ce9" office:value-type="string">
            <text:p>2026-03-15 19:44:08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10X.XXX.XXX.3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Nizoral Krem 20mg/g 30 g</text:p>
          </table:table-cell>
          <table:table-cell table:style-name="ce8" office:value-type="float" office:value="9594">
            <text:p>9594</text:p>
          </table:table-cell>
          <table:table-cell table:style-name="ce9" office:value-type="string">
            <text:p>2026-03-15 19:46:17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89.XXX.XXX.X2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Glukometry i akcesoria dla diabetyków</text:p>
          </table:table-cell>
          <table:table-cell table:style-name="ce9" office:value-type="string">
            <text:p>Accu-Check Active</text:p>
          </table:table-cell>
          <table:table-cell table:style-name="ce8" office:value-type="float" office:value="19537">
            <text:p>19537</text:p>
          </table:table-cell>
          <table:table-cell table:style-name="ce9" office:value-type="string">
            <text:p>2026-03-15 19:46:30</text:p>
          </table:table-cell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9" office:value-type="string">
            <text:p>46.XXX.XXX.2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łyny i żele do dezynfekcji ran</text:p>
          </table:table-cell>
          <table:table-cell table:style-name="ce9" office:value-type="string">
            <text:p>Farmina Jodyna Hospital 800g</text:p>
          </table:table-cell>
          <table:table-cell table:style-name="ce8" office:value-type="float" office:value="8114">
            <text:p>8114</text:p>
          </table:table-cell>
          <table:table-cell table:style-name="ce9" office:value-type="string">
            <text:p>2026-03-15 19:46:34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18X.XXX.XXX.4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Pasty do zębów</text:p>
          </table:table-cell>
          <table:table-cell table:style-name="ce9" office:value-type="string">
            <text:p>Pierre Fabre Elgydium Pasta Do Zębów Z Kompleksem Fluorinol Protect + 75ml</text:p>
          </table:table-cell>
          <table:table-cell table:style-name="ce8" office:value-type="float" office:value="29833">
            <text:p>29833</text:p>
          </table:table-cell>
          <table:table-cell table:style-name="ce9" office:value-type="string">
            <text:p>2026-03-15 19:47:49</text:p>
          </table:table-cell>
          <table:table-cell table:style-name="ce10" office:value-type="currency" office:currency="PLN" office:value="0.67">
            <text:p>0,67 zł</text:p>
          </table:table-cell>
          <table:table-cell table:style-name="ce8"/>
          <table:table-cell table:style-name="ce10" office:value-type="currency" office:currency="PLN" office:value="0.67">
            <text:p>0,67 zł</text:p>
          </table:table-cell>
          <table:table-cell table:style-name="ce8"/>
          <table:table-cell table:style-name="ce9" office:value-type="string">
            <text:p>5.XXX.XXX.1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Maść Szałwiowa 25 G</text:p>
          </table:table-cell>
          <table:table-cell table:style-name="ce8" office:value-type="float" office:value="9164">
            <text:p>9164</text:p>
          </table:table-cell>
          <table:table-cell table:style-name="ce9" office:value-type="string">
            <text:p>2026-03-15 19:49:44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21X.XXX.XXX.3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eparaty medycyny naturalnej</text:p>
          </table:table-cell>
          <table:table-cell table:style-name="ce9" office:value-type="string">
            <text:p>Tisane FARM Żel propolisowy 6g</text:p>
          </table:table-cell>
          <table:table-cell table:style-name="ce8" office:value-type="float" office:value="18277">
            <text:p>18277</text:p>
          </table:table-cell>
          <table:table-cell table:style-name="ce9" office:value-type="string">
            <text:p>2026-03-15 19:50:02</text:p>
          </table:table-cell>
          <table:table-cell table:style-name="ce10" office:value-type="currency" office:currency="PLN" office:value="0.88">
            <text:p>0,88 zł</text:p>
          </table:table-cell>
          <table:table-cell table:style-name="ce8"/>
          <table:table-cell table:style-name="ce10" office:value-type="currency" office:currency="PLN" office:value="0.88">
            <text:p>0,88 zł</text:p>
          </table:table-cell>
          <table:table-cell table:style-name="ce8"/>
          <table:table-cell table:style-name="ce9" office:value-type="string">
            <text:p>18X.XXX.XXX.X7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UPSARIN C, 20 tabletek musujących</text:p>
          </table:table-cell>
          <table:table-cell table:style-name="ce8" office:value-type="float" office:value="6364">
            <text:p>6364</text:p>
          </table:table-cell>
          <table:table-cell table:style-name="ce9" office:value-type="string">
            <text:p>2026-03-15 19:50:54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77.XXX.XXX.X0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Dla dziecka</text:p>
          </table:table-cell>
          <table:table-cell table:style-name="ce9" office:value-type="string">
            <text:p>Kosmetyki dla dzieci i niemowląt</text:p>
          </table:table-cell>
          <table:table-cell table:style-name="ce9" office:value-type="string">
            <text:p>Amara Cynkokrem Go! 50ml</text:p>
          </table:table-cell>
          <table:table-cell table:style-name="ce8" office:value-type="float" office:value="16539">
            <text:p>16539</text:p>
          </table:table-cell>
          <table:table-cell table:style-name="ce9" office:value-type="string">
            <text:p>2026-03-15 19:53:13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37.XXX.XXX.8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ciała</text:p>
          </table:table-cell>
          <table:table-cell table:style-name="ce9" office:value-type="string">
            <text:p>DUCRAY DEXYANE MED Wyrób medyczny krem kojąco-regenerujący 100ml</text:p>
          </table:table-cell>
          <table:table-cell table:style-name="ce8" office:value-type="float" office:value="31945">
            <text:p>31945</text:p>
          </table:table-cell>
          <table:table-cell table:style-name="ce9" office:value-type="string">
            <text:p>2026-03-15 19:54:14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77.XXX.XXX.5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Dla dziecka</text:p>
          </table:table-cell>
          <table:table-cell table:style-name="ce9" office:value-type="string">
            <text:p>Kosmetyki dla dzieci i niemowląt</text:p>
          </table:table-cell>
          <table:table-cell table:style-name="ce9" office:value-type="string">
            <text:p>Amara Cynkokrem Go! 50ml</text:p>
          </table:table-cell>
          <table:table-cell table:style-name="ce8" office:value-type="float" office:value="16539">
            <text:p>16539</text:p>
          </table:table-cell>
          <table:table-cell table:style-name="ce9" office:value-type="string">
            <text:p>2026-03-15 19:54:20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37.XXX.XXX.8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Zioła</text:p>
          </table:table-cell>
          <table:table-cell table:style-name="ce9" office:value-type="string">
            <text:p>Zioł.Koszyczek Arniki zioło pojed. 25 g</text:p>
          </table:table-cell>
          <table:table-cell table:style-name="ce8" office:value-type="float" office:value="18460">
            <text:p>18460</text:p>
          </table:table-cell>
          <table:table-cell table:style-name="ce9" office:value-type="string">
            <text:p>2026-03-15 19:55:49</text:p>
          </table:table-cell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9" office:value-type="string">
            <text:p>37.XXX.XXX.X3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Suplementy dla dzieci</text:p>
          </table:table-cell>
          <table:table-cell table:style-name="ce9" office:value-type="string">
            <text:p>Błonnik dla dzieci + probiotyki 100 g</text:p>
          </table:table-cell>
          <table:table-cell table:style-name="ce8" office:value-type="float" office:value="11947">
            <text:p>11947</text:p>
          </table:table-cell>
          <table:table-cell table:style-name="ce9" office:value-type="string">
            <text:p>2026-03-15 19:56:26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46.XXX.XXX.X0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Akcesoria do inhalatorów</text:p>
          </table:table-cell>
          <table:table-cell table:style-name="ce9" office:value-type="string">
            <text:p>Intec Medical Zestaw Akcesoriów Do Inhalatora Pro Intec Z Maską Dla Dzieci</text:p>
          </table:table-cell>
          <table:table-cell table:style-name="ce8" office:value-type="float" office:value="4164">
            <text:p>4164</text:p>
          </table:table-cell>
          <table:table-cell table:style-name="ce9" office:value-type="string">
            <text:p>2026-03-15 19:57:43</text:p>
          </table:table-cell>
          <table:table-cell table:style-name="ce10" office:value-type="currency" office:currency="PLN" office:value="0.76">
            <text:p>0,76 zł</text:p>
          </table:table-cell>
          <table:table-cell table:style-name="ce8"/>
          <table:table-cell table:style-name="ce10" office:value-type="currency" office:currency="PLN" office:value="0.76">
            <text:p>0,76 zł</text:p>
          </table:table-cell>
          <table:table-cell table:style-name="ce8"/>
          <table:table-cell table:style-name="ce9" office:value-type="string">
            <text:p>17X.XXX.XXX.X3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eparaty medycyny naturalnej</text:p>
          </table:table-cell>
          <table:table-cell table:style-name="ce9" office:value-type="string">
            <text:p>Tisane FARM Żel propolisowy 6g</text:p>
          </table:table-cell>
          <table:table-cell table:style-name="ce8" office:value-type="float" office:value="18277">
            <text:p>18277</text:p>
          </table:table-cell>
          <table:table-cell table:style-name="ce9" office:value-type="string">
            <text:p>2026-03-15 19:59:48</text:p>
          </table:table-cell>
          <table:table-cell table:style-name="ce10" office:value-type="currency" office:currency="PLN" office:value="0.88">
            <text:p>0,88 zł</text:p>
          </table:table-cell>
          <table:table-cell table:style-name="ce8"/>
          <table:table-cell table:style-name="ce10" office:value-type="currency" office:currency="PLN" office:value="0.88">
            <text:p>0,88 zł</text:p>
          </table:table-cell>
          <table:table-cell table:style-name="ce8"/>
          <table:table-cell table:style-name="ce9" office:value-type="string">
            <text:p>18X.XXX.XXX.X7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</text:p>
          </table:table-cell>
          <table:table-cell table:style-name="ce9" office:value-type="string">
            <text:p>Lactulose-MIP syrop 9,75g/15ml 1000ml</text:p>
          </table:table-cell>
          <table:table-cell table:style-name="ce8" office:value-type="float" office:value="7759">
            <text:p>7759</text:p>
          </table:table-cell>
          <table:table-cell table:style-name="ce9" office:value-type="string">
            <text:p>2026-03-15 20:00:15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37.XXX.XXX.5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Troxerutin żel 0,02 g/1g 30g</text:p>
          </table:table-cell>
          <table:table-cell table:style-name="ce8" office:value-type="float" office:value="18301">
            <text:p>18301</text:p>
          </table:table-cell>
          <table:table-cell table:style-name="ce9" office:value-type="string">
            <text:p>2026-03-15 20:00:16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91.XXX.XXX.X2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Sora Protect - aerozol na włosy zapobiegający wszawicy 50ml</text:p>
          </table:table-cell>
          <table:table-cell table:style-name="ce8" office:value-type="float" office:value="6881">
            <text:p>6881</text:p>
          </table:table-cell>
          <table:table-cell table:style-name="ce9" office:value-type="string">
            <text:p>2026-03-15 20:01:50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93.XXX.XXX.X2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Suplementy na wzrok i słuch</text:p>
          </table:table-cell>
          <table:table-cell table:style-name="ce9" office:value-type="string">
            <text:p>Kropia Plus krople do oczu nawilżające 10ml</text:p>
          </table:table-cell>
          <table:table-cell table:style-name="ce8" office:value-type="float" office:value="29313">
            <text:p>29313</text:p>
          </table:table-cell>
          <table:table-cell table:style-name="ce9" office:value-type="string">
            <text:p>2026-03-15 20:01:53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31.XXX.XXX.X3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Termometry</text:p>
          </table:table-cell>
          <table:table-cell table:style-name="ce9" office:value-type="string">
            <text:p>Microlife MT 16C2</text:p>
          </table:table-cell>
          <table:table-cell table:style-name="ce8" office:value-type="float" office:value="9695">
            <text:p>9695</text:p>
          </table:table-cell>
          <table:table-cell table:style-name="ce9" office:value-type="string">
            <text:p>2026-03-15 20:03:53</text:p>
          </table:table-cell>
          <table:table-cell table:style-name="ce10" office:value-type="currency" office:currency="PLN" office:value="1.03">
            <text:p>1,03 zł</text:p>
          </table:table-cell>
          <table:table-cell table:style-name="ce8"/>
          <table:table-cell table:style-name="ce10" office:value-type="currency" office:currency="PLN" office:value="1.03">
            <text:p>1,03 zł</text:p>
          </table:table-cell>
          <table:table-cell table:style-name="ce8"/>
          <table:table-cell table:style-name="ce9" office:value-type="string">
            <text:p>18X.XXX.XXX.2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ozostałe wyposażenie apteczek</text:p>
          </table:table-cell>
          <table:table-cell table:style-name="ce9" office:value-type="string">
            <text:p>Tecweld Icemix sztuczny lód w aerozolu 400ml</text:p>
          </table:table-cell>
          <table:table-cell table:style-name="ce8" office:value-type="float" office:value="4136">
            <text:p>4136</text:p>
          </table:table-cell>
          <table:table-cell table:style-name="ce9" office:value-type="string">
            <text:p>2026-03-15 20:04:03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14X.XXX.XXX.5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 i trawienie</text:p>
          </table:table-cell>
          <table:table-cell table:style-name="ce9" office:value-type="string">
            <text:p>Estabiom Junior 20kaps.</text:p>
          </table:table-cell>
          <table:table-cell table:style-name="ce8" office:value-type="float" office:value="6953">
            <text:p>6953</text:p>
          </table:table-cell>
          <table:table-cell table:style-name="ce9" office:value-type="string">
            <text:p>2026-03-15 20:05:18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18X.XXX.XXX.8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eparaty medycyny naturalnej</text:p>
          </table:table-cell>
          <table:table-cell table:style-name="ce9" office:value-type="string">
            <text:p>HIRUPAR żel do nóg z wyciągiem z pijawek 100 g</text:p>
          </table:table-cell>
          <table:table-cell table:style-name="ce8" office:value-type="float" office:value="9907">
            <text:p>9907</text:p>
          </table:table-cell>
          <table:table-cell table:style-name="ce9" office:value-type="string">
            <text:p>2026-03-15 20:05:34</text:p>
          </table:table-cell>
          <table:table-cell table:style-name="ce10" office:value-type="currency" office:currency="PLN" office:value="0.88">
            <text:p>0,88 zł</text:p>
          </table:table-cell>
          <table:table-cell table:style-name="ce8"/>
          <table:table-cell table:style-name="ce10" office:value-type="currency" office:currency="PLN" office:value="0.88">
            <text:p>0,88 zł</text:p>
          </table:table-cell>
          <table:table-cell table:style-name="ce8"/>
          <table:table-cell table:style-name="ce9" office:value-type="string">
            <text:p>83.XXX.XXX.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la mam i kobiet w ciąży</text:p>
          </table:table-cell>
          <table:table-cell table:style-name="ce9" office:value-type="string">
            <text:p>SOLGAR WITAMINY I MINERAŁY PRENATALNE 60 tabl</text:p>
          </table:table-cell>
          <table:table-cell table:style-name="ce8" office:value-type="float" office:value="740">
            <text:p>740</text:p>
          </table:table-cell>
          <table:table-cell table:style-name="ce9" office:value-type="string">
            <text:p>2026-03-15 20:07:26</text:p>
          </table:table-cell>
          <table:table-cell table:style-name="ce10" office:value-type="currency" office:currency="PLN" office:value="0.81">
            <text:p>0,81 zł</text:p>
          </table:table-cell>
          <table:table-cell table:style-name="ce8"/>
          <table:table-cell table:style-name="ce10" office:value-type="currency" office:currency="PLN" office:value="0.81">
            <text:p>0,81 zł</text:p>
          </table:table-cell>
          <table:table-cell table:style-name="ce8"/>
          <table:table-cell table:style-name="ce9" office:value-type="string">
            <text:p>85.XXX.XXX.X6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Rzuć palenie</text:p>
          </table:table-cell>
          <table:table-cell table:style-name="ce9" office:value-type="string">
            <text:p>NIQUITIN przezroczysty, plastry transdermalne, 21 mg / 24 h, 7 szt</text:p>
          </table:table-cell>
          <table:table-cell table:style-name="ce8" office:value-type="float" office:value="9593">
            <text:p>9593</text:p>
          </table:table-cell>
          <table:table-cell table:style-name="ce9" office:value-type="string">
            <text:p>2026-03-15 20:11:51</text:p>
          </table:table-cell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9" office:value-type="string">
            <text:p>83.XXX.XXX.X5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włosów</text:p>
          </table:table-cell>
          <table:table-cell table:style-name="ce9" office:value-type="string">
            <text:p>Nuxe Hair Prodigieux Odżywcza Maska 30ml + Nabłyszczający Szampon 50ml + Nabłyszczająca Odżywka 30ml</text:p>
          </table:table-cell>
          <table:table-cell table:style-name="ce8" office:value-type="float" office:value="28305">
            <text:p>28305</text:p>
          </table:table-cell>
          <table:table-cell table:style-name="ce9" office:value-type="string">
            <text:p>2026-03-15 20:12:13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93.XXX.XXX.5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</text:p>
          </table:table-cell>
          <table:table-cell table:style-name="ce9" office:value-type="string">
            <text:p>Rennie Antiacidum o smaku miętowym 48 tabletek do ssania</text:p>
          </table:table-cell>
          <table:table-cell table:style-name="ce8" office:value-type="float" office:value="15795">
            <text:p>15795</text:p>
          </table:table-cell>
          <table:table-cell table:style-name="ce9" office:value-type="string">
            <text:p>2026-03-15 20:12:34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31.XXX.XXX.3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Opatrunki</text:p>
          </table:table-cell>
          <table:table-cell table:style-name="ce9" office:value-type="string">
            <text:p>Granuflex opatrunek hydrokoloidowy 20x20cm 1szt</text:p>
          </table:table-cell>
          <table:table-cell table:style-name="ce8" office:value-type="float" office:value="11589">
            <text:p>11589</text:p>
          </table:table-cell>
          <table:table-cell table:style-name="ce9" office:value-type="string">
            <text:p>2026-03-15 20:13:19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21X.XXX.XXX.X6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ęśnie, stawy i kości</text:p>
          </table:table-cell>
          <table:table-cell table:style-name="ce9" office:value-type="string">
            <text:p>Voltaren Emulgel 1% żel 0,01 g/g 100 g (Import równoległy)</text:p>
          </table:table-cell>
          <table:table-cell table:style-name="ce8" office:value-type="float" office:value="14669">
            <text:p>14669</text:p>
          </table:table-cell>
          <table:table-cell table:style-name="ce9" office:value-type="string">
            <text:p>2026-03-15 20:16:28</text:p>
          </table:table-cell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9" office:value-type="string">
            <text:p>17X.XXX.XXX.6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Lamisilatt Krem 10 mg/g 15g</text:p>
          </table:table-cell>
          <table:table-cell table:style-name="ce8" office:value-type="float" office:value="6122">
            <text:p>6122</text:p>
          </table:table-cell>
          <table:table-cell table:style-name="ce9" office:value-type="string">
            <text:p>2026-03-15 20:16:53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2.XXX.XXX.X4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Opatrunki</text:p>
          </table:table-cell>
          <table:table-cell table:style-name="ce9" office:value-type="string">
            <text:p>Granuflex opatrunek hydrokoloidowy 20x20cm 1szt</text:p>
          </table:table-cell>
          <table:table-cell table:style-name="ce8" office:value-type="float" office:value="11589">
            <text:p>11589</text:p>
          </table:table-cell>
          <table:table-cell table:style-name="ce9" office:value-type="string">
            <text:p>2026-03-15 20:17:45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21X.XXX.XXX.X6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Avene Sunsimed Ka Bardzo Wysoka Ochrona 80ml</text:p>
          </table:table-cell>
          <table:table-cell table:style-name="ce8" office:value-type="float" office:value="28241">
            <text:p>28241</text:p>
          </table:table-cell>
          <table:table-cell table:style-name="ce9" office:value-type="string">
            <text:p>2026-03-15 20:17:59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84.XXX.XXX.X5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ozostałe artykuły medyczne i rehabilitacyjne</text:p>
          </table:table-cell>
          <table:table-cell table:style-name="ce9" office:value-type="string">
            <text:p>Zarys Worek Do Zbiórki Moczu Odpływ T 2l</text:p>
          </table:table-cell>
          <table:table-cell table:style-name="ce8" office:value-type="float" office:value="5632">
            <text:p>5632</text:p>
          </table:table-cell>
          <table:table-cell table:style-name="ce9" office:value-type="string">
            <text:p>2026-03-15 20:20:18</text:p>
          </table:table-cell>
          <table:table-cell table:style-name="ce10" office:value-type="currency" office:currency="PLN" office:value="0.92">
            <text:p>0,92 zł</text:p>
          </table:table-cell>
          <table:table-cell table:style-name="ce8"/>
          <table:table-cell table:style-name="ce10" office:value-type="currency" office:currency="PLN" office:value="0.92">
            <text:p>0,92 zł</text:p>
          </table:table-cell>
          <table:table-cell table:style-name="ce8"/>
          <table:table-cell table:style-name="ce9" office:value-type="string">
            <text:p>37.XXX.XXX.4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Alergia</text:p>
          </table:table-cell>
          <table:table-cell table:style-name="ce9" office:value-type="string">
            <text:p>CLARITINE ALLERGY SYROP 60ML</text:p>
          </table:table-cell>
          <table:table-cell table:style-name="ce8" office:value-type="float" office:value="3574">
            <text:p>3574</text:p>
          </table:table-cell>
          <table:table-cell table:style-name="ce9" office:value-type="string">
            <text:p>2026-03-15 20:20:40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19X.XXX.XXX.X1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ozostałe artykuły medyczne i rehabilitacyjne</text:p>
          </table:table-cell>
          <table:table-cell table:style-name="ce9" office:value-type="string">
            <text:p>Zarys Worek Do Zbiórki Moczu Odpływ T 2l</text:p>
          </table:table-cell>
          <table:table-cell table:style-name="ce8" office:value-type="float" office:value="5632">
            <text:p>5632</text:p>
          </table:table-cell>
          <table:table-cell table:style-name="ce9" office:value-type="string">
            <text:p>2026-03-15 20:21:53</text:p>
          </table:table-cell>
          <table:table-cell table:style-name="ce10" office:value-type="currency" office:currency="PLN" office:value="0.92">
            <text:p>0,92 zł</text:p>
          </table:table-cell>
          <table:table-cell table:style-name="ce8"/>
          <table:table-cell table:style-name="ce10" office:value-type="currency" office:currency="PLN" office:value="0.92">
            <text:p>0,92 zł</text:p>
          </table:table-cell>
          <table:table-cell table:style-name="ce8"/>
          <table:table-cell table:style-name="ce9" office:value-type="string">
            <text:p>37.XXX.XXX.4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Zestawy dla kobiet</text:p>
          </table:table-cell>
          <table:table-cell table:style-name="ce9" office:value-type="string">
            <text:p>A-Derma Zestaw Exomega Control Zestaw: Balsam Emolient 200Ml + Olejek Emolient 100Ml</text:p>
          </table:table-cell>
          <table:table-cell table:style-name="ce8" office:value-type="float" office:value="31901">
            <text:p>31901</text:p>
          </table:table-cell>
          <table:table-cell table:style-name="ce9" office:value-type="string">
            <text:p>2026-03-15 20:21:57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31.XXX.XXX.X9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Stawy, mięśnie i kości</text:p>
          </table:table-cell>
          <table:table-cell table:style-name="ce9" office:value-type="string">
            <text:p>Ultraflex 60kaps.</text:p>
          </table:table-cell>
          <table:table-cell table:style-name="ce8" office:value-type="float" office:value="32305">
            <text:p>32305</text:p>
          </table:table-cell>
          <table:table-cell table:style-name="ce9" office:value-type="string">
            <text:p>2026-03-15 20:22:11</text:p>
          </table:table-cell>
          <table:table-cell table:style-name="ce10" office:value-type="currency" office:currency="PLN" office:value="0.83">
            <text:p>0,83 zł</text:p>
          </table:table-cell>
          <table:table-cell table:style-name="ce8"/>
          <table:table-cell table:style-name="ce10" office:value-type="currency" office:currency="PLN" office:value="0.83">
            <text:p>0,83 zł</text:p>
          </table:table-cell>
          <table:table-cell table:style-name="ce8"/>
          <table:table-cell table:style-name="ce9" office:value-type="string">
            <text:p>5.XXX.XXX.6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Glukometry i akcesoria dla diabetyków</text:p>
          </table:table-cell>
          <table:table-cell table:style-name="ce9" office:value-type="string">
            <text:p>One Touch Delica Plus Lancety 100Szt.</text:p>
          </table:table-cell>
          <table:table-cell table:style-name="ce8" office:value-type="float" office:value="8494">
            <text:p>8494</text:p>
          </table:table-cell>
          <table:table-cell table:style-name="ce9" office:value-type="string">
            <text:p>2026-03-15 20:32:54</text:p>
          </table:table-cell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9" office:value-type="string">
            <text:p>95.XXX.XXX.1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Suplementy na wzrok i słuch</text:p>
          </table:table-cell>
          <table:table-cell table:style-name="ce9" office:value-type="string">
            <text:p>Aronta 30 tabl</text:p>
          </table:table-cell>
          <table:table-cell table:style-name="ce8" office:value-type="float" office:value="658">
            <text:p>658</text:p>
          </table:table-cell>
          <table:table-cell table:style-name="ce9" office:value-type="string">
            <text:p>2026-03-15 20:33:07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45.XXX.XXX.X1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Suplementy na wzrok i słuch</text:p>
          </table:table-cell>
          <table:table-cell table:style-name="ce9" office:value-type="string">
            <text:p>Aronta 30 tabl</text:p>
          </table:table-cell>
          <table:table-cell table:style-name="ce8" office:value-type="float" office:value="658">
            <text:p>658</text:p>
          </table:table-cell>
          <table:table-cell table:style-name="ce9" office:value-type="string">
            <text:p>2026-03-15 20:34:05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45.XXX.XXX.X1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 i trawienie</text:p>
          </table:table-cell>
          <table:table-cell table:style-name="ce9" office:value-type="string">
            <text:p>Gorvita Babka Płesznik Mielona 150g</text:p>
          </table:table-cell>
          <table:table-cell table:style-name="ce8" office:value-type="float" office:value="16104">
            <text:p>16104</text:p>
          </table:table-cell>
          <table:table-cell table:style-name="ce9" office:value-type="string">
            <text:p>2026-03-15 20:37:53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31.XXX.XXX.X3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Rzuć palenie</text:p>
          </table:table-cell>
          <table:table-cell table:style-name="ce9" office:value-type="string">
            <text:p>NIQUITIN przezroczysty, plastry transdermalne, 21 mg / 24 h, 7 szt</text:p>
          </table:table-cell>
          <table:table-cell table:style-name="ce8" office:value-type="float" office:value="9593">
            <text:p>9593</text:p>
          </table:table-cell>
          <table:table-cell table:style-name="ce9" office:value-type="string">
            <text:p>2026-03-15 20:38:17</text:p>
          </table:table-cell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9" office:value-type="string">
            <text:p>83.XXX.XXX.X5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Nizoral Krem 20mg/g 30 g</text:p>
          </table:table-cell>
          <table:table-cell table:style-name="ce8" office:value-type="float" office:value="9594">
            <text:p>9594</text:p>
          </table:table-cell>
          <table:table-cell table:style-name="ce9" office:value-type="string">
            <text:p>2026-03-15 20:40:08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18X.XXX.XXX.X1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Daktarin 20mg/g, krem 30g</text:p>
          </table:table-cell>
          <table:table-cell table:style-name="ce8" office:value-type="float" office:value="9326">
            <text:p>9326</text:p>
          </table:table-cell>
          <table:table-cell table:style-name="ce9" office:value-type="string">
            <text:p>2026-03-15 20:40:23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89.XXX.XXX.7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Zestawy dermokosmetyków</text:p>
          </table:table-cell>
          <table:table-cell table:style-name="ce9" office:value-type="string">
            <text:p>Krem Nuxe Prodigieuse Florale Zestaw z kosmetyczką podróżną 2024</text:p>
          </table:table-cell>
          <table:table-cell table:style-name="ce8" office:value-type="float" office:value="28311">
            <text:p>28311</text:p>
          </table:table-cell>
          <table:table-cell table:style-name="ce9" office:value-type="string">
            <text:p>2026-03-15 20:42:45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17X.XXX.XXX.3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Termometry</text:p>
          </table:table-cell>
          <table:table-cell table:style-name="ce9" office:value-type="string">
            <text:p>Microlife MT 16C2</text:p>
          </table:table-cell>
          <table:table-cell table:style-name="ce8" office:value-type="float" office:value="9695">
            <text:p>9695</text:p>
          </table:table-cell>
          <table:table-cell table:style-name="ce9" office:value-type="string">
            <text:p>2026-03-15 20:43:36</text:p>
          </table:table-cell>
          <table:table-cell table:style-name="ce10" office:value-type="currency" office:currency="PLN" office:value="1.03">
            <text:p>1,03 zł</text:p>
          </table:table-cell>
          <table:table-cell table:style-name="ce8"/>
          <table:table-cell table:style-name="ce10" office:value-type="currency" office:currency="PLN" office:value="1.03">
            <text:p>1,03 zł</text:p>
          </table:table-cell>
          <table:table-cell table:style-name="ce8"/>
          <table:table-cell table:style-name="ce9" office:value-type="string">
            <text:p>5.XXX.XXX.7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</text:p>
          </table:table-cell>
          <table:table-cell table:style-name="ce9" office:value-type="string">
            <text:p>Rennie Antiacidum o smaku miętowym 48 tabletek do ssania</text:p>
          </table:table-cell>
          <table:table-cell table:style-name="ce8" office:value-type="float" office:value="15795">
            <text:p>15795</text:p>
          </table:table-cell>
          <table:table-cell table:style-name="ce9" office:value-type="string">
            <text:p>2026-03-15 20:44:41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37.XXX.XXX.1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ciała</text:p>
          </table:table-cell>
          <table:table-cell table:style-name="ce9" office:value-type="string">
            <text:p>AFLOFARM Nivelium med krem dermatologiczny 250ml</text:p>
          </table:table-cell>
          <table:table-cell table:style-name="ce8" office:value-type="float" office:value="8641">
            <text:p>8641</text:p>
          </table:table-cell>
          <table:table-cell table:style-name="ce9" office:value-type="string">
            <text:p>2026-03-15 20:46:12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19X.XXX.XXX.3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 i trawienie</text:p>
          </table:table-cell>
          <table:table-cell table:style-name="ce9" office:value-type="string">
            <text:p>Travislim x 30tabl.</text:p>
          </table:table-cell>
          <table:table-cell table:style-name="ce8" office:value-type="float" office:value="32304">
            <text:p>32304</text:p>
          </table:table-cell>
          <table:table-cell table:style-name="ce9" office:value-type="string">
            <text:p>2026-03-15 20:46:31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10X.XXX.XXX.2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ciała</text:p>
          </table:table-cell>
          <table:table-cell table:style-name="ce9" office:value-type="string">
            <text:p>Emolium DERMOCARE Emulsja na suchą skórę głowy 100ml</text:p>
          </table:table-cell>
          <table:table-cell table:style-name="ce8" office:value-type="float" office:value="335">
            <text:p>335</text:p>
          </table:table-cell>
          <table:table-cell table:style-name="ce9" office:value-type="string">
            <text:p>2026-03-15 20:47:07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37.XXX.XXX.X2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Akcesoria do inhalatorów</text:p>
          </table:table-cell>
          <table:table-cell table:style-name="ce9" office:value-type="string">
            <text:p>Intec Medical Zestaw Akcesoriów Do Inhalatora Pro Intec Z Maską Dla Dzieci</text:p>
          </table:table-cell>
          <table:table-cell table:style-name="ce8" office:value-type="float" office:value="4164">
            <text:p>4164</text:p>
          </table:table-cell>
          <table:table-cell table:style-name="ce9" office:value-type="string">
            <text:p>2026-03-15 20:47:20</text:p>
          </table:table-cell>
          <table:table-cell table:style-name="ce10" office:value-type="currency" office:currency="PLN" office:value="0.76">
            <text:p>0,76 zł</text:p>
          </table:table-cell>
          <table:table-cell table:style-name="ce8"/>
          <table:table-cell table:style-name="ce10" office:value-type="currency" office:currency="PLN" office:value="0.76">
            <text:p>0,76 zł</text:p>
          </table:table-cell>
          <table:table-cell table:style-name="ce8"/>
          <table:table-cell table:style-name="ce9" office:value-type="string">
            <text:p>31.XXX.XXX.X3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Termometry</text:p>
          </table:table-cell>
          <table:table-cell table:style-name="ce9" office:value-type="string">
            <text:p>Microlife MT 16C2</text:p>
          </table:table-cell>
          <table:table-cell table:style-name="ce8" office:value-type="float" office:value="9695">
            <text:p>9695</text:p>
          </table:table-cell>
          <table:table-cell table:style-name="ce9" office:value-type="string">
            <text:p>2026-03-15 20:48:19</text:p>
          </table:table-cell>
          <table:table-cell table:style-name="ce10" office:value-type="currency" office:currency="PLN" office:value="1.03">
            <text:p>1,03 zł</text:p>
          </table:table-cell>
          <table:table-cell table:style-name="ce8"/>
          <table:table-cell table:style-name="ce10" office:value-type="currency" office:currency="PLN" office:value="1.03">
            <text:p>1,03 zł</text:p>
          </table:table-cell>
          <table:table-cell table:style-name="ce8"/>
          <table:table-cell table:style-name="ce9" office:value-type="string">
            <text:p>5.XXX.XXX.7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Opatrunki</text:p>
          </table:table-cell>
          <table:table-cell table:style-name="ce9" office:value-type="string">
            <text:p>Hartmann Atrauman Ag opatrunek z maścią 5cm x 5cm 1szt.</text:p>
          </table:table-cell>
          <table:table-cell table:style-name="ce8" office:value-type="float" office:value="7724">
            <text:p>7724</text:p>
          </table:table-cell>
          <table:table-cell table:style-name="ce9" office:value-type="string">
            <text:p>2026-03-15 20:50:36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83.XXX.XXX.8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moczowy i płciowy</text:p>
          </table:table-cell>
          <table:table-cell table:style-name="ce9" office:value-type="string">
            <text:p>Gynoxin Uno 0,6G 1kaps.</text:p>
          </table:table-cell>
          <table:table-cell table:style-name="ce8" office:value-type="float" office:value="10753">
            <text:p>10753</text:p>
          </table:table-cell>
          <table:table-cell table:style-name="ce9" office:value-type="string">
            <text:p>2026-03-15 20:51:28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93.XXX.XXX.9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Suplementy dla dzieci</text:p>
          </table:table-cell>
          <table:table-cell table:style-name="ce9" office:value-type="string">
            <text:p>Błonnik dla dzieci + probiotyki 100 g</text:p>
          </table:table-cell>
          <table:table-cell table:style-name="ce8" office:value-type="float" office:value="11947">
            <text:p>11947</text:p>
          </table:table-cell>
          <table:table-cell table:style-name="ce9" office:value-type="string">
            <text:p>2026-03-15 20:52:22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5.XXX.XXX.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Suplementy dla dzieci</text:p>
          </table:table-cell>
          <table:table-cell table:style-name="ce9" office:value-type="string">
            <text:p>Błonnik dla dzieci + probiotyki 100 g</text:p>
          </table:table-cell>
          <table:table-cell table:style-name="ce8" office:value-type="float" office:value="11947">
            <text:p>11947</text:p>
          </table:table-cell>
          <table:table-cell table:style-name="ce9" office:value-type="string">
            <text:p>2026-03-15 20:52:30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5.XXX.XXX.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Excilor Leczenie grzybicy paznokci 3,3ml</text:p>
          </table:table-cell>
          <table:table-cell table:style-name="ce8" office:value-type="float" office:value="3920">
            <text:p>3920</text:p>
          </table:table-cell>
          <table:table-cell table:style-name="ce9" office:value-type="string">
            <text:p>2026-03-15 20:54:10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83.XXX.XXX.X2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</text:p>
          </table:table-cell>
          <table:table-cell table:style-name="ce9" office:value-type="string">
            <text:p>Dulcobis czopki na zaparcia 6 szt.</text:p>
          </table:table-cell>
          <table:table-cell table:style-name="ce8" office:value-type="float" office:value="8472">
            <text:p>8472</text:p>
          </table:table-cell>
          <table:table-cell table:style-name="ce9" office:value-type="string">
            <text:p>2026-03-15 20:54:43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91.XXX.XXX.X7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</text:p>
          </table:table-cell>
          <table:table-cell table:style-name="ce9" office:value-type="string">
            <text:p>Dulcobis czopki na zaparcia 6 szt.</text:p>
          </table:table-cell>
          <table:table-cell table:style-name="ce8" office:value-type="float" office:value="8472">
            <text:p>8472</text:p>
          </table:table-cell>
          <table:table-cell table:style-name="ce9" office:value-type="string">
            <text:p>2026-03-15 20:57:31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80.XXX.XXX.4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łciowy i moczowy</text:p>
          </table:table-cell>
          <table:table-cell table:style-name="ce9" office:value-type="string">
            <text:p>Miovelia Nac 15 kaps.</text:p>
          </table:table-cell>
          <table:table-cell table:style-name="ce8" office:value-type="float" office:value="11821">
            <text:p>11821</text:p>
          </table:table-cell>
          <table:table-cell table:style-name="ce9" office:value-type="string">
            <text:p>2026-03-15 20:59:46</text:p>
          </table:table-cell>
          <table:table-cell table:style-name="ce10" office:value-type="currency" office:currency="PLN" office:value="0.75">
            <text:p>0,75 zł</text:p>
          </table:table-cell>
          <table:table-cell table:style-name="ce8"/>
          <table:table-cell table:style-name="ce10" office:value-type="currency" office:currency="PLN" office:value="0.75">
            <text:p>0,75 zł</text:p>
          </table:table-cell>
          <table:table-cell table:style-name="ce8"/>
          <table:table-cell table:style-name="ce9" office:value-type="string">
            <text:p>85.XXX.XXX.X7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Termometry</text:p>
          </table:table-cell>
          <table:table-cell table:style-name="ce9" office:value-type="string">
            <text:p>Microlife MT 16C2</text:p>
          </table:table-cell>
          <table:table-cell table:style-name="ce8" office:value-type="float" office:value="9695">
            <text:p>9695</text:p>
          </table:table-cell>
          <table:table-cell table:style-name="ce9" office:value-type="string">
            <text:p>2026-03-15 21:00:54</text:p>
          </table:table-cell>
          <table:table-cell table:style-name="ce10" office:value-type="currency" office:currency="PLN" office:value="1.03">
            <text:p>1,03 zł</text:p>
          </table:table-cell>
          <table:table-cell table:style-name="ce8"/>
          <table:table-cell table:style-name="ce10" office:value-type="currency" office:currency="PLN" office:value="1.03">
            <text:p>1,03 zł</text:p>
          </table:table-cell>
          <table:table-cell table:style-name="ce8"/>
          <table:table-cell table:style-name="ce9" office:value-type="string">
            <text:p>89.XXX.XXX.X6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ciała</text:p>
          </table:table-cell>
          <table:table-cell table:style-name="ce9" office:value-type="string">
            <text:p>Emolium DERMOCARE Emulsja na suchą skórę głowy 100ml</text:p>
          </table:table-cell>
          <table:table-cell table:style-name="ce8" office:value-type="float" office:value="335">
            <text:p>335</text:p>
          </table:table-cell>
          <table:table-cell table:style-name="ce9" office:value-type="string">
            <text:p>2026-03-15 21:02:20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83.XXX.XXX.2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Zestawy dla kobiet</text:p>
          </table:table-cell>
          <table:table-cell table:style-name="ce9" office:value-type="string">
            <text:p>Klorane Chinina Zestaw Przeciw Wypadaniu Włosów – Szampon, 400 ml + Odżywka, 200 ml</text:p>
          </table:table-cell>
          <table:table-cell table:style-name="ce8" office:value-type="float" office:value="32607">
            <text:p>32607</text:p>
          </table:table-cell>
          <table:table-cell table:style-name="ce9" office:value-type="string">
            <text:p>2026-03-15 21:04:17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89.XXX.XXX.X2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eparaty medycyny naturalnej</text:p>
          </table:table-cell>
          <table:table-cell table:style-name="ce9" office:value-type="string">
            <text:p>Tisane FARM Żel propolisowy 6g</text:p>
          </table:table-cell>
          <table:table-cell table:style-name="ce8" office:value-type="float" office:value="18277">
            <text:p>18277</text:p>
          </table:table-cell>
          <table:table-cell table:style-name="ce9" office:value-type="string">
            <text:p>2026-03-15 21:04:34</text:p>
          </table:table-cell>
          <table:table-cell table:style-name="ce10" office:value-type="currency" office:currency="PLN" office:value="0.88">
            <text:p>0,88 zł</text:p>
          </table:table-cell>
          <table:table-cell table:style-name="ce8"/>
          <table:table-cell table:style-name="ce10" office:value-type="currency" office:currency="PLN" office:value="0.88">
            <text:p>0,88 zł</text:p>
          </table:table-cell>
          <table:table-cell table:style-name="ce8"/>
          <table:table-cell table:style-name="ce9" office:value-type="string">
            <text:p>91.XXX.XXX.X9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Stawy, mięśnie i kości</text:p>
          </table:table-cell>
          <table:table-cell table:style-name="ce9" office:value-type="string">
            <text:p>Phytomedica Promyalgan 120tabl.</text:p>
          </table:table-cell>
          <table:table-cell table:style-name="ce8" office:value-type="float" office:value="25920">
            <text:p>25920</text:p>
          </table:table-cell>
          <table:table-cell table:style-name="ce9" office:value-type="string">
            <text:p>2026-03-15 21:05:23</text:p>
          </table:table-cell>
          <table:table-cell table:style-name="ce10" office:value-type="currency" office:currency="PLN" office:value="0.83">
            <text:p>0,83 zł</text:p>
          </table:table-cell>
          <table:table-cell table:style-name="ce8"/>
          <table:table-cell table:style-name="ce10" office:value-type="currency" office:currency="PLN" office:value="0.83">
            <text:p>0,83 zł</text:p>
          </table:table-cell>
          <table:table-cell table:style-name="ce8"/>
          <table:table-cell table:style-name="ce9" office:value-type="string">
            <text:p>91.XXX.XXX.6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eparaty medycyny naturalnej</text:p>
          </table:table-cell>
          <table:table-cell table:style-name="ce9" office:value-type="string">
            <text:p>Tisane FARM Żel propolisowy 6g</text:p>
          </table:table-cell>
          <table:table-cell table:style-name="ce8" office:value-type="float" office:value="18277">
            <text:p>18277</text:p>
          </table:table-cell>
          <table:table-cell table:style-name="ce9" office:value-type="string">
            <text:p>2026-03-15 21:06:13</text:p>
          </table:table-cell>
          <table:table-cell table:style-name="ce10" office:value-type="currency" office:currency="PLN" office:value="0.88">
            <text:p>0,88 zł</text:p>
          </table:table-cell>
          <table:table-cell table:style-name="ce8"/>
          <table:table-cell table:style-name="ce10" office:value-type="currency" office:currency="PLN" office:value="0.88">
            <text:p>0,88 zł</text:p>
          </table:table-cell>
          <table:table-cell table:style-name="ce8"/>
          <table:table-cell table:style-name="ce9" office:value-type="string">
            <text:p>91.XXX.XXX.X9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Emolium INTENSIVE Krem specjalny 75ml</text:p>
          </table:table-cell>
          <table:table-cell table:style-name="ce8" office:value-type="float" office:value="3892">
            <text:p>3892</text:p>
          </table:table-cell>
          <table:table-cell table:style-name="ce9" office:value-type="string">
            <text:p>2026-03-15 21:07:50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17X.XXX.XXX.X4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Emolium INTENSIVE Krem specjalny 75ml</text:p>
          </table:table-cell>
          <table:table-cell table:style-name="ce8" office:value-type="float" office:value="3892">
            <text:p>3892</text:p>
          </table:table-cell>
          <table:table-cell table:style-name="ce9" office:value-type="string">
            <text:p>2026-03-15 21:09:03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17X.XXX.XXX.X4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ArgenTussin Gardło, smak miętowo-cytrynowy 16 pastylek</text:p>
          </table:table-cell>
          <table:table-cell table:style-name="ce8" office:value-type="float" office:value="13334">
            <text:p>13334</text:p>
          </table:table-cell>
          <table:table-cell table:style-name="ce9" office:value-type="string">
            <text:p>2026-03-15 21:12:05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46.XXX.XXX.4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 i trawienie</text:p>
          </table:table-cell>
          <table:table-cell table:style-name="ce9" office:value-type="string">
            <text:p>Primaflor Multi 10kaps.</text:p>
          </table:table-cell>
          <table:table-cell table:style-name="ce8" office:value-type="float" office:value="32298">
            <text:p>32298</text:p>
          </table:table-cell>
          <table:table-cell table:style-name="ce9" office:value-type="string">
            <text:p>2026-03-15 21:12:33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89.XXX.XXX.X5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 i trawienie</text:p>
          </table:table-cell>
          <table:table-cell table:style-name="ce9" office:value-type="string">
            <text:p>Primaflor Multi 10kaps.</text:p>
          </table:table-cell>
          <table:table-cell table:style-name="ce8" office:value-type="float" office:value="32298">
            <text:p>32298</text:p>
          </table:table-cell>
          <table:table-cell table:style-name="ce9" office:value-type="string">
            <text:p>2026-03-15 21:13:33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89.XXX.XXX.X5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Zioła</text:p>
          </table:table-cell>
          <table:table-cell table:style-name="ce9" office:value-type="string">
            <text:p>Verdin Fix Zioła Z Owocami Leśnymi 20 saszetek</text:p>
          </table:table-cell>
          <table:table-cell table:style-name="ce8" office:value-type="float" office:value="18355">
            <text:p>18355</text:p>
          </table:table-cell>
          <table:table-cell table:style-name="ce9" office:value-type="string">
            <text:p>2026-03-15 21:13:46</text:p>
          </table:table-cell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9" office:value-type="string">
            <text:p>84.XXX.XXX.X4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ciała</text:p>
          </table:table-cell>
          <table:table-cell table:style-name="ce9" office:value-type="string">
            <text:p>Emolium DERMOCARE Emulsja na suchą skórę głowy 100ml</text:p>
          </table:table-cell>
          <table:table-cell table:style-name="ce8" office:value-type="float" office:value="335">
            <text:p>335</text:p>
          </table:table-cell>
          <table:table-cell table:style-name="ce9" office:value-type="string">
            <text:p>2026-03-15 21:14:18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18X.XXX.XXX.X5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nerały i witaminy</text:p>
          </table:table-cell>
          <table:table-cell table:style-name="ce9" office:value-type="string">
            <text:p>BODYMAX PLUS Multiwitamina Odporność Energia 200 tab.</text:p>
          </table:table-cell>
          <table:table-cell table:style-name="ce8" office:value-type="float" office:value="16252">
            <text:p>16252</text:p>
          </table:table-cell>
          <table:table-cell table:style-name="ce9" office:value-type="string">
            <text:p>2026-03-15 21:14:26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91.XXX.XXX.X1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ciała</text:p>
          </table:table-cell>
          <table:table-cell table:style-name="ce9" office:value-type="string">
            <text:p>Emolium DERMOCARE Emulsja na suchą skórę głowy 100ml</text:p>
          </table:table-cell>
          <table:table-cell table:style-name="ce8" office:value-type="float" office:value="335">
            <text:p>335</text:p>
          </table:table-cell>
          <table:table-cell table:style-name="ce9" office:value-type="string">
            <text:p>2026-03-15 21:14:52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18X.XXX.XXX.X5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ciała</text:p>
          </table:table-cell>
          <table:table-cell table:style-name="ce9" office:value-type="string">
            <text:p>Emolium DERMOCARE Emulsja na suchą skórę głowy 100ml</text:p>
          </table:table-cell>
          <table:table-cell table:style-name="ce8" office:value-type="float" office:value="335">
            <text:p>335</text:p>
          </table:table-cell>
          <table:table-cell table:style-name="ce9" office:value-type="string">
            <text:p>2026-03-15 21:15:28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18X.XXX.XXX.X5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Alfofarm Sora Med płyn do zwalczania wszawicy 100ml</text:p>
          </table:table-cell>
          <table:table-cell table:style-name="ce8" office:value-type="float" office:value="18130">
            <text:p>18130</text:p>
          </table:table-cell>
          <table:table-cell table:style-name="ce9" office:value-type="string">
            <text:p>2026-03-15 21:16:33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93.XXX.XXX.X5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Opatrunki</text:p>
          </table:table-cell>
          <table:table-cell table:style-name="ce9" office:value-type="string">
            <text:p>BACTIGRAS Opatrunek Gazowy Nasączony Parafiną I Chlorheksydyną 10cm x 10cm 10szt.</text:p>
          </table:table-cell>
          <table:table-cell table:style-name="ce8" office:value-type="float" office:value="9185">
            <text:p>9185</text:p>
          </table:table-cell>
          <table:table-cell table:style-name="ce9" office:value-type="string">
            <text:p>2026-03-15 21:16:34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18X.XXX.XXX.3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Nizoral Krem 20mg/g 30 g</text:p>
          </table:table-cell>
          <table:table-cell table:style-name="ce8" office:value-type="float" office:value="9594">
            <text:p>9594</text:p>
          </table:table-cell>
          <table:table-cell table:style-name="ce9" office:value-type="string">
            <text:p>2026-03-15 21:17:09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31.XXX.XXX.X0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Cholinex Pastylki do ssania w stanach zapalnych gardła i jamy ustnej 16 szt.</text:p>
          </table:table-cell>
          <table:table-cell table:style-name="ce8" office:value-type="float" office:value="10620">
            <text:p>10620</text:p>
          </table:table-cell>
          <table:table-cell table:style-name="ce9" office:value-type="string">
            <text:p>2026-03-15 21:17:12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37.XXX.XXX.X9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</text:p>
          </table:table-cell>
          <table:table-cell table:style-name="ce9" office:value-type="string">
            <text:p>Lactulose-MIP syrop 9,75g/15ml 1000ml</text:p>
          </table:table-cell>
          <table:table-cell table:style-name="ce8" office:value-type="float" office:value="7759">
            <text:p>7759</text:p>
          </table:table-cell>
          <table:table-cell table:style-name="ce9" office:value-type="string">
            <text:p>2026-03-15 21:17:40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5.XXX.XXX.X7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</text:p>
          </table:table-cell>
          <table:table-cell table:style-name="ce9" office:value-type="string">
            <text:p>Lactulose-MIP syrop 9,75g/15ml 1000ml</text:p>
          </table:table-cell>
          <table:table-cell table:style-name="ce8" office:value-type="float" office:value="7759">
            <text:p>7759</text:p>
          </table:table-cell>
          <table:table-cell table:style-name="ce9" office:value-type="string">
            <text:p>2026-03-15 21:17:41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66.XXX.XXX.6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Opatrunki</text:p>
          </table:table-cell>
          <table:table-cell table:style-name="ce9" office:value-type="string">
            <text:p>BACTIGRAS Opatrunek Gazowy Nasączony Parafiną I Chlorheksydyną 10cm x 10cm 10szt.</text:p>
          </table:table-cell>
          <table:table-cell table:style-name="ce8" office:value-type="float" office:value="9185">
            <text:p>9185</text:p>
          </table:table-cell>
          <table:table-cell table:style-name="ce9" office:value-type="string">
            <text:p>2026-03-15 21:17:43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18X.XXX.XXX.3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ciała</text:p>
          </table:table-cell>
          <table:table-cell table:style-name="ce9" office:value-type="string">
            <text:p>Emolium DERMOCARE Emulsja na suchą skórę głowy 100ml</text:p>
          </table:table-cell>
          <table:table-cell table:style-name="ce8" office:value-type="float" office:value="335">
            <text:p>335</text:p>
          </table:table-cell>
          <table:table-cell table:style-name="ce9" office:value-type="string">
            <text:p>2026-03-15 21:18:12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18X.XXX.XXX.X5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Zestawy dermokosmetyków</text:p>
          </table:table-cell>
          <table:table-cell table:style-name="ce9" office:value-type="string">
            <text:p>Avene Dermabsolu Krem Na Noc 50ml + Pod Oczy 15ml</text:p>
          </table:table-cell>
          <table:table-cell table:style-name="ce8" office:value-type="float" office:value="32643">
            <text:p>32643</text:p>
          </table:table-cell>
          <table:table-cell table:style-name="ce9" office:value-type="string">
            <text:p>2026-03-15 21:18:19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31.XXX.XXX.2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Sora Protect - aerozol na włosy zapobiegający wszawicy 50ml</text:p>
          </table:table-cell>
          <table:table-cell table:style-name="ce8" office:value-type="float" office:value="6881">
            <text:p>6881</text:p>
          </table:table-cell>
          <table:table-cell table:style-name="ce9" office:value-type="string">
            <text:p>2026-03-15 21:20:54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93.XXX.XXX.X5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Biuro i firma</text:p>
          </table:table-cell>
          <table:table-cell table:style-name="ce9" office:value-type="string">
            <text:p>Wyposażenie medyczne</text:p>
          </table:table-cell>
          <table:table-cell table:style-name="ce9" office:value-type="string">
            <text:p>Romed Worek Na Mocz Ze Spustem 2,0 L 1 Szt</text:p>
          </table:table-cell>
          <table:table-cell table:style-name="ce8" office:value-type="float" office:value="14672">
            <text:p>14672</text:p>
          </table:table-cell>
          <table:table-cell table:style-name="ce9" office:value-type="string">
            <text:p>2026-03-15 21:21:44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77.XXX.XXX.X0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Iwostin Hydro Sensitia Intensywnie nawilżające serum, 30 ml</text:p>
          </table:table-cell>
          <table:table-cell table:style-name="ce8" office:value-type="float" office:value="14083">
            <text:p>14083</text:p>
          </table:table-cell>
          <table:table-cell table:style-name="ce9" office:value-type="string">
            <text:p>2026-03-15 21:23:14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93.XXX.XXX.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eparaty medycyny naturalnej</text:p>
          </table:table-cell>
          <table:table-cell table:style-name="ce9" office:value-type="string">
            <text:p>Tisane FARM Żel propolisowy 6g</text:p>
          </table:table-cell>
          <table:table-cell table:style-name="ce8" office:value-type="float" office:value="18277">
            <text:p>18277</text:p>
          </table:table-cell>
          <table:table-cell table:style-name="ce9" office:value-type="string">
            <text:p>2026-03-15 21:23:34</text:p>
          </table:table-cell>
          <table:table-cell table:style-name="ce10" office:value-type="currency" office:currency="PLN" office:value="0.88">
            <text:p>0,88 zł</text:p>
          </table:table-cell>
          <table:table-cell table:style-name="ce8"/>
          <table:table-cell table:style-name="ce10" office:value-type="currency" office:currency="PLN" office:value="0.88">
            <text:p>0,88 zł</text:p>
          </table:table-cell>
          <table:table-cell table:style-name="ce8"/>
          <table:table-cell table:style-name="ce9" office:value-type="string">
            <text:p>31.XXX.XXX.X0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Otrivin Menthol 1mg/ml Aerozol do nosa 10 ml</text:p>
          </table:table-cell>
          <table:table-cell table:style-name="ce8" office:value-type="float" office:value="14886">
            <text:p>14886</text:p>
          </table:table-cell>
          <table:table-cell table:style-name="ce9" office:value-type="string">
            <text:p>2026-03-15 21:23:44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18X.XXX.XXX.X9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Dom i wnętrze</text:p>
          </table:table-cell>
          <table:table-cell table:style-name="ce9" office:value-type="string">
            <text:p>Olejki zapachowe</text:p>
          </table:table-cell>
          <table:table-cell table:style-name="ce9" office:value-type="string">
            <text:p>Pharmatech Olejek dla zakatarzonych 10ml</text:p>
          </table:table-cell>
          <table:table-cell table:style-name="ce8" office:value-type="float" office:value="19392">
            <text:p>19392</text:p>
          </table:table-cell>
          <table:table-cell table:style-name="ce9" office:value-type="string">
            <text:p>2026-03-15 21:24:12</text:p>
          </table:table-cell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9" office:value-type="string">
            <text:p>62.XXX.XXX.4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Kosmetyki po opalaniu</text:p>
          </table:table-cell>
          <table:table-cell table:style-name="ce9" office:value-type="string">
            <text:p>Diaderma Olejek Marchewkowy Do Utrwalania Opalenizny 30 ml</text:p>
          </table:table-cell>
          <table:table-cell table:style-name="ce8" office:value-type="float" office:value="4751">
            <text:p>4751</text:p>
          </table:table-cell>
          <table:table-cell table:style-name="ce9" office:value-type="string">
            <text:p>2026-03-15 21:24:44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77.XXX.XXX.3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Dom i wnętrze</text:p>
          </table:table-cell>
          <table:table-cell table:style-name="ce9" office:value-type="string">
            <text:p>Olejki zapachowe</text:p>
          </table:table-cell>
          <table:table-cell table:style-name="ce9" office:value-type="string">
            <text:p>Pharmatech Olejek dla zakatarzonych 10ml</text:p>
          </table:table-cell>
          <table:table-cell table:style-name="ce8" office:value-type="float" office:value="19392">
            <text:p>19392</text:p>
          </table:table-cell>
          <table:table-cell table:style-name="ce9" office:value-type="string">
            <text:p>2026-03-15 21:25:40</text:p>
          </table:table-cell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9" office:value-type="string">
            <text:p>62.XXX.XXX.4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Otrivin Menthol 1mg/ml Aerozol do nosa 10 ml</text:p>
          </table:table-cell>
          <table:table-cell table:style-name="ce8" office:value-type="float" office:value="14886">
            <text:p>14886</text:p>
          </table:table-cell>
          <table:table-cell table:style-name="ce9" office:value-type="string">
            <text:p>2026-03-15 21:26:42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18X.XXX.XXX.X9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Zestawy dermokosmetyków</text:p>
          </table:table-cell>
          <table:table-cell table:style-name="ce9" office:value-type="string">
            <text:p>Avene Hyaluron Activ B3 Krem Na Noc 50ml + Pod Oczy 15ml</text:p>
          </table:table-cell>
          <table:table-cell table:style-name="ce8" office:value-type="float" office:value="32646">
            <text:p>32646</text:p>
          </table:table-cell>
          <table:table-cell table:style-name="ce9" office:value-type="string">
            <text:p>2026-03-15 21:26:47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83.XXX.XXX.X6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 i trawienie</text:p>
          </table:table-cell>
          <table:table-cell table:style-name="ce9" office:value-type="string">
            <text:p>Primaflor Multi 10kaps.</text:p>
          </table:table-cell>
          <table:table-cell table:style-name="ce8" office:value-type="float" office:value="32298">
            <text:p>32298</text:p>
          </table:table-cell>
          <table:table-cell table:style-name="ce9" office:value-type="string">
            <text:p>2026-03-15 21:26:51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89.XXX.XXX.X5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 i trawienie</text:p>
          </table:table-cell>
          <table:table-cell table:style-name="ce9" office:value-type="string">
            <text:p>Primaflor Multi 10kaps.</text:p>
          </table:table-cell>
          <table:table-cell table:style-name="ce8" office:value-type="float" office:value="32298">
            <text:p>32298</text:p>
          </table:table-cell>
          <table:table-cell table:style-name="ce9" office:value-type="string">
            <text:p>2026-03-15 21:27:49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89.XXX.XXX.X5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Otrivin Menthol 1mg/ml Aerozol do nosa 10 ml</text:p>
          </table:table-cell>
          <table:table-cell table:style-name="ce8" office:value-type="float" office:value="14886">
            <text:p>14886</text:p>
          </table:table-cell>
          <table:table-cell table:style-name="ce9" office:value-type="string">
            <text:p>2026-03-15 21:27:51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93.XXX.XXX.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DUCRAY KERACNYL Repair Balsam do ust 15ml</text:p>
          </table:table-cell>
          <table:table-cell table:style-name="ce8" office:value-type="float" office:value="32640">
            <text:p>32640</text:p>
          </table:table-cell>
          <table:table-cell table:style-name="ce9" office:value-type="string">
            <text:p>2026-03-15 21:28:18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19X.XXX.XXX.9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Suplementy dla dzieci</text:p>
          </table:table-cell>
          <table:table-cell table:style-name="ce9" office:value-type="string">
            <text:p>Błonnik dla dzieci + probiotyki 100 g</text:p>
          </table:table-cell>
          <table:table-cell table:style-name="ce8" office:value-type="float" office:value="11947">
            <text:p>11947</text:p>
          </table:table-cell>
          <table:table-cell table:style-name="ce9" office:value-type="string">
            <text:p>2026-03-15 21:28:29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83.XXX.XXX.8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Otrivin Menthol 1mg/ml Aerozol do nosa 10 ml</text:p>
          </table:table-cell>
          <table:table-cell table:style-name="ce8" office:value-type="float" office:value="14886">
            <text:p>14886</text:p>
          </table:table-cell>
          <table:table-cell table:style-name="ce9" office:value-type="string">
            <text:p>2026-03-15 21:29:10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93.XXX.XXX.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ęśnie, stawy i kości</text:p>
          </table:table-cell>
          <table:table-cell table:style-name="ce9" office:value-type="string">
            <text:p>Borowina Lecznicza Pasta 1 Kg</text:p>
          </table:table-cell>
          <table:table-cell table:style-name="ce8" office:value-type="float" office:value="4899">
            <text:p>4899</text:p>
          </table:table-cell>
          <table:table-cell table:style-name="ce9" office:value-type="string">
            <text:p>2026-03-15 21:29:20</text:p>
          </table:table-cell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9" office:value-type="string">
            <text:p>83.XXX.XXX.X0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ciała</text:p>
          </table:table-cell>
          <table:table-cell table:style-name="ce9" office:value-type="string">
            <text:p>Emolium Dermocare Nawilżający Olejek do mycia 400 ml</text:p>
          </table:table-cell>
          <table:table-cell table:style-name="ce8" office:value-type="float" office:value="7660">
            <text:p>7660</text:p>
          </table:table-cell>
          <table:table-cell table:style-name="ce9" office:value-type="string">
            <text:p>2026-03-15 21:29:53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37.XXX.XXX.8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nerały i witaminy</text:p>
          </table:table-cell>
          <table:table-cell table:style-name="ce9" office:value-type="string">
            <text:p>Biofarm Vigalex D3 + K2 Max 60 tabl.</text:p>
          </table:table-cell>
          <table:table-cell table:style-name="ce8" office:value-type="float" office:value="18365">
            <text:p>18365</text:p>
          </table:table-cell>
          <table:table-cell table:style-name="ce9" office:value-type="string">
            <text:p>2026-03-15 21:30:49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85.XXX.XXX.X6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Zestawy dermokosmetyków</text:p>
          </table:table-cell>
          <table:table-cell table:style-name="ce9" office:value-type="string">
            <text:p>Avene Dermabsolu Krem Na Noc 50ml + Pod Oczy 15ml</text:p>
          </table:table-cell>
          <table:table-cell table:style-name="ce8" office:value-type="float" office:value="32643">
            <text:p>32643</text:p>
          </table:table-cell>
          <table:table-cell table:style-name="ce9" office:value-type="string">
            <text:p>2026-03-15 21:34:18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31.XXX.XXX.2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</text:p>
          </table:table-cell>
          <table:table-cell table:style-name="ce9" office:value-type="string">
            <text:p>Rennie Antiacidum o smaku miętowym 48 tabletek do ssania</text:p>
          </table:table-cell>
          <table:table-cell table:style-name="ce8" office:value-type="float" office:value="15795">
            <text:p>15795</text:p>
          </table:table-cell>
          <table:table-cell table:style-name="ce9" office:value-type="string">
            <text:p>2026-03-15 21:35:11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31.XXX.XXX.3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</text:p>
          </table:table-cell>
          <table:table-cell table:style-name="ce9" office:value-type="string">
            <text:p>Rennie Antiacidum o smaku miętowym 48 tabletek do ssania</text:p>
          </table:table-cell>
          <table:table-cell table:style-name="ce8" office:value-type="float" office:value="15795">
            <text:p>15795</text:p>
          </table:table-cell>
          <table:table-cell table:style-name="ce9" office:value-type="string">
            <text:p>2026-03-15 21:35:46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31.XXX.XXX.3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moczowy i płciowy</text:p>
          </table:table-cell>
          <table:table-cell table:style-name="ce9" office:value-type="string">
            <text:p>Gynoxin Uno 1kaps.</text:p>
          </table:table-cell>
          <table:table-cell table:style-name="ce8" office:value-type="float" office:value="10956">
            <text:p>10956</text:p>
          </table:table-cell>
          <table:table-cell table:style-name="ce9" office:value-type="string">
            <text:p>2026-03-15 21:35:57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91.XXX.XXX.X3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Zestawy dermokosmetyków</text:p>
          </table:table-cell>
          <table:table-cell table:style-name="ce9" office:value-type="string">
            <text:p>Avene Dermabsolu Krem Na Noc 50ml + Pod Oczy 15ml</text:p>
          </table:table-cell>
          <table:table-cell table:style-name="ce8" office:value-type="float" office:value="32643">
            <text:p>32643</text:p>
          </table:table-cell>
          <table:table-cell table:style-name="ce9" office:value-type="string">
            <text:p>2026-03-15 21:37:23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10X.XXX.XXX.9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Excilor Leczenie grzybicy paznokci 3,3ml</text:p>
          </table:table-cell>
          <table:table-cell table:style-name="ce8" office:value-type="float" office:value="3920">
            <text:p>3920</text:p>
          </table:table-cell>
          <table:table-cell table:style-name="ce9" office:value-type="string">
            <text:p>2026-03-15 21:37:28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31.XXX.XXX.X9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Zestawy dermokosmetyków</text:p>
          </table:table-cell>
          <table:table-cell table:style-name="ce9" office:value-type="string">
            <text:p>Avene Dermabsolu Krem Na Noc 50ml + Pod Oczy 15ml</text:p>
          </table:table-cell>
          <table:table-cell table:style-name="ce8" office:value-type="float" office:value="32643">
            <text:p>32643</text:p>
          </table:table-cell>
          <table:table-cell table:style-name="ce9" office:value-type="string">
            <text:p>2026-03-15 21:38:29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10X.XXX.XXX.9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Suplementy na odchudzanie</text:p>
          </table:table-cell>
          <table:table-cell table:style-name="ce9" office:value-type="string">
            <text:p>HYDROSLIMMER 30 tabl.</text:p>
          </table:table-cell>
          <table:table-cell table:style-name="ce8" office:value-type="float" office:value="32282">
            <text:p>32282</text:p>
          </table:table-cell>
          <table:table-cell table:style-name="ce9" office:value-type="string">
            <text:p>2026-03-15 21:39:15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83.XXX.XXX.X7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</text:p>
          </table:table-cell>
          <table:table-cell table:style-name="ce9" office:value-type="string">
            <text:p>Delfarma Skinscabin Płyn 120ml</text:p>
          </table:table-cell>
          <table:table-cell table:style-name="ce8" office:value-type="float" office:value="13970">
            <text:p>13970</text:p>
          </table:table-cell>
          <table:table-cell table:style-name="ce9" office:value-type="string">
            <text:p>2026-03-15 21:40:34</text:p>
          </table:table-cell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9" office:value-type="string">
            <text:p>18X.XXX.XXX.8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Emolium INTENSIVE Krem specjalny 75ml</text:p>
          </table:table-cell>
          <table:table-cell table:style-name="ce8" office:value-type="float" office:value="3892">
            <text:p>3892</text:p>
          </table:table-cell>
          <table:table-cell table:style-name="ce9" office:value-type="string">
            <text:p>2026-03-15 21:41:14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11X.XXX.XXX.X3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</text:p>
          </table:table-cell>
          <table:table-cell table:style-name="ce9" office:value-type="string">
            <text:p>Dulcobis Lek Na Zaparcia 5mg 40tabl.</text:p>
          </table:table-cell>
          <table:table-cell table:style-name="ce8" office:value-type="float" office:value="295">
            <text:p>295</text:p>
          </table:table-cell>
          <table:table-cell table:style-name="ce9" office:value-type="string">
            <text:p>2026-03-15 21:41:52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91.XXX.XXX.7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ciała</text:p>
          </table:table-cell>
          <table:table-cell table:style-name="ce9" office:value-type="string">
            <text:p>Emolium DERMOCARE Emulsja na suchą skórę głowy 100ml</text:p>
          </table:table-cell>
          <table:table-cell table:style-name="ce8" office:value-type="float" office:value="335">
            <text:p>335</text:p>
          </table:table-cell>
          <table:table-cell table:style-name="ce9" office:value-type="string">
            <text:p>2026-03-15 21:42:07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37.XXX.XXX.X2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Sora Protect - aerozol na włosy zapobiegający wszawicy 50ml</text:p>
          </table:table-cell>
          <table:table-cell table:style-name="ce8" office:value-type="float" office:value="6881">
            <text:p>6881</text:p>
          </table:table-cell>
          <table:table-cell table:style-name="ce9" office:value-type="string">
            <text:p>2026-03-15 21:42:59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17X.XXX.XXX.5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 i trawienie</text:p>
          </table:table-cell>
          <table:table-cell table:style-name="ce9" office:value-type="string">
            <text:p>Daopro 30 Minitabl. Dojelitowych</text:p>
          </table:table-cell>
          <table:table-cell table:style-name="ce8" office:value-type="float" office:value="19374">
            <text:p>19374</text:p>
          </table:table-cell>
          <table:table-cell table:style-name="ce9" office:value-type="string">
            <text:p>2026-03-15 21:43:25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19X.XXX.XXX.6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Otrivin Menthol 1mg/ml Aerozol do nosa 10 ml</text:p>
          </table:table-cell>
          <table:table-cell table:style-name="ce8" office:value-type="float" office:value="14886">
            <text:p>14886</text:p>
          </table:table-cell>
          <table:table-cell table:style-name="ce9" office:value-type="string">
            <text:p>2026-03-15 21:44:09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18X.XXX.XXX.X9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Pasty do zębów</text:p>
          </table:table-cell>
          <table:table-cell table:style-name="ce9" office:value-type="string">
            <text:p>Pierre Fabre Elgydium Pasta Do Zębów Z Kompleksem Fluorinol Protect + 75ml</text:p>
          </table:table-cell>
          <table:table-cell table:style-name="ce8" office:value-type="float" office:value="29833">
            <text:p>29833</text:p>
          </table:table-cell>
          <table:table-cell table:style-name="ce9" office:value-type="string">
            <text:p>2026-03-15 21:44:30</text:p>
          </table:table-cell>
          <table:table-cell table:style-name="ce10" office:value-type="currency" office:currency="PLN" office:value="0.67">
            <text:p>0,67 zł</text:p>
          </table:table-cell>
          <table:table-cell table:style-name="ce8"/>
          <table:table-cell table:style-name="ce10" office:value-type="currency" office:currency="PLN" office:value="0.67">
            <text:p>0,67 zł</text:p>
          </table:table-cell>
          <table:table-cell table:style-name="ce8"/>
          <table:table-cell table:style-name="ce9" office:value-type="string">
            <text:p>17X.XXX.XXX.2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 i trawienie</text:p>
          </table:table-cell>
          <table:table-cell table:style-name="ce9" office:value-type="string">
            <text:p>Daopro 30 Minitabl. Dojelitowych</text:p>
          </table:table-cell>
          <table:table-cell table:style-name="ce8" office:value-type="float" office:value="19374">
            <text:p>19374</text:p>
          </table:table-cell>
          <table:table-cell table:style-name="ce9" office:value-type="string">
            <text:p>2026-03-15 21:44:58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37.XXX.XXX.X4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 i trawienie</text:p>
          </table:table-cell>
          <table:table-cell table:style-name="ce9" office:value-type="string">
            <text:p>Daopro 30 Minitabl. Dojelitowych</text:p>
          </table:table-cell>
          <table:table-cell table:style-name="ce8" office:value-type="float" office:value="19374">
            <text:p>19374</text:p>
          </table:table-cell>
          <table:table-cell table:style-name="ce9" office:value-type="string">
            <text:p>2026-03-15 21:45:31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37.XXX.XXX.X4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Suplementy na wzrok i słuch</text:p>
          </table:table-cell>
          <table:table-cell table:style-name="ce9" office:value-type="string">
            <text:p>Aronta 30 tabl</text:p>
          </table:table-cell>
          <table:table-cell table:style-name="ce8" office:value-type="float" office:value="658">
            <text:p>658</text:p>
          </table:table-cell>
          <table:table-cell table:style-name="ce9" office:value-type="string">
            <text:p>2026-03-15 21:46:02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91.XXX.XXX.X9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Termometry</text:p>
          </table:table-cell>
          <table:table-cell table:style-name="ce9" office:value-type="string">
            <text:p>Microlife MT 16C2</text:p>
          </table:table-cell>
          <table:table-cell table:style-name="ce8" office:value-type="float" office:value="9695">
            <text:p>9695</text:p>
          </table:table-cell>
          <table:table-cell table:style-name="ce9" office:value-type="string">
            <text:p>2026-03-15 21:46:37</text:p>
          </table:table-cell>
          <table:table-cell table:style-name="ce10" office:value-type="currency" office:currency="PLN" office:value="1.03">
            <text:p>1,03 zł</text:p>
          </table:table-cell>
          <table:table-cell table:style-name="ce8"/>
          <table:table-cell table:style-name="ce10" office:value-type="currency" office:currency="PLN" office:value="1.03">
            <text:p>1,03 zł</text:p>
          </table:table-cell>
          <table:table-cell table:style-name="ce8"/>
          <table:table-cell table:style-name="ce9" office:value-type="string">
            <text:p>89.XXX.XXX.X5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Termometry</text:p>
          </table:table-cell>
          <table:table-cell table:style-name="ce9" office:value-type="string">
            <text:p>Microlife MT 16C2</text:p>
          </table:table-cell>
          <table:table-cell table:style-name="ce8" office:value-type="float" office:value="9695">
            <text:p>9695</text:p>
          </table:table-cell>
          <table:table-cell table:style-name="ce9" office:value-type="string">
            <text:p>2026-03-15 21:47:00</text:p>
          </table:table-cell>
          <table:table-cell table:style-name="ce10" office:value-type="currency" office:currency="PLN" office:value="1.03">
            <text:p>1,03 zł</text:p>
          </table:table-cell>
          <table:table-cell table:style-name="ce8"/>
          <table:table-cell table:style-name="ce10" office:value-type="currency" office:currency="PLN" office:value="1.03">
            <text:p>1,03 zł</text:p>
          </table:table-cell>
          <table:table-cell table:style-name="ce8"/>
          <table:table-cell table:style-name="ce9" office:value-type="string">
            <text:p>89.XXX.XXX.X5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Termometry</text:p>
          </table:table-cell>
          <table:table-cell table:style-name="ce9" office:value-type="string">
            <text:p>Microlife MT 16C2</text:p>
          </table:table-cell>
          <table:table-cell table:style-name="ce8" office:value-type="float" office:value="9695">
            <text:p>9695</text:p>
          </table:table-cell>
          <table:table-cell table:style-name="ce9" office:value-type="string">
            <text:p>2026-03-15 21:47:19</text:p>
          </table:table-cell>
          <table:table-cell table:style-name="ce10" office:value-type="currency" office:currency="PLN" office:value="1.03">
            <text:p>1,03 zł</text:p>
          </table:table-cell>
          <table:table-cell table:style-name="ce8"/>
          <table:table-cell table:style-name="ce10" office:value-type="currency" office:currency="PLN" office:value="1.03">
            <text:p>1,03 zł</text:p>
          </table:table-cell>
          <table:table-cell table:style-name="ce8"/>
          <table:table-cell table:style-name="ce9" office:value-type="string">
            <text:p>17X.XXX.XXX.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Suplementy na wzrok i słuch</text:p>
          </table:table-cell>
          <table:table-cell table:style-name="ce9" office:value-type="string">
            <text:p>Aronta 30 tabl</text:p>
          </table:table-cell>
          <table:table-cell table:style-name="ce8" office:value-type="float" office:value="658">
            <text:p>658</text:p>
          </table:table-cell>
          <table:table-cell table:style-name="ce9" office:value-type="string">
            <text:p>2026-03-15 21:47:58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91.XXX.XXX.X9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łyny i żele do dezynfekcji ran</text:p>
          </table:table-cell>
          <table:table-cell table:style-name="ce9" office:value-type="string">
            <text:p>Skinsept Pur 1000ml</text:p>
          </table:table-cell>
          <table:table-cell table:style-name="ce8" office:value-type="float" office:value="15403">
            <text:p>15403</text:p>
          </table:table-cell>
          <table:table-cell table:style-name="ce9" office:value-type="string">
            <text:p>2026-03-15 21:48:05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17X.XXX.XXX.X7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ciała</text:p>
          </table:table-cell>
          <table:table-cell table:style-name="ce9" office:value-type="string">
            <text:p>Emolium DERMOCARE Emulsja na suchą skórę głowy 100ml</text:p>
          </table:table-cell>
          <table:table-cell table:style-name="ce8" office:value-type="float" office:value="335">
            <text:p>335</text:p>
          </table:table-cell>
          <table:table-cell table:style-name="ce9" office:value-type="string">
            <text:p>2026-03-15 21:50:05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93.XXX.XXX.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Dla dziecka</text:p>
          </table:table-cell>
          <table:table-cell table:style-name="ce9" office:value-type="string">
            <text:p>Mleka początkowe</text:p>
          </table:table-cell>
          <table:table-cell table:style-name="ce9" office:value-type="string">
            <text:p>Bebilon Nenatal Premium Płyn 24X70Ml</text:p>
          </table:table-cell>
          <table:table-cell table:style-name="ce8" office:value-type="float" office:value="12210">
            <text:p>12210</text:p>
          </table:table-cell>
          <table:table-cell table:style-name="ce9" office:value-type="string">
            <text:p>2026-03-15 21:50:06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87.XXX.XXX.3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ęśnie, stawy i kości</text:p>
          </table:table-cell>
          <table:table-cell table:style-name="ce9" office:value-type="string">
            <text:p>VIS Dolomit 0,5 g 100 tabletek</text:p>
          </table:table-cell>
          <table:table-cell table:style-name="ce8" office:value-type="float" office:value="3728">
            <text:p>3728</text:p>
          </table:table-cell>
          <table:table-cell table:style-name="ce9" office:value-type="string">
            <text:p>2026-03-15 21:51:17</text:p>
          </table:table-cell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9" office:value-type="string">
            <text:p>18X.XXX.XXX.X4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ciała</text:p>
          </table:table-cell>
          <table:table-cell table:style-name="ce9" office:value-type="string">
            <text:p>AFLOFARM Nivelium med krem dermatologiczny 250ml</text:p>
          </table:table-cell>
          <table:table-cell table:style-name="ce8" office:value-type="float" office:value="8641">
            <text:p>8641</text:p>
          </table:table-cell>
          <table:table-cell table:style-name="ce9" office:value-type="string">
            <text:p>2026-03-15 21:53:18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77.XXX.XXX.1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La Roche-Posay Hyalu B5 Aquagel Żel Nawilżający Spf 30 50Ml</text:p>
          </table:table-cell>
          <table:table-cell table:style-name="ce8" office:value-type="float" office:value="18852">
            <text:p>18852</text:p>
          </table:table-cell>
          <table:table-cell table:style-name="ce9" office:value-type="string">
            <text:p>2026-03-15 21:54:02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94.XXX.XXX.3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moczowy i płciowy</text:p>
          </table:table-cell>
          <table:table-cell table:style-name="ce9" office:value-type="string">
            <text:p>Furaginum MAX 100 mg 30 tab.</text:p>
          </table:table-cell>
          <table:table-cell table:style-name="ce8" office:value-type="float" office:value="19673">
            <text:p>19673</text:p>
          </table:table-cell>
          <table:table-cell table:style-name="ce9" office:value-type="string">
            <text:p>2026-03-15 21:54:53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10X.XXX.XXX.3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Otrivin Menthol 1mg/ml Aerozol do nosa 10 ml</text:p>
          </table:table-cell>
          <table:table-cell table:style-name="ce8" office:value-type="float" office:value="14886">
            <text:p>14886</text:p>
          </table:table-cell>
          <table:table-cell table:style-name="ce9" office:value-type="string">
            <text:p>2026-03-15 21:55:21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18X.XXX.XXX.X9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 i trawienie</text:p>
          </table:table-cell>
          <table:table-cell table:style-name="ce9" office:value-type="string">
            <text:p>Estabiom Junior 20kaps.</text:p>
          </table:table-cell>
          <table:table-cell table:style-name="ce8" office:value-type="float" office:value="6953">
            <text:p>6953</text:p>
          </table:table-cell>
          <table:table-cell table:style-name="ce9" office:value-type="string">
            <text:p>2026-03-15 21:55:28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46.XXX.XXX.2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Zestawy dla kobiet</text:p>
          </table:table-cell>
          <table:table-cell table:style-name="ce9" office:value-type="string">
            <text:p>Klorane Chinina Zestaw Przeciw Wypadaniu Włosów – Szampon, 400 ml + Odżywka, 200 ml</text:p>
          </table:table-cell>
          <table:table-cell table:style-name="ce8" office:value-type="float" office:value="32607">
            <text:p>32607</text:p>
          </table:table-cell>
          <table:table-cell table:style-name="ce9" office:value-type="string">
            <text:p>2026-03-15 21:56:03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5.XXX.XXX.X9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Ducray Keracnyl Reapir Krem Odbudowujący 50ml</text:p>
          </table:table-cell>
          <table:table-cell table:style-name="ce8" office:value-type="float" office:value="19520">
            <text:p>19520</text:p>
          </table:table-cell>
          <table:table-cell table:style-name="ce9" office:value-type="string">
            <text:p>2026-03-15 21:56:28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37.XXX.XXX.X2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ęśnie, stawy i kości</text:p>
          </table:table-cell>
          <table:table-cell table:style-name="ce9" office:value-type="string">
            <text:p>Borowina Lecznicza Pasta 1 Kg</text:p>
          </table:table-cell>
          <table:table-cell table:style-name="ce8" office:value-type="float" office:value="4899">
            <text:p>4899</text:p>
          </table:table-cell>
          <table:table-cell table:style-name="ce9" office:value-type="string">
            <text:p>2026-03-15 21:59:50</text:p>
          </table:table-cell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9" office:value-type="string">
            <text:p>37.XXX.XXX.X2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Lamisilatt Krem 10 mg/g 15g</text:p>
          </table:table-cell>
          <table:table-cell table:style-name="ce8" office:value-type="float" office:value="6122">
            <text:p>6122</text:p>
          </table:table-cell>
          <table:table-cell table:style-name="ce9" office:value-type="string">
            <text:p>2026-03-15 22:01:07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87.XXX.XXX.X2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Kremy i maści medycyny naturalnej</text:p>
          </table:table-cell>
          <table:table-cell table:style-name="ce9" office:value-type="string">
            <text:p>Elissa Maść majerankowa 25g</text:p>
          </table:table-cell>
          <table:table-cell table:style-name="ce8" office:value-type="float" office:value="4515">
            <text:p>4515</text:p>
          </table:table-cell>
          <table:table-cell table:style-name="ce9" office:value-type="string">
            <text:p>2026-03-15 22:04:44</text:p>
          </table:table-cell>
          <table:table-cell table:style-name="ce10" office:value-type="currency" office:currency="PLN" office:value="0.76">
            <text:p>0,76 zł</text:p>
          </table:table-cell>
          <table:table-cell table:style-name="ce8"/>
          <table:table-cell table:style-name="ce10" office:value-type="currency" office:currency="PLN" office:value="0.76">
            <text:p>0,76 zł</text:p>
          </table:table-cell>
          <table:table-cell table:style-name="ce8"/>
          <table:table-cell table:style-name="ce9" office:value-type="string">
            <text:p>31.XXX.XXX.X5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Zestawy dermokosmetyków</text:p>
          </table:table-cell>
          <table:table-cell table:style-name="ce9" office:value-type="string">
            <text:p>Avene Dermabsolu Krem Na Noc 50ml + Pod Oczy 15ml</text:p>
          </table:table-cell>
          <table:table-cell table:style-name="ce8" office:value-type="float" office:value="32643">
            <text:p>32643</text:p>
          </table:table-cell>
          <table:table-cell table:style-name="ce9" office:value-type="string">
            <text:p>2026-03-15 22:06:52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31.XXX.XXX.2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Suplementy dla dzieci</text:p>
          </table:table-cell>
          <table:table-cell table:style-name="ce9" office:value-type="string">
            <text:p>Vivomixx Mikrokapsułki 10 mld 30 kapsułek</text:p>
          </table:table-cell>
          <table:table-cell table:style-name="ce8" office:value-type="float" office:value="596">
            <text:p>596</text:p>
          </table:table-cell>
          <table:table-cell table:style-name="ce9" office:value-type="string">
            <text:p>2026-03-15 22:07:01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77.XXX.XXX.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Chema-Elektromet Atopigo koncentrat do koncentrat do kąpieli 100g</text:p>
          </table:table-cell>
          <table:table-cell table:style-name="ce8" office:value-type="float" office:value="13988">
            <text:p>13988</text:p>
          </table:table-cell>
          <table:table-cell table:style-name="ce9" office:value-type="string">
            <text:p>2026-03-15 22:08:59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14X.XXX.XXX.8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Pozostałe kosmetyki do włosów</text:p>
          </table:table-cell>
          <table:table-cell table:style-name="ce9" office:value-type="string">
            <text:p>DUCRAY ANACAPS Reactiv, 3x30kapsułek</text:p>
          </table:table-cell>
          <table:table-cell table:style-name="ce8" office:value-type="float" office:value="18922">
            <text:p>18922</text:p>
          </table:table-cell>
          <table:table-cell table:style-name="ce9" office:value-type="string">
            <text:p>2026-03-15 22:17:21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18X.XXX.XXX.7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Opatrunki</text:p>
          </table:table-cell>
          <table:table-cell table:style-name="ce9" office:value-type="string">
            <text:p>LABORATORIA POLFA ŁÓDŹ SP. Z O.O. OPATRUNEK URGOCLEAN AG 10 X 10CM</text:p>
          </table:table-cell>
          <table:table-cell table:style-name="ce8" office:value-type="float" office:value="10151">
            <text:p>10151</text:p>
          </table:table-cell>
          <table:table-cell table:style-name="ce9" office:value-type="string">
            <text:p>2026-03-15 22:17:31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78.XXX.XXX.7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ciała</text:p>
          </table:table-cell>
          <table:table-cell table:style-name="ce9" office:value-type="string">
            <text:p>Emolium DERMOCARE Emulsja na suchą skórę głowy 100ml</text:p>
          </table:table-cell>
          <table:table-cell table:style-name="ce8" office:value-type="float" office:value="335">
            <text:p>335</text:p>
          </table:table-cell>
          <table:table-cell table:style-name="ce9" office:value-type="string">
            <text:p>2026-03-15 22:17:59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10X.XXX.XXX.X4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Excilor Leczenie grzybicy paznokci 3,3ml</text:p>
          </table:table-cell>
          <table:table-cell table:style-name="ce8" office:value-type="float" office:value="3920">
            <text:p>3920</text:p>
          </table:table-cell>
          <table:table-cell table:style-name="ce9" office:value-type="string">
            <text:p>2026-03-15 22:19:45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83.XXX.XXX.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Emolium INTENSIVE Krem specjalny 75ml</text:p>
          </table:table-cell>
          <table:table-cell table:style-name="ce8" office:value-type="float" office:value="3892">
            <text:p>3892</text:p>
          </table:table-cell>
          <table:table-cell table:style-name="ce9" office:value-type="string">
            <text:p>2026-03-15 22:22:48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18X.XXX.XXX.X4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Pozostałe kosmetyki do włosów</text:p>
          </table:table-cell>
          <table:table-cell table:style-name="ce9" office:value-type="string">
            <text:p>Seboradin Spray Odsiwiający Do Włosów Forte 200ml</text:p>
          </table:table-cell>
          <table:table-cell table:style-name="ce8" office:value-type="float" office:value="26469">
            <text:p>26469</text:p>
          </table:table-cell>
          <table:table-cell table:style-name="ce9" office:value-type="string">
            <text:p>2026-03-15 22:23:09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19X.XXX.XXX.X1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Emolium INTENSIVE Krem specjalny 75ml</text:p>
          </table:table-cell>
          <table:table-cell table:style-name="ce8" office:value-type="float" office:value="3892">
            <text:p>3892</text:p>
          </table:table-cell>
          <table:table-cell table:style-name="ce9" office:value-type="string">
            <text:p>2026-03-15 22:23:16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18X.XXX.XXX.X4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łciowy i moczowy</text:p>
          </table:table-cell>
          <table:table-cell table:style-name="ce9" office:value-type="string">
            <text:p>Miovelia Nac 15 kaps.</text:p>
          </table:table-cell>
          <table:table-cell table:style-name="ce8" office:value-type="float" office:value="11821">
            <text:p>11821</text:p>
          </table:table-cell>
          <table:table-cell table:style-name="ce9" office:value-type="string">
            <text:p>2026-03-15 22:23:32</text:p>
          </table:table-cell>
          <table:table-cell table:style-name="ce10" office:value-type="currency" office:currency="PLN" office:value="0.75">
            <text:p>0,75 zł</text:p>
          </table:table-cell>
          <table:table-cell table:style-name="ce8"/>
          <table:table-cell table:style-name="ce10" office:value-type="currency" office:currency="PLN" office:value="0.75">
            <text:p>0,75 zł</text:p>
          </table:table-cell>
          <table:table-cell table:style-name="ce8"/>
          <table:table-cell table:style-name="ce9" office:value-type="string">
            <text:p>89.XXX.XXX.4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Suplementy dla dzieci</text:p>
          </table:table-cell>
          <table:table-cell table:style-name="ce9" office:value-type="string">
            <text:p>Błonnik dla dzieci + probiotyki 100 g</text:p>
          </table:table-cell>
          <table:table-cell table:style-name="ce8" office:value-type="float" office:value="11947">
            <text:p>11947</text:p>
          </table:table-cell>
          <table:table-cell table:style-name="ce9" office:value-type="string">
            <text:p>2026-03-15 22:24:26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91.XXX.XXX.X0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Opatrunki</text:p>
          </table:table-cell>
          <table:table-cell table:style-name="ce9" office:value-type="string">
            <text:p>Stop Hemo Tampony hemostatyczne <text:s/>5szt.</text:p>
          </table:table-cell>
          <table:table-cell table:style-name="ce8" office:value-type="float" office:value="11602">
            <text:p>11602</text:p>
          </table:table-cell>
          <table:table-cell table:style-name="ce9" office:value-type="string">
            <text:p>2026-03-15 22:25:12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5.XXX.XXX.6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Emolium INTENSIVE Krem specjalny 75ml</text:p>
          </table:table-cell>
          <table:table-cell table:style-name="ce8" office:value-type="float" office:value="3892">
            <text:p>3892</text:p>
          </table:table-cell>
          <table:table-cell table:style-name="ce9" office:value-type="string">
            <text:p>2026-03-15 22:27:33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21X.XXX.XXX.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nerwowy i pamięć</text:p>
          </table:table-cell>
          <table:table-cell table:style-name="ce9" office:value-type="string">
            <text:p>Kapsułki Herbapol na Uspokojenie 30 szt.</text:p>
          </table:table-cell>
          <table:table-cell table:style-name="ce8" office:value-type="float" office:value="10626">
            <text:p>10626</text:p>
          </table:table-cell>
          <table:table-cell table:style-name="ce9" office:value-type="string">
            <text:p>2026-03-15 22:28:33</text:p>
          </table:table-cell>
          <table:table-cell table:style-name="ce10" office:value-type="currency" office:currency="PLN" office:value="0.74">
            <text:p>0,74 zł</text:p>
          </table:table-cell>
          <table:table-cell table:style-name="ce8"/>
          <table:table-cell table:style-name="ce10" office:value-type="currency" office:currency="PLN" office:value="0.74">
            <text:p>0,74 zł</text:p>
          </table:table-cell>
          <table:table-cell table:style-name="ce8"/>
          <table:table-cell table:style-name="ce9" office:value-type="string">
            <text:p>46.XXX.XXX.2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Otrivin Menthol 1mg/ml Aerozol do nosa 10 ml</text:p>
          </table:table-cell>
          <table:table-cell table:style-name="ce8" office:value-type="float" office:value="14886">
            <text:p>14886</text:p>
          </table:table-cell>
          <table:table-cell table:style-name="ce9" office:value-type="string">
            <text:p>2026-03-15 22:29:18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80.XXX.XXX.X4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Kremy i maści medycyny naturalnej</text:p>
          </table:table-cell>
          <table:table-cell table:style-name="ce9" office:value-type="string">
            <text:p>Gorvita Maść końska rozgrzewająca 250 ml</text:p>
          </table:table-cell>
          <table:table-cell table:style-name="ce8" office:value-type="float" office:value="17239">
            <text:p>17239</text:p>
          </table:table-cell>
          <table:table-cell table:style-name="ce9" office:value-type="string">
            <text:p>2026-03-15 22:29:34</text:p>
          </table:table-cell>
          <table:table-cell table:style-name="ce10" office:value-type="currency" office:currency="PLN" office:value="0.76">
            <text:p>0,76 zł</text:p>
          </table:table-cell>
          <table:table-cell table:style-name="ce8"/>
          <table:table-cell table:style-name="ce10" office:value-type="currency" office:currency="PLN" office:value="0.76">
            <text:p>0,76 zł</text:p>
          </table:table-cell>
          <table:table-cell table:style-name="ce8"/>
          <table:table-cell table:style-name="ce9" office:value-type="string">
            <text:p>46.XXX.XXX.X5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 i trawienie</text:p>
          </table:table-cell>
          <table:table-cell table:style-name="ce9" office:value-type="string">
            <text:p>Estabiom Junior 20kaps.</text:p>
          </table:table-cell>
          <table:table-cell table:style-name="ce8" office:value-type="float" office:value="6953">
            <text:p>6953</text:p>
          </table:table-cell>
          <table:table-cell table:style-name="ce9" office:value-type="string">
            <text:p>2026-03-15 22:35:41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46.XXX.XXX.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Dla dziecka</text:p>
          </table:table-cell>
          <table:table-cell table:style-name="ce9" office:value-type="string">
            <text:p>Mleka początkowe</text:p>
          </table:table-cell>
          <table:table-cell table:style-name="ce9" office:value-type="string">
            <text:p>NESTLE NAN OPTIPRO Plus 1 HM-O Mleko Początkowe dla niemowląt od urodzenia 400g</text:p>
          </table:table-cell>
          <table:table-cell table:style-name="ce8" office:value-type="float" office:value="17320">
            <text:p>17320</text:p>
          </table:table-cell>
          <table:table-cell table:style-name="ce9" office:value-type="string">
            <text:p>2026-03-15 22:39:57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10X.XXX.XXX.X7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Emolium INTENSIVE Krem specjalny 75ml</text:p>
          </table:table-cell>
          <table:table-cell table:style-name="ce8" office:value-type="float" office:value="3892">
            <text:p>3892</text:p>
          </table:table-cell>
          <table:table-cell table:style-name="ce9" office:value-type="string">
            <text:p>2026-03-15 22:41:28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83.XXX.XXX.2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ciała</text:p>
          </table:table-cell>
          <table:table-cell table:style-name="ce9" office:value-type="string">
            <text:p>AFLOFARM Nivelium med krem dermatologiczny 250ml</text:p>
          </table:table-cell>
          <table:table-cell table:style-name="ce8" office:value-type="float" office:value="8641">
            <text:p>8641</text:p>
          </table:table-cell>
          <table:table-cell table:style-name="ce9" office:value-type="string">
            <text:p>2026-03-15 22:44:02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37.XXX.XXX.2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Allergika Krem na powieki MED 15ml</text:p>
          </table:table-cell>
          <table:table-cell table:style-name="ce8" office:value-type="float" office:value="11734">
            <text:p>11734</text:p>
          </table:table-cell>
          <table:table-cell table:style-name="ce9" office:value-type="string">
            <text:p>2026-03-15 22:44:09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37.XXX.XXX.X3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łciowy i moczowy</text:p>
          </table:table-cell>
          <table:table-cell table:style-name="ce9" office:value-type="string">
            <text:p>UROFEM Control 60 tabl.</text:p>
          </table:table-cell>
          <table:table-cell table:style-name="ce8" office:value-type="float" office:value="32306">
            <text:p>32306</text:p>
          </table:table-cell>
          <table:table-cell table:style-name="ce9" office:value-type="string">
            <text:p>2026-03-15 22:45:43</text:p>
          </table:table-cell>
          <table:table-cell table:style-name="ce10" office:value-type="currency" office:currency="PLN" office:value="0.75">
            <text:p>0,75 zł</text:p>
          </table:table-cell>
          <table:table-cell table:style-name="ce8"/>
          <table:table-cell table:style-name="ce10" office:value-type="currency" office:currency="PLN" office:value="0.75">
            <text:p>0,75 zł</text:p>
          </table:table-cell>
          <table:table-cell table:style-name="ce8"/>
          <table:table-cell table:style-name="ce9" office:value-type="string">
            <text:p>37.XXX.XXX.X3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Iwostin Hydro Sensitia Intensywnie nawilżające serum, 30 ml</text:p>
          </table:table-cell>
          <table:table-cell table:style-name="ce8" office:value-type="float" office:value="14083">
            <text:p>14083</text:p>
          </table:table-cell>
          <table:table-cell table:style-name="ce9" office:value-type="string">
            <text:p>2026-03-15 22:46:29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18X.XXX.XXX.X6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Emolium INTENSIVE Krem specjalny 75ml</text:p>
          </table:table-cell>
          <table:table-cell table:style-name="ce8" office:value-type="float" office:value="3892">
            <text:p>3892</text:p>
          </table:table-cell>
          <table:table-cell table:style-name="ce9" office:value-type="string">
            <text:p>2026-03-15 22:46:56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83.XXX.XXX.1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Opatrunki</text:p>
          </table:table-cell>
          <table:table-cell table:style-name="ce9" office:value-type="string">
            <text:p>Aqua Gel opatrunek hydrożelowy 10x12cm 1 szt.</text:p>
          </table:table-cell>
          <table:table-cell table:style-name="ce8" office:value-type="float" office:value="6772">
            <text:p>6772</text:p>
          </table:table-cell>
          <table:table-cell table:style-name="ce9" office:value-type="string">
            <text:p>2026-03-15 22:53:03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10X.XXX.XXX.7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Opatrunki</text:p>
          </table:table-cell>
          <table:table-cell table:style-name="ce9" office:value-type="string">
            <text:p>Smith Nephew Bactigras z chlorhexyd. 15x20cm 10 szt.</text:p>
          </table:table-cell>
          <table:table-cell table:style-name="ce8" office:value-type="float" office:value="13551">
            <text:p>13551</text:p>
          </table:table-cell>
          <table:table-cell table:style-name="ce9" office:value-type="string">
            <text:p>2026-03-15 22:56:00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18X.XXX.XXX.7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Zestawy dermokosmetyków</text:p>
          </table:table-cell>
          <table:table-cell table:style-name="ce9" office:value-type="string">
            <text:p>Avene Hyaluron Activ B3 Krem Na Noc 50ml + Pod Oczy 15ml</text:p>
          </table:table-cell>
          <table:table-cell table:style-name="ce8" office:value-type="float" office:value="32646">
            <text:p>32646</text:p>
          </table:table-cell>
          <table:table-cell table:style-name="ce9" office:value-type="string">
            <text:p>2026-03-15 23:01:48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19X.XXX.XXX.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Polopiryna S 300mg 10 tabl.</text:p>
          </table:table-cell>
          <table:table-cell table:style-name="ce8" office:value-type="float" office:value="28021">
            <text:p>28021</text:p>
          </table:table-cell>
          <table:table-cell table:style-name="ce9" office:value-type="string">
            <text:p>2026-03-15 23:02:22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93.XXX.XXX.X5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Nizoral Krem 20mg/g 30 g</text:p>
          </table:table-cell>
          <table:table-cell table:style-name="ce8" office:value-type="float" office:value="9594">
            <text:p>9594</text:p>
          </table:table-cell>
          <table:table-cell table:style-name="ce9" office:value-type="string">
            <text:p>2026-03-15 23:03:22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5.XXX.XXX.2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Dla dziecka</text:p>
          </table:table-cell>
          <table:table-cell table:style-name="ce9" office:value-type="string">
            <text:p>Aspiratory i gruszki do nosa</text:p>
          </table:table-cell>
          <table:table-cell table:style-name="ce9" office:value-type="string">
            <text:p>CONTROLY SMARKACZ Aspirator kataru dla dzieci, 1 szt.</text:p>
          </table:table-cell>
          <table:table-cell table:style-name="ce8" office:value-type="float" office:value="19588">
            <text:p>19588</text:p>
          </table:table-cell>
          <table:table-cell table:style-name="ce9" office:value-type="string">
            <text:p>2026-03-15 23:07:58</text:p>
          </table:table-cell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9" office:value-type="string">
            <text:p>21X.XXX.XXX.7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Avene HYALURON ACTIV B3 Krem odbudowujący komórki 50ml</text:p>
          </table:table-cell>
          <table:table-cell table:style-name="ce8" office:value-type="float" office:value="19009">
            <text:p>19009</text:p>
          </table:table-cell>
          <table:table-cell table:style-name="ce9" office:value-type="string">
            <text:p>2026-03-15 23:10:37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19X.XXX.XXX.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nerały i witaminy</text:p>
          </table:table-cell>
          <table:table-cell table:style-name="ce9" office:value-type="string">
            <text:p>NORIS PHARMA Vitaprim D3 Forte 4000 + K2, 60 kaps. -&gt; Wysyłka w 24h już za 3,99zł! [Odbiór w Żabce]</text:p>
          </table:table-cell>
          <table:table-cell table:style-name="ce8" office:value-type="float" office:value="32311">
            <text:p>32311</text:p>
          </table:table-cell>
          <table:table-cell table:style-name="ce9" office:value-type="string">
            <text:p>2026-03-15 23:12:42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37.XXX.XXX.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Homeopatia</text:p>
          </table:table-cell>
          <table:table-cell table:style-name="ce9" office:value-type="string">
            <text:p>Heel-Nux Vomica krople zaburzenia żoładkowo jelitowe 30 ml</text:p>
          </table:table-cell>
          <table:table-cell table:style-name="ce8" office:value-type="float" office:value="12509">
            <text:p>12509</text:p>
          </table:table-cell>
          <table:table-cell table:style-name="ce9" office:value-type="string">
            <text:p>2026-03-15 23:17:51</text:p>
          </table:table-cell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9" office:value-type="string">
            <text:p>80.XXX.XXX.1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eparaty medycyny naturalnej</text:p>
          </table:table-cell>
          <table:table-cell table:style-name="ce9" office:value-type="string">
            <text:p>Tisane FARM Żel propolisowy 6g</text:p>
          </table:table-cell>
          <table:table-cell table:style-name="ce8" office:value-type="float" office:value="18277">
            <text:p>18277</text:p>
          </table:table-cell>
          <table:table-cell table:style-name="ce9" office:value-type="string">
            <text:p>2026-03-15 23:19:11</text:p>
          </table:table-cell>
          <table:table-cell table:style-name="ce10" office:value-type="currency" office:currency="PLN" office:value="0.88">
            <text:p>0,88 zł</text:p>
          </table:table-cell>
          <table:table-cell table:style-name="ce8"/>
          <table:table-cell table:style-name="ce10" office:value-type="currency" office:currency="PLN" office:value="0.88">
            <text:p>0,88 zł</text:p>
          </table:table-cell>
          <table:table-cell table:style-name="ce8"/>
          <table:table-cell table:style-name="ce9" office:value-type="string">
            <text:p>18X.XXX.XXX.X4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Stawy, mięśnie i kości</text:p>
          </table:table-cell>
          <table:table-cell table:style-name="ce9" office:value-type="string">
            <text:p>Trb Chemedica Artivit 2x15 Fiolek</text:p>
          </table:table-cell>
          <table:table-cell table:style-name="ce8" office:value-type="float" office:value="28278">
            <text:p>28278</text:p>
          </table:table-cell>
          <table:table-cell table:style-name="ce9" office:value-type="string">
            <text:p>2026-03-15 23:21:26</text:p>
          </table:table-cell>
          <table:table-cell table:style-name="ce10" office:value-type="currency" office:currency="PLN" office:value="0.83">
            <text:p>0,83 zł</text:p>
          </table:table-cell>
          <table:table-cell table:style-name="ce8"/>
          <table:table-cell table:style-name="ce10" office:value-type="currency" office:currency="PLN" office:value="0.83">
            <text:p>0,83 zł</text:p>
          </table:table-cell>
          <table:table-cell table:style-name="ce8"/>
          <table:table-cell table:style-name="ce9" office:value-type="string">
            <text:p>91.XXX.XXX.7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Pozostałe kosmetyki do włosów</text:p>
          </table:table-cell>
          <table:table-cell table:style-name="ce9" office:value-type="string">
            <text:p>Seboradin Spray Odsiwiający Do Włosów Forte 200ml</text:p>
          </table:table-cell>
          <table:table-cell table:style-name="ce8" office:value-type="float" office:value="26469">
            <text:p>26469</text:p>
          </table:table-cell>
          <table:table-cell table:style-name="ce9" office:value-type="string">
            <text:p>2026-03-15 23:23:09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37.XXX.XXX.X0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Kremy i maści medycyny naturalnej</text:p>
          </table:table-cell>
          <table:table-cell table:style-name="ce9" office:value-type="string">
            <text:p>Gorvita Maść końska rozgrzewająca 250 ml</text:p>
          </table:table-cell>
          <table:table-cell table:style-name="ce8" office:value-type="float" office:value="17239">
            <text:p>17239</text:p>
          </table:table-cell>
          <table:table-cell table:style-name="ce9" office:value-type="string">
            <text:p>2026-03-15 23:23:16</text:p>
          </table:table-cell>
          <table:table-cell table:style-name="ce10" office:value-type="currency" office:currency="PLN" office:value="0.76">
            <text:p>0,76 zł</text:p>
          </table:table-cell>
          <table:table-cell table:style-name="ce8"/>
          <table:table-cell table:style-name="ce10" office:value-type="currency" office:currency="PLN" office:value="0.76">
            <text:p>0,76 zł</text:p>
          </table:table-cell>
          <table:table-cell table:style-name="ce8"/>
          <table:table-cell table:style-name="ce9" office:value-type="string">
            <text:p>88.XXX.XXX.8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Opatrunki</text:p>
          </table:table-cell>
          <table:table-cell table:style-name="ce9" office:value-type="string">
            <text:p>HYDROCOLL Thin opatrunek hydrokoloidowy 10cmx10cm - 1 sztuka</text:p>
          </table:table-cell>
          <table:table-cell table:style-name="ce8" office:value-type="float" office:value="14536">
            <text:p>14536</text:p>
          </table:table-cell>
          <table:table-cell table:style-name="ce9" office:value-type="string">
            <text:p>2026-03-15 23:28:21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95.XXX.XXX.X9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Opatrunki</text:p>
          </table:table-cell>
          <table:table-cell table:style-name="ce9" office:value-type="string">
            <text:p>HYDROCOLL Thin opatrunek hydrokoloidowy 10cmx10cm - 1 sztuka</text:p>
          </table:table-cell>
          <table:table-cell table:style-name="ce8" office:value-type="float" office:value="14536">
            <text:p>14536</text:p>
          </table:table-cell>
          <table:table-cell table:style-name="ce9" office:value-type="string">
            <text:p>2026-03-15 23:30:14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95.XXX.XXX.X9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Opatrunki</text:p>
          </table:table-cell>
          <table:table-cell table:style-name="ce9" office:value-type="string">
            <text:p>HYDROCOLL opatrunek hydrokoloidowy jałowy 10cmx10cm - 1 sztuka</text:p>
          </table:table-cell>
          <table:table-cell table:style-name="ce8" office:value-type="float" office:value="8563">
            <text:p>8563</text:p>
          </table:table-cell>
          <table:table-cell table:style-name="ce9" office:value-type="string">
            <text:p>2026-03-15 23:31:17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95.XXX.XXX.X9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 i trawienie</text:p>
          </table:table-cell>
          <table:table-cell table:style-name="ce9" office:value-type="string">
            <text:p>Daopro 30 Minitabl. Dojelitowych</text:p>
          </table:table-cell>
          <table:table-cell table:style-name="ce8" office:value-type="float" office:value="19374">
            <text:p>19374</text:p>
          </table:table-cell>
          <table:table-cell table:style-name="ce9" office:value-type="string">
            <text:p>2026-03-15 23:33:10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84.XXX.XXX.X2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ArgenTussin Gardło, smak miętowo-cytrynowy 16 pastylek</text:p>
          </table:table-cell>
          <table:table-cell table:style-name="ce8" office:value-type="float" office:value="13334">
            <text:p>13334</text:p>
          </table:table-cell>
          <table:table-cell table:style-name="ce9" office:value-type="string">
            <text:p>2026-03-15 23:34:59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21X.XXX.XXX.6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Alergia</text:p>
          </table:table-cell>
          <table:table-cell table:style-name="ce9" office:value-type="string">
            <text:p>EctoAlerg krople do oczu 10ml</text:p>
          </table:table-cell>
          <table:table-cell table:style-name="ce8" office:value-type="float" office:value="8340">
            <text:p>8340</text:p>
          </table:table-cell>
          <table:table-cell table:style-name="ce9" office:value-type="string">
            <text:p>2026-03-15 23:36:17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18X.XXX.XXX.X6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ciała</text:p>
          </table:table-cell>
          <table:table-cell table:style-name="ce9" office:value-type="string">
            <text:p>Emolium DERMOCARE Emulsja na suchą skórę głowy 100ml</text:p>
          </table:table-cell>
          <table:table-cell table:style-name="ce8" office:value-type="float" office:value="335">
            <text:p>335</text:p>
          </table:table-cell>
          <table:table-cell table:style-name="ce9" office:value-type="string">
            <text:p>2026-03-15 23:37:00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19X.XXX.XXX.X1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moczowy i płciowy</text:p>
          </table:table-cell>
          <table:table-cell table:style-name="ce9" office:value-type="string">
            <text:p>Fytofontana Gyntima Czopki Dopochwowe Probiotica 10szt.</text:p>
          </table:table-cell>
          <table:table-cell table:style-name="ce8" office:value-type="float" office:value="5827">
            <text:p>5827</text:p>
          </table:table-cell>
          <table:table-cell table:style-name="ce9" office:value-type="string">
            <text:p>2026-03-15 23:37:28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78.XXX.XXX.X0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Alergia</text:p>
          </table:table-cell>
          <table:table-cell table:style-name="ce9" office:value-type="string">
            <text:p>Zatoxin Katar I Alergia Spray Do Nosa 30Ml</text:p>
          </table:table-cell>
          <table:table-cell table:style-name="ce8" office:value-type="float" office:value="15846">
            <text:p>15846</text:p>
          </table:table-cell>
          <table:table-cell table:style-name="ce9" office:value-type="string">
            <text:p>2026-03-15 23:42:50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78.XXX.XXX.2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Termometry</text:p>
          </table:table-cell>
          <table:table-cell table:style-name="ce9" office:value-type="string">
            <text:p>Microlife MT 16C2</text:p>
          </table:table-cell>
          <table:table-cell table:style-name="ce8" office:value-type="float" office:value="9695">
            <text:p>9695</text:p>
          </table:table-cell>
          <table:table-cell table:style-name="ce9" office:value-type="string">
            <text:p>2026-03-15 23:43:15</text:p>
          </table:table-cell>
          <table:table-cell table:style-name="ce10" office:value-type="currency" office:currency="PLN" office:value="1.03">
            <text:p>1,03 zł</text:p>
          </table:table-cell>
          <table:table-cell table:style-name="ce8"/>
          <table:table-cell table:style-name="ce10" office:value-type="currency" office:currency="PLN" office:value="1.03">
            <text:p>1,03 zł</text:p>
          </table:table-cell>
          <table:table-cell table:style-name="ce8"/>
          <table:table-cell table:style-name="ce9" office:value-type="string">
            <text:p>83.XXX.XXX.X4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Alergia</text:p>
          </table:table-cell>
          <table:table-cell table:style-name="ce9" office:value-type="string">
            <text:p>Zatoxin Katar I Alergia Spray Do Nosa 30Ml</text:p>
          </table:table-cell>
          <table:table-cell table:style-name="ce8" office:value-type="float" office:value="15846">
            <text:p>15846</text:p>
          </table:table-cell>
          <table:table-cell table:style-name="ce9" office:value-type="string">
            <text:p>2026-03-15 23:43:41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78.XXX.XXX.2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Alergia</text:p>
          </table:table-cell>
          <table:table-cell table:style-name="ce9" office:value-type="string">
            <text:p>Zatoxin Katar I Alergia Spray Do Nosa 30Ml</text:p>
          </table:table-cell>
          <table:table-cell table:style-name="ce8" office:value-type="float" office:value="15846">
            <text:p>15846</text:p>
          </table:table-cell>
          <table:table-cell table:style-name="ce9" office:value-type="string">
            <text:p>2026-03-15 23:44:14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78.XXX.XXX.2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ciała</text:p>
          </table:table-cell>
          <table:table-cell table:style-name="ce9" office:value-type="string">
            <text:p>Emolium DERMOCARE Emulsja na suchą skórę głowy 100ml</text:p>
          </table:table-cell>
          <table:table-cell table:style-name="ce8" office:value-type="float" office:value="335">
            <text:p>335</text:p>
          </table:table-cell>
          <table:table-cell table:style-name="ce9" office:value-type="string">
            <text:p>2026-03-15 23:51:34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91.XXX.XXX.X8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Dla dziecka</text:p>
          </table:table-cell>
          <table:table-cell table:style-name="ce9" office:value-type="string">
            <text:p>Mleka początkowe</text:p>
          </table:table-cell>
          <table:table-cell table:style-name="ce9" office:value-type="string">
            <text:p>NESTLE NAN OPTIPRO Plus 1 HM-O Mleko Początkowe dla niemowląt od urodzenia 400g</text:p>
          </table:table-cell>
          <table:table-cell table:style-name="ce8" office:value-type="float" office:value="17320">
            <text:p>17320</text:p>
          </table:table-cell>
          <table:table-cell table:style-name="ce9" office:value-type="string">
            <text:p>2026-03-15 23:52:53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18X.XXX.XXX.X8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Alergia</text:p>
          </table:table-cell>
          <table:table-cell table:style-name="ce9" office:value-type="string">
            <text:p>Zatoxin Katar I Alergia Spray Do Nosa 30Ml</text:p>
          </table:table-cell>
          <table:table-cell table:style-name="ce8" office:value-type="float" office:value="15846">
            <text:p>15846</text:p>
          </table:table-cell>
          <table:table-cell table:style-name="ce9" office:value-type="string">
            <text:p>2026-03-16 00:18:52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37.XXX.XXX.X4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Otrivin Menthol 1mg/ml Aerozol do nosa 10 ml</text:p>
          </table:table-cell>
          <table:table-cell table:style-name="ce8" office:value-type="float" office:value="14886">
            <text:p>14886</text:p>
          </table:table-cell>
          <table:table-cell table:style-name="ce9" office:value-type="string">
            <text:p>2026-03-16 00:20:07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21X.XXX.XXX.6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Otrivin Menthol 1mg/ml Aerozol do nosa 10 ml</text:p>
          </table:table-cell>
          <table:table-cell table:style-name="ce8" office:value-type="float" office:value="14886">
            <text:p>14886</text:p>
          </table:table-cell>
          <table:table-cell table:style-name="ce9" office:value-type="string">
            <text:p>2026-03-16 00:22:28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21X.XXX.XXX.6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nerwowy i pamięć</text:p>
          </table:table-cell>
          <table:table-cell table:style-name="ce9" office:value-type="string">
            <text:p>Tabletki MAGPRIM Skurcz 30 szt.</text:p>
          </table:table-cell>
          <table:table-cell table:style-name="ce8" office:value-type="float" office:value="32288">
            <text:p>32288</text:p>
          </table:table-cell>
          <table:table-cell table:style-name="ce9" office:value-type="string">
            <text:p>2026-03-16 00:40:23</text:p>
          </table:table-cell>
          <table:table-cell table:style-name="ce10" office:value-type="currency" office:currency="PLN" office:value="0.74">
            <text:p>0,74 zł</text:p>
          </table:table-cell>
          <table:table-cell table:style-name="ce8"/>
          <table:table-cell table:style-name="ce10" office:value-type="currency" office:currency="PLN" office:value="0.74">
            <text:p>0,74 zł</text:p>
          </table:table-cell>
          <table:table-cell table:style-name="ce8"/>
          <table:table-cell table:style-name="ce9" office:value-type="string">
            <text:p>78.XXX.XXX.X6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Lamisilatt Krem 10 mg/g 15g</text:p>
          </table:table-cell>
          <table:table-cell table:style-name="ce8" office:value-type="float" office:value="6122">
            <text:p>6122</text:p>
          </table:table-cell>
          <table:table-cell table:style-name="ce9" office:value-type="string">
            <text:p>2026-03-16 00:46:28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31.XXX.XXX.X2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Aspirin 500mg 10 tabletek</text:p>
          </table:table-cell>
          <table:table-cell table:style-name="ce8" office:value-type="float" office:value="16095">
            <text:p>16095</text:p>
          </table:table-cell>
          <table:table-cell table:style-name="ce9" office:value-type="string">
            <text:p>2026-03-16 00:46:34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18X.XXX.XXX.4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Lamisilatt Krem 10 mg/g 15g</text:p>
          </table:table-cell>
          <table:table-cell table:style-name="ce8" office:value-type="float" office:value="6122">
            <text:p>6122</text:p>
          </table:table-cell>
          <table:table-cell table:style-name="ce9" office:value-type="string">
            <text:p>2026-03-16 00:48:59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31.XXX.XXX.X2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Alergia</text:p>
          </table:table-cell>
          <table:table-cell table:style-name="ce9" office:value-type="string">
            <text:p>Fenistil Krople doustne 1mg/1ml 20ml (Import równoległy)</text:p>
          </table:table-cell>
          <table:table-cell table:style-name="ce8" office:value-type="float" office:value="8335">
            <text:p>8335</text:p>
          </table:table-cell>
          <table:table-cell table:style-name="ce9" office:value-type="string">
            <text:p>2026-03-16 00:53:27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91.XXX.XXX.4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Alergia</text:p>
          </table:table-cell>
          <table:table-cell table:style-name="ce9" office:value-type="string">
            <text:p>EctoAlerg krople do oczu 10ml</text:p>
          </table:table-cell>
          <table:table-cell table:style-name="ce8" office:value-type="float" office:value="8340">
            <text:p>8340</text:p>
          </table:table-cell>
          <table:table-cell table:style-name="ce9" office:value-type="string">
            <text:p>2026-03-16 01:12:05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37.XXX.XXX.X1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eparaty medycyny naturalnej</text:p>
          </table:table-cell>
          <table:table-cell table:style-name="ce9" office:value-type="string">
            <text:p>Tisane FARM Żel propolisowy 6g</text:p>
          </table:table-cell>
          <table:table-cell table:style-name="ce8" office:value-type="float" office:value="18277">
            <text:p>18277</text:p>
          </table:table-cell>
          <table:table-cell table:style-name="ce9" office:value-type="string">
            <text:p>2026-03-16 02:07:32</text:p>
          </table:table-cell>
          <table:table-cell table:style-name="ce10" office:value-type="currency" office:currency="PLN" office:value="0.88">
            <text:p>0,88 zł</text:p>
          </table:table-cell>
          <table:table-cell table:style-name="ce8"/>
          <table:table-cell table:style-name="ce10" office:value-type="currency" office:currency="PLN" office:value="0.88">
            <text:p>0,88 zł</text:p>
          </table:table-cell>
          <table:table-cell table:style-name="ce8"/>
          <table:table-cell table:style-name="ce9" office:value-type="string">
            <text:p>37.XXX.XXX.X0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eparaty medycyny naturalnej</text:p>
          </table:table-cell>
          <table:table-cell table:style-name="ce9" office:value-type="string">
            <text:p>Tisane FARM Żel propolisowy 6g</text:p>
          </table:table-cell>
          <table:table-cell table:style-name="ce8" office:value-type="float" office:value="18277">
            <text:p>18277</text:p>
          </table:table-cell>
          <table:table-cell table:style-name="ce9" office:value-type="string">
            <text:p>2026-03-16 02:08:32</text:p>
          </table:table-cell>
          <table:table-cell table:style-name="ce10" office:value-type="currency" office:currency="PLN" office:value="0.88">
            <text:p>0,88 zł</text:p>
          </table:table-cell>
          <table:table-cell table:style-name="ce8"/>
          <table:table-cell table:style-name="ce10" office:value-type="currency" office:currency="PLN" office:value="0.88">
            <text:p>0,88 zł</text:p>
          </table:table-cell>
          <table:table-cell table:style-name="ce8"/>
          <table:table-cell table:style-name="ce9" office:value-type="string">
            <text:p>37.XXX.XXX.X0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eparaty medycyny naturalnej</text:p>
          </table:table-cell>
          <table:table-cell table:style-name="ce9" office:value-type="string">
            <text:p>Tisane FARM Żel propolisowy 6g</text:p>
          </table:table-cell>
          <table:table-cell table:style-name="ce8" office:value-type="float" office:value="18277">
            <text:p>18277</text:p>
          </table:table-cell>
          <table:table-cell table:style-name="ce9" office:value-type="string">
            <text:p>2026-03-16 02:09:44</text:p>
          </table:table-cell>
          <table:table-cell table:style-name="ce10" office:value-type="currency" office:currency="PLN" office:value="0.88">
            <text:p>0,88 zł</text:p>
          </table:table-cell>
          <table:table-cell table:style-name="ce8"/>
          <table:table-cell table:style-name="ce10" office:value-type="currency" office:currency="PLN" office:value="0.88">
            <text:p>0,88 zł</text:p>
          </table:table-cell>
          <table:table-cell table:style-name="ce8"/>
          <table:table-cell table:style-name="ce9" office:value-type="string">
            <text:p>37.XXX.XXX.X0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Skinoren Krem 30g</text:p>
          </table:table-cell>
          <table:table-cell table:style-name="ce8" office:value-type="float" office:value="10861">
            <text:p>10861</text:p>
          </table:table-cell>
          <table:table-cell table:style-name="ce9" office:value-type="string">
            <text:p>2026-03-16 02:28:00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12X.XXX.XXX.4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Środki na przeziębienie</text:p>
          </table:table-cell>
          <table:table-cell table:style-name="ce9" office:value-type="string">
            <text:p>CLARVOX Porzeczka 36 past.</text:p>
          </table:table-cell>
          <table:table-cell table:style-name="ce8" office:value-type="float" office:value="32270">
            <text:p>32270</text:p>
          </table:table-cell>
          <table:table-cell table:style-name="ce9" office:value-type="string">
            <text:p>2026-03-16 02:32:56</text:p>
          </table:table-cell>
          <table:table-cell table:style-name="ce10" office:value-type="currency" office:currency="PLN" office:value="0.83">
            <text:p>0,83 zł</text:p>
          </table:table-cell>
          <table:table-cell table:style-name="ce8"/>
          <table:table-cell table:style-name="ce10" office:value-type="currency" office:currency="PLN" office:value="0.83">
            <text:p>0,83 zł</text:p>
          </table:table-cell>
          <table:table-cell table:style-name="ce8"/>
          <table:table-cell table:style-name="ce9" office:value-type="string">
            <text:p>37.XXX.XXX.X7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Kremy do stóp</text:p>
          </table:table-cell>
          <table:table-cell table:style-name="ce9" office:value-type="string">
            <text:p>Zyskaj Zdrowie Żel kasztanowy z rutyną 350g</text:p>
          </table:table-cell>
          <table:table-cell table:style-name="ce8" office:value-type="float" office:value="17011">
            <text:p>17011</text:p>
          </table:table-cell>
          <table:table-cell table:style-name="ce9" office:value-type="string">
            <text:p>2026-03-16 03:07:00</text:p>
          </table:table-cell>
          <table:table-cell table:style-name="ce10" office:value-type="currency" office:currency="PLN" office:value="0.77">
            <text:p>0,77 zł</text:p>
          </table:table-cell>
          <table:table-cell table:style-name="ce8"/>
          <table:table-cell table:style-name="ce10" office:value-type="currency" office:currency="PLN" office:value="0.77">
            <text:p>0,77 zł</text:p>
          </table:table-cell>
          <table:table-cell table:style-name="ce8"/>
          <table:table-cell table:style-name="ce9" office:value-type="string">
            <text:p>77.XXX.XXX.3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Dla dziecka</text:p>
          </table:table-cell>
          <table:table-cell table:style-name="ce9" office:value-type="string">
            <text:p>Mleka początkowe</text:p>
          </table:table-cell>
          <table:table-cell table:style-name="ce9" office:value-type="string">
            <text:p>Bebilon HMF Wzmacniacz mleka kobiecego 50x1g</text:p>
          </table:table-cell>
          <table:table-cell table:style-name="ce8" office:value-type="float" office:value="18684">
            <text:p>18684</text:p>
          </table:table-cell>
          <table:table-cell table:style-name="ce9" office:value-type="string">
            <text:p>2026-03-16 03:07:28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5.XXX.XXX.8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Kremy do stóp</text:p>
          </table:table-cell>
          <table:table-cell table:style-name="ce9" office:value-type="string">
            <text:p>Zyskaj Zdrowie Żel kasztanowy z rutyną 350g</text:p>
          </table:table-cell>
          <table:table-cell table:style-name="ce8" office:value-type="float" office:value="17011">
            <text:p>17011</text:p>
          </table:table-cell>
          <table:table-cell table:style-name="ce9" office:value-type="string">
            <text:p>2026-03-16 03:08:24</text:p>
          </table:table-cell>
          <table:table-cell table:style-name="ce10" office:value-type="currency" office:currency="PLN" office:value="0.77">
            <text:p>0,77 zł</text:p>
          </table:table-cell>
          <table:table-cell table:style-name="ce8"/>
          <table:table-cell table:style-name="ce10" office:value-type="currency" office:currency="PLN" office:value="0.77">
            <text:p>0,77 zł</text:p>
          </table:table-cell>
          <table:table-cell table:style-name="ce8"/>
          <table:table-cell table:style-name="ce9" office:value-type="string">
            <text:p>77.XXX.XXX.3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Kremy do stóp</text:p>
          </table:table-cell>
          <table:table-cell table:style-name="ce9" office:value-type="string">
            <text:p>Zyskaj Zdrowie Żel kasztanowy z rutyną 350g</text:p>
          </table:table-cell>
          <table:table-cell table:style-name="ce8" office:value-type="float" office:value="17011">
            <text:p>17011</text:p>
          </table:table-cell>
          <table:table-cell table:style-name="ce9" office:value-type="string">
            <text:p>2026-03-16 03:13:36</text:p>
          </table:table-cell>
          <table:table-cell table:style-name="ce10" office:value-type="currency" office:currency="PLN" office:value="0.77">
            <text:p>0,77 zł</text:p>
          </table:table-cell>
          <table:table-cell table:style-name="ce8"/>
          <table:table-cell table:style-name="ce10" office:value-type="currency" office:currency="PLN" office:value="0.77">
            <text:p>0,77 zł</text:p>
          </table:table-cell>
          <table:table-cell table:style-name="ce8"/>
          <table:table-cell table:style-name="ce9" office:value-type="string">
            <text:p>77.XXX.XXX.3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Skinoren Krem 30g</text:p>
          </table:table-cell>
          <table:table-cell table:style-name="ce8" office:value-type="float" office:value="10861">
            <text:p>10861</text:p>
          </table:table-cell>
          <table:table-cell table:style-name="ce9" office:value-type="string">
            <text:p>2026-03-16 03:53:13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92.XXX.XXX.1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Jama ustna</text:p>
          </table:table-cell>
          <table:table-cell table:style-name="ce9" office:value-type="string">
            <text:p>Hevipoint Lek przeciw opryszczce warg i twarzy 30 tabletek</text:p>
          </table:table-cell>
          <table:table-cell table:style-name="ce8" office:value-type="float" office:value="4109">
            <text:p>4109</text:p>
          </table:table-cell>
          <table:table-cell table:style-name="ce9" office:value-type="string">
            <text:p>2026-03-16 04:44:30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83.XXX.XXX.X5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Jama ustna</text:p>
          </table:table-cell>
          <table:table-cell table:style-name="ce9" office:value-type="string">
            <text:p>Hevipoint Lek przeciw opryszczce warg i twarzy 30 tabletek</text:p>
          </table:table-cell>
          <table:table-cell table:style-name="ce8" office:value-type="float" office:value="4109">
            <text:p>4109</text:p>
          </table:table-cell>
          <table:table-cell table:style-name="ce9" office:value-type="string">
            <text:p>2026-03-16 04:45:14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83.XXX.XXX.X5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Zambon Fluimucil Forte 600 Mg 10 Tabl.</text:p>
          </table:table-cell>
          <table:table-cell table:style-name="ce8" office:value-type="float" office:value="18574">
            <text:p>18574</text:p>
          </table:table-cell>
          <table:table-cell table:style-name="ce9" office:value-type="string">
            <text:p>2026-03-16 04:50:39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87.XXX.XXX.X0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</text:p>
          </table:table-cell>
          <table:table-cell table:style-name="ce9" office:value-type="string">
            <text:p>Pantoprazol Teva 20 mg 14 tabl.</text:p>
          </table:table-cell>
          <table:table-cell table:style-name="ce8" office:value-type="float" office:value="9938">
            <text:p>9938</text:p>
          </table:table-cell>
          <table:table-cell table:style-name="ce9" office:value-type="string">
            <text:p>2026-03-16 05:10:19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31.XXX.XXX.X0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</text:p>
          </table:table-cell>
          <table:table-cell table:style-name="ce9" office:value-type="string">
            <text:p>Pantoprazol Teva 20 mg 14 tabl.</text:p>
          </table:table-cell>
          <table:table-cell table:style-name="ce8" office:value-type="float" office:value="9938">
            <text:p>9938</text:p>
          </table:table-cell>
          <table:table-cell table:style-name="ce9" office:value-type="string">
            <text:p>2026-03-16 05:12:15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31.XXX.XXX.X0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</text:p>
          </table:table-cell>
          <table:table-cell table:style-name="ce9" office:value-type="string">
            <text:p>Pantoprazol Teva 20 mg 14 tabl.</text:p>
          </table:table-cell>
          <table:table-cell table:style-name="ce8" office:value-type="float" office:value="9938">
            <text:p>9938</text:p>
          </table:table-cell>
          <table:table-cell table:style-name="ce9" office:value-type="string">
            <text:p>2026-03-16 05:13:00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31.XXX.XXX.X0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</text:p>
          </table:table-cell>
          <table:table-cell table:style-name="ce9" office:value-type="string">
            <text:p>Pantoprazol Teva 20 mg 14 tabl.</text:p>
          </table:table-cell>
          <table:table-cell table:style-name="ce8" office:value-type="float" office:value="9938">
            <text:p>9938</text:p>
          </table:table-cell>
          <table:table-cell table:style-name="ce9" office:value-type="string">
            <text:p>2026-03-16 05:13:41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31.XXX.XXX.X0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</text:p>
          </table:table-cell>
          <table:table-cell table:style-name="ce9" office:value-type="string">
            <text:p>Eva/Qu czopki przeciw zaparciom 6 czopków</text:p>
          </table:table-cell>
          <table:table-cell table:style-name="ce8" office:value-type="float" office:value="3918">
            <text:p>3918</text:p>
          </table:table-cell>
          <table:table-cell table:style-name="ce9" office:value-type="string">
            <text:p>2026-03-16 05:16:17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18X.XXX.XXX.X7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</text:p>
          </table:table-cell>
          <table:table-cell table:style-name="ce9" office:value-type="string">
            <text:p>Eva/Qu czopki przeciw zaparciom 6 czopków</text:p>
          </table:table-cell>
          <table:table-cell table:style-name="ce8" office:value-type="float" office:value="3918">
            <text:p>3918</text:p>
          </table:table-cell>
          <table:table-cell table:style-name="ce9" office:value-type="string">
            <text:p>2026-03-16 05:16:31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18X.XXX.XXX.X7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</text:p>
          </table:table-cell>
          <table:table-cell table:style-name="ce9" office:value-type="string">
            <text:p>Pantoprazol Teva 20 mg 14 tabl.</text:p>
          </table:table-cell>
          <table:table-cell table:style-name="ce8" office:value-type="float" office:value="9938">
            <text:p>9938</text:p>
          </table:table-cell>
          <table:table-cell table:style-name="ce9" office:value-type="string">
            <text:p>2026-03-16 05:18:05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31.XXX.XXX.X0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</text:p>
          </table:table-cell>
          <table:table-cell table:style-name="ce9" office:value-type="string">
            <text:p>Pantoprazol Teva 20 mg 14 tabl.</text:p>
          </table:table-cell>
          <table:table-cell table:style-name="ce8" office:value-type="float" office:value="9938">
            <text:p>9938</text:p>
          </table:table-cell>
          <table:table-cell table:style-name="ce9" office:value-type="string">
            <text:p>2026-03-16 05:22:31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31.XXX.XXX.X0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zieci i niemowlęta</text:p>
          </table:table-cell>
          <table:table-cell table:style-name="ce9" office:value-type="string">
            <text:p>Juvit Multi krople doustne 10ml</text:p>
          </table:table-cell>
          <table:table-cell table:style-name="ce8" office:value-type="float" office:value="6099">
            <text:p>6099</text:p>
          </table:table-cell>
          <table:table-cell table:style-name="ce9" office:value-type="string">
            <text:p>2026-03-16 05:32:46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17X.XXX.XXX.X7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Dla dziecka</text:p>
          </table:table-cell>
          <table:table-cell table:style-name="ce9" office:value-type="string">
            <text:p>Mleka początkowe</text:p>
          </table:table-cell>
          <table:table-cell table:style-name="ce9" office:value-type="string">
            <text:p>NESTLE NAN OPTIPRO Plus 1 HM-O Mleko Początkowe dla niemowląt od urodzenia W Płynie 32x70ml</text:p>
          </table:table-cell>
          <table:table-cell table:style-name="ce8" office:value-type="float" office:value="17321">
            <text:p>17321</text:p>
          </table:table-cell>
          <table:table-cell table:style-name="ce9" office:value-type="string">
            <text:p>2026-03-16 05:41:48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95.XXX.XXX.X7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Otrivin Menthol 1mg/ml Aerozol do nosa 10 ml</text:p>
          </table:table-cell>
          <table:table-cell table:style-name="ce8" office:value-type="float" office:value="14886">
            <text:p>14886</text:p>
          </table:table-cell>
          <table:table-cell table:style-name="ce9" office:value-type="string">
            <text:p>2026-03-16 05:48:02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46.XXX.XXX.X5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Suplementy na wzrok i słuch</text:p>
          </table:table-cell>
          <table:table-cell table:style-name="ce9" office:value-type="string">
            <text:p>OPTICall Plus maść na powieki 20 g</text:p>
          </table:table-cell>
          <table:table-cell table:style-name="ce8" office:value-type="float" office:value="14984">
            <text:p>14984</text:p>
          </table:table-cell>
          <table:table-cell table:style-name="ce9" office:value-type="string">
            <text:p>2026-03-16 05:49:58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95.XXX.XXX.8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moczowy i płciowy</text:p>
          </table:table-cell>
          <table:table-cell table:style-name="ce9" office:value-type="string">
            <text:p>Prurifem Kadefarm 30ml</text:p>
          </table:table-cell>
          <table:table-cell table:style-name="ce8" office:value-type="float" office:value="5129">
            <text:p>5129</text:p>
          </table:table-cell>
          <table:table-cell table:style-name="ce9" office:value-type="string">
            <text:p>2026-03-16 05:52:14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83.XXX.XXX.X7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ęśnie, stawy i kości</text:p>
          </table:table-cell>
          <table:table-cell table:style-name="ce9" office:value-type="string">
            <text:p>VIS Dolomit 0,5 g 100 tabletek</text:p>
          </table:table-cell>
          <table:table-cell table:style-name="ce8" office:value-type="float" office:value="3728">
            <text:p>3728</text:p>
          </table:table-cell>
          <table:table-cell table:style-name="ce9" office:value-type="string">
            <text:p>2026-03-16 05:55:12</text:p>
          </table:table-cell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9" office:value-type="string">
            <text:p>37.XXX.XXX.7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łciowy i moczowy</text:p>
          </table:table-cell>
          <table:table-cell table:style-name="ce9" office:value-type="string">
            <text:p>Miovelia Nac 15 kaps.</text:p>
          </table:table-cell>
          <table:table-cell table:style-name="ce8" office:value-type="float" office:value="11821">
            <text:p>11821</text:p>
          </table:table-cell>
          <table:table-cell table:style-name="ce9" office:value-type="string">
            <text:p>2026-03-16 05:57:35</text:p>
          </table:table-cell>
          <table:table-cell table:style-name="ce10" office:value-type="currency" office:currency="PLN" office:value="0.75">
            <text:p>0,75 zł</text:p>
          </table:table-cell>
          <table:table-cell table:style-name="ce8"/>
          <table:table-cell table:style-name="ce10" office:value-type="currency" office:currency="PLN" office:value="0.75">
            <text:p>0,75 zł</text:p>
          </table:table-cell>
          <table:table-cell table:style-name="ce8"/>
          <table:table-cell table:style-name="ce9" office:value-type="string">
            <text:p>31.XXX.XXX.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ęśnie, stawy i kości</text:p>
          </table:table-cell>
          <table:table-cell table:style-name="ce9" office:value-type="string">
            <text:p>Borowina Lecznicza Pasta 1 Kg</text:p>
          </table:table-cell>
          <table:table-cell table:style-name="ce8" office:value-type="float" office:value="4899">
            <text:p>4899</text:p>
          </table:table-cell>
          <table:table-cell table:style-name="ce9" office:value-type="string">
            <text:p>2026-03-16 05:58:11</text:p>
          </table:table-cell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9" office:value-type="string">
            <text:p>79.XXX.XXX.X3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</text:p>
          </table:table-cell>
          <table:table-cell table:style-name="ce9" office:value-type="string">
            <text:p>Farmapia Maść Propolisowa Wspomagająca Gojenie Ran 7% 30g</text:p>
          </table:table-cell>
          <table:table-cell table:style-name="ce8" office:value-type="float" office:value="9761">
            <text:p>9761</text:p>
          </table:table-cell>
          <table:table-cell table:style-name="ce9" office:value-type="string">
            <text:p>2026-03-16 06:03:51</text:p>
          </table:table-cell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9" office:value-type="string">
            <text:p>46.XXX.XXX.7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ęśnie, stawy i kości</text:p>
          </table:table-cell>
          <table:table-cell table:style-name="ce9" office:value-type="string">
            <text:p>Borowina Lecznicza Pasta 1 Kg</text:p>
          </table:table-cell>
          <table:table-cell table:style-name="ce8" office:value-type="float" office:value="4899">
            <text:p>4899</text:p>
          </table:table-cell>
          <table:table-cell table:style-name="ce9" office:value-type="string">
            <text:p>2026-03-16 06:08:08</text:p>
          </table:table-cell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9" office:value-type="string">
            <text:p>79.XXX.XXX.X3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ciała</text:p>
          </table:table-cell>
          <table:table-cell table:style-name="ce9" office:value-type="string">
            <text:p>Emolium DERMOCARE Emulsja na suchą skórę głowy 100ml</text:p>
          </table:table-cell>
          <table:table-cell table:style-name="ce8" office:value-type="float" office:value="335">
            <text:p>335</text:p>
          </table:table-cell>
          <table:table-cell table:style-name="ce9" office:value-type="string">
            <text:p>2026-03-16 06:09:32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18X.XXX.XXX.X5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nerwowy</text:p>
          </table:table-cell>
          <table:table-cell table:style-name="ce9" office:value-type="string">
            <text:p>Tabletki NervoCalm Forte 20 szt.</text:p>
          </table:table-cell>
          <table:table-cell table:style-name="ce8" office:value-type="float" office:value="12744">
            <text:p>12744</text:p>
          </table:table-cell>
          <table:table-cell table:style-name="ce9" office:value-type="string">
            <text:p>2026-03-16 06:09:45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46.XXX.XXX.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APAP Ból i Gorączka C Plus 10 tab. mus.</text:p>
          </table:table-cell>
          <table:table-cell table:style-name="ce8" office:value-type="float" office:value="11252">
            <text:p>11252</text:p>
          </table:table-cell>
          <table:table-cell table:style-name="ce9" office:value-type="string">
            <text:p>2026-03-16 06:20:09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78.XXX.XXX.X4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Sora Protect - aerozol na włosy zapobiegający wszawicy 50ml</text:p>
          </table:table-cell>
          <table:table-cell table:style-name="ce8" office:value-type="float" office:value="6881">
            <text:p>6881</text:p>
          </table:table-cell>
          <table:table-cell table:style-name="ce9" office:value-type="string">
            <text:p>2026-03-16 06:23:38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93.XXX.XXX.5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zieci i niemowlęta</text:p>
          </table:table-cell>
          <table:table-cell table:style-name="ce9" office:value-type="string">
            <text:p>Juvit Multi krople doustne 10ml</text:p>
          </table:table-cell>
          <table:table-cell table:style-name="ce8" office:value-type="float" office:value="6099">
            <text:p>6099</text:p>
          </table:table-cell>
          <table:table-cell table:style-name="ce9" office:value-type="string">
            <text:p>2026-03-16 06:25:48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84.XXX.XXX.3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Pozostałe kosmetyki do włosów</text:p>
          </table:table-cell>
          <table:table-cell table:style-name="ce9" office:value-type="string">
            <text:p>Seboradin Spray Odsiwiający Do Włosów Forte 200ml</text:p>
          </table:table-cell>
          <table:table-cell table:style-name="ce8" office:value-type="float" office:value="26469">
            <text:p>26469</text:p>
          </table:table-cell>
          <table:table-cell table:style-name="ce9" office:value-type="string">
            <text:p>2026-03-16 06:42:08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31.XXX.XXX.6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nerały i witaminy</text:p>
          </table:table-cell>
          <table:table-cell table:style-name="ce9" office:value-type="string">
            <text:p>Biovital Odporność Spray 10ml</text:p>
          </table:table-cell>
          <table:table-cell table:style-name="ce8" office:value-type="float" office:value="19643">
            <text:p>19643</text:p>
          </table:table-cell>
          <table:table-cell table:style-name="ce9" office:value-type="string">
            <text:p>2026-03-16 06:48:03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17X.XXX.XXX.X8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nerały i witaminy</text:p>
          </table:table-cell>
          <table:table-cell table:style-name="ce9" office:value-type="string">
            <text:p>Biovital Odporność Spray 10ml</text:p>
          </table:table-cell>
          <table:table-cell table:style-name="ce8" office:value-type="float" office:value="19643">
            <text:p>19643</text:p>
          </table:table-cell>
          <table:table-cell table:style-name="ce9" office:value-type="string">
            <text:p>2026-03-16 06:49:01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17X.XXX.XXX.X8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Rzuć palenie</text:p>
          </table:table-cell>
          <table:table-cell table:style-name="ce9" office:value-type="string">
            <text:p>NIQUITIN przezroczysty, plastry transdermalne, 21 mg / 24 h, 7 szt</text:p>
          </table:table-cell>
          <table:table-cell table:style-name="ce8" office:value-type="float" office:value="9593">
            <text:p>9593</text:p>
          </table:table-cell>
          <table:table-cell table:style-name="ce9" office:value-type="string">
            <text:p>2026-03-16 06:50:11</text:p>
          </table:table-cell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9" office:value-type="string">
            <text:p>37.XXX.XXX.6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Sora Protect - aerozol na włosy zapobiegający wszawicy 50ml</text:p>
          </table:table-cell>
          <table:table-cell table:style-name="ce8" office:value-type="float" office:value="6881">
            <text:p>6881</text:p>
          </table:table-cell>
          <table:table-cell table:style-name="ce9" office:value-type="string">
            <text:p>2026-03-16 06:51:14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18X.XXX.XXX.4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Rzuć palenie</text:p>
          </table:table-cell>
          <table:table-cell table:style-name="ce9" office:value-type="string">
            <text:p>NIQUITIN przezroczysty, plastry transdermalne, 21 mg / 24 h, 7 szt</text:p>
          </table:table-cell>
          <table:table-cell table:style-name="ce8" office:value-type="float" office:value="9593">
            <text:p>9593</text:p>
          </table:table-cell>
          <table:table-cell table:style-name="ce9" office:value-type="string">
            <text:p>2026-03-16 06:51:38</text:p>
          </table:table-cell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9" office:value-type="string">
            <text:p>84.XXX.XXX.X3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Żywienie medyczne</text:p>
          </table:table-cell>
          <table:table-cell table:style-name="ce9" office:value-type="string">
            <text:p>Nutricia Nutrison Protein Intense Butelka 500ml</text:p>
          </table:table-cell>
          <table:table-cell table:style-name="ce8" office:value-type="float" office:value="28426">
            <text:p>28426</text:p>
          </table:table-cell>
          <table:table-cell table:style-name="ce9" office:value-type="string">
            <text:p>2026-03-16 06:54:15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91.XXX.XXX.6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ciała</text:p>
          </table:table-cell>
          <table:table-cell table:style-name="ce9" office:value-type="string">
            <text:p>Emolium DERMOCARE Emulsja na suchą skórę głowy 100ml</text:p>
          </table:table-cell>
          <table:table-cell table:style-name="ce8" office:value-type="float" office:value="335">
            <text:p>335</text:p>
          </table:table-cell>
          <table:table-cell table:style-name="ce9" office:value-type="string">
            <text:p>2026-03-16 06:59:56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18X.XXX.XXX.X5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Glukometry i akcesoria dla diabetyków</text:p>
          </table:table-cell>
          <table:table-cell table:style-name="ce9" office:value-type="string">
            <text:p>Wellion Symphar Test Paskowy 50 szt.</text:p>
          </table:table-cell>
          <table:table-cell table:style-name="ce8" office:value-type="float" office:value="9226">
            <text:p>9226</text:p>
          </table:table-cell>
          <table:table-cell table:style-name="ce9" office:value-type="string">
            <text:p>2026-03-16 07:00:01</text:p>
          </table:table-cell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9" office:value-type="string">
            <text:p>31.XXX.XXX.1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Allergika Krem na powieki MED 15ml</text:p>
          </table:table-cell>
          <table:table-cell table:style-name="ce8" office:value-type="float" office:value="11734">
            <text:p>11734</text:p>
          </table:table-cell>
          <table:table-cell table:style-name="ce9" office:value-type="string">
            <text:p>2026-03-16 07:00:09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89.XXX.XXX.X1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moczowy i płciowy</text:p>
          </table:table-cell>
          <table:table-cell table:style-name="ce9" office:value-type="string">
            <text:p>Gynoxin Uno 1kaps.</text:p>
          </table:table-cell>
          <table:table-cell table:style-name="ce8" office:value-type="float" office:value="10956">
            <text:p>10956</text:p>
          </table:table-cell>
          <table:table-cell table:style-name="ce9" office:value-type="string">
            <text:p>2026-03-16 07:01:27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46.XXX.XXX.3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Środki na przeziębienie</text:p>
          </table:table-cell>
          <table:table-cell table:style-name="ce9" office:value-type="string">
            <text:p>CLARVOX Porzeczka 36 past.</text:p>
          </table:table-cell>
          <table:table-cell table:style-name="ce8" office:value-type="float" office:value="32270">
            <text:p>32270</text:p>
          </table:table-cell>
          <table:table-cell table:style-name="ce9" office:value-type="string">
            <text:p>2026-03-16 07:02:25</text:p>
          </table:table-cell>
          <table:table-cell table:style-name="ce10" office:value-type="currency" office:currency="PLN" office:value="0.83">
            <text:p>0,83 zł</text:p>
          </table:table-cell>
          <table:table-cell table:style-name="ce8"/>
          <table:table-cell table:style-name="ce10" office:value-type="currency" office:currency="PLN" office:value="0.83">
            <text:p>0,83 zł</text:p>
          </table:table-cell>
          <table:table-cell table:style-name="ce8"/>
          <table:table-cell table:style-name="ce9" office:value-type="string">
            <text:p>78.XXX.XXX.X4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Środki na przeziębienie</text:p>
          </table:table-cell>
          <table:table-cell table:style-name="ce9" office:value-type="string">
            <text:p>CLARVOX Porzeczka 36 past.</text:p>
          </table:table-cell>
          <table:table-cell table:style-name="ce8" office:value-type="float" office:value="32270">
            <text:p>32270</text:p>
          </table:table-cell>
          <table:table-cell table:style-name="ce9" office:value-type="string">
            <text:p>2026-03-16 07:03:37</text:p>
          </table:table-cell>
          <table:table-cell table:style-name="ce10" office:value-type="currency" office:currency="PLN" office:value="0.83">
            <text:p>0,83 zł</text:p>
          </table:table-cell>
          <table:table-cell table:style-name="ce8"/>
          <table:table-cell table:style-name="ce10" office:value-type="currency" office:currency="PLN" office:value="0.83">
            <text:p>0,83 zł</text:p>
          </table:table-cell>
          <table:table-cell table:style-name="ce8"/>
          <table:table-cell table:style-name="ce9" office:value-type="string">
            <text:p>78.XXX.XXX.X4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nerały i witaminy</text:p>
          </table:table-cell>
          <table:table-cell table:style-name="ce9" office:value-type="string">
            <text:p>Sufrin 60tabl.</text:p>
          </table:table-cell>
          <table:table-cell table:style-name="ce8" office:value-type="float" office:value="5345">
            <text:p>5345</text:p>
          </table:table-cell>
          <table:table-cell table:style-name="ce9" office:value-type="string">
            <text:p>2026-03-16 07:10:07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77.XXX.XXX.X3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Termometry</text:p>
          </table:table-cell>
          <table:table-cell table:style-name="ce9" office:value-type="string">
            <text:p>Microlife MT 16C2</text:p>
          </table:table-cell>
          <table:table-cell table:style-name="ce8" office:value-type="float" office:value="9695">
            <text:p>9695</text:p>
          </table:table-cell>
          <table:table-cell table:style-name="ce9" office:value-type="string">
            <text:p>2026-03-16 07:13:00</text:p>
          </table:table-cell>
          <table:table-cell table:style-name="ce10" office:value-type="currency" office:currency="PLN" office:value="1.03">
            <text:p>1,03 zł</text:p>
          </table:table-cell>
          <table:table-cell table:style-name="ce8"/>
          <table:table-cell table:style-name="ce10" office:value-type="currency" office:currency="PLN" office:value="1.03">
            <text:p>1,03 zł</text:p>
          </table:table-cell>
          <table:table-cell table:style-name="ce8"/>
          <table:table-cell table:style-name="ce9" office:value-type="string">
            <text:p>85.XXX.XXX.X2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Rzuć palenie</text:p>
          </table:table-cell>
          <table:table-cell table:style-name="ce9" office:value-type="string">
            <text:p>NIQUITIN przezroczysty, plastry transdermalne, 21 mg / 24 h, 7 szt</text:p>
          </table:table-cell>
          <table:table-cell table:style-name="ce8" office:value-type="float" office:value="9593">
            <text:p>9593</text:p>
          </table:table-cell>
          <table:table-cell table:style-name="ce9" office:value-type="string">
            <text:p>2026-03-16 07:13:56</text:p>
          </table:table-cell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9" office:value-type="string">
            <text:p>37.XXX.XXX.X1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</text:p>
          </table:table-cell>
          <table:table-cell table:style-name="ce9" office:value-type="string">
            <text:p>Eva/Qu czopki przeciw zaparciom 6 czopków</text:p>
          </table:table-cell>
          <table:table-cell table:style-name="ce8" office:value-type="float" office:value="3918">
            <text:p>3918</text:p>
          </table:table-cell>
          <table:table-cell table:style-name="ce9" office:value-type="string">
            <text:p>2026-03-16 07:14:20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91.XXX.XXX.3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</text:p>
          </table:table-cell>
          <table:table-cell table:style-name="ce9" office:value-type="string">
            <text:p>Dulcobis czopki na zaparcia 6 szt.</text:p>
          </table:table-cell>
          <table:table-cell table:style-name="ce8" office:value-type="float" office:value="8472">
            <text:p>8472</text:p>
          </table:table-cell>
          <table:table-cell table:style-name="ce9" office:value-type="string">
            <text:p>2026-03-16 07:15:41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93.XXX.XXX.7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nerały i witaminy</text:p>
          </table:table-cell>
          <table:table-cell table:style-name="ce9" office:value-type="string">
            <text:p>BODYMAX PLUS Multiwitamina Odporność Energia 200 tab.</text:p>
          </table:table-cell>
          <table:table-cell table:style-name="ce8" office:value-type="float" office:value="16252">
            <text:p>16252</text:p>
          </table:table-cell>
          <table:table-cell table:style-name="ce9" office:value-type="string">
            <text:p>2026-03-16 07:19:26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77.XXX.XXX.X9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nerały i witaminy</text:p>
          </table:table-cell>
          <table:table-cell table:style-name="ce9" office:value-type="string">
            <text:p>BODYMAX PLUS Multiwitamina Odporność Energia 200 tab.</text:p>
          </table:table-cell>
          <table:table-cell table:style-name="ce8" office:value-type="float" office:value="16252">
            <text:p>16252</text:p>
          </table:table-cell>
          <table:table-cell table:style-name="ce9" office:value-type="string">
            <text:p>2026-03-16 07:20:07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77.XXX.XXX.X9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zieci i niemowlęta</text:p>
          </table:table-cell>
          <table:table-cell table:style-name="ce9" office:value-type="string">
            <text:p>Juvit Multi krople doustne 10ml</text:p>
          </table:table-cell>
          <table:table-cell table:style-name="ce8" office:value-type="float" office:value="6099">
            <text:p>6099</text:p>
          </table:table-cell>
          <table:table-cell table:style-name="ce9" office:value-type="string">
            <text:p>2026-03-16 07:20:58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31.XXX.XXX.X5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zieci i niemowlęta</text:p>
          </table:table-cell>
          <table:table-cell table:style-name="ce9" office:value-type="string">
            <text:p>Juvit Multi krople doustne 10ml</text:p>
          </table:table-cell>
          <table:table-cell table:style-name="ce8" office:value-type="float" office:value="6099">
            <text:p>6099</text:p>
          </table:table-cell>
          <table:table-cell table:style-name="ce9" office:value-type="string">
            <text:p>2026-03-16 07:23:22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94.XXX.XXX.3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Suplementy na wzrok i słuch</text:p>
          </table:table-cell>
          <table:table-cell table:style-name="ce9" office:value-type="string">
            <text:p>ECTOGEL Żel do oczu z ektoiną 10ml</text:p>
          </table:table-cell>
          <table:table-cell table:style-name="ce8" office:value-type="float" office:value="14067">
            <text:p>14067</text:p>
          </table:table-cell>
          <table:table-cell table:style-name="ce9" office:value-type="string">
            <text:p>2026-03-16 07:23:46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31.XXX.XXX.X9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zieci i niemowlęta</text:p>
          </table:table-cell>
          <table:table-cell table:style-name="ce9" office:value-type="string">
            <text:p>Juvit Multi krople doustne 10ml</text:p>
          </table:table-cell>
          <table:table-cell table:style-name="ce8" office:value-type="float" office:value="6099">
            <text:p>6099</text:p>
          </table:table-cell>
          <table:table-cell table:style-name="ce9" office:value-type="string">
            <text:p>2026-03-16 07:26:02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94.XXX.XXX.3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ęśnie, stawy i kości</text:p>
          </table:table-cell>
          <table:table-cell table:style-name="ce9" office:value-type="string">
            <text:p>Borowina Lecznicza Pasta 1 Kg</text:p>
          </table:table-cell>
          <table:table-cell table:style-name="ce8" office:value-type="float" office:value="4899">
            <text:p>4899</text:p>
          </table:table-cell>
          <table:table-cell table:style-name="ce9" office:value-type="string">
            <text:p>2026-03-16 07:26:52</text:p>
          </table:table-cell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9" office:value-type="string">
            <text:p>79.XXX.XXX.X3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zieci i niemowlęta</text:p>
          </table:table-cell>
          <table:table-cell table:style-name="ce9" office:value-type="string">
            <text:p>Juvit Multi krople doustne 10ml</text:p>
          </table:table-cell>
          <table:table-cell table:style-name="ce8" office:value-type="float" office:value="6099">
            <text:p>6099</text:p>
          </table:table-cell>
          <table:table-cell table:style-name="ce9" office:value-type="string">
            <text:p>2026-03-16 07:27:15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94.XXX.XXX.3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la mam i kobiet w ciąży</text:p>
          </table:table-cell>
          <table:table-cell table:style-name="ce9" office:value-type="string">
            <text:p>Vita-miner Prenatal 60 tabl</text:p>
          </table:table-cell>
          <table:table-cell table:style-name="ce8" office:value-type="float" office:value="369">
            <text:p>369</text:p>
          </table:table-cell>
          <table:table-cell table:style-name="ce9" office:value-type="string">
            <text:p>2026-03-16 07:34:24</text:p>
          </table:table-cell>
          <table:table-cell table:style-name="ce10" office:value-type="currency" office:currency="PLN" office:value="0.81">
            <text:p>0,81 zł</text:p>
          </table:table-cell>
          <table:table-cell table:style-name="ce8"/>
          <table:table-cell table:style-name="ce10" office:value-type="currency" office:currency="PLN" office:value="0.81">
            <text:p>0,81 zł</text:p>
          </table:table-cell>
          <table:table-cell table:style-name="ce8"/>
          <table:table-cell table:style-name="ce9" office:value-type="string">
            <text:p>78.XXX.XXX.X4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 i trawienie</text:p>
          </table:table-cell>
          <table:table-cell table:style-name="ce9" office:value-type="string">
            <text:p>Estabiom Junior 20kaps.</text:p>
          </table:table-cell>
          <table:table-cell table:style-name="ce8" office:value-type="float" office:value="6953">
            <text:p>6953</text:p>
          </table:table-cell>
          <table:table-cell table:style-name="ce9" office:value-type="string">
            <text:p>2026-03-16 07:36:02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14X.XXX.XXX.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nerwowy</text:p>
          </table:table-cell>
          <table:table-cell table:style-name="ce9" office:value-type="string">
            <text:p>Tabletki NervoCalm Forte 20 szt.</text:p>
          </table:table-cell>
          <table:table-cell table:style-name="ce8" office:value-type="float" office:value="12744">
            <text:p>12744</text:p>
          </table:table-cell>
          <table:table-cell table:style-name="ce9" office:value-type="string">
            <text:p>2026-03-16 07:43:15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91.XXX.XXX.9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Zestawy dla kobiet</text:p>
          </table:table-cell>
          <table:table-cell table:style-name="ce9" office:value-type="string">
            <text:p>Caudalie Vinopure Zestaw Startowy dla Skóry Trądzikowej</text:p>
          </table:table-cell>
          <table:table-cell table:style-name="ce8" office:value-type="float" office:value="32416">
            <text:p>32416</text:p>
          </table:table-cell>
          <table:table-cell table:style-name="ce9" office:value-type="string">
            <text:p>2026-03-16 07:43:19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18X.XXX.XXX.X6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Zestawy dla kobiet</text:p>
          </table:table-cell>
          <table:table-cell table:style-name="ce9" office:value-type="string">
            <text:p>Caudalie Vinopure Zestaw Startowy dla Skóry Trądzikowej</text:p>
          </table:table-cell>
          <table:table-cell table:style-name="ce8" office:value-type="float" office:value="32416">
            <text:p>32416</text:p>
          </table:table-cell>
          <table:table-cell table:style-name="ce9" office:value-type="string">
            <text:p>2026-03-16 07:44:32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18X.XXX.XXX.X6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ęśnie, stawy i kości</text:p>
          </table:table-cell>
          <table:table-cell table:style-name="ce9" office:value-type="string">
            <text:p>Voltaren Emulgel 11,6mg/g żel 50g</text:p>
          </table:table-cell>
          <table:table-cell table:style-name="ce8" office:value-type="float" office:value="7178">
            <text:p>7178</text:p>
          </table:table-cell>
          <table:table-cell table:style-name="ce9" office:value-type="string">
            <text:p>2026-03-16 07:45:46</text:p>
          </table:table-cell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9" office:value-type="string">
            <text:p>31.XXX.XXX.4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ęśnie, stawy i kości</text:p>
          </table:table-cell>
          <table:table-cell table:style-name="ce9" office:value-type="string">
            <text:p>Voltaren Emulgel 11,6mg/g żel 50g</text:p>
          </table:table-cell>
          <table:table-cell table:style-name="ce8" office:value-type="float" office:value="7178">
            <text:p>7178</text:p>
          </table:table-cell>
          <table:table-cell table:style-name="ce9" office:value-type="string">
            <text:p>2026-03-16 07:50:52</text:p>
          </table:table-cell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9" office:value-type="string">
            <text:p>31.XXX.XXX.4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Termometry</text:p>
          </table:table-cell>
          <table:table-cell table:style-name="ce9" office:value-type="string">
            <text:p>Microlife MT 16C2</text:p>
          </table:table-cell>
          <table:table-cell table:style-name="ce8" office:value-type="float" office:value="9695">
            <text:p>9695</text:p>
          </table:table-cell>
          <table:table-cell table:style-name="ce9" office:value-type="string">
            <text:p>2026-03-16 07:51:58</text:p>
          </table:table-cell>
          <table:table-cell table:style-name="ce10" office:value-type="currency" office:currency="PLN" office:value="1.03">
            <text:p>1,03 zł</text:p>
          </table:table-cell>
          <table:table-cell table:style-name="ce8"/>
          <table:table-cell table:style-name="ce10" office:value-type="currency" office:currency="PLN" office:value="1.03">
            <text:p>1,03 zł</text:p>
          </table:table-cell>
          <table:table-cell table:style-name="ce8"/>
          <table:table-cell table:style-name="ce9" office:value-type="string">
            <text:p>31.XXX.XXX.X6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</text:p>
          </table:table-cell>
          <table:table-cell table:style-name="ce9" office:value-type="string">
            <text:p>Alugastrin 40 tabletek</text:p>
          </table:table-cell>
          <table:table-cell table:style-name="ce8" office:value-type="float" office:value="5864">
            <text:p>5864</text:p>
          </table:table-cell>
          <table:table-cell table:style-name="ce9" office:value-type="string">
            <text:p>2026-03-16 07:56:54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89.XXX.XXX.X1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</text:p>
          </table:table-cell>
          <table:table-cell table:style-name="ce9" office:value-type="string">
            <text:p>Rennie Antiacidum o smaku miętowym 48 tabletek do ssania</text:p>
          </table:table-cell>
          <table:table-cell table:style-name="ce8" office:value-type="float" office:value="15795">
            <text:p>15795</text:p>
          </table:table-cell>
          <table:table-cell table:style-name="ce9" office:value-type="string">
            <text:p>2026-03-16 07:58:24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89.XXX.XXX.X1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Zestawy dermokosmetyków</text:p>
          </table:table-cell>
          <table:table-cell table:style-name="ce9" office:value-type="string">
            <text:p>Avene Hyaluron Activ B3 Krem Na Noc 50ml + Pod Oczy 15ml</text:p>
          </table:table-cell>
          <table:table-cell table:style-name="ce8" office:value-type="float" office:value="32646">
            <text:p>32646</text:p>
          </table:table-cell>
          <table:table-cell table:style-name="ce9" office:value-type="string">
            <text:p>2026-03-16 07:59:56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46.XXX.XXX.X1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łyny i żele do dezynfekcji ran</text:p>
          </table:table-cell>
          <table:table-cell table:style-name="ce9" office:value-type="string">
            <text:p>Farmina Jodyna Hospital 800g</text:p>
          </table:table-cell>
          <table:table-cell table:style-name="ce8" office:value-type="float" office:value="8114">
            <text:p>8114</text:p>
          </table:table-cell>
          <table:table-cell table:style-name="ce9" office:value-type="string">
            <text:p>2026-03-16 08:05:46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37.XXX.XXX.X4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ciwbólowe</text:p>
          </table:table-cell>
          <table:table-cell table:style-name="ce9" office:value-type="string">
            <text:p>IBUPROM REGULAR 10 tabl.</text:p>
          </table:table-cell>
          <table:table-cell table:style-name="ce8" office:value-type="float" office:value="12">
            <text:p>12</text:p>
          </table:table-cell>
          <table:table-cell table:style-name="ce9" office:value-type="string">
            <text:p>2026-03-16 08:13:56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37.XXX.XXX.X2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Biuro i firma</text:p>
          </table:table-cell>
          <table:table-cell table:style-name="ce9" office:value-type="string">
            <text:p>Wyposażenie medyczne</text:p>
          </table:table-cell>
          <table:table-cell table:style-name="ce9" office:value-type="string">
            <text:p>Strzykawka Cewnikowa Janetta 50Ml</text:p>
          </table:table-cell>
          <table:table-cell table:style-name="ce8" office:value-type="float" office:value="18161">
            <text:p>18161</text:p>
          </table:table-cell>
          <table:table-cell table:style-name="ce9" office:value-type="string">
            <text:p>2026-03-16 08:15:37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31.XXX.XXX.X3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Dla dziecka</text:p>
          </table:table-cell>
          <table:table-cell table:style-name="ce9" office:value-type="string">
            <text:p>Majtki poporodowe</text:p>
          </table:table-cell>
          <table:table-cell table:style-name="ce9" office:value-type="string">
            <text:p>Komfortowe Majteczki Jednorazowe Dla Kobiet Rozmiar 38 X 7 Sztuk</text:p>
          </table:table-cell>
          <table:table-cell table:style-name="ce8" office:value-type="float" office:value="13815">
            <text:p>13815</text:p>
          </table:table-cell>
          <table:table-cell table:style-name="ce9" office:value-type="string">
            <text:p>2026-03-16 08:15:58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18X.XXX.XXX.1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Ogród</text:p>
          </table:table-cell>
          <table:table-cell table:style-name="ce9" office:value-type="string">
            <text:p>Odstraszanie owadów</text:p>
          </table:table-cell>
          <table:table-cell table:style-name="ce9" office:value-type="string">
            <text:p>Mosbito Opaska Odstraszająca Komary i Meszki 1szt</text:p>
          </table:table-cell>
          <table:table-cell table:style-name="ce8" office:value-type="float" office:value="4597">
            <text:p>4597</text:p>
          </table:table-cell>
          <table:table-cell table:style-name="ce9" office:value-type="string">
            <text:p>2026-03-16 08:17:44</text:p>
          </table:table-cell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9" office:value-type="string">
            <text:p>37.XXX.XXX.X7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 i trawienie</text:p>
          </table:table-cell>
          <table:table-cell table:style-name="ce9" office:value-type="string">
            <text:p>Sylimarol Gastro 30kaps.</text:p>
          </table:table-cell>
          <table:table-cell table:style-name="ce8" office:value-type="float" office:value="11530">
            <text:p>11530</text:p>
          </table:table-cell>
          <table:table-cell table:style-name="ce9" office:value-type="string">
            <text:p>2026-03-16 08:19:07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83.XXX.XXX.X8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Zestawy dermokosmetyków</text:p>
          </table:table-cell>
          <table:table-cell table:style-name="ce9" office:value-type="string">
            <text:p>Avene Hyaluron Activ B3 Krem Na Noc 50ml + Pod Oczy 15ml</text:p>
          </table:table-cell>
          <table:table-cell table:style-name="ce8" office:value-type="float" office:value="32646">
            <text:p>32646</text:p>
          </table:table-cell>
          <table:table-cell table:style-name="ce9" office:value-type="string">
            <text:p>2026-03-16 08:26:06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82.XXX.XXX.2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Alergia</text:p>
          </table:table-cell>
          <table:table-cell table:style-name="ce9" office:value-type="string">
            <text:p>Fenistil Krople doustne 1mg/1ml 20ml (Import równoległy)</text:p>
          </table:table-cell>
          <table:table-cell table:style-name="ce8" office:value-type="float" office:value="8335">
            <text:p>8335</text:p>
          </table:table-cell>
          <table:table-cell table:style-name="ce9" office:value-type="string">
            <text:p>2026-03-16 08:31:36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95.XXX.XXX.3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Alergia</text:p>
          </table:table-cell>
          <table:table-cell table:style-name="ce9" office:value-type="string">
            <text:p>Fenistil Krople doustne 1mg/1ml 20ml (Import równoległy)</text:p>
          </table:table-cell>
          <table:table-cell table:style-name="ce8" office:value-type="float" office:value="8335">
            <text:p>8335</text:p>
          </table:table-cell>
          <table:table-cell table:style-name="ce9" office:value-type="string">
            <text:p>2026-03-16 08:34:30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77.XXX.XXX.4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</text:p>
          </table:table-cell>
          <table:table-cell table:style-name="ce9" office:value-type="string">
            <text:p>Pantoprazol Teva 20 mg 14 tabl.</text:p>
          </table:table-cell>
          <table:table-cell table:style-name="ce8" office:value-type="float" office:value="9938">
            <text:p>9938</text:p>
          </table:table-cell>
          <table:table-cell table:style-name="ce9" office:value-type="string">
            <text:p>2026-03-16 08:35:35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21X.XXX.XXX.3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Rzuć palenie</text:p>
          </table:table-cell>
          <table:table-cell table:style-name="ce9" office:value-type="string">
            <text:p>NIQUITIN przezroczysty, plastry transdermalne, 21 mg / 24 h, 7 szt</text:p>
          </table:table-cell>
          <table:table-cell table:style-name="ce8" office:value-type="float" office:value="9593">
            <text:p>9593</text:p>
          </table:table-cell>
          <table:table-cell table:style-name="ce9" office:value-type="string">
            <text:p>2026-03-16 08:36:47</text:p>
          </table:table-cell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9" office:value-type="string">
            <text:p>18X.XXX.XXX.X4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Suplementy na wzrok i słuch</text:p>
          </table:table-cell>
          <table:table-cell table:style-name="ce9" office:value-type="string">
            <text:p>Aronta 30 tabl</text:p>
          </table:table-cell>
          <table:table-cell table:style-name="ce8" office:value-type="float" office:value="658">
            <text:p>658</text:p>
          </table:table-cell>
          <table:table-cell table:style-name="ce9" office:value-type="string">
            <text:p>2026-03-16 08:40:14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15X.XXX.XXX.1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Glukometry i akcesoria dla diabetyków</text:p>
          </table:table-cell>
          <table:table-cell table:style-name="ce9" office:value-type="string">
            <text:p>Accu-Check Active</text:p>
          </table:table-cell>
          <table:table-cell table:style-name="ce8" office:value-type="float" office:value="19537">
            <text:p>19537</text:p>
          </table:table-cell>
          <table:table-cell table:style-name="ce9" office:value-type="string">
            <text:p>2026-03-16 08:41:03</text:p>
          </table:table-cell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9" office:value-type="string">
            <text:p>37.XXX.XXX.X6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Rzuć palenie</text:p>
          </table:table-cell>
          <table:table-cell table:style-name="ce9" office:value-type="string">
            <text:p>NIQUITIN przezroczysty, plastry transdermalne, 21 mg / 24 h, 7 szt</text:p>
          </table:table-cell>
          <table:table-cell table:style-name="ce8" office:value-type="float" office:value="9593">
            <text:p>9593</text:p>
          </table:table-cell>
          <table:table-cell table:style-name="ce9" office:value-type="string">
            <text:p>2026-03-16 08:41:23</text:p>
          </table:table-cell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9" office:value-type="string">
            <text:p>18X.XXX.XXX.X4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Daktarin 20mg/g, krem 30g</text:p>
          </table:table-cell>
          <table:table-cell table:style-name="ce8" office:value-type="float" office:value="9326">
            <text:p>9326</text:p>
          </table:table-cell>
          <table:table-cell table:style-name="ce9" office:value-type="string">
            <text:p>2026-03-16 08:42:46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46.XXX.XXX.6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ciwbólowe</text:p>
          </table:table-cell>
          <table:table-cell table:style-name="ce9" office:value-type="string">
            <text:p>IBUPROM REGULAR 10 tabl.</text:p>
          </table:table-cell>
          <table:table-cell table:style-name="ce8" office:value-type="float" office:value="12">
            <text:p>12</text:p>
          </table:table-cell>
          <table:table-cell table:style-name="ce9" office:value-type="string">
            <text:p>2026-03-16 08:43:22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46.XXX.XXX.X4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Serce i układ krążenia</text:p>
          </table:table-cell>
          <table:table-cell table:style-name="ce9" office:value-type="string">
            <text:p>Tanakan 90 tabletek</text:p>
          </table:table-cell>
          <table:table-cell table:style-name="ce8" office:value-type="float" office:value="6611">
            <text:p>6611</text:p>
          </table:table-cell>
          <table:table-cell table:style-name="ce9" office:value-type="string">
            <text:p>2026-03-16 08:43:32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77.XXX.XXX.X3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eparaty medycyny naturalnej</text:p>
          </table:table-cell>
          <table:table-cell table:style-name="ce9" office:value-type="string">
            <text:p>Salviafarm Żel z kasztanowcem na przemęczone nogi 200ml</text:p>
          </table:table-cell>
          <table:table-cell table:style-name="ce8" office:value-type="float" office:value="18515">
            <text:p>18515</text:p>
          </table:table-cell>
          <table:table-cell table:style-name="ce9" office:value-type="string">
            <text:p>2026-03-16 08:45:32</text:p>
          </table:table-cell>
          <table:table-cell table:style-name="ce10" office:value-type="currency" office:currency="PLN" office:value="0.88">
            <text:p>0,88 zł</text:p>
          </table:table-cell>
          <table:table-cell table:style-name="ce8"/>
          <table:table-cell table:style-name="ce10" office:value-type="currency" office:currency="PLN" office:value="0.88">
            <text:p>0,88 zł</text:p>
          </table:table-cell>
          <table:table-cell table:style-name="ce8"/>
          <table:table-cell table:style-name="ce9" office:value-type="string">
            <text:p>77.XXX.XXX.5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nerały i witaminy</text:p>
          </table:table-cell>
          <table:table-cell table:style-name="ce9" office:value-type="string">
            <text:p>HASCO VITAMINIUM A+E x 30 tabl. HASCO</text:p>
          </table:table-cell>
          <table:table-cell table:style-name="ce8" office:value-type="float" office:value="6384">
            <text:p>6384</text:p>
          </table:table-cell>
          <table:table-cell table:style-name="ce9" office:value-type="string">
            <text:p>2026-03-16 08:48:01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37.XXX.XXX.X5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ciwbólowe</text:p>
          </table:table-cell>
          <table:table-cell table:style-name="ce9" office:value-type="string">
            <text:p>IBUPROM REGULAR 10 tabl.</text:p>
          </table:table-cell>
          <table:table-cell table:style-name="ce8" office:value-type="float" office:value="12">
            <text:p>12</text:p>
          </table:table-cell>
          <table:table-cell table:style-name="ce9" office:value-type="string">
            <text:p>2026-03-16 08:49:49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46.XXX.XXX.X4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Wzrok i słuch</text:p>
          </table:table-cell>
          <table:table-cell table:style-name="ce9" office:value-type="string">
            <text:p>Otinum 0,2g/g Krople Do Uszu 10g</text:p>
          </table:table-cell>
          <table:table-cell table:style-name="ce8" office:value-type="float" office:value="15762">
            <text:p>15762</text:p>
          </table:table-cell>
          <table:table-cell table:style-name="ce9" office:value-type="string">
            <text:p>2026-03-16 08:51:38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19X.XXX.XXX.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Alergia</text:p>
          </table:table-cell>
          <table:table-cell table:style-name="ce9" office:value-type="string">
            <text:p>Fenistil Krople doustne 1mg/1ml 20ml (Import równoległy)</text:p>
          </table:table-cell>
          <table:table-cell table:style-name="ce8" office:value-type="float" office:value="8335">
            <text:p>8335</text:p>
          </table:table-cell>
          <table:table-cell table:style-name="ce9" office:value-type="string">
            <text:p>2026-03-16 09:06:21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83.XXX.XXX.X0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Alergia</text:p>
          </table:table-cell>
          <table:table-cell table:style-name="ce9" office:value-type="string">
            <text:p>Polcrom Krople do oczu 10ml 2x5ml</text:p>
          </table:table-cell>
          <table:table-cell table:style-name="ce8" office:value-type="float" office:value="6243">
            <text:p>6243</text:p>
          </table:table-cell>
          <table:table-cell table:style-name="ce9" office:value-type="string">
            <text:p>2026-03-16 09:07:14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95.XXX.XXX.X4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Alergia</text:p>
          </table:table-cell>
          <table:table-cell table:style-name="ce9" office:value-type="string">
            <text:p>Fenistil Krople doustne 1mg/1ml 20ml (Import równoległy)</text:p>
          </table:table-cell>
          <table:table-cell table:style-name="ce8" office:value-type="float" office:value="8335">
            <text:p>8335</text:p>
          </table:table-cell>
          <table:table-cell table:style-name="ce9" office:value-type="string">
            <text:p>2026-03-16 09:07:18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83.XXX.XXX.X0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Opatrunki</text:p>
          </table:table-cell>
          <table:table-cell table:style-name="ce9" office:value-type="string">
            <text:p>Akutol Opatrunek plaster w sprayu 60ml</text:p>
          </table:table-cell>
          <table:table-cell table:style-name="ce8" office:value-type="float" office:value="10087">
            <text:p>10087</text:p>
          </table:table-cell>
          <table:table-cell table:style-name="ce9" office:value-type="string">
            <text:p>2026-03-16 09:08:22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37.XXX.XXX.6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Alergia</text:p>
          </table:table-cell>
          <table:table-cell table:style-name="ce9" office:value-type="string">
            <text:p>Fenistil Krople doustne 1mg/1ml 20ml (Import równoległy)</text:p>
          </table:table-cell>
          <table:table-cell table:style-name="ce8" office:value-type="float" office:value="8335">
            <text:p>8335</text:p>
          </table:table-cell>
          <table:table-cell table:style-name="ce9" office:value-type="string">
            <text:p>2026-03-16 09:10:57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83.XXX.XXX.X0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Wzrok i słuch</text:p>
          </table:table-cell>
          <table:table-cell table:style-name="ce9" office:value-type="string">
            <text:p>Euphrasia Świetlik Krople Do Oczu 10ml</text:p>
          </table:table-cell>
          <table:table-cell table:style-name="ce8" office:value-type="float" office:value="13982">
            <text:p>13982</text:p>
          </table:table-cell>
          <table:table-cell table:style-name="ce9" office:value-type="string">
            <text:p>2026-03-16 09:13:55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10X.XXX.XXX.6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Contractubex 50g</text:p>
          </table:table-cell>
          <table:table-cell table:style-name="ce8" office:value-type="float" office:value="5948">
            <text:p>5948</text:p>
          </table:table-cell>
          <table:table-cell table:style-name="ce9" office:value-type="string">
            <text:p>2026-03-16 09:16:46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83.XXX.XXX.X1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Glukometry i akcesoria dla diabetyków</text:p>
          </table:table-cell>
          <table:table-cell table:style-name="ce9" office:value-type="string">
            <text:p>Abbott Freestyle Libre 2 Sensor 1szt.</text:p>
          </table:table-cell>
          <table:table-cell table:style-name="ce8" office:value-type="float" office:value="32071">
            <text:p>32071</text:p>
          </table:table-cell>
          <table:table-cell table:style-name="ce9" office:value-type="string">
            <text:p>2026-03-16 09:19:34</text:p>
          </table:table-cell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9" office:value-type="string">
            <text:p>18X.XXX.XXX.1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Suplementy na wzrok i słuch</text:p>
          </table:table-cell>
          <table:table-cell table:style-name="ce9" office:value-type="string">
            <text:p>Aronta 30 tabl</text:p>
          </table:table-cell>
          <table:table-cell table:style-name="ce8" office:value-type="float" office:value="658">
            <text:p>658</text:p>
          </table:table-cell>
          <table:table-cell table:style-name="ce9" office:value-type="string">
            <text:p>2026-03-16 09:20:42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45.XXX.XXX.X1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Zestawy dermokosmetyków</text:p>
          </table:table-cell>
          <table:table-cell table:style-name="ce9" office:value-type="string">
            <text:p>Avene Hyaluron Activ B3 Krem Na Noc 50ml + Pod Oczy 15ml</text:p>
          </table:table-cell>
          <table:table-cell table:style-name="ce8" office:value-type="float" office:value="32646">
            <text:p>32646</text:p>
          </table:table-cell>
          <table:table-cell table:style-name="ce9" office:value-type="string">
            <text:p>2026-03-16 09:23:04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31.XXX.XXX.X3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Pozostałe kosmetyki do pielęgnacji ust</text:p>
          </table:table-cell>
          <table:table-cell table:style-name="ce9" office:value-type="string">
            <text:p>ANNA Wazelina kosmetyczna z witaminami A+E 50g</text:p>
          </table:table-cell>
          <table:table-cell table:style-name="ce8" office:value-type="float" office:value="9548">
            <text:p>9548</text:p>
          </table:table-cell>
          <table:table-cell table:style-name="ce9" office:value-type="string">
            <text:p>2026-03-16 09:24:37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10X.XXX.XXX.X1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Wzrok i słuch</text:p>
          </table:table-cell>
          <table:table-cell table:style-name="ce9" office:value-type="string">
            <text:p>Softeye Duo Krople Do Oczu 10ml</text:p>
          </table:table-cell>
          <table:table-cell table:style-name="ce8" office:value-type="float" office:value="19605">
            <text:p>19605</text:p>
          </table:table-cell>
          <table:table-cell table:style-name="ce9" office:value-type="string">
            <text:p>2026-03-16 09:24:39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19X.XXX.XXX.8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</text:p>
          </table:table-cell>
          <table:table-cell table:style-name="ce9" office:value-type="string">
            <text:p>XENNA balance 6 sasz.</text:p>
          </table:table-cell>
          <table:table-cell table:style-name="ce8" office:value-type="float" office:value="10167">
            <text:p>10167</text:p>
          </table:table-cell>
          <table:table-cell table:style-name="ce9" office:value-type="string">
            <text:p>2026-03-16 09:24:43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85.XXX.XXX.X3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Pozostałe kosmetyki do pielęgnacji ust</text:p>
          </table:table-cell>
          <table:table-cell table:style-name="ce9" office:value-type="string">
            <text:p>ANNA Wazelina kosmetyczna z witaminami A+E 50g</text:p>
          </table:table-cell>
          <table:table-cell table:style-name="ce8" office:value-type="float" office:value="9548">
            <text:p>9548</text:p>
          </table:table-cell>
          <table:table-cell table:style-name="ce9" office:value-type="string">
            <text:p>2026-03-16 09:26:13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10X.XXX.XXX.X1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Stawy, mięśnie i kości</text:p>
          </table:table-cell>
          <table:table-cell table:style-name="ce9" office:value-type="string">
            <text:p>R-Flex Ultra Hydrolize 30sasz.</text:p>
          </table:table-cell>
          <table:table-cell table:style-name="ce8" office:value-type="float" office:value="10366">
            <text:p>10366</text:p>
          </table:table-cell>
          <table:table-cell table:style-name="ce9" office:value-type="string">
            <text:p>2026-03-16 09:26:22</text:p>
          </table:table-cell>
          <table:table-cell table:style-name="ce10" office:value-type="currency" office:currency="PLN" office:value="0.83">
            <text:p>0,83 zł</text:p>
          </table:table-cell>
          <table:table-cell table:style-name="ce8"/>
          <table:table-cell table:style-name="ce10" office:value-type="currency" office:currency="PLN" office:value="0.83">
            <text:p>0,83 zł</text:p>
          </table:table-cell>
          <table:table-cell table:style-name="ce8"/>
          <table:table-cell table:style-name="ce9" office:value-type="string">
            <text:p>83.XXX.XXX.2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 i trawienie</text:p>
          </table:table-cell>
          <table:table-cell table:style-name="ce9" office:value-type="string">
            <text:p>Livenorm 30kaps.</text:p>
          </table:table-cell>
          <table:table-cell table:style-name="ce8" office:value-type="float" office:value="9836">
            <text:p>9836</text:p>
          </table:table-cell>
          <table:table-cell table:style-name="ce9" office:value-type="string">
            <text:p>2026-03-16 09:26:44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37.XXX.XXX.X2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Stawy, mięśnie i kości</text:p>
          </table:table-cell>
          <table:table-cell table:style-name="ce9" office:value-type="string">
            <text:p>R-Flex Ultra Hydrolize 30sasz.</text:p>
          </table:table-cell>
          <table:table-cell table:style-name="ce8" office:value-type="float" office:value="10366">
            <text:p>10366</text:p>
          </table:table-cell>
          <table:table-cell table:style-name="ce9" office:value-type="string">
            <text:p>2026-03-16 09:26:54</text:p>
          </table:table-cell>
          <table:table-cell table:style-name="ce10" office:value-type="currency" office:currency="PLN" office:value="0.83">
            <text:p>0,83 zł</text:p>
          </table:table-cell>
          <table:table-cell table:style-name="ce8"/>
          <table:table-cell table:style-name="ce10" office:value-type="currency" office:currency="PLN" office:value="0.83">
            <text:p>0,83 zł</text:p>
          </table:table-cell>
          <table:table-cell table:style-name="ce8"/>
          <table:table-cell table:style-name="ce9" office:value-type="string">
            <text:p>83.XXX.XXX.2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Wzrok i słuch</text:p>
          </table:table-cell>
          <table:table-cell table:style-name="ce9" office:value-type="string">
            <text:p>Blephasol Płyn Micelarny Do Wrażliwych Powiek 100ml</text:p>
          </table:table-cell>
          <table:table-cell table:style-name="ce8" office:value-type="float" office:value="3432">
            <text:p>3432</text:p>
          </table:table-cell>
          <table:table-cell table:style-name="ce9" office:value-type="string">
            <text:p>2026-03-16 09:28:41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31.XXX.XXX.X1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</text:p>
          </table:table-cell>
          <table:table-cell table:style-name="ce9" office:value-type="string">
            <text:p>Inversion Femme Complex 90kaps.</text:p>
          </table:table-cell>
          <table:table-cell table:style-name="ce8" office:value-type="float" office:value="12016">
            <text:p>12016</text:p>
          </table:table-cell>
          <table:table-cell table:style-name="ce9" office:value-type="string">
            <text:p>2026-03-16 09:32:13</text:p>
          </table:table-cell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9" office:value-type="string">
            <text:p>83.XXX.XXX.X5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Zioła</text:p>
          </table:table-cell>
          <table:table-cell table:style-name="ce9" office:value-type="string">
            <text:p>Zioła Mnicha Na trawienie 20tbx2g</text:p>
          </table:table-cell>
          <table:table-cell table:style-name="ce8" office:value-type="float" office:value="18546">
            <text:p>18546</text:p>
          </table:table-cell>
          <table:table-cell table:style-name="ce9" office:value-type="string">
            <text:p>2026-03-16 09:33:38</text:p>
          </table:table-cell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9" office:value-type="string">
            <text:p>31.XXX.XXX.X5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</text:p>
          </table:table-cell>
          <table:table-cell table:style-name="ce9" office:value-type="string">
            <text:p>Inversion Femme Complex 90kaps.</text:p>
          </table:table-cell>
          <table:table-cell table:style-name="ce8" office:value-type="float" office:value="12016">
            <text:p>12016</text:p>
          </table:table-cell>
          <table:table-cell table:style-name="ce9" office:value-type="string">
            <text:p>2026-03-16 09:34:36</text:p>
          </table:table-cell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9" office:value-type="string">
            <text:p>83.XXX.XXX.X5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</text:p>
          </table:table-cell>
          <table:table-cell table:style-name="ce9" office:value-type="string">
            <text:p>Delfarma Skinscabin Płyn 120ml</text:p>
          </table:table-cell>
          <table:table-cell table:style-name="ce8" office:value-type="float" office:value="13970">
            <text:p>13970</text:p>
          </table:table-cell>
          <table:table-cell table:style-name="ce9" office:value-type="string">
            <text:p>2026-03-16 09:37:21</text:p>
          </table:table-cell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9" office:value-type="string">
            <text:p>82.XXX.XXX.X3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ciała</text:p>
          </table:table-cell>
          <table:table-cell table:style-name="ce9" office:value-type="string">
            <text:p>Emolium A -Topic Trójaktywna emulsja do ciała do skóry atopowej, 200 ml</text:p>
          </table:table-cell>
          <table:table-cell table:style-name="ce8" office:value-type="float" office:value="14970">
            <text:p>14970</text:p>
          </table:table-cell>
          <table:table-cell table:style-name="ce9" office:value-type="string">
            <text:p>2026-03-16 09:39:53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17X.XXX.XXX.6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ciała</text:p>
          </table:table-cell>
          <table:table-cell table:style-name="ce9" office:value-type="string">
            <text:p>Emolium A -Topic Trójaktywna emulsja do ciała do skóry atopowej, 200 ml</text:p>
          </table:table-cell>
          <table:table-cell table:style-name="ce8" office:value-type="float" office:value="14970">
            <text:p>14970</text:p>
          </table:table-cell>
          <table:table-cell table:style-name="ce9" office:value-type="string">
            <text:p>2026-03-16 09:41:26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17X.XXX.XXX.6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</text:p>
          </table:table-cell>
          <table:table-cell table:style-name="ce9" office:value-type="string">
            <text:p>Pharmapoint Legalon 140, 20kaps</text:p>
          </table:table-cell>
          <table:table-cell table:style-name="ce8" office:value-type="float" office:value="19282">
            <text:p>19282</text:p>
          </table:table-cell>
          <table:table-cell table:style-name="ce9" office:value-type="string">
            <text:p>2026-03-16 09:42:20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89.XXX.XXX.X8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</text:p>
          </table:table-cell>
          <table:table-cell table:style-name="ce9" office:value-type="string">
            <text:p>MYLAN Legalon 140 20 kaps</text:p>
          </table:table-cell>
          <table:table-cell table:style-name="ce8" office:value-type="float" office:value="17151">
            <text:p>17151</text:p>
          </table:table-cell>
          <table:table-cell table:style-name="ce9" office:value-type="string">
            <text:p>2026-03-16 09:42:36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89.XXX.XXX.X8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Wzrok i słuch</text:p>
          </table:table-cell>
          <table:table-cell table:style-name="ce9" office:value-type="string">
            <text:p>Natur Produkt Vedixin Intense 10ml</text:p>
          </table:table-cell>
          <table:table-cell table:style-name="ce8" office:value-type="float" office:value="28091">
            <text:p>28091</text:p>
          </table:table-cell>
          <table:table-cell table:style-name="ce9" office:value-type="string">
            <text:p>2026-03-16 09:43:25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79.XXX.XXX.X3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ozostałe wyposażenie apteczek</text:p>
          </table:table-cell>
          <table:table-cell table:style-name="ce9" office:value-type="string">
            <text:p>Tecweld Icemix sztuczny lód w aerozolu 400ml</text:p>
          </table:table-cell>
          <table:table-cell table:style-name="ce8" office:value-type="float" office:value="4136">
            <text:p>4136</text:p>
          </table:table-cell>
          <table:table-cell table:style-name="ce9" office:value-type="string">
            <text:p>2026-03-16 09:46:37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83.XXX.XXX.1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ozostałe wyposażenie apteczek</text:p>
          </table:table-cell>
          <table:table-cell table:style-name="ce9" office:value-type="string">
            <text:p>Tecweld Icemix sztuczny lód w aerozolu 400ml</text:p>
          </table:table-cell>
          <table:table-cell table:style-name="ce8" office:value-type="float" office:value="4136">
            <text:p>4136</text:p>
          </table:table-cell>
          <table:table-cell table:style-name="ce9" office:value-type="string">
            <text:p>2026-03-16 09:48:25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83.XXX.XXX.1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</text:p>
          </table:table-cell>
          <table:table-cell table:style-name="ce9" office:value-type="string">
            <text:p>Kebene Plus 20 tabl</text:p>
          </table:table-cell>
          <table:table-cell table:style-name="ce8" office:value-type="float" office:value="17015">
            <text:p>17015</text:p>
          </table:table-cell>
          <table:table-cell table:style-name="ce9" office:value-type="string">
            <text:p>2026-03-16 09:49:46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46.XXX.XXX.6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moczowy i płciowy</text:p>
          </table:table-cell>
          <table:table-cell table:style-name="ce9" office:value-type="string">
            <text:p>Gynoxin Uno 0,6G 1kaps.</text:p>
          </table:table-cell>
          <table:table-cell table:style-name="ce8" office:value-type="float" office:value="10753">
            <text:p>10753</text:p>
          </table:table-cell>
          <table:table-cell table:style-name="ce9" office:value-type="string">
            <text:p>2026-03-16 09:50:32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31.XXX.XXX.1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UPSARIN C, 20 tabletek musujących</text:p>
          </table:table-cell>
          <table:table-cell table:style-name="ce8" office:value-type="float" office:value="6364">
            <text:p>6364</text:p>
          </table:table-cell>
          <table:table-cell table:style-name="ce9" office:value-type="string">
            <text:p>2026-03-16 09:50:50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18X.XXX.XXX.2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Zioła</text:p>
          </table:table-cell>
          <table:table-cell table:style-name="ce9" office:value-type="string">
            <text:p>Zioła Mnicha Na odchudzanie 20tbx2g</text:p>
          </table:table-cell>
          <table:table-cell table:style-name="ce8" office:value-type="float" office:value="18545">
            <text:p>18545</text:p>
          </table:table-cell>
          <table:table-cell table:style-name="ce9" office:value-type="string">
            <text:p>2026-03-16 09:54:21</text:p>
          </table:table-cell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9" office:value-type="string">
            <text:p>31.XXX.XXX.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Opatrunki</text:p>
          </table:table-cell>
          <table:table-cell table:style-name="ce9" office:value-type="string">
            <text:p>Hartmann Atrauman Ag opatrunek z maścią 5cm x 5cm 1szt.</text:p>
          </table:table-cell>
          <table:table-cell table:style-name="ce8" office:value-type="float" office:value="7724">
            <text:p>7724</text:p>
          </table:table-cell>
          <table:table-cell table:style-name="ce9" office:value-type="string">
            <text:p>2026-03-16 09:55:26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37.XXX.XXX.3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ozostałe wyposażenie apteczek</text:p>
          </table:table-cell>
          <table:table-cell table:style-name="ce9" office:value-type="string">
            <text:p>Tecweld Icemix sztuczny lód w aerozolu 400ml</text:p>
          </table:table-cell>
          <table:table-cell table:style-name="ce8" office:value-type="float" office:value="4136">
            <text:p>4136</text:p>
          </table:table-cell>
          <table:table-cell table:style-name="ce9" office:value-type="string">
            <text:p>2026-03-16 09:56:25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18X.XXX.XXX.3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ozostałe artykuły medyczne i rehabilitacyjne</text:p>
          </table:table-cell>
          <table:table-cell table:style-name="ce9" office:value-type="string">
            <text:p>Kej Gruszka z kanką nr 9</text:p>
          </table:table-cell>
          <table:table-cell table:style-name="ce8" office:value-type="float" office:value="16885">
            <text:p>16885</text:p>
          </table:table-cell>
          <table:table-cell table:style-name="ce9" office:value-type="string">
            <text:p>2026-03-16 10:02:26</text:p>
          </table:table-cell>
          <table:table-cell table:style-name="ce10" office:value-type="currency" office:currency="PLN" office:value="0.92">
            <text:p>0,92 zł</text:p>
          </table:table-cell>
          <table:table-cell table:style-name="ce8"/>
          <table:table-cell table:style-name="ce10" office:value-type="currency" office:currency="PLN" office:value="0.92">
            <text:p>0,92 zł</text:p>
          </table:table-cell>
          <table:table-cell table:style-name="ce8"/>
          <table:table-cell table:style-name="ce9" office:value-type="string">
            <text:p>88.XXX.XXX.1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ciwbólowe</text:p>
          </table:table-cell>
          <table:table-cell table:style-name="ce9" office:value-type="string">
            <text:p>Dexak SL 25mg granulat 20 saszetek</text:p>
          </table:table-cell>
          <table:table-cell table:style-name="ce8" office:value-type="float" office:value="16603">
            <text:p>16603</text:p>
          </table:table-cell>
          <table:table-cell table:style-name="ce9" office:value-type="string">
            <text:p>2026-03-16 10:03:02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83.XXX.XXX.9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Samoopalacze</text:p>
          </table:table-cell>
          <table:table-cell table:style-name="ce9" office:value-type="string">
            <text:p>CAUDALIE Samoopalające krople brązujące 15 ml</text:p>
          </table:table-cell>
          <table:table-cell table:style-name="ce8" office:value-type="float" office:value="31976">
            <text:p>31976</text:p>
          </table:table-cell>
          <table:table-cell table:style-name="ce9" office:value-type="string">
            <text:p>2026-03-16 10:04:03</text:p>
          </table:table-cell>
          <table:table-cell table:style-name="ce10" office:value-type="currency" office:currency="PLN" office:value="0.81">
            <text:p>0,81 zł</text:p>
          </table:table-cell>
          <table:table-cell table:style-name="ce8"/>
          <table:table-cell table:style-name="ce10" office:value-type="currency" office:currency="PLN" office:value="0.81">
            <text:p>0,81 zł</text:p>
          </table:table-cell>
          <table:table-cell table:style-name="ce8"/>
          <table:table-cell table:style-name="ce9" office:value-type="string">
            <text:p>10X.XXX.XXX.7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Alergia</text:p>
          </table:table-cell>
          <table:table-cell table:style-name="ce9" office:value-type="string">
            <text:p>Polcrom Krople do oczu 10ml 2x5ml</text:p>
          </table:table-cell>
          <table:table-cell table:style-name="ce8" office:value-type="float" office:value="6243">
            <text:p>6243</text:p>
          </table:table-cell>
          <table:table-cell table:style-name="ce9" office:value-type="string">
            <text:p>2026-03-16 10:06:55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21X.XXX.XXX.X2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Alergia</text:p>
          </table:table-cell>
          <table:table-cell table:style-name="ce9" office:value-type="string">
            <text:p>Polcrom Krople do oczu 10ml 2x5ml</text:p>
          </table:table-cell>
          <table:table-cell table:style-name="ce8" office:value-type="float" office:value="6243">
            <text:p>6243</text:p>
          </table:table-cell>
          <table:table-cell table:style-name="ce9" office:value-type="string">
            <text:p>2026-03-16 10:06:56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66.XXX.XXX.6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Oscillococcinum na przeziębienie i grypę 30 dawek x 1 g</text:p>
          </table:table-cell>
          <table:table-cell table:style-name="ce8" office:value-type="float" office:value="4856">
            <text:p>4856</text:p>
          </table:table-cell>
          <table:table-cell table:style-name="ce9" office:value-type="string">
            <text:p>2026-03-16 10:11:35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21X.XXX.XXX.X5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moczowy i płciowy</text:p>
          </table:table-cell>
          <table:table-cell table:style-name="ce9" office:value-type="string">
            <text:p>Furaginum MAX 100 mg 30 tab.</text:p>
          </table:table-cell>
          <table:table-cell table:style-name="ce8" office:value-type="float" office:value="19673">
            <text:p>19673</text:p>
          </table:table-cell>
          <table:table-cell table:style-name="ce9" office:value-type="string">
            <text:p>2026-03-16 10:12:55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31.XXX.XXX.X4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ciwbólowe</text:p>
          </table:table-cell>
          <table:table-cell table:style-name="ce9" office:value-type="string">
            <text:p>Dexak SL 25mg granulat 10 saszetek</text:p>
          </table:table-cell>
          <table:table-cell table:style-name="ce8" office:value-type="float" office:value="15153">
            <text:p>15153</text:p>
          </table:table-cell>
          <table:table-cell table:style-name="ce9" office:value-type="string">
            <text:p>2026-03-16 10:13:40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83.XXX.XXX.X0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Stawy, mięśnie i kości</text:p>
          </table:table-cell>
          <table:table-cell table:style-name="ce9" office:value-type="string">
            <text:p>NordFarm Glukozamina 500 Plus 90tabl.</text:p>
          </table:table-cell>
          <table:table-cell table:style-name="ce8" office:value-type="float" office:value="4048">
            <text:p>4048</text:p>
          </table:table-cell>
          <table:table-cell table:style-name="ce9" office:value-type="string">
            <text:p>2026-03-16 10:17:27</text:p>
          </table:table-cell>
          <table:table-cell table:style-name="ce10" office:value-type="currency" office:currency="PLN" office:value="0.83">
            <text:p>0,83 zł</text:p>
          </table:table-cell>
          <table:table-cell table:style-name="ce8"/>
          <table:table-cell table:style-name="ce10" office:value-type="currency" office:currency="PLN" office:value="0.83">
            <text:p>0,83 zł</text:p>
          </table:table-cell>
          <table:table-cell table:style-name="ce8"/>
          <table:table-cell table:style-name="ce9" office:value-type="string">
            <text:p>37.XXX.XXX.2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 i trawienie</text:p>
          </table:table-cell>
          <table:table-cell table:style-name="ce9" office:value-type="string">
            <text:p>Noris Pharma Enteroflor 20kaps.</text:p>
          </table:table-cell>
          <table:table-cell table:style-name="ce8" office:value-type="float" office:value="32275">
            <text:p>32275</text:p>
          </table:table-cell>
          <table:table-cell table:style-name="ce9" office:value-type="string">
            <text:p>2026-03-16 10:17:50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95.XXX.XXX.X0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Stawy, mięśnie i kości</text:p>
          </table:table-cell>
          <table:table-cell table:style-name="ce9" office:value-type="string">
            <text:p>NordFarm Glukozamina 500 Plus 90tabl.</text:p>
          </table:table-cell>
          <table:table-cell table:style-name="ce8" office:value-type="float" office:value="4048">
            <text:p>4048</text:p>
          </table:table-cell>
          <table:table-cell table:style-name="ce9" office:value-type="string">
            <text:p>2026-03-16 10:19:06</text:p>
          </table:table-cell>
          <table:table-cell table:style-name="ce10" office:value-type="currency" office:currency="PLN" office:value="0.83">
            <text:p>0,83 zł</text:p>
          </table:table-cell>
          <table:table-cell table:style-name="ce8"/>
          <table:table-cell table:style-name="ce10" office:value-type="currency" office:currency="PLN" office:value="0.83">
            <text:p>0,83 zł</text:p>
          </table:table-cell>
          <table:table-cell table:style-name="ce8"/>
          <table:table-cell table:style-name="ce9" office:value-type="string">
            <text:p>37.XXX.XXX.2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</text:p>
          </table:table-cell>
          <table:table-cell table:style-name="ce9" office:value-type="string">
            <text:p>Dulcobis Lek Na Zaparcia 5mg 40tabl.</text:p>
          </table:table-cell>
          <table:table-cell table:style-name="ce8" office:value-type="float" office:value="10698">
            <text:p>10698</text:p>
          </table:table-cell>
          <table:table-cell table:style-name="ce9" office:value-type="string">
            <text:p>2026-03-16 10:20:11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19X.XXX.XXX.1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włosów</text:p>
          </table:table-cell>
          <table:table-cell table:style-name="ce9" office:value-type="string">
            <text:p>Amaderm Szampon Przeciwłupieżowy 150ml</text:p>
          </table:table-cell>
          <table:table-cell table:style-name="ce8" office:value-type="float" office:value="13949">
            <text:p>13949</text:p>
          </table:table-cell>
          <table:table-cell table:style-name="ce9" office:value-type="string">
            <text:p>2026-03-16 10:20:17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14X.XXX.XXX.2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Jama ustna</text:p>
          </table:table-cell>
          <table:table-cell table:style-name="ce9" office:value-type="string">
            <text:p>Urgo Opryszczka 3ml</text:p>
          </table:table-cell>
          <table:table-cell table:style-name="ce8" office:value-type="float" office:value="8304">
            <text:p>8304</text:p>
          </table:table-cell>
          <table:table-cell table:style-name="ce9" office:value-type="string">
            <text:p>2026-03-16 10:20:39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37.XXX.XXX.X3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Avene Sunsimed Ka Bardzo Wysoka Ochrona 80ml</text:p>
          </table:table-cell>
          <table:table-cell table:style-name="ce8" office:value-type="float" office:value="28241">
            <text:p>28241</text:p>
          </table:table-cell>
          <table:table-cell table:style-name="ce9" office:value-type="string">
            <text:p>2026-03-16 10:22:11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18X.XXX.XXX.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Stawy, mięśnie i kości</text:p>
          </table:table-cell>
          <table:table-cell table:style-name="ce9" office:value-type="string">
            <text:p>NordFarm Glukozamina 500 Plus 90tabl.</text:p>
          </table:table-cell>
          <table:table-cell table:style-name="ce8" office:value-type="float" office:value="4048">
            <text:p>4048</text:p>
          </table:table-cell>
          <table:table-cell table:style-name="ce9" office:value-type="string">
            <text:p>2026-03-16 10:23:11</text:p>
          </table:table-cell>
          <table:table-cell table:style-name="ce10" office:value-type="currency" office:currency="PLN" office:value="0.83">
            <text:p>0,83 zł</text:p>
          </table:table-cell>
          <table:table-cell table:style-name="ce8"/>
          <table:table-cell table:style-name="ce10" office:value-type="currency" office:currency="PLN" office:value="0.83">
            <text:p>0,83 zł</text:p>
          </table:table-cell>
          <table:table-cell table:style-name="ce8"/>
          <table:table-cell table:style-name="ce9" office:value-type="string">
            <text:p>37.XXX.XXX.2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ciwbólowe</text:p>
          </table:table-cell>
          <table:table-cell table:style-name="ce9" office:value-type="string">
            <text:p>Dexak SL 25mg granulat 10 saszetek</text:p>
          </table:table-cell>
          <table:table-cell table:style-name="ce8" office:value-type="float" office:value="15153">
            <text:p>15153</text:p>
          </table:table-cell>
          <table:table-cell table:style-name="ce9" office:value-type="string">
            <text:p>2026-03-16 10:25:43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83.XXX.XXX.X0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Stawy, mięśnie i kości</text:p>
          </table:table-cell>
          <table:table-cell table:style-name="ce9" office:value-type="string">
            <text:p>NordFarm Glukozamina 500 Plus 90tabl.</text:p>
          </table:table-cell>
          <table:table-cell table:style-name="ce8" office:value-type="float" office:value="4048">
            <text:p>4048</text:p>
          </table:table-cell>
          <table:table-cell table:style-name="ce9" office:value-type="string">
            <text:p>2026-03-16 10:26:06</text:p>
          </table:table-cell>
          <table:table-cell table:style-name="ce10" office:value-type="currency" office:currency="PLN" office:value="0.83">
            <text:p>0,83 zł</text:p>
          </table:table-cell>
          <table:table-cell table:style-name="ce8"/>
          <table:table-cell table:style-name="ce10" office:value-type="currency" office:currency="PLN" office:value="0.83">
            <text:p>0,83 zł</text:p>
          </table:table-cell>
          <table:table-cell table:style-name="ce8"/>
          <table:table-cell table:style-name="ce9" office:value-type="string">
            <text:p>37.XXX.XXX.2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Otrivin Menthol 1mg/ml Aerozol do nosa 10 ml</text:p>
          </table:table-cell>
          <table:table-cell table:style-name="ce8" office:value-type="float" office:value="14886">
            <text:p>14886</text:p>
          </table:table-cell>
          <table:table-cell table:style-name="ce9" office:value-type="string">
            <text:p>2026-03-16 10:26:20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21X.XXX.XXX.X3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Serce i układ krążenia</text:p>
          </table:table-cell>
          <table:table-cell table:style-name="ce9" office:value-type="string">
            <text:p>Venoruton Gel 40 g</text:p>
          </table:table-cell>
          <table:table-cell table:style-name="ce8" office:value-type="float" office:value="11789">
            <text:p>11789</text:p>
          </table:table-cell>
          <table:table-cell table:style-name="ce9" office:value-type="string">
            <text:p>2026-03-16 10:26:50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21X.XXX.XXX.3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</text:p>
          </table:table-cell>
          <table:table-cell table:style-name="ce9" office:value-type="string">
            <text:p>Inversion Femme Complex 90kaps.</text:p>
          </table:table-cell>
          <table:table-cell table:style-name="ce8" office:value-type="float" office:value="12016">
            <text:p>12016</text:p>
          </table:table-cell>
          <table:table-cell table:style-name="ce9" office:value-type="string">
            <text:p>2026-03-16 10:27:51</text:p>
          </table:table-cell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9" office:value-type="string">
            <text:p>31.XXX.XXX.X3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</text:p>
          </table:table-cell>
          <table:table-cell table:style-name="ce9" office:value-type="string">
            <text:p>Inversion Femme Complex 90kaps.</text:p>
          </table:table-cell>
          <table:table-cell table:style-name="ce8" office:value-type="float" office:value="12016">
            <text:p>12016</text:p>
          </table:table-cell>
          <table:table-cell table:style-name="ce9" office:value-type="string">
            <text:p>2026-03-16 10:29:27</text:p>
          </table:table-cell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9" office:value-type="string">
            <text:p>31.XXX.XXX.X3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Bioderma Atoderm Intensive Żel Oczyszczający I Natłuszczający 1000ml</text:p>
          </table:table-cell>
          <table:table-cell table:style-name="ce8" office:value-type="float" office:value="21024">
            <text:p>21024</text:p>
          </table:table-cell>
          <table:table-cell table:style-name="ce9" office:value-type="string">
            <text:p>2026-03-16 10:30:29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37.XXX.XXX.X3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ozostałe artykuły medyczne i rehabilitacyjne</text:p>
          </table:table-cell>
          <table:table-cell table:style-name="ce9" office:value-type="string">
            <text:p>Anty Kleszcz Przyrząd Do Usuwania Kleszczy 1szt.</text:p>
          </table:table-cell>
          <table:table-cell table:style-name="ce8" office:value-type="float" office:value="13664">
            <text:p>13664</text:p>
          </table:table-cell>
          <table:table-cell table:style-name="ce9" office:value-type="string">
            <text:p>2026-03-16 10:31:33</text:p>
          </table:table-cell>
          <table:table-cell table:style-name="ce10" office:value-type="currency" office:currency="PLN" office:value="0.92">
            <text:p>0,92 zł</text:p>
          </table:table-cell>
          <table:table-cell table:style-name="ce8"/>
          <table:table-cell table:style-name="ce10" office:value-type="currency" office:currency="PLN" office:value="0.92">
            <text:p>0,92 zł</text:p>
          </table:table-cell>
          <table:table-cell table:style-name="ce8"/>
          <table:table-cell table:style-name="ce9" office:value-type="string">
            <text:p>5.XXX.XXX.6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Stawy, mięśnie i kości</text:p>
          </table:table-cell>
          <table:table-cell table:style-name="ce9" office:value-type="string">
            <text:p>NordFarm Glukozamina 500 Plus 90tabl.</text:p>
          </table:table-cell>
          <table:table-cell table:style-name="ce8" office:value-type="float" office:value="4048">
            <text:p>4048</text:p>
          </table:table-cell>
          <table:table-cell table:style-name="ce9" office:value-type="string">
            <text:p>2026-03-16 10:33:10</text:p>
          </table:table-cell>
          <table:table-cell table:style-name="ce10" office:value-type="currency" office:currency="PLN" office:value="0.83">
            <text:p>0,83 zł</text:p>
          </table:table-cell>
          <table:table-cell table:style-name="ce8"/>
          <table:table-cell table:style-name="ce10" office:value-type="currency" office:currency="PLN" office:value="0.83">
            <text:p>0,83 zł</text:p>
          </table:table-cell>
          <table:table-cell table:style-name="ce8"/>
          <table:table-cell table:style-name="ce9" office:value-type="string">
            <text:p>37.XXX.XXX.2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Oscillococcinum na przeziębienie i grypę 30 dawek x 1 g</text:p>
          </table:table-cell>
          <table:table-cell table:style-name="ce8" office:value-type="float" office:value="4856">
            <text:p>4856</text:p>
          </table:table-cell>
          <table:table-cell table:style-name="ce9" office:value-type="string">
            <text:p>2026-03-16 10:33:52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82.XXX.XXX.X9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ozostałe wyposażenie apteczek</text:p>
          </table:table-cell>
          <table:table-cell table:style-name="ce9" office:value-type="string">
            <text:p>Tecweld Icemix sztuczny lód w aerozolu 400ml</text:p>
          </table:table-cell>
          <table:table-cell table:style-name="ce8" office:value-type="float" office:value="4136">
            <text:p>4136</text:p>
          </table:table-cell>
          <table:table-cell table:style-name="ce9" office:value-type="string">
            <text:p>2026-03-16 10:33:56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17X.XXX.XXX.2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ęśnie, stawy i kości</text:p>
          </table:table-cell>
          <table:table-cell table:style-name="ce9" office:value-type="string">
            <text:p>Voltaren Emulgel 11,6mg/g żel 50g</text:p>
          </table:table-cell>
          <table:table-cell table:style-name="ce8" office:value-type="float" office:value="7178">
            <text:p>7178</text:p>
          </table:table-cell>
          <table:table-cell table:style-name="ce9" office:value-type="string">
            <text:p>2026-03-16 10:34:47</text:p>
          </table:table-cell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9" office:value-type="string">
            <text:p>18X.XXX.XXX.6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</text:p>
          </table:table-cell>
          <table:table-cell table:style-name="ce9" office:value-type="string">
            <text:p>Inversion Femme Complex 90kaps.</text:p>
          </table:table-cell>
          <table:table-cell table:style-name="ce8" office:value-type="float" office:value="12016">
            <text:p>12016</text:p>
          </table:table-cell>
          <table:table-cell table:style-name="ce9" office:value-type="string">
            <text:p>2026-03-16 10:38:57</text:p>
          </table:table-cell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9" office:value-type="string">
            <text:p>46.XXX.XXX.X3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ciała</text:p>
          </table:table-cell>
          <table:table-cell table:style-name="ce9" office:value-type="string">
            <text:p>Emolium Dermocare emulsja do kąpieli 400ml</text:p>
          </table:table-cell>
          <table:table-cell table:style-name="ce8" office:value-type="float" office:value="326">
            <text:p>326</text:p>
          </table:table-cell>
          <table:table-cell table:style-name="ce9" office:value-type="string">
            <text:p>2026-03-16 10:39:52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15X.XXX.XXX.8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nerały i witaminy</text:p>
          </table:table-cell>
          <table:table-cell table:style-name="ce9" office:value-type="string">
            <text:p>Sufrin 60tabl.</text:p>
          </table:table-cell>
          <table:table-cell table:style-name="ce8" office:value-type="float" office:value="5345">
            <text:p>5345</text:p>
          </table:table-cell>
          <table:table-cell table:style-name="ce9" office:value-type="string">
            <text:p>2026-03-16 10:42:24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37.XXX.XXX.X1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Alergia</text:p>
          </table:table-cell>
          <table:table-cell table:style-name="ce9" office:value-type="string">
            <text:p>Zatoxin Katar I Alergia Spray Do Nosa 30Ml</text:p>
          </table:table-cell>
          <table:table-cell table:style-name="ce8" office:value-type="float" office:value="15846">
            <text:p>15846</text:p>
          </table:table-cell>
          <table:table-cell table:style-name="ce9" office:value-type="string">
            <text:p>2026-03-16 10:43:07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31.XXX.XXX.X5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</text:p>
          </table:table-cell>
          <table:table-cell table:style-name="ce9" office:value-type="string">
            <text:p>Alugastrin 40 tabletek</text:p>
          </table:table-cell>
          <table:table-cell table:style-name="ce8" office:value-type="float" office:value="5864">
            <text:p>5864</text:p>
          </table:table-cell>
          <table:table-cell table:style-name="ce9" office:value-type="string">
            <text:p>2026-03-16 10:43:13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89.XXX.XXX.X1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</text:p>
          </table:table-cell>
          <table:table-cell table:style-name="ce9" office:value-type="string">
            <text:p>Alugastrin 40 tabletek</text:p>
          </table:table-cell>
          <table:table-cell table:style-name="ce8" office:value-type="float" office:value="5864">
            <text:p>5864</text:p>
          </table:table-cell>
          <table:table-cell table:style-name="ce9" office:value-type="string">
            <text:p>2026-03-16 10:43:34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89.XXX.XXX.X1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Wzrok i słuch</text:p>
          </table:table-cell>
          <table:table-cell table:style-name="ce9" office:value-type="string">
            <text:p>Blephasol Płyn Micelarny Do Wrażliwych Powiek 100ml</text:p>
          </table:table-cell>
          <table:table-cell table:style-name="ce8" office:value-type="float" office:value="3432">
            <text:p>3432</text:p>
          </table:table-cell>
          <table:table-cell table:style-name="ce9" office:value-type="string">
            <text:p>2026-03-16 10:43:36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77.XXX.XXX.1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Otrivin Menthol 1mg/ml Aerozol do nosa 10 ml</text:p>
          </table:table-cell>
          <table:table-cell table:style-name="ce8" office:value-type="float" office:value="14886">
            <text:p>14886</text:p>
          </table:table-cell>
          <table:table-cell table:style-name="ce9" office:value-type="string">
            <text:p>2026-03-16 10:45:52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18X.XXX.XXX.X6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</text:p>
          </table:table-cell>
          <table:table-cell table:style-name="ce9" office:value-type="string">
            <text:p>Rennie Antiacidum o smaku miętowym 48 tabletek do ssania</text:p>
          </table:table-cell>
          <table:table-cell table:style-name="ce8" office:value-type="float" office:value="15795">
            <text:p>15795</text:p>
          </table:table-cell>
          <table:table-cell table:style-name="ce9" office:value-type="string">
            <text:p>2026-03-16 10:45:53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89.XXX.XXX.X1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zieci i niemowlęta</text:p>
          </table:table-cell>
          <table:table-cell table:style-name="ce9" office:value-type="string">
            <text:p>Reckitt Benckiser Nurofen Dla Dzieci Forte Trus 150ml</text:p>
          </table:table-cell>
          <table:table-cell table:style-name="ce8" office:value-type="float" office:value="10768">
            <text:p>10768</text:p>
          </table:table-cell>
          <table:table-cell table:style-name="ce9" office:value-type="string">
            <text:p>2026-03-16 10:47:12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18X.XXX.XXX.X8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Akcesoria medycyny naturalnej</text:p>
          </table:table-cell>
          <table:table-cell table:style-name="ce9" office:value-type="string">
            <text:p>MED SYSTEM Pompka do baniek bezogniowych 1 szt.</text:p>
          </table:table-cell>
          <table:table-cell table:style-name="ce8" office:value-type="float" office:value="17842">
            <text:p>17842</text:p>
          </table:table-cell>
          <table:table-cell table:style-name="ce9" office:value-type="string">
            <text:p>2026-03-16 10:48:31</text:p>
          </table:table-cell>
          <table:table-cell table:style-name="ce10" office:value-type="currency" office:currency="PLN" office:value="0.86">
            <text:p>0,86 zł</text:p>
          </table:table-cell>
          <table:table-cell table:style-name="ce8"/>
          <table:table-cell table:style-name="ce10" office:value-type="currency" office:currency="PLN" office:value="0.86">
            <text:p>0,86 zł</text:p>
          </table:table-cell>
          <table:table-cell table:style-name="ce8"/>
          <table:table-cell table:style-name="ce9" office:value-type="string">
            <text:p>31.XXX.XXX.X8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Pielęgnacja protez</text:p>
          </table:table-cell>
          <table:table-cell table:style-name="ce9" office:value-type="string">
            <text:p>Dentbox pudełko na protezy zębowe</text:p>
          </table:table-cell>
          <table:table-cell table:style-name="ce8" office:value-type="float" office:value="13732">
            <text:p>13732</text:p>
          </table:table-cell>
          <table:table-cell table:style-name="ce9" office:value-type="string">
            <text:p>2026-03-16 10:51:17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37.XXX.XXX.7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Glukometry i akcesoria dla diabetyków</text:p>
          </table:table-cell>
          <table:table-cell table:style-name="ce9" office:value-type="string">
            <text:p>Accu-Chek Nakłuwacz FastClix + 6 lancetów</text:p>
          </table:table-cell>
          <table:table-cell table:style-name="ce8" office:value-type="float" office:value="8385">
            <text:p>8385</text:p>
          </table:table-cell>
          <table:table-cell table:style-name="ce9" office:value-type="string">
            <text:p>2026-03-16 10:52:31</text:p>
          </table:table-cell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9" office:value-type="string">
            <text:p>91.XXX.XXX.3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lastry, przylepce i taśmy opatrunkowe</text:p>
          </table:table-cell>
          <table:table-cell table:style-name="ce9" office:value-type="string">
            <text:p>Leukoplast Cuticell Paraffin Plaster Impregnowany Parafiną 5szt</text:p>
          </table:table-cell>
          <table:table-cell table:style-name="ce8" office:value-type="float" office:value="11751">
            <text:p>11751</text:p>
          </table:table-cell>
          <table:table-cell table:style-name="ce9" office:value-type="string">
            <text:p>2026-03-16 10:52:51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5.XXX.XXX.4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Otrivin Menthol 1mg/ml Aerozol do nosa 10 ml</text:p>
          </table:table-cell>
          <table:table-cell table:style-name="ce8" office:value-type="float" office:value="14886">
            <text:p>14886</text:p>
          </table:table-cell>
          <table:table-cell table:style-name="ce9" office:value-type="string">
            <text:p>2026-03-16 10:56:32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79.XXX.XXX.1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Dom i wnętrze</text:p>
          </table:table-cell>
          <table:table-cell table:style-name="ce9" office:value-type="string">
            <text:p>Olejki zapachowe</text:p>
          </table:table-cell>
          <table:table-cell table:style-name="ce9" office:value-type="string">
            <text:p>Profarm - Olejek Manuka 10 ml.</text:p>
          </table:table-cell>
          <table:table-cell table:style-name="ce8" office:value-type="float" office:value="11086">
            <text:p>11086</text:p>
          </table:table-cell>
          <table:table-cell table:style-name="ce9" office:value-type="string">
            <text:p>2026-03-16 10:58:34</text:p>
          </table:table-cell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9" office:value-type="string">
            <text:p>77.XXX.XXX.8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Kremy do twarzy</text:p>
          </table:table-cell>
          <table:table-cell table:style-name="ce9" office:value-type="string">
            <text:p>Krem Avena Ochronny Z Witaminą A Tuba Na Dzień I Noc 25g</text:p>
          </table:table-cell>
          <table:table-cell table:style-name="ce8" office:value-type="float" office:value="4274">
            <text:p>4274</text:p>
          </table:table-cell>
          <table:table-cell table:style-name="ce9" office:value-type="string">
            <text:p>2026-03-16 10:59:24</text:p>
          </table:table-cell>
          <table:table-cell table:style-name="ce10" office:value-type="currency" office:currency="PLN" office:value="1.02">
            <text:p>1,02 zł</text:p>
          </table:table-cell>
          <table:table-cell table:style-name="ce8"/>
          <table:table-cell table:style-name="ce10" office:value-type="currency" office:currency="PLN" office:value="1.02">
            <text:p>1,02 zł</text:p>
          </table:table-cell>
          <table:table-cell table:style-name="ce8"/>
          <table:table-cell table:style-name="ce9" office:value-type="string">
            <text:p>31.XXX.XXX.X1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ciała</text:p>
          </table:table-cell>
          <table:table-cell table:style-name="ce9" office:value-type="string">
            <text:p>CeraVe Regenerujący krem do rąk 50ml</text:p>
          </table:table-cell>
          <table:table-cell table:style-name="ce8" office:value-type="float" office:value="3515">
            <text:p>3515</text:p>
          </table:table-cell>
          <table:table-cell table:style-name="ce9" office:value-type="string">
            <text:p>2026-03-16 10:59:36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91.XXX.XXX.X3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Otrivin Menthol 1mg/ml Aerozol do nosa 10 ml</text:p>
          </table:table-cell>
          <table:table-cell table:style-name="ce8" office:value-type="float" office:value="14886">
            <text:p>14886</text:p>
          </table:table-cell>
          <table:table-cell table:style-name="ce9" office:value-type="string">
            <text:p>2026-03-16 11:04:09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37.XXX.XXX.5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łyny i żele do dezynfekcji ran</text:p>
          </table:table-cell>
          <table:table-cell table:style-name="ce9" office:value-type="string">
            <text:p>Kikgel Microdacyn Hydrogel Żel Do Dezynfekcji Ran 60G</text:p>
          </table:table-cell>
          <table:table-cell table:style-name="ce8" office:value-type="float" office:value="17309">
            <text:p>17309</text:p>
          </table:table-cell>
          <table:table-cell table:style-name="ce9" office:value-type="string">
            <text:p>2026-03-16 11:06:40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10X.XXX.XXX.X1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RatuŻel, 50ml</text:p>
          </table:table-cell>
          <table:table-cell table:style-name="ce8" office:value-type="float" office:value="14829">
            <text:p>14829</text:p>
          </table:table-cell>
          <table:table-cell table:style-name="ce9" office:value-type="string">
            <text:p>2026-03-16 11:11:25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37.XXX.XXX.1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ciwbólowe</text:p>
          </table:table-cell>
          <table:table-cell table:style-name="ce9" office:value-type="string">
            <text:p>Dexak SL 25mg granulat 20 saszetek</text:p>
          </table:table-cell>
          <table:table-cell table:style-name="ce8" office:value-type="float" office:value="16603">
            <text:p>16603</text:p>
          </table:table-cell>
          <table:table-cell table:style-name="ce9" office:value-type="string">
            <text:p>2026-03-16 11:12:32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37.XXX.XXX.7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</text:p>
          </table:table-cell>
          <table:table-cell table:style-name="ce9" office:value-type="string">
            <text:p>Proskin Lf 30szt.</text:p>
          </table:table-cell>
          <table:table-cell table:style-name="ce8" office:value-type="float" office:value="12932">
            <text:p>12932</text:p>
          </table:table-cell>
          <table:table-cell table:style-name="ce9" office:value-type="string">
            <text:p>2026-03-16 11:15:57</text:p>
          </table:table-cell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9" office:value-type="string">
            <text:p>19X.XXX.XXX.X5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Suplementy dla seniorów</text:p>
          </table:table-cell>
          <table:table-cell table:style-name="ce9" office:value-type="string">
            <text:p>VITAPRIM Senior 60 tabl.</text:p>
          </table:table-cell>
          <table:table-cell table:style-name="ce8" office:value-type="float" office:value="32314">
            <text:p>32314</text:p>
          </table:table-cell>
          <table:table-cell table:style-name="ce9" office:value-type="string">
            <text:p>2026-03-16 11:18:17</text:p>
          </table:table-cell>
          <table:table-cell table:style-name="ce10" office:value-type="currency" office:currency="PLN" office:value="0.69">
            <text:p>0,69 zł</text:p>
          </table:table-cell>
          <table:table-cell table:style-name="ce8"/>
          <table:table-cell table:style-name="ce10" office:value-type="currency" office:currency="PLN" office:value="0.69">
            <text:p>0,69 zł</text:p>
          </table:table-cell>
          <table:table-cell table:style-name="ce8"/>
          <table:table-cell table:style-name="ce9" office:value-type="string">
            <text:p>83.XXX.XXX.3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Suplementy dla seniorów</text:p>
          </table:table-cell>
          <table:table-cell table:style-name="ce9" office:value-type="string">
            <text:p>VITAPRIM Senior 60 tabl.</text:p>
          </table:table-cell>
          <table:table-cell table:style-name="ce8" office:value-type="float" office:value="32314">
            <text:p>32314</text:p>
          </table:table-cell>
          <table:table-cell table:style-name="ce9" office:value-type="string">
            <text:p>2026-03-16 11:19:23</text:p>
          </table:table-cell>
          <table:table-cell table:style-name="ce10" office:value-type="currency" office:currency="PLN" office:value="0.69">
            <text:p>0,69 zł</text:p>
          </table:table-cell>
          <table:table-cell table:style-name="ce8"/>
          <table:table-cell table:style-name="ce10" office:value-type="currency" office:currency="PLN" office:value="0.69">
            <text:p>0,69 zł</text:p>
          </table:table-cell>
          <table:table-cell table:style-name="ce8"/>
          <table:table-cell table:style-name="ce9" office:value-type="string">
            <text:p>83.XXX.XXX.3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Biuro i firma</text:p>
          </table:table-cell>
          <table:table-cell table:style-name="ce9" office:value-type="string">
            <text:p>Wyposażenie medyczne</text:p>
          </table:table-cell>
          <table:table-cell table:style-name="ce9" office:value-type="string">
            <text:p>Romed Igła ROMED 0,5 x 16mm 100 szt.</text:p>
          </table:table-cell>
          <table:table-cell table:style-name="ce8" office:value-type="float" office:value="15208">
            <text:p>15208</text:p>
          </table:table-cell>
          <table:table-cell table:style-name="ce9" office:value-type="string">
            <text:p>2026-03-16 11:19:56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18X.XXX.XXX.9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Podkłady do twarzy</text:p>
          </table:table-cell>
          <table:table-cell table:style-name="ce9" office:value-type="string">
            <text:p>Caudalie Vinopure Fluid matująco nawilżający 60 ml</text:p>
          </table:table-cell>
          <table:table-cell table:style-name="ce8" office:value-type="float" office:value="32413">
            <text:p>32413</text:p>
          </table:table-cell>
          <table:table-cell table:style-name="ce9" office:value-type="string">
            <text:p>2026-03-16 11:21:06</text:p>
          </table:table-cell>
          <table:table-cell table:style-name="ce10" office:value-type="currency" office:currency="PLN" office:value="0.92">
            <text:p>0,92 zł</text:p>
          </table:table-cell>
          <table:table-cell table:style-name="ce8"/>
          <table:table-cell table:style-name="ce10" office:value-type="currency" office:currency="PLN" office:value="0.92">
            <text:p>0,92 zł</text:p>
          </table:table-cell>
          <table:table-cell table:style-name="ce8"/>
          <table:table-cell table:style-name="ce9" office:value-type="string">
            <text:p>31.XXX.XXX.X3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nerały i witaminy</text:p>
          </table:table-cell>
          <table:table-cell table:style-name="ce9" office:value-type="string">
            <text:p>BODYMAX PLUS Multiwitamina Odporność Energia 200 tab.</text:p>
          </table:table-cell>
          <table:table-cell table:style-name="ce8" office:value-type="float" office:value="16252">
            <text:p>16252</text:p>
          </table:table-cell>
          <table:table-cell table:style-name="ce9" office:value-type="string">
            <text:p>2026-03-16 11:21:22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84.XXX.XXX.4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Glukometry i akcesoria dla diabetyków</text:p>
          </table:table-cell>
          <table:table-cell table:style-name="ce9" office:value-type="string">
            <text:p>Genexo Ixell</text:p>
          </table:table-cell>
          <table:table-cell table:style-name="ce8" office:value-type="float" office:value="23286">
            <text:p>23286</text:p>
          </table:table-cell>
          <table:table-cell table:style-name="ce9" office:value-type="string">
            <text:p>2026-03-16 11:21:28</text:p>
          </table:table-cell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9" office:value-type="string">
            <text:p>18X.XXX.XXX.9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</text:p>
          </table:table-cell>
          <table:table-cell table:style-name="ce9" office:value-type="string">
            <text:p>Inversion Femme Complex 90kaps.</text:p>
          </table:table-cell>
          <table:table-cell table:style-name="ce8" office:value-type="float" office:value="12016">
            <text:p>12016</text:p>
          </table:table-cell>
          <table:table-cell table:style-name="ce9" office:value-type="string">
            <text:p>2026-03-16 11:22:18</text:p>
          </table:table-cell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9" office:value-type="string">
            <text:p>31.XXX.XXX.X9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Zioła</text:p>
          </table:table-cell>
          <table:table-cell table:style-name="ce9" office:value-type="string">
            <text:p>Zioła Mnicha Na odchudzanie 20tbx2g</text:p>
          </table:table-cell>
          <table:table-cell table:style-name="ce8" office:value-type="float" office:value="18545">
            <text:p>18545</text:p>
          </table:table-cell>
          <table:table-cell table:style-name="ce9" office:value-type="string">
            <text:p>2026-03-16 11:22:22</text:p>
          </table:table-cell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9" office:value-type="string">
            <text:p>89.XXX.XXX.X8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Akcesoria do inhalatorów</text:p>
          </table:table-cell>
          <table:table-cell table:style-name="ce9" office:value-type="string">
            <text:p>Komora inhalacyjna AeroChamber Plus Flow</text:p>
          </table:table-cell>
          <table:table-cell table:style-name="ce8" office:value-type="float" office:value="11457">
            <text:p>11457</text:p>
          </table:table-cell>
          <table:table-cell table:style-name="ce9" office:value-type="string">
            <text:p>2026-03-16 11:23:34</text:p>
          </table:table-cell>
          <table:table-cell table:style-name="ce10" office:value-type="currency" office:currency="PLN" office:value="0.76">
            <text:p>0,76 zł</text:p>
          </table:table-cell>
          <table:table-cell table:style-name="ce8"/>
          <table:table-cell table:style-name="ce10" office:value-type="currency" office:currency="PLN" office:value="0.76">
            <text:p>0,76 zł</text:p>
          </table:table-cell>
          <table:table-cell table:style-name="ce8"/>
          <table:table-cell table:style-name="ce9" office:value-type="string">
            <text:p>83.XXX.XXX.3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Pozostałe kosmetyki do pielęgnacji twarzy</text:p>
          </table:table-cell>
          <table:table-cell table:style-name="ce9" office:value-type="string">
            <text:p>GORVITA Puder rodzinny pielęgnacyjny 50ml</text:p>
          </table:table-cell>
          <table:table-cell table:style-name="ce8" office:value-type="float" office:value="17905">
            <text:p>17905</text:p>
          </table:table-cell>
          <table:table-cell table:style-name="ce9" office:value-type="string">
            <text:p>2026-03-16 11:24:48</text:p>
          </table:table-cell>
          <table:table-cell table:style-name="ce10" office:value-type="currency" office:currency="PLN" office:value="0.76">
            <text:p>0,76 zł</text:p>
          </table:table-cell>
          <table:table-cell table:style-name="ce8"/>
          <table:table-cell table:style-name="ce10" office:value-type="currency" office:currency="PLN" office:value="0.76">
            <text:p>0,76 zł</text:p>
          </table:table-cell>
          <table:table-cell table:style-name="ce8"/>
          <table:table-cell table:style-name="ce9" office:value-type="string">
            <text:p>19X.XXX.XXX.X0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</text:p>
          </table:table-cell>
          <table:table-cell table:style-name="ce9" office:value-type="string">
            <text:p>Inversion Femme Complex 90kaps.</text:p>
          </table:table-cell>
          <table:table-cell table:style-name="ce8" office:value-type="float" office:value="12016">
            <text:p>12016</text:p>
          </table:table-cell>
          <table:table-cell table:style-name="ce9" office:value-type="string">
            <text:p>2026-03-16 11:26:11</text:p>
          </table:table-cell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9" office:value-type="string">
            <text:p>31.XXX.XXX.X9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Allergika, Krem do twarzy MED, 50 ml</text:p>
          </table:table-cell>
          <table:table-cell table:style-name="ce8" office:value-type="float" office:value="11733">
            <text:p>11733</text:p>
          </table:table-cell>
          <table:table-cell table:style-name="ce9" office:value-type="string">
            <text:p>2026-03-16 11:27:58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91.XXX.XXX.X9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Serce i układ krążenia</text:p>
          </table:table-cell>
          <table:table-cell table:style-name="ce9" office:value-type="string">
            <text:p>Tanakan 90 tabletek</text:p>
          </table:table-cell>
          <table:table-cell table:style-name="ce8" office:value-type="float" office:value="6611">
            <text:p>6611</text:p>
          </table:table-cell>
          <table:table-cell table:style-name="ce9" office:value-type="string">
            <text:p>2026-03-16 11:29:45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18X.XXX.XXX.7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Dermedic Sunbrella Fotostabilny Krem Ochronny Do Twarzy SPF50+ Skóra tłusta i mieszana 50 g</text:p>
          </table:table-cell>
          <table:table-cell table:style-name="ce8" office:value-type="float" office:value="3703">
            <text:p>3703</text:p>
          </table:table-cell>
          <table:table-cell table:style-name="ce9" office:value-type="string">
            <text:p>2026-03-16 11:30:04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77.XXX.XXX.2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odukty konopne</text:p>
          </table:table-cell>
          <table:table-cell table:style-name="ce9" office:value-type="string">
            <text:p>Pozytywne Konopie Maść Konopna Cbd 30ml</text:p>
          </table:table-cell>
          <table:table-cell table:style-name="ce8" office:value-type="float" office:value="32202">
            <text:p>32202</text:p>
          </table:table-cell>
          <table:table-cell table:style-name="ce9" office:value-type="string">
            <text:p>2026-03-16 11:30:06</text:p>
          </table:table-cell>
          <table:table-cell table:style-name="ce10" office:value-type="currency" office:currency="PLN" office:value="0.76">
            <text:p>0,76 zł</text:p>
          </table:table-cell>
          <table:table-cell table:style-name="ce8"/>
          <table:table-cell table:style-name="ce10" office:value-type="currency" office:currency="PLN" office:value="0.76">
            <text:p>0,76 zł</text:p>
          </table:table-cell>
          <table:table-cell table:style-name="ce8"/>
          <table:table-cell table:style-name="ce9" office:value-type="string">
            <text:p>89.XXX.XXX.X5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ęśnie, stawy i kości</text:p>
          </table:table-cell>
          <table:table-cell table:style-name="ce9" office:value-type="string">
            <text:p>Suplasyn 1-Shot 60 mg/6ml 1 ampułko-strzykawka</text:p>
          </table:table-cell>
          <table:table-cell table:style-name="ce8" office:value-type="float" office:value="26968">
            <text:p>26968</text:p>
          </table:table-cell>
          <table:table-cell table:style-name="ce9" office:value-type="string">
            <text:p>2026-03-16 11:32:48</text:p>
          </table:table-cell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9" office:value-type="string">
            <text:p>91.XXX.XXX.6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Oscillococcinum na przeziębienie i grypę 30 dawek x 1 g</text:p>
          </table:table-cell>
          <table:table-cell table:style-name="ce8" office:value-type="float" office:value="4856">
            <text:p>4856</text:p>
          </table:table-cell>
          <table:table-cell table:style-name="ce9" office:value-type="string">
            <text:p>2026-03-16 11:34:18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83.XXX.XXX.5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Samoopalacze</text:p>
          </table:table-cell>
          <table:table-cell table:style-name="ce9" office:value-type="string">
            <text:p>CAUDALIE Samoopalające krople brązujące 15 ml</text:p>
          </table:table-cell>
          <table:table-cell table:style-name="ce8" office:value-type="float" office:value="31976">
            <text:p>31976</text:p>
          </table:table-cell>
          <table:table-cell table:style-name="ce9" office:value-type="string">
            <text:p>2026-03-16 11:34:43</text:p>
          </table:table-cell>
          <table:table-cell table:style-name="ce10" office:value-type="currency" office:currency="PLN" office:value="0.81">
            <text:p>0,81 zł</text:p>
          </table:table-cell>
          <table:table-cell table:style-name="ce8"/>
          <table:table-cell table:style-name="ce10" office:value-type="currency" office:currency="PLN" office:value="0.81">
            <text:p>0,81 zł</text:p>
          </table:table-cell>
          <table:table-cell table:style-name="ce8"/>
          <table:table-cell table:style-name="ce9" office:value-type="string">
            <text:p>31.XXX.XXX.4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ęśnie, stawy i kości</text:p>
          </table:table-cell>
          <table:table-cell table:style-name="ce9" office:value-type="string">
            <text:p>KARPAL AKUT maść, 50ml</text:p>
          </table:table-cell>
          <table:table-cell table:style-name="ce8" office:value-type="float" office:value="17004">
            <text:p>17004</text:p>
          </table:table-cell>
          <table:table-cell table:style-name="ce9" office:value-type="string">
            <text:p>2026-03-16 11:35:38</text:p>
          </table:table-cell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9" office:value-type="string">
            <text:p>37.XXX.XXX.2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Clotrimazolum Krem przeciwgrzybiczy 10mg/g 20g</text:p>
          </table:table-cell>
          <table:table-cell table:style-name="ce8" office:value-type="float" office:value="5940">
            <text:p>5940</text:p>
          </table:table-cell>
          <table:table-cell table:style-name="ce9" office:value-type="string">
            <text:p>2026-03-16 11:36:17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89.XXX.XXX.X0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Hirudoid Żel na krwiaki i obrzęki oraz zapalenie żył 40 g</text:p>
          </table:table-cell>
          <table:table-cell table:style-name="ce8" office:value-type="float" office:value="19762">
            <text:p>19762</text:p>
          </table:table-cell>
          <table:table-cell table:style-name="ce9" office:value-type="string">
            <text:p>2026-03-16 11:39:04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89.XXX.XXX.X3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Zestawy dermokosmetyków</text:p>
          </table:table-cell>
          <table:table-cell table:style-name="ce9" office:value-type="string">
            <text:p>Caudalie Vinoperfect Zestaw Wiosenny - Serum Rozjaśniające, 30ml + Krem na Dzień, 15ml + Krem na Noc, 15ml</text:p>
          </table:table-cell>
          <table:table-cell table:style-name="ce8" office:value-type="float" office:value="36451">
            <text:p>36451</text:p>
          </table:table-cell>
          <table:table-cell table:style-name="ce9" office:value-type="string">
            <text:p>2026-03-16 11:39:13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46.XXX.XXX.X0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Glukometry i akcesoria dla diabetyków</text:p>
          </table:table-cell>
          <table:table-cell table:style-name="ce9" office:value-type="string">
            <text:p>Nakłuwacz AccuChek Softclix KIT + 25 lancetów</text:p>
          </table:table-cell>
          <table:table-cell table:style-name="ce8" office:value-type="float" office:value="13662">
            <text:p>13662</text:p>
          </table:table-cell>
          <table:table-cell table:style-name="ce9" office:value-type="string">
            <text:p>2026-03-16 11:40:20</text:p>
          </table:table-cell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9" office:value-type="string">
            <text:p>17X.XXX.XXX.5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Akcesoria do inhalatorów</text:p>
          </table:table-cell>
          <table:table-cell table:style-name="ce9" office:value-type="string">
            <text:p>Intec Medical Zestaw Akcesoriów Do Inhalatora Pro Intec Z Maską Dla Dzieci</text:p>
          </table:table-cell>
          <table:table-cell table:style-name="ce8" office:value-type="float" office:value="4164">
            <text:p>4164</text:p>
          </table:table-cell>
          <table:table-cell table:style-name="ce9" office:value-type="string">
            <text:p>2026-03-16 11:40:23</text:p>
          </table:table-cell>
          <table:table-cell table:style-name="ce10" office:value-type="currency" office:currency="PLN" office:value="0.76">
            <text:p>0,76 zł</text:p>
          </table:table-cell>
          <table:table-cell table:style-name="ce8"/>
          <table:table-cell table:style-name="ce10" office:value-type="currency" office:currency="PLN" office:value="0.76">
            <text:p>0,76 zł</text:p>
          </table:table-cell>
          <table:table-cell table:style-name="ce8"/>
          <table:table-cell table:style-name="ce9" office:value-type="string">
            <text:p>21X.XXX.XXX.X2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</text:p>
          </table:table-cell>
          <table:table-cell table:style-name="ce9" office:value-type="string">
            <text:p>Goprazol Max 0,02g 14 kaps.</text:p>
          </table:table-cell>
          <table:table-cell table:style-name="ce8" office:value-type="float" office:value="12494">
            <text:p>12494</text:p>
          </table:table-cell>
          <table:table-cell table:style-name="ce9" office:value-type="string">
            <text:p>2026-03-16 11:40:30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37.XXX.XXX.8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Glukometry i akcesoria dla diabetyków</text:p>
          </table:table-cell>
          <table:table-cell table:style-name="ce9" office:value-type="string">
            <text:p>Accu-Chek Nakłuwacz FastClix + 6 lancetów</text:p>
          </table:table-cell>
          <table:table-cell table:style-name="ce8" office:value-type="float" office:value="8385">
            <text:p>8385</text:p>
          </table:table-cell>
          <table:table-cell table:style-name="ce9" office:value-type="string">
            <text:p>2026-03-16 11:41:02</text:p>
          </table:table-cell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9" office:value-type="string">
            <text:p>17X.XXX.XXX.5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Samoopalacze</text:p>
          </table:table-cell>
          <table:table-cell table:style-name="ce9" office:value-type="string">
            <text:p>CAUDALIE Samoopalające krople brązujące 15 ml</text:p>
          </table:table-cell>
          <table:table-cell table:style-name="ce8" office:value-type="float" office:value="31976">
            <text:p>31976</text:p>
          </table:table-cell>
          <table:table-cell table:style-name="ce9" office:value-type="string">
            <text:p>2026-03-16 11:41:09</text:p>
          </table:table-cell>
          <table:table-cell table:style-name="ce10" office:value-type="currency" office:currency="PLN" office:value="0.81">
            <text:p>0,81 zł</text:p>
          </table:table-cell>
          <table:table-cell table:style-name="ce8"/>
          <table:table-cell table:style-name="ce10" office:value-type="currency" office:currency="PLN" office:value="0.81">
            <text:p>0,81 zł</text:p>
          </table:table-cell>
          <table:table-cell table:style-name="ce8"/>
          <table:table-cell table:style-name="ce9" office:value-type="string">
            <text:p>31.XXX.XXX.4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</text:p>
          </table:table-cell>
          <table:table-cell table:style-name="ce9" office:value-type="string">
            <text:p>Gelacet 120kaps.</text:p>
          </table:table-cell>
          <table:table-cell table:style-name="ce8" office:value-type="float" office:value="13430">
            <text:p>13430</text:p>
          </table:table-cell>
          <table:table-cell table:style-name="ce9" office:value-type="string">
            <text:p>2026-03-16 11:42:22</text:p>
          </table:table-cell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9" office:value-type="string">
            <text:p>5.XXX.XXX.X6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Glukometry i akcesoria dla diabetyków</text:p>
          </table:table-cell>
          <table:table-cell table:style-name="ce9" office:value-type="string">
            <text:p>Genexo Ixell</text:p>
          </table:table-cell>
          <table:table-cell table:style-name="ce8" office:value-type="float" office:value="23286">
            <text:p>23286</text:p>
          </table:table-cell>
          <table:table-cell table:style-name="ce9" office:value-type="string">
            <text:p>2026-03-16 11:42:51</text:p>
          </table:table-cell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9" office:value-type="string">
            <text:p>77.XXX.XXX.5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Fluimucil Forte 600mg 10tabl.</text:p>
          </table:table-cell>
          <table:table-cell table:style-name="ce8" office:value-type="float" office:value="11787">
            <text:p>11787</text:p>
          </table:table-cell>
          <table:table-cell table:style-name="ce9" office:value-type="string">
            <text:p>2026-03-16 11:48:50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89.XXX.XXX.X7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ęśnie, stawy i kości</text:p>
          </table:table-cell>
          <table:table-cell table:style-name="ce9" office:value-type="string">
            <text:p>Suplasyn 1-Shot 60 mg/6ml 1 ampułko-strzykawka</text:p>
          </table:table-cell>
          <table:table-cell table:style-name="ce8" office:value-type="float" office:value="26968">
            <text:p>26968</text:p>
          </table:table-cell>
          <table:table-cell table:style-name="ce9" office:value-type="string">
            <text:p>2026-03-16 11:49:16</text:p>
          </table:table-cell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9" office:value-type="string">
            <text:p>19X.XXX.XXX.4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Suplementy na odchudzanie</text:p>
          </table:table-cell>
          <table:table-cell table:style-name="ce9" office:value-type="string">
            <text:p>HYDROSLIMMER 30 tabl.</text:p>
          </table:table-cell>
          <table:table-cell table:style-name="ce8" office:value-type="float" office:value="32282">
            <text:p>32282</text:p>
          </table:table-cell>
          <table:table-cell table:style-name="ce9" office:value-type="string">
            <text:p>2026-03-16 11:49:55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15X.XXX.XXX.X4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łciowy i moczowy</text:p>
          </table:table-cell>
          <table:table-cell table:style-name="ce9" office:value-type="string">
            <text:p>UroLact doustny Probiotyk Urologiczny 400mg, 10 kaps.</text:p>
          </table:table-cell>
          <table:table-cell table:style-name="ce8" office:value-type="float" office:value="19043">
            <text:p>19043</text:p>
          </table:table-cell>
          <table:table-cell table:style-name="ce9" office:value-type="string">
            <text:p>2026-03-16 11:51:48</text:p>
          </table:table-cell>
          <table:table-cell table:style-name="ce10" office:value-type="currency" office:currency="PLN" office:value="0.75">
            <text:p>0,75 zł</text:p>
          </table:table-cell>
          <table:table-cell table:style-name="ce8"/>
          <table:table-cell table:style-name="ce10" office:value-type="currency" office:currency="PLN" office:value="0.75">
            <text:p>0,75 zł</text:p>
          </table:table-cell>
          <table:table-cell table:style-name="ce8"/>
          <table:table-cell table:style-name="ce9" office:value-type="string">
            <text:p>19X.XXX.XXX.X5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</text:p>
          </table:table-cell>
          <table:table-cell table:style-name="ce9" office:value-type="string">
            <text:p>Inversion Femme Complex 90kaps.</text:p>
          </table:table-cell>
          <table:table-cell table:style-name="ce8" office:value-type="float" office:value="12016">
            <text:p>12016</text:p>
          </table:table-cell>
          <table:table-cell table:style-name="ce9" office:value-type="string">
            <text:p>2026-03-16 11:51:53</text:p>
          </table:table-cell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9" office:value-type="string">
            <text:p>37.XXX.XXX.X1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Glukometry i akcesoria dla diabetyków</text:p>
          </table:table-cell>
          <table:table-cell table:style-name="ce9" office:value-type="string">
            <text:p>Genexo Ixell</text:p>
          </table:table-cell>
          <table:table-cell table:style-name="ce8" office:value-type="float" office:value="23286">
            <text:p>23286</text:p>
          </table:table-cell>
          <table:table-cell table:style-name="ce9" office:value-type="string">
            <text:p>2026-03-16 11:52:29</text:p>
          </table:table-cell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9" office:value-type="string">
            <text:p>46.XXX.XXX.X6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łyny i żele do dezynfekcji ran</text:p>
          </table:table-cell>
          <table:table-cell table:style-name="ce9" office:value-type="string">
            <text:p>Oktaseptal – aerozol z oktenidyną do dezynfekcji i odkażania ran, 250 ml</text:p>
          </table:table-cell>
          <table:table-cell table:style-name="ce8" office:value-type="float" office:value="11025">
            <text:p>11025</text:p>
          </table:table-cell>
          <table:table-cell table:style-name="ce9" office:value-type="string">
            <text:p>2026-03-16 11:52:47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37.XXX.XXX.X0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Dla dziecka</text:p>
          </table:table-cell>
          <table:table-cell table:style-name="ce9" office:value-type="string">
            <text:p>Mleka następne</text:p>
          </table:table-cell>
          <table:table-cell table:style-name="ce9" office:value-type="string">
            <text:p>Nutramigen 3 LGG Complete proszek 400g</text:p>
          </table:table-cell>
          <table:table-cell table:style-name="ce8" office:value-type="float" office:value="9721">
            <text:p>9721</text:p>
          </table:table-cell>
          <table:table-cell table:style-name="ce9" office:value-type="string">
            <text:p>2026-03-16 11:53:19</text:p>
          </table:table-cell>
          <table:table-cell table:style-name="ce10" office:value-type="currency" office:currency="PLN" office:value="0.94">
            <text:p>0,94 zł</text:p>
          </table:table-cell>
          <table:table-cell table:style-name="ce8"/>
          <table:table-cell table:style-name="ce10" office:value-type="currency" office:currency="PLN" office:value="0.94">
            <text:p>0,94 zł</text:p>
          </table:table-cell>
          <table:table-cell table:style-name="ce8"/>
          <table:table-cell table:style-name="ce9" office:value-type="string">
            <text:p>92.XXX.XXX.8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Pozostałe kosmetyki do pielęgnacji ciała</text:p>
          </table:table-cell>
          <table:table-cell table:style-name="ce9" office:value-type="string">
            <text:p>Reprintic Krem ochronny do codziennej pielęgnacji tatuaży SPF 15 100 ml</text:p>
          </table:table-cell>
          <table:table-cell table:style-name="ce8" office:value-type="float" office:value="13610">
            <text:p>13610</text:p>
          </table:table-cell>
          <table:table-cell table:style-name="ce9" office:value-type="string">
            <text:p>2026-03-16 11:53:21</text:p>
          </table:table-cell>
          <table:table-cell table:style-name="ce10" office:value-type="currency" office:currency="PLN" office:value="0.75">
            <text:p>0,75 zł</text:p>
          </table:table-cell>
          <table:table-cell table:style-name="ce8"/>
          <table:table-cell table:style-name="ce10" office:value-type="currency" office:currency="PLN" office:value="0.75">
            <text:p>0,75 zł</text:p>
          </table:table-cell>
          <table:table-cell table:style-name="ce8"/>
          <table:table-cell table:style-name="ce9" office:value-type="string">
            <text:p>19X.XXX.XXX.X2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zieci i niemowlęta</text:p>
          </table:table-cell>
          <table:table-cell table:style-name="ce9" office:value-type="string">
            <text:p>Juvit Multi krople doustne 10ml</text:p>
          </table:table-cell>
          <table:table-cell table:style-name="ce8" office:value-type="float" office:value="6099">
            <text:p>6099</text:p>
          </table:table-cell>
          <table:table-cell table:style-name="ce9" office:value-type="string">
            <text:p>2026-03-16 11:57:16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77.XXX.XXX.X5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nerały i witaminy</text:p>
          </table:table-cell>
          <table:table-cell table:style-name="ce9" office:value-type="string">
            <text:p>Orsalit tabs 24 tabl musujące + Magnez z wit.B6 10 tabl musujących</text:p>
          </table:table-cell>
          <table:table-cell table:style-name="ce8" office:value-type="float" office:value="17594">
            <text:p>17594</text:p>
          </table:table-cell>
          <table:table-cell table:style-name="ce9" office:value-type="string">
            <text:p>2026-03-16 11:58:33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83.XXX.XXX.X4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Zestawy dermokosmetyków</text:p>
          </table:table-cell>
          <table:table-cell table:style-name="ce9" office:value-type="string">
            <text:p>Caudalie Vinoperfect Zestaw Wiosenny - Serum Rozjaśniające, 30ml + Krem na Dzień, 15ml + Krem na Noc, 15ml</text:p>
          </table:table-cell>
          <table:table-cell table:style-name="ce8" office:value-type="float" office:value="36451">
            <text:p>36451</text:p>
          </table:table-cell>
          <table:table-cell table:style-name="ce9" office:value-type="string">
            <text:p>2026-03-16 12:02:31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37.XXX.XXX.X1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Otrivin Menthol 1mg/ml Aerozol do nosa 10 ml</text:p>
          </table:table-cell>
          <table:table-cell table:style-name="ce8" office:value-type="float" office:value="14886">
            <text:p>14886</text:p>
          </table:table-cell>
          <table:table-cell table:style-name="ce9" office:value-type="string">
            <text:p>2026-03-16 12:03:04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89.XXX.XXX.6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moczowy i płciowy</text:p>
          </table:table-cell>
          <table:table-cell table:style-name="ce9" office:value-type="string">
            <text:p>Permen Med Forte Tabletki powlekane, na zaburzenia erekcji 4 szt.</text:p>
          </table:table-cell>
          <table:table-cell table:style-name="ce8" office:value-type="float" office:value="19672">
            <text:p>19672</text:p>
          </table:table-cell>
          <table:table-cell table:style-name="ce9" office:value-type="string">
            <text:p>2026-03-16 12:06:07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81.XXX.XXX.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moczowy i płciowy</text:p>
          </table:table-cell>
          <table:table-cell table:style-name="ce9" office:value-type="string">
            <text:p>Furaginum MAX 100 mg 30 tab.</text:p>
          </table:table-cell>
          <table:table-cell table:style-name="ce8" office:value-type="float" office:value="19673">
            <text:p>19673</text:p>
          </table:table-cell>
          <table:table-cell table:style-name="ce9" office:value-type="string">
            <text:p>2026-03-16 12:08:38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18X.XXX.XXX.X6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Alergia</text:p>
          </table:table-cell>
          <table:table-cell table:style-name="ce9" office:value-type="string">
            <text:p>Fenistil Krople doustne 1mg/1ml 20ml (Import równoległy)</text:p>
          </table:table-cell>
          <table:table-cell table:style-name="ce8" office:value-type="float" office:value="8335">
            <text:p>8335</text:p>
          </table:table-cell>
          <table:table-cell table:style-name="ce9" office:value-type="string">
            <text:p>2026-03-16 12:09:43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18X.XXX.XXX.X0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Zestawy dermokosmetyków</text:p>
          </table:table-cell>
          <table:table-cell table:style-name="ce9" office:value-type="string">
            <text:p>Avene Hyaluron Activ B3 Krem Na Noc 50ml + Pod Oczy 15ml</text:p>
          </table:table-cell>
          <table:table-cell table:style-name="ce8" office:value-type="float" office:value="32646">
            <text:p>32646</text:p>
          </table:table-cell>
          <table:table-cell table:style-name="ce9" office:value-type="string">
            <text:p>2026-03-16 12:12:48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89.XXX.XXX.X0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nerały i witaminy</text:p>
          </table:table-cell>
          <table:table-cell table:style-name="ce9" office:value-type="string">
            <text:p>Zyskaj Zdrowie Magnez+B1 B6 B12 30 tabl.</text:p>
          </table:table-cell>
          <table:table-cell table:style-name="ce8" office:value-type="float" office:value="17199">
            <text:p>17199</text:p>
          </table:table-cell>
          <table:table-cell table:style-name="ce9" office:value-type="string">
            <text:p>2026-03-16 12:14:59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21X.XXX.XXX.X9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Otrivin Menthol 1mg/ml Aerozol do nosa 10 ml</text:p>
          </table:table-cell>
          <table:table-cell table:style-name="ce8" office:value-type="float" office:value="14886">
            <text:p>14886</text:p>
          </table:table-cell>
          <table:table-cell table:style-name="ce9" office:value-type="string">
            <text:p>2026-03-16 12:18:37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79.XXX.XXX.6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</text:p>
          </table:table-cell>
          <table:table-cell table:style-name="ce9" office:value-type="string">
            <text:p>Tiorfan 10 kapsułek</text:p>
          </table:table-cell>
          <table:table-cell table:style-name="ce8" office:value-type="float" office:value="5416">
            <text:p>5416</text:p>
          </table:table-cell>
          <table:table-cell table:style-name="ce9" office:value-type="string">
            <text:p>2026-03-16 12:18:56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94.XXX.XXX.X4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Kremy do ciała</text:p>
          </table:table-cell>
          <table:table-cell table:style-name="ce9" office:value-type="string">
            <text:p>Gorvita Żel żywokostowy z jałowcem i MSM 200ml</text:p>
          </table:table-cell>
          <table:table-cell table:style-name="ce8" office:value-type="float" office:value="11273">
            <text:p>11273</text:p>
          </table:table-cell>
          <table:table-cell table:style-name="ce9" office:value-type="string">
            <text:p>2026-03-16 12:20:11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62.XXX.XXX.X5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Kremy do twarzy</text:p>
          </table:table-cell>
          <table:table-cell table:style-name="ce9" office:value-type="string">
            <text:p>Krem Allergika z olejkiem z wiesiołka 20% na dzień i noc 100ml</text:p>
          </table:table-cell>
          <table:table-cell table:style-name="ce8" office:value-type="float" office:value="11735">
            <text:p>11735</text:p>
          </table:table-cell>
          <table:table-cell table:style-name="ce9" office:value-type="string">
            <text:p>2026-03-16 12:20:55</text:p>
          </table:table-cell>
          <table:table-cell table:style-name="ce10" office:value-type="currency" office:currency="PLN" office:value="1.02">
            <text:p>1,02 zł</text:p>
          </table:table-cell>
          <table:table-cell table:style-name="ce8"/>
          <table:table-cell table:style-name="ce10" office:value-type="currency" office:currency="PLN" office:value="1.02">
            <text:p>1,02 zł</text:p>
          </table:table-cell>
          <table:table-cell table:style-name="ce8"/>
          <table:table-cell table:style-name="ce9" office:value-type="string">
            <text:p>94.XXX.XXX.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nerały i witaminy</text:p>
          </table:table-cell>
          <table:table-cell table:style-name="ce9" office:value-type="string">
            <text:p>Zyskaj Zdrowie Magnez+B1 B6 B12 30 tabl.</text:p>
          </table:table-cell>
          <table:table-cell table:style-name="ce8" office:value-type="float" office:value="17199">
            <text:p>17199</text:p>
          </table:table-cell>
          <table:table-cell table:style-name="ce9" office:value-type="string">
            <text:p>2026-03-16 12:21:03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21X.XXX.XXX.X9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Zestawy dermokosmetyków</text:p>
          </table:table-cell>
          <table:table-cell table:style-name="ce9" office:value-type="string">
            <text:p>Caudalie Vinoperfect Zestaw Wiosenny - Serum Rozjaśniające, 30ml + Krem na Dzień, 15ml + Krem na Noc, 15ml</text:p>
          </table:table-cell>
          <table:table-cell table:style-name="ce8" office:value-type="float" office:value="36451">
            <text:p>36451</text:p>
          </table:table-cell>
          <table:table-cell table:style-name="ce9" office:value-type="string">
            <text:p>2026-03-16 12:25:21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37.XXX.XXX.X1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łciowy i moczowy</text:p>
          </table:table-cell>
          <table:table-cell table:style-name="ce9" office:value-type="string">
            <text:p>UroLact doustny Probiotyk Urologiczny 400mg, 10 kaps.</text:p>
          </table:table-cell>
          <table:table-cell table:style-name="ce8" office:value-type="float" office:value="19043">
            <text:p>19043</text:p>
          </table:table-cell>
          <table:table-cell table:style-name="ce9" office:value-type="string">
            <text:p>2026-03-16 12:27:19</text:p>
          </table:table-cell>
          <table:table-cell table:style-name="ce10" office:value-type="currency" office:currency="PLN" office:value="0.75">
            <text:p>0,75 zł</text:p>
          </table:table-cell>
          <table:table-cell table:style-name="ce8"/>
          <table:table-cell table:style-name="ce10" office:value-type="currency" office:currency="PLN" office:value="0.75">
            <text:p>0,75 zł</text:p>
          </table:table-cell>
          <table:table-cell table:style-name="ce8"/>
          <table:table-cell table:style-name="ce9" office:value-type="string">
            <text:p>95.XXX.XXX.4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Żywienie medyczne</text:p>
          </table:table-cell>
          <table:table-cell table:style-name="ce9" office:value-type="string">
            <text:p>Nutridrink preparat odżywczy smak owoce leśne 4x125ml</text:p>
          </table:table-cell>
          <table:table-cell table:style-name="ce8" office:value-type="float" office:value="886">
            <text:p>886</text:p>
          </table:table-cell>
          <table:table-cell table:style-name="ce9" office:value-type="string">
            <text:p>2026-03-16 12:27:21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37.XXX.XXX.X5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Otrivin Menthol 1mg/ml Aerozol do nosa 10 ml</text:p>
          </table:table-cell>
          <table:table-cell table:style-name="ce8" office:value-type="float" office:value="14886">
            <text:p>14886</text:p>
          </table:table-cell>
          <table:table-cell table:style-name="ce9" office:value-type="string">
            <text:p>2026-03-16 12:27:54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77.XXX.XXX.X3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Bioderma Atoderm Intensive Żel Oczyszczający I Natłuszczający 1000ml</text:p>
          </table:table-cell>
          <table:table-cell table:style-name="ce8" office:value-type="float" office:value="21024">
            <text:p>21024</text:p>
          </table:table-cell>
          <table:table-cell table:style-name="ce9" office:value-type="string">
            <text:p>2026-03-16 12:28:00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10X.XXX.XXX.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</text:p>
          </table:table-cell>
          <table:table-cell table:style-name="ce9" office:value-type="string">
            <text:p>Inversion Femme Complex 90kaps.</text:p>
          </table:table-cell>
          <table:table-cell table:style-name="ce8" office:value-type="float" office:value="12016">
            <text:p>12016</text:p>
          </table:table-cell>
          <table:table-cell table:style-name="ce9" office:value-type="string">
            <text:p>2026-03-16 12:31:45</text:p>
          </table:table-cell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9" office:value-type="string">
            <text:p>37.XXX.XXX.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Opatrunki</text:p>
          </table:table-cell>
          <table:table-cell table:style-name="ce9" office:value-type="string">
            <text:p>Hartmann Atrauman Ag opatrunek z maścią 5cm x 5cm 1szt.</text:p>
          </table:table-cell>
          <table:table-cell table:style-name="ce8" office:value-type="float" office:value="7724">
            <text:p>7724</text:p>
          </table:table-cell>
          <table:table-cell table:style-name="ce9" office:value-type="string">
            <text:p>2026-03-16 12:33:41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91.XXX.XXX.3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</text:p>
          </table:table-cell>
          <table:table-cell table:style-name="ce9" office:value-type="string">
            <text:p>Inversion Femme Complex 90kaps.</text:p>
          </table:table-cell>
          <table:table-cell table:style-name="ce8" office:value-type="float" office:value="12016">
            <text:p>12016</text:p>
          </table:table-cell>
          <table:table-cell table:style-name="ce9" office:value-type="string">
            <text:p>2026-03-16 12:34:29</text:p>
          </table:table-cell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9" office:value-type="string">
            <text:p>37.XXX.XXX.7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</text:p>
          </table:table-cell>
          <table:table-cell table:style-name="ce9" office:value-type="string">
            <text:p>Inversion Femme Complex 90kaps.</text:p>
          </table:table-cell>
          <table:table-cell table:style-name="ce8" office:value-type="float" office:value="12016">
            <text:p>12016</text:p>
          </table:table-cell>
          <table:table-cell table:style-name="ce9" office:value-type="string">
            <text:p>2026-03-16 12:34:53</text:p>
          </table:table-cell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9" office:value-type="string">
            <text:p>37.XXX.XXX.7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</text:p>
          </table:table-cell>
          <table:table-cell table:style-name="ce9" office:value-type="string">
            <text:p>Inversion Femme Complex 90kaps.</text:p>
          </table:table-cell>
          <table:table-cell table:style-name="ce8" office:value-type="float" office:value="12016">
            <text:p>12016</text:p>
          </table:table-cell>
          <table:table-cell table:style-name="ce9" office:value-type="string">
            <text:p>2026-03-16 12:35:21</text:p>
          </table:table-cell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9" office:value-type="string">
            <text:p>37.XXX.XXX.7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eparaty medycyny naturalnej</text:p>
          </table:table-cell>
          <table:table-cell table:style-name="ce9" office:value-type="string">
            <text:p>Ozonella Oliwka Ozonowana 100 ml</text:p>
          </table:table-cell>
          <table:table-cell table:style-name="ce8" office:value-type="float" office:value="13559">
            <text:p>13559</text:p>
          </table:table-cell>
          <table:table-cell table:style-name="ce9" office:value-type="string">
            <text:p>2026-03-16 12:36:11</text:p>
          </table:table-cell>
          <table:table-cell table:style-name="ce10" office:value-type="currency" office:currency="PLN" office:value="0.88">
            <text:p>0,88 zł</text:p>
          </table:table-cell>
          <table:table-cell table:style-name="ce8"/>
          <table:table-cell table:style-name="ce10" office:value-type="currency" office:currency="PLN" office:value="0.88">
            <text:p>0,88 zł</text:p>
          </table:table-cell>
          <table:table-cell table:style-name="ce8"/>
          <table:table-cell table:style-name="ce9" office:value-type="string">
            <text:p>21X.XXX.XXX.9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krążenia i serce</text:p>
          </table:table-cell>
          <table:table-cell table:style-name="ce9" office:value-type="string">
            <text:p>Gal Tran 100kaps.</text:p>
          </table:table-cell>
          <table:table-cell table:style-name="ce8" office:value-type="float" office:value="5427">
            <text:p>5427</text:p>
          </table:table-cell>
          <table:table-cell table:style-name="ce9" office:value-type="string">
            <text:p>2026-03-16 12:36:38</text:p>
          </table:table-cell>
          <table:table-cell table:style-name="ce10" office:value-type="currency" office:currency="PLN" office:value="0.83">
            <text:p>0,83 zł</text:p>
          </table:table-cell>
          <table:table-cell table:style-name="ce8"/>
          <table:table-cell table:style-name="ce10" office:value-type="currency" office:currency="PLN" office:value="0.83">
            <text:p>0,83 zł</text:p>
          </table:table-cell>
          <table:table-cell table:style-name="ce8"/>
          <table:table-cell table:style-name="ce9" office:value-type="string">
            <text:p>18X.XXX.XXX.1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Glukometry i akcesoria dla diabetyków</text:p>
          </table:table-cell>
          <table:table-cell table:style-name="ce9" office:value-type="string">
            <text:p>Accu-Chek Nakłuwacz FastClix + 6 lancetów</text:p>
          </table:table-cell>
          <table:table-cell table:style-name="ce8" office:value-type="float" office:value="8385">
            <text:p>8385</text:p>
          </table:table-cell>
          <table:table-cell table:style-name="ce9" office:value-type="string">
            <text:p>2026-03-16 12:37:28</text:p>
          </table:table-cell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9" office:value-type="string">
            <text:p>37.XXX.XXX.X1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Nuxe Nuxuriance Gold Ultraodżywczy Krem Do Twarzy 50ml + Balsam Pod Oczy 15ml</text:p>
          </table:table-cell>
          <table:table-cell table:style-name="ce8" office:value-type="float" office:value="31961">
            <text:p>31961</text:p>
          </table:table-cell>
          <table:table-cell table:style-name="ce9" office:value-type="string">
            <text:p>2026-03-16 12:37:49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79.XXX.XXX.4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Opatrunki</text:p>
          </table:table-cell>
          <table:table-cell table:style-name="ce9" office:value-type="string">
            <text:p>Akutol Opatrunek plaster w sprayu 60ml</text:p>
          </table:table-cell>
          <table:table-cell table:style-name="ce8" office:value-type="float" office:value="10087">
            <text:p>10087</text:p>
          </table:table-cell>
          <table:table-cell table:style-name="ce9" office:value-type="string">
            <text:p>2026-03-16 12:40:49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37.XXX.XXX.6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nerały i witaminy</text:p>
          </table:table-cell>
          <table:table-cell table:style-name="ce9" office:value-type="string">
            <text:p>Polfarmex Calcifos 500 Mg X 150 Tabl</text:p>
          </table:table-cell>
          <table:table-cell table:style-name="ce8" office:value-type="float" office:value="18941">
            <text:p>18941</text:p>
          </table:table-cell>
          <table:table-cell table:style-name="ce9" office:value-type="string">
            <text:p>2026-03-16 12:41:42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79.XXX.XXX.7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 i trawienie</text:p>
          </table:table-cell>
          <table:table-cell table:style-name="ce9" office:value-type="string">
            <text:p>Estabiom Junior 20kaps.</text:p>
          </table:table-cell>
          <table:table-cell table:style-name="ce8" office:value-type="float" office:value="6953">
            <text:p>6953</text:p>
          </table:table-cell>
          <table:table-cell table:style-name="ce9" office:value-type="string">
            <text:p>2026-03-16 12:43:52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82.XXX.XXX.X9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</text:p>
          </table:table-cell>
          <table:table-cell table:style-name="ce9" office:value-type="string">
            <text:p>Alugastrin 40 tabletek</text:p>
          </table:table-cell>
          <table:table-cell table:style-name="ce8" office:value-type="float" office:value="5864">
            <text:p>5864</text:p>
          </table:table-cell>
          <table:table-cell table:style-name="ce9" office:value-type="string">
            <text:p>2026-03-16 12:44:09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83.XXX.XXX.3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Oscillococcinum na przeziębienie i grypę 30 dawek x 1 g</text:p>
          </table:table-cell>
          <table:table-cell table:style-name="ce8" office:value-type="float" office:value="4856">
            <text:p>4856</text:p>
          </table:table-cell>
          <table:table-cell table:style-name="ce9" office:value-type="string">
            <text:p>2026-03-16 12:44:10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18X.XXX.XXX.X9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Ciśnieniomierze</text:p>
          </table:table-cell>
          <table:table-cell table:style-name="ce9" office:value-type="string">
            <text:p>Omron M4 Intelli It</text:p>
          </table:table-cell>
          <table:table-cell table:style-name="ce8" office:value-type="float" office:value="29699">
            <text:p>29699</text:p>
          </table:table-cell>
          <table:table-cell table:style-name="ce9" office:value-type="string">
            <text:p>2026-03-16 12:45:19</text:p>
          </table:table-cell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9" office:value-type="string">
            <text:p>18X.XXX.XXX.X4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Oscillococcinum na przeziębienie i grypę 30 dawek x 1 g</text:p>
          </table:table-cell>
          <table:table-cell table:style-name="ce8" office:value-type="float" office:value="4856">
            <text:p>4856</text:p>
          </table:table-cell>
          <table:table-cell table:style-name="ce9" office:value-type="string">
            <text:p>2026-03-16 12:46:56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83.XXX.XXX.2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Otrivin Menthol 1mg/ml Aerozol do nosa 10 ml</text:p>
          </table:table-cell>
          <table:table-cell table:style-name="ce8" office:value-type="float" office:value="14886">
            <text:p>14886</text:p>
          </table:table-cell>
          <table:table-cell table:style-name="ce9" office:value-type="string">
            <text:p>2026-03-16 12:47:00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37.XXX.XXX.1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moczowy i płciowy</text:p>
          </table:table-cell>
          <table:table-cell table:style-name="ce9" office:value-type="string">
            <text:p>Gynoxin Optima 200mg 3kaps.</text:p>
          </table:table-cell>
          <table:table-cell table:style-name="ce8" office:value-type="float" office:value="9579">
            <text:p>9579</text:p>
          </table:table-cell>
          <table:table-cell table:style-name="ce9" office:value-type="string">
            <text:p>2026-03-16 12:47:37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18X.XXX.XXX.8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Suplementy na odchudzanie</text:p>
          </table:table-cell>
          <table:table-cell table:style-name="ce9" office:value-type="string">
            <text:p>HYDROSLIMMER 30 tabl.</text:p>
          </table:table-cell>
          <table:table-cell table:style-name="ce8" office:value-type="float" office:value="32282">
            <text:p>32282</text:p>
          </table:table-cell>
          <table:table-cell table:style-name="ce9" office:value-type="string">
            <text:p>2026-03-16 12:49:02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46.XXX.XXX.1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Testy diagnostyczne</text:p>
          </table:table-cell>
          <table:table-cell table:style-name="ce9" office:value-type="string">
            <text:p>Diagnosis TEST OWULACYJNY LH VITAM X 5 SzT</text:p>
          </table:table-cell>
          <table:table-cell table:style-name="ce8" office:value-type="float" office:value="5406">
            <text:p>5406</text:p>
          </table:table-cell>
          <table:table-cell table:style-name="ce9" office:value-type="string">
            <text:p>2026-03-16 12:50:27</text:p>
          </table:table-cell>
          <table:table-cell table:style-name="ce10" office:value-type="currency" office:currency="PLN" office:value="0.74">
            <text:p>0,74 zł</text:p>
          </table:table-cell>
          <table:table-cell table:style-name="ce8"/>
          <table:table-cell table:style-name="ce10" office:value-type="currency" office:currency="PLN" office:value="0.74">
            <text:p>0,74 zł</text:p>
          </table:table-cell>
          <table:table-cell table:style-name="ce8"/>
          <table:table-cell table:style-name="ce9" office:value-type="string">
            <text:p>37.XXX.XXX.X6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CAUDALIE PREMIER CRU RICHE Krem o bogatej konsystencji Anti - Age 50 ml</text:p>
          </table:table-cell>
          <table:table-cell table:style-name="ce8" office:value-type="float" office:value="31983">
            <text:p>31983</text:p>
          </table:table-cell>
          <table:table-cell table:style-name="ce9" office:value-type="string">
            <text:p>2026-03-16 12:55:42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10X.XXX.XXX.1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Granudacyn Roztwór do płukania ran 1000 ml</text:p>
          </table:table-cell>
          <table:table-cell table:style-name="ce8" office:value-type="float" office:value="16873">
            <text:p>16873</text:p>
          </table:table-cell>
          <table:table-cell table:style-name="ce9" office:value-type="string">
            <text:p>2026-03-16 12:57:11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77.XXX.XXX.3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Zestawy dermokosmetyków</text:p>
          </table:table-cell>
          <table:table-cell table:style-name="ce9" office:value-type="string">
            <text:p>Caudalie Vinoperfect Zestaw Wiosenny - Serum Rozjaśniające, 30ml + Krem na Dzień, 15ml + Krem na Noc, 15ml</text:p>
          </table:table-cell>
          <table:table-cell table:style-name="ce8" office:value-type="float" office:value="36451">
            <text:p>36451</text:p>
          </table:table-cell>
          <table:table-cell table:style-name="ce9" office:value-type="string">
            <text:p>2026-03-16 12:59:28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37.XXX.XXX.X8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Biuro i firma</text:p>
          </table:table-cell>
          <table:table-cell table:style-name="ce9" office:value-type="string">
            <text:p>Wyposażenie medyczne</text:p>
          </table:table-cell>
          <table:table-cell table:style-name="ce9" office:value-type="string">
            <text:p>Van Oostveen Medical Strzykawka Tuberkulinowa 1ml + Igła 0,3x13 Szt</text:p>
          </table:table-cell>
          <table:table-cell table:style-name="ce8" office:value-type="float" office:value="11603">
            <text:p>11603</text:p>
          </table:table-cell>
          <table:table-cell table:style-name="ce9" office:value-type="string">
            <text:p>2026-03-16 13:01:08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31.XXX.XXX.X6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nerały i witaminy</text:p>
          </table:table-cell>
          <table:table-cell table:style-name="ce9" office:value-type="string">
            <text:p>VITTER Calcium z Vit. C FORTE o smaku pomarańczowym, 20 tab. musujących</text:p>
          </table:table-cell>
          <table:table-cell table:style-name="ce8" office:value-type="float" office:value="15027">
            <text:p>15027</text:p>
          </table:table-cell>
          <table:table-cell table:style-name="ce9" office:value-type="string">
            <text:p>2026-03-16 13:01:46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10X.XXX.XXX.3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Zestawy dermokosmetyków</text:p>
          </table:table-cell>
          <table:table-cell table:style-name="ce9" office:value-type="string">
            <text:p>Caudalie Vinoperfect Zestaw Wiosenny - Serum Rozjaśniające, 30ml + Krem na Dzień, 15ml + Krem na Noc, 15ml</text:p>
          </table:table-cell>
          <table:table-cell table:style-name="ce8" office:value-type="float" office:value="36451">
            <text:p>36451</text:p>
          </table:table-cell>
          <table:table-cell table:style-name="ce9" office:value-type="string">
            <text:p>2026-03-16 13:03:58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31.XXX.XXX.X2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moczowy i płciowy</text:p>
          </table:table-cell>
          <table:table-cell table:style-name="ce9" office:value-type="string">
            <text:p>Gynoxin Optima 200mg 3kaps.</text:p>
          </table:table-cell>
          <table:table-cell table:style-name="ce8" office:value-type="float" office:value="9579">
            <text:p>9579</text:p>
          </table:table-cell>
          <table:table-cell table:style-name="ce9" office:value-type="string">
            <text:p>2026-03-16 13:04:23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5.XXX.XXX.8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</text:p>
          </table:table-cell>
          <table:table-cell table:style-name="ce9" office:value-type="string">
            <text:p>Lactulose-MIP syrop 9,75g/15ml 1000ml</text:p>
          </table:table-cell>
          <table:table-cell table:style-name="ce8" office:value-type="float" office:value="7759">
            <text:p>7759</text:p>
          </table:table-cell>
          <table:table-cell table:style-name="ce9" office:value-type="string">
            <text:p>2026-03-16 13:04:35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21X.XXX.XXX.X2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moczowy i płciowy</text:p>
          </table:table-cell>
          <table:table-cell table:style-name="ce9" office:value-type="string">
            <text:p>Gynoxin Optima 200mg 3kaps.</text:p>
          </table:table-cell>
          <table:table-cell table:style-name="ce8" office:value-type="float" office:value="9579">
            <text:p>9579</text:p>
          </table:table-cell>
          <table:table-cell table:style-name="ce9" office:value-type="string">
            <text:p>2026-03-16 13:04:38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5.XXX.XXX.8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Glukometry i akcesoria dla diabetyków</text:p>
          </table:table-cell>
          <table:table-cell table:style-name="ce9" office:value-type="string">
            <text:p>Roche Diabetes Care Paski Do Glukozy Accu Check Instant 100 szt</text:p>
          </table:table-cell>
          <table:table-cell table:style-name="ce8" office:value-type="float" office:value="3191">
            <text:p>3191</text:p>
          </table:table-cell>
          <table:table-cell table:style-name="ce9" office:value-type="string">
            <text:p>2026-03-16 13:06:09</text:p>
          </table:table-cell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9" office:value-type="string">
            <text:p>37.XXX.XXX.X1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Opatrunki</text:p>
          </table:table-cell>
          <table:table-cell table:style-name="ce9" office:value-type="string">
            <text:p>CONVATEC LTD. CONVATEC LTD. GRANUFLEX EXTRA THIN Opatrunek hydrokoloidowy 10cm x 10cm 1 szt.</text:p>
          </table:table-cell>
          <table:table-cell table:style-name="ce8" office:value-type="float" office:value="8496">
            <text:p>8496</text:p>
          </table:table-cell>
          <table:table-cell table:style-name="ce9" office:value-type="string">
            <text:p>2026-03-16 13:08:07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21X.XXX.XXX.3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</text:p>
          </table:table-cell>
          <table:table-cell table:style-name="ce9" office:value-type="string">
            <text:p>Inversion Femme Complex 90kaps.</text:p>
          </table:table-cell>
          <table:table-cell table:style-name="ce8" office:value-type="float" office:value="12016">
            <text:p>12016</text:p>
          </table:table-cell>
          <table:table-cell table:style-name="ce9" office:value-type="string">
            <text:p>2026-03-16 13:08:46</text:p>
          </table:table-cell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9" office:value-type="string">
            <text:p>10X.XXX.XXX.X5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nerały i witaminy</text:p>
          </table:table-cell>
          <table:table-cell table:style-name="ce9" office:value-type="string">
            <text:p>Sufrin 60tabl.</text:p>
          </table:table-cell>
          <table:table-cell table:style-name="ce8" office:value-type="float" office:value="5345">
            <text:p>5345</text:p>
          </table:table-cell>
          <table:table-cell table:style-name="ce9" office:value-type="string">
            <text:p>2026-03-16 13:10:25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19X.XXX.XXX.X5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</text:p>
          </table:table-cell>
          <table:table-cell table:style-name="ce9" office:value-type="string">
            <text:p>Rennie Antiacidum o smaku miętowym 24 tabletki do ssania</text:p>
          </table:table-cell>
          <table:table-cell table:style-name="ce8" office:value-type="float" office:value="7288">
            <text:p>7288</text:p>
          </table:table-cell>
          <table:table-cell table:style-name="ce9" office:value-type="string">
            <text:p>2026-03-16 13:10:41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91.XXX.XXX.4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Zioła</text:p>
          </table:table-cell>
          <table:table-cell table:style-name="ce9" office:value-type="string">
            <text:p>Flos: Brzoza liść (betulae folium) - 50g</text:p>
          </table:table-cell>
          <table:table-cell table:style-name="ce8" office:value-type="float" office:value="12132">
            <text:p>12132</text:p>
          </table:table-cell>
          <table:table-cell table:style-name="ce9" office:value-type="string">
            <text:p>2026-03-16 13:11:08</text:p>
          </table:table-cell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9" office:value-type="string">
            <text:p>37.XXX.XXX.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łciowy i moczowy</text:p>
          </table:table-cell>
          <table:table-cell table:style-name="ce9" office:value-type="string">
            <text:p>UROFEM Żurawina 60 tabl.</text:p>
          </table:table-cell>
          <table:table-cell table:style-name="ce8" office:value-type="float" office:value="32307">
            <text:p>32307</text:p>
          </table:table-cell>
          <table:table-cell table:style-name="ce9" office:value-type="string">
            <text:p>2026-03-16 13:11:21</text:p>
          </table:table-cell>
          <table:table-cell table:style-name="ce10" office:value-type="currency" office:currency="PLN" office:value="0.75">
            <text:p>0,75 zł</text:p>
          </table:table-cell>
          <table:table-cell table:style-name="ce8"/>
          <table:table-cell table:style-name="ce10" office:value-type="currency" office:currency="PLN" office:value="0.75">
            <text:p>0,75 zł</text:p>
          </table:table-cell>
          <table:table-cell table:style-name="ce8"/>
          <table:table-cell table:style-name="ce9" office:value-type="string">
            <text:p>5.XXX.XXX.X4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</text:p>
          </table:table-cell>
          <table:table-cell table:style-name="ce9" office:value-type="string">
            <text:p>Inversion Femme Complex 90kaps.</text:p>
          </table:table-cell>
          <table:table-cell table:style-name="ce8" office:value-type="float" office:value="12016">
            <text:p>12016</text:p>
          </table:table-cell>
          <table:table-cell table:style-name="ce9" office:value-type="string">
            <text:p>2026-03-16 13:11:23</text:p>
          </table:table-cell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9" office:value-type="string">
            <text:p>10X.XXX.XXX.X5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</text:p>
          </table:table-cell>
          <table:table-cell table:style-name="ce9" office:value-type="string">
            <text:p>Pharmapoint Legalon 140, 20kaps</text:p>
          </table:table-cell>
          <table:table-cell table:style-name="ce8" office:value-type="float" office:value="19282">
            <text:p>19282</text:p>
          </table:table-cell>
          <table:table-cell table:style-name="ce9" office:value-type="string">
            <text:p>2026-03-16 13:14:45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89.XXX.XXX.X0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nerwowy</text:p>
          </table:table-cell>
          <table:table-cell table:style-name="ce9" office:value-type="string">
            <text:p>Tanakan 40 Mg 30 Tabl.</text:p>
          </table:table-cell>
          <table:table-cell table:style-name="ce8" office:value-type="float" office:value="19454">
            <text:p>19454</text:p>
          </table:table-cell>
          <table:table-cell table:style-name="ce9" office:value-type="string">
            <text:p>2026-03-16 13:16:40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91.XXX.XXX.X1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Zambon Fluimucil Forte 600 Mg 10 Tabl.</text:p>
          </table:table-cell>
          <table:table-cell table:style-name="ce8" office:value-type="float" office:value="3997">
            <text:p>3997</text:p>
          </table:table-cell>
          <table:table-cell table:style-name="ce9" office:value-type="string">
            <text:p>2026-03-16 13:17:35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83.XXX.XXX.X2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Opaski elastyczne</text:p>
          </table:table-cell>
          <table:table-cell table:style-name="ce9" office:value-type="string">
            <text:p>PANI TERESA® <text:s/>PT 0306 Opaska elastyczna stawu nadgarstkowego - krótka</text:p>
          </table:table-cell>
          <table:table-cell table:style-name="ce8" office:value-type="float" office:value="9007">
            <text:p>9007</text:p>
          </table:table-cell>
          <table:table-cell table:style-name="ce9" office:value-type="string">
            <text:p>2026-03-16 13:17:51</text:p>
          </table:table-cell>
          <table:table-cell table:style-name="ce10" office:value-type="currency" office:currency="PLN" office:value="0.67">
            <text:p>0,67 zł</text:p>
          </table:table-cell>
          <table:table-cell table:style-name="ce8"/>
          <table:table-cell table:style-name="ce10" office:value-type="currency" office:currency="PLN" office:value="0.67">
            <text:p>0,67 zł</text:p>
          </table:table-cell>
          <table:table-cell table:style-name="ce8"/>
          <table:table-cell table:style-name="ce9" office:value-type="string">
            <text:p>37.XXX.XXX.X5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Glukometry i akcesoria dla diabetyków</text:p>
          </table:table-cell>
          <table:table-cell table:style-name="ce9" office:value-type="string">
            <text:p>One Touch Delica Plus Lancety 100Szt.</text:p>
          </table:table-cell>
          <table:table-cell table:style-name="ce8" office:value-type="float" office:value="8494">
            <text:p>8494</text:p>
          </table:table-cell>
          <table:table-cell table:style-name="ce9" office:value-type="string">
            <text:p>2026-03-16 13:19:22</text:p>
          </table:table-cell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9" office:value-type="string">
            <text:p>10X.XXX.XXX.X1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HASCO Maść tranowa 20g</text:p>
          </table:table-cell>
          <table:table-cell table:style-name="ce8" office:value-type="float" office:value="6148">
            <text:p>6148</text:p>
          </table:table-cell>
          <table:table-cell table:style-name="ce9" office:value-type="string">
            <text:p>2026-03-16 13:25:24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79.XXX.XXX.2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Balsamy do ust</text:p>
          </table:table-cell>
          <table:table-cell table:style-name="ce9" office:value-type="string">
            <text:p>Tisane balsam do ust 4,7g</text:p>
          </table:table-cell>
          <table:table-cell table:style-name="ce8" office:value-type="float" office:value="11377">
            <text:p>11377</text:p>
          </table:table-cell>
          <table:table-cell table:style-name="ce9" office:value-type="string">
            <text:p>2026-03-16 13:26:42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84.XXX.XXX.X0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Kremy do twarzy</text:p>
          </table:table-cell>
          <table:table-cell table:style-name="ce9" office:value-type="string">
            <text:p>Krem Avena Ochronny Z Witaminą A Tuba Na Dzień I Noc 25g</text:p>
          </table:table-cell>
          <table:table-cell table:style-name="ce8" office:value-type="float" office:value="4274">
            <text:p>4274</text:p>
          </table:table-cell>
          <table:table-cell table:style-name="ce9" office:value-type="string">
            <text:p>2026-03-16 13:27:07</text:p>
          </table:table-cell>
          <table:table-cell table:style-name="ce10" office:value-type="currency" office:currency="PLN" office:value="1.02">
            <text:p>1,02 zł</text:p>
          </table:table-cell>
          <table:table-cell table:style-name="ce8"/>
          <table:table-cell table:style-name="ce10" office:value-type="currency" office:currency="PLN" office:value="1.02">
            <text:p>1,02 zł</text:p>
          </table:table-cell>
          <table:table-cell table:style-name="ce8"/>
          <table:table-cell table:style-name="ce9" office:value-type="string">
            <text:p>91.XXX.XXX.X3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nerały i witaminy</text:p>
          </table:table-cell>
          <table:table-cell table:style-name="ce9" office:value-type="string">
            <text:p>NORIS PHARMA Vitaprim D3 Forte 4000 + K2, 60 kaps. -&gt; Wysyłka w 24h już za 3,99zł! [Odbiór w Żabce]</text:p>
          </table:table-cell>
          <table:table-cell table:style-name="ce8" office:value-type="float" office:value="32311">
            <text:p>32311</text:p>
          </table:table-cell>
          <table:table-cell table:style-name="ce9" office:value-type="string">
            <text:p>2026-03-16 13:27:33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89.XXX.XXX.X4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Homeopatia</text:p>
          </table:table-cell>
          <table:table-cell table:style-name="ce9" office:value-type="string">
            <text:p>Heel-Nux Vomica krople zaburzenia żoładkowo jelitowe 30 ml</text:p>
          </table:table-cell>
          <table:table-cell table:style-name="ce8" office:value-type="float" office:value="12509">
            <text:p>12509</text:p>
          </table:table-cell>
          <table:table-cell table:style-name="ce9" office:value-type="string">
            <text:p>2026-03-16 13:29:20</text:p>
          </table:table-cell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9" office:value-type="string">
            <text:p>46.XXX.XXX.X7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zieci i niemowlęta</text:p>
          </table:table-cell>
          <table:table-cell table:style-name="ce9" office:value-type="string">
            <text:p>Juvit Multi krople doustne 10ml</text:p>
          </table:table-cell>
          <table:table-cell table:style-name="ce8" office:value-type="float" office:value="6099">
            <text:p>6099</text:p>
          </table:table-cell>
          <table:table-cell table:style-name="ce9" office:value-type="string">
            <text:p>2026-03-16 13:32:08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5.XXX.XXX.3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Zioła</text:p>
          </table:table-cell>
          <table:table-cell table:style-name="ce9" office:value-type="string">
            <text:p>Zioła Mnicha Na cukier 20tbx2g</text:p>
          </table:table-cell>
          <table:table-cell table:style-name="ce8" office:value-type="float" office:value="27922">
            <text:p>27922</text:p>
          </table:table-cell>
          <table:table-cell table:style-name="ce9" office:value-type="string">
            <text:p>2026-03-16 13:33:46</text:p>
          </table:table-cell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9" office:value-type="string">
            <text:p>5.XXX.XXX.X5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Zioła</text:p>
          </table:table-cell>
          <table:table-cell table:style-name="ce9" office:value-type="string">
            <text:p>Zioła Mnicha Na cukier 20tbx2g</text:p>
          </table:table-cell>
          <table:table-cell table:style-name="ce8" office:value-type="float" office:value="27922">
            <text:p>27922</text:p>
          </table:table-cell>
          <table:table-cell table:style-name="ce9" office:value-type="string">
            <text:p>2026-03-16 13:33:46</text:p>
          </table:table-cell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9" office:value-type="string">
            <text:p>66.XXX.XXX.6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Clotrimazolum Krem przeciwgrzybiczy 10mg/g 20g</text:p>
          </table:table-cell>
          <table:table-cell table:style-name="ce8" office:value-type="float" office:value="5940">
            <text:p>5940</text:p>
          </table:table-cell>
          <table:table-cell table:style-name="ce9" office:value-type="string">
            <text:p>2026-03-16 13:34:12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84.XXX.XXX.X4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Szampony do włosów</text:p>
          </table:table-cell>
          <table:table-cell table:style-name="ce9" office:value-type="string">
            <text:p>FARMONA Jantar szampon enzymatyczny z wyciągiem z bursztynu 330ml</text:p>
          </table:table-cell>
          <table:table-cell table:style-name="ce8" office:value-type="float" office:value="16987">
            <text:p>16987</text:p>
          </table:table-cell>
          <table:table-cell table:style-name="ce9" office:value-type="string">
            <text:p>2026-03-16 13:35:07</text:p>
          </table:table-cell>
          <table:table-cell table:style-name="ce10" office:value-type="currency" office:currency="PLN" office:value="0.88">
            <text:p>0,88 zł</text:p>
          </table:table-cell>
          <table:table-cell table:style-name="ce8"/>
          <table:table-cell table:style-name="ce10" office:value-type="currency" office:currency="PLN" office:value="0.88">
            <text:p>0,88 zł</text:p>
          </table:table-cell>
          <table:table-cell table:style-name="ce8"/>
          <table:table-cell table:style-name="ce9" office:value-type="string">
            <text:p>37.XXX.XXX.X1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Opatrunki</text:p>
          </table:table-cell>
          <table:table-cell table:style-name="ce9" office:value-type="string">
            <text:p>Opatr.Vliwazell wysoce chłonny 10x20 25szt</text:p>
          </table:table-cell>
          <table:table-cell table:style-name="ce8" office:value-type="float" office:value="12823">
            <text:p>12823</text:p>
          </table:table-cell>
          <table:table-cell table:style-name="ce9" office:value-type="string">
            <text:p>2026-03-16 13:36:52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37.XXX.XXX.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moczowy i płciowy</text:p>
          </table:table-cell>
          <table:table-cell table:style-name="ce9" office:value-type="string">
            <text:p>Gynoxin Optima 200mg 3kaps.</text:p>
          </table:table-cell>
          <table:table-cell table:style-name="ce8" office:value-type="float" office:value="9579">
            <text:p>9579</text:p>
          </table:table-cell>
          <table:table-cell table:style-name="ce9" office:value-type="string">
            <text:p>2026-03-16 13:39:07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46.XXX.XXX.X5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Zioła</text:p>
          </table:table-cell>
          <table:table-cell table:style-name="ce9" office:value-type="string">
            <text:p>Senes liść FIX 1 g 50 sasz.</text:p>
          </table:table-cell>
          <table:table-cell table:style-name="ce8" office:value-type="float" office:value="6404">
            <text:p>6404</text:p>
          </table:table-cell>
          <table:table-cell table:style-name="ce9" office:value-type="string">
            <text:p>2026-03-16 13:39:30</text:p>
          </table:table-cell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9" office:value-type="string">
            <text:p>31.XXX.XXX.X1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Rzuć palenie</text:p>
          </table:table-cell>
          <table:table-cell table:style-name="ce9" office:value-type="string">
            <text:p>NIQUITIN przezroczysty, plastry transdermalne, 21 mg / 24 h, 7 szt</text:p>
          </table:table-cell>
          <table:table-cell table:style-name="ce8" office:value-type="float" office:value="9593">
            <text:p>9593</text:p>
          </table:table-cell>
          <table:table-cell table:style-name="ce9" office:value-type="string">
            <text:p>2026-03-16 13:42:05</text:p>
          </table:table-cell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9" office:value-type="string">
            <text:p>46.XXX.XXX.X1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UPSARIN C, 20 tabletek musujących</text:p>
          </table:table-cell>
          <table:table-cell table:style-name="ce8" office:value-type="float" office:value="6364">
            <text:p>6364</text:p>
          </table:table-cell>
          <table:table-cell table:style-name="ce9" office:value-type="string">
            <text:p>2026-03-16 13:42:43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37.XXX.XXX.5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Suplementy dla seniorów</text:p>
          </table:table-cell>
          <table:table-cell table:style-name="ce9" office:value-type="string">
            <text:p>VITAPRIM Senior 60 tabl.</text:p>
          </table:table-cell>
          <table:table-cell table:style-name="ce8" office:value-type="float" office:value="32314">
            <text:p>32314</text:p>
          </table:table-cell>
          <table:table-cell table:style-name="ce9" office:value-type="string">
            <text:p>2026-03-16 13:44:52</text:p>
          </table:table-cell>
          <table:table-cell table:style-name="ce10" office:value-type="currency" office:currency="PLN" office:value="0.69">
            <text:p>0,69 zł</text:p>
          </table:table-cell>
          <table:table-cell table:style-name="ce8"/>
          <table:table-cell table:style-name="ce10" office:value-type="currency" office:currency="PLN" office:value="0.69">
            <text:p>0,69 zł</text:p>
          </table:table-cell>
          <table:table-cell table:style-name="ce8"/>
          <table:table-cell table:style-name="ce9" office:value-type="string">
            <text:p>62.XXX.XXX.3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Inhalatory</text:p>
          </table:table-cell>
          <table:table-cell table:style-name="ce9" office:value-type="string">
            <text:p>Diagnostic Inhalator PRO Mesh</text:p>
          </table:table-cell>
          <table:table-cell table:style-name="ce8" office:value-type="float" office:value="12540">
            <text:p>12540</text:p>
          </table:table-cell>
          <table:table-cell table:style-name="ce9" office:value-type="string">
            <text:p>2026-03-16 13:45:37</text:p>
          </table:table-cell>
          <table:table-cell table:style-name="ce10" office:value-type="currency" office:currency="PLN" office:value="1.03">
            <text:p>1,03 zł</text:p>
          </table:table-cell>
          <table:table-cell table:style-name="ce8"/>
          <table:table-cell table:style-name="ce10" office:value-type="currency" office:currency="PLN" office:value="1.03">
            <text:p>1,03 zł</text:p>
          </table:table-cell>
          <table:table-cell table:style-name="ce8"/>
          <table:table-cell table:style-name="ce9" office:value-type="string">
            <text:p>18X.XXX.XXX.7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</text:p>
          </table:table-cell>
          <table:table-cell table:style-name="ce9" office:value-type="string">
            <text:p>Dulcobis Lek Na Zaparcia 5mg 40tabl.</text:p>
          </table:table-cell>
          <table:table-cell table:style-name="ce8" office:value-type="float" office:value="295">
            <text:p>295</text:p>
          </table:table-cell>
          <table:table-cell table:style-name="ce9" office:value-type="string">
            <text:p>2026-03-16 13:45:57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45.XXX.XXX.5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Stawy, mięśnie i kości</text:p>
          </table:table-cell>
          <table:table-cell table:style-name="ce9" office:value-type="string">
            <text:p>Ultraflex 60kaps.</text:p>
          </table:table-cell>
          <table:table-cell table:style-name="ce8" office:value-type="float" office:value="32305">
            <text:p>32305</text:p>
          </table:table-cell>
          <table:table-cell table:style-name="ce9" office:value-type="string">
            <text:p>2026-03-16 13:47:30</text:p>
          </table:table-cell>
          <table:table-cell table:style-name="ce10" office:value-type="currency" office:currency="PLN" office:value="0.83">
            <text:p>0,83 zł</text:p>
          </table:table-cell>
          <table:table-cell table:style-name="ce8"/>
          <table:table-cell table:style-name="ce10" office:value-type="currency" office:currency="PLN" office:value="0.83">
            <text:p>0,83 zł</text:p>
          </table:table-cell>
          <table:table-cell table:style-name="ce8"/>
          <table:table-cell table:style-name="ce9" office:value-type="string">
            <text:p>18X.XXX.XXX.X2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Serce i układ krążenia</text:p>
          </table:table-cell>
          <table:table-cell table:style-name="ce9" office:value-type="string">
            <text:p>Aspirin Cardio 100mg 28 tabl</text:p>
          </table:table-cell>
          <table:table-cell table:style-name="ce8" office:value-type="float" office:value="16094">
            <text:p>16094</text:p>
          </table:table-cell>
          <table:table-cell table:style-name="ce9" office:value-type="string">
            <text:p>2026-03-16 13:48:30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83.XXX.XXX.9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ęśnie, stawy i kości</text:p>
          </table:table-cell>
          <table:table-cell table:style-name="ce9" office:value-type="string">
            <text:p>Go-On 25 Mg/2,5 ml Ampułko-Strzykawka 1 Szt.</text:p>
          </table:table-cell>
          <table:table-cell table:style-name="ce8" office:value-type="float" office:value="13773">
            <text:p>13773</text:p>
          </table:table-cell>
          <table:table-cell table:style-name="ce9" office:value-type="string">
            <text:p>2026-03-16 13:49:32</text:p>
          </table:table-cell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9" office:value-type="string">
            <text:p>83.XXX.XXX.X5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Alergia</text:p>
          </table:table-cell>
          <table:table-cell table:style-name="ce9" office:value-type="string">
            <text:p>Cetip 10 tabl.</text:p>
          </table:table-cell>
          <table:table-cell table:style-name="ce8" office:value-type="float" office:value="394">
            <text:p>394</text:p>
          </table:table-cell>
          <table:table-cell table:style-name="ce9" office:value-type="string">
            <text:p>2026-03-16 13:50:15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85.XXX.XXX.X4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Balsamy do ust</text:p>
          </table:table-cell>
          <table:table-cell table:style-name="ce9" office:value-type="string">
            <text:p>Tisane balsam do ust 4,7g</text:p>
          </table:table-cell>
          <table:table-cell table:style-name="ce8" office:value-type="float" office:value="11377">
            <text:p>11377</text:p>
          </table:table-cell>
          <table:table-cell table:style-name="ce9" office:value-type="string">
            <text:p>2026-03-16 13:52:44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17X.XXX.XXX.8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</text:p>
          </table:table-cell>
          <table:table-cell table:style-name="ce9" office:value-type="string">
            <text:p>Pharmapoint Legalon 140, 20kaps</text:p>
          </table:table-cell>
          <table:table-cell table:style-name="ce8" office:value-type="float" office:value="19282">
            <text:p>19282</text:p>
          </table:table-cell>
          <table:table-cell table:style-name="ce9" office:value-type="string">
            <text:p>2026-03-16 13:53:25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83.XXX.XXX.X2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Kremy i maści medycyny naturalnej</text:p>
          </table:table-cell>
          <table:table-cell table:style-name="ce9" office:value-type="string">
            <text:p>MAŚĆ KOŃSKA chłodząca Dr.Natura 350g+150g</text:p>
          </table:table-cell>
          <table:table-cell table:style-name="ce8" office:value-type="float" office:value="14480">
            <text:p>14480</text:p>
          </table:table-cell>
          <table:table-cell table:style-name="ce9" office:value-type="string">
            <text:p>2026-03-16 13:55:06</text:p>
          </table:table-cell>
          <table:table-cell table:style-name="ce10" office:value-type="currency" office:currency="PLN" office:value="0.76">
            <text:p>0,76 zł</text:p>
          </table:table-cell>
          <table:table-cell table:style-name="ce8"/>
          <table:table-cell table:style-name="ce10" office:value-type="currency" office:currency="PLN" office:value="0.76">
            <text:p>0,76 zł</text:p>
          </table:table-cell>
          <table:table-cell table:style-name="ce8"/>
          <table:table-cell table:style-name="ce9" office:value-type="string">
            <text:p>18X.XXX.XXX.2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 i trawienie</text:p>
          </table:table-cell>
          <table:table-cell table:style-name="ce9" office:value-type="string">
            <text:p>Hydronea Citron Baby 10sasz.</text:p>
          </table:table-cell>
          <table:table-cell table:style-name="ce8" office:value-type="float" office:value="13442">
            <text:p>13442</text:p>
          </table:table-cell>
          <table:table-cell table:style-name="ce9" office:value-type="string">
            <text:p>2026-03-16 13:55:48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83.XXX.XXX.X1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ęśnie, stawy i kości</text:p>
          </table:table-cell>
          <table:table-cell table:style-name="ce9" office:value-type="string">
            <text:p>Voltaren Emulgel 1% żel 0,01 g/g 100 g (Import równoległy)</text:p>
          </table:table-cell>
          <table:table-cell table:style-name="ce8" office:value-type="float" office:value="14669">
            <text:p>14669</text:p>
          </table:table-cell>
          <table:table-cell table:style-name="ce9" office:value-type="string">
            <text:p>2026-03-16 13:56:23</text:p>
          </table:table-cell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9" office:value-type="string">
            <text:p>83.XXX.XXX.2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nerały i witaminy</text:p>
          </table:table-cell>
          <table:table-cell table:style-name="ce9" office:value-type="string">
            <text:p>Biofarm Vigalex D3 + K2 Max 60 tabl.</text:p>
          </table:table-cell>
          <table:table-cell table:style-name="ce8" office:value-type="float" office:value="18365">
            <text:p>18365</text:p>
          </table:table-cell>
          <table:table-cell table:style-name="ce9" office:value-type="string">
            <text:p>2026-03-16 13:57:30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46.XXX.XXX.8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ęśnie, stawy i kości</text:p>
          </table:table-cell>
          <table:table-cell table:style-name="ce9" office:value-type="string">
            <text:p>Voltaren Emulgel 11,6mg/g żel 50g</text:p>
          </table:table-cell>
          <table:table-cell table:style-name="ce8" office:value-type="float" office:value="7178">
            <text:p>7178</text:p>
          </table:table-cell>
          <table:table-cell table:style-name="ce9" office:value-type="string">
            <text:p>2026-03-16 13:58:04</text:p>
          </table:table-cell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9" office:value-type="string">
            <text:p>83.XXX.XXX.2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nerały i witaminy</text:p>
          </table:table-cell>
          <table:table-cell table:style-name="ce9" office:value-type="string">
            <text:p>BODYMAX PLUS Multiwitamina Odporność Energia 200 tab.</text:p>
          </table:table-cell>
          <table:table-cell table:style-name="ce8" office:value-type="float" office:value="16252">
            <text:p>16252</text:p>
          </table:table-cell>
          <table:table-cell table:style-name="ce9" office:value-type="string">
            <text:p>2026-03-16 13:58:08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17X.XXX.XXX.8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Zestawy dermokosmetyków</text:p>
          </table:table-cell>
          <table:table-cell table:style-name="ce9" office:value-type="string">
            <text:p>Caudalie Vinoperfect Zestaw Wiosenny - Serum Rozjaśniające, 30ml + Krem na Dzień, 15ml + Krem na Noc, 15ml</text:p>
          </table:table-cell>
          <table:table-cell table:style-name="ce8" office:value-type="float" office:value="36451">
            <text:p>36451</text:p>
          </table:table-cell>
          <table:table-cell table:style-name="ce9" office:value-type="string">
            <text:p>2026-03-16 13:58:51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37.XXX.XXX.5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nerały i witaminy</text:p>
          </table:table-cell>
          <table:table-cell table:style-name="ce9" office:value-type="string">
            <text:p>BODYMAX PLUS Multiwitamina Odporność Energia 200 tab.</text:p>
          </table:table-cell>
          <table:table-cell table:style-name="ce8" office:value-type="float" office:value="16252">
            <text:p>16252</text:p>
          </table:table-cell>
          <table:table-cell table:style-name="ce9" office:value-type="string">
            <text:p>2026-03-16 13:59:17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87.XXX.XXX.4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nerały i witaminy</text:p>
          </table:table-cell>
          <table:table-cell table:style-name="ce9" office:value-type="string">
            <text:p>BODYMAX PLUS Multiwitamina Odporność Energia 200 tab.</text:p>
          </table:table-cell>
          <table:table-cell table:style-name="ce8" office:value-type="float" office:value="16252">
            <text:p>16252</text:p>
          </table:table-cell>
          <table:table-cell table:style-name="ce9" office:value-type="string">
            <text:p>2026-03-16 14:03:30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18X.XXX.XXX.X3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Opatrunki</text:p>
          </table:table-cell>
          <table:table-cell table:style-name="ce9" office:value-type="string">
            <text:p>HYDROCOLL Thin opatrunek hydrokoloidowy 10cmx10cm - 1 sztuka</text:p>
          </table:table-cell>
          <table:table-cell table:style-name="ce8" office:value-type="float" office:value="14536">
            <text:p>14536</text:p>
          </table:table-cell>
          <table:table-cell table:style-name="ce9" office:value-type="string">
            <text:p>2026-03-16 14:07:05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19X.XXX.XXX.X8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Opatrunki</text:p>
          </table:table-cell>
          <table:table-cell table:style-name="ce9" office:value-type="string">
            <text:p>Convatec Granuflex Obramowany Bordered Opatrunek Hydrokoloidowy 6X6Cm 1Szt</text:p>
          </table:table-cell>
          <table:table-cell table:style-name="ce8" office:value-type="float" office:value="16874">
            <text:p>16874</text:p>
          </table:table-cell>
          <table:table-cell table:style-name="ce9" office:value-type="string">
            <text:p>2026-03-16 14:15:35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46.XXX.XXX.X7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 i trawienie</text:p>
          </table:table-cell>
          <table:table-cell table:style-name="ce9" office:value-type="string">
            <text:p>Heparol 30tabl.</text:p>
          </table:table-cell>
          <table:table-cell table:style-name="ce8" office:value-type="float" office:value="8214">
            <text:p>8214</text:p>
          </table:table-cell>
          <table:table-cell table:style-name="ce9" office:value-type="string">
            <text:p>2026-03-16 14:15:58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37.XXX.XXX.2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ęśnie, stawy i kości</text:p>
          </table:table-cell>
          <table:table-cell table:style-name="ce9" office:value-type="string">
            <text:p>Go-On 25 Mg/2,5 ml Ampułko-Strzykawka 1 Szt.</text:p>
          </table:table-cell>
          <table:table-cell table:style-name="ce8" office:value-type="float" office:value="13773">
            <text:p>13773</text:p>
          </table:table-cell>
          <table:table-cell table:style-name="ce9" office:value-type="string">
            <text:p>2026-03-16 14:18:00</text:p>
          </table:table-cell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9" office:value-type="string">
            <text:p>93.XXX.XXX.5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Iwostin Capillin krem wzmacniający na naczynka SPF20 bogata konsystencja 40ml</text:p>
          </table:table-cell>
          <table:table-cell table:style-name="ce8" office:value-type="float" office:value="10586">
            <text:p>10586</text:p>
          </table:table-cell>
          <table:table-cell table:style-name="ce9" office:value-type="string">
            <text:p>2026-03-16 14:18:59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16X.XXX.XXX.X9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Zestawy dermokosmetyków</text:p>
          </table:table-cell>
          <table:table-cell table:style-name="ce9" office:value-type="string">
            <text:p>Caudalie Vinoperfect Zestaw Wiosenny - Serum Rozjaśniające, 30ml + Krem na Dzień, 15ml + Krem na Noc, 15ml</text:p>
          </table:table-cell>
          <table:table-cell table:style-name="ce8" office:value-type="float" office:value="36451">
            <text:p>36451</text:p>
          </table:table-cell>
          <table:table-cell table:style-name="ce9" office:value-type="string">
            <text:p>2026-03-16 14:21:15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31.XXX.XXX.X6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nerały i witaminy</text:p>
          </table:table-cell>
          <table:table-cell table:style-name="ce9" office:value-type="string">
            <text:p>Biofarm Vigalex D3 + K2 Max 60 tabl.</text:p>
          </table:table-cell>
          <table:table-cell table:style-name="ce8" office:value-type="float" office:value="18365">
            <text:p>18365</text:p>
          </table:table-cell>
          <table:table-cell table:style-name="ce9" office:value-type="string">
            <text:p>2026-03-16 14:22:30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37.XXX.XXX.4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Mydła</text:p>
          </table:table-cell>
          <table:table-cell table:style-name="ce9" office:value-type="string">
            <text:p>Vinsvin Mydełko naturalne z nanosrebrem w płynie 500Ml</text:p>
          </table:table-cell>
          <table:table-cell table:style-name="ce8" office:value-type="float" office:value="4626">
            <text:p>4626</text:p>
          </table:table-cell>
          <table:table-cell table:style-name="ce9" office:value-type="string">
            <text:p>2026-03-16 14:23:11</text:p>
          </table:table-cell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9" office:value-type="string">
            <text:p>5.XXX.XXX.9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Alergia</text:p>
          </table:table-cell>
          <table:table-cell table:style-name="ce9" office:value-type="string">
            <text:p>Cetip 10 tabl.</text:p>
          </table:table-cell>
          <table:table-cell table:style-name="ce8" office:value-type="float" office:value="394">
            <text:p>394</text:p>
          </table:table-cell>
          <table:table-cell table:style-name="ce9" office:value-type="string">
            <text:p>2026-03-16 14:24:38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85.XXX.XXX.X4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ęśnie, stawy i kości</text:p>
          </table:table-cell>
          <table:table-cell table:style-name="ce9" office:value-type="string">
            <text:p>Borowina Lecznicza Pasta 1 Kg</text:p>
          </table:table-cell>
          <table:table-cell table:style-name="ce8" office:value-type="float" office:value="4899">
            <text:p>4899</text:p>
          </table:table-cell>
          <table:table-cell table:style-name="ce9" office:value-type="string">
            <text:p>2026-03-16 14:27:15</text:p>
          </table:table-cell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9" office:value-type="string">
            <text:p>19X.XXX.XXX.X1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ęśnie, stawy i kości</text:p>
          </table:table-cell>
          <table:table-cell table:style-name="ce9" office:value-type="string">
            <text:p>Borowina Lecznicza Pasta 1 Kg</text:p>
          </table:table-cell>
          <table:table-cell table:style-name="ce8" office:value-type="float" office:value="4899">
            <text:p>4899</text:p>
          </table:table-cell>
          <table:table-cell table:style-name="ce9" office:value-type="string">
            <text:p>2026-03-16 14:28:00</text:p>
          </table:table-cell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9" office:value-type="string">
            <text:p>19X.XXX.XXX.X1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łyny i żele do dezynfekcji ran</text:p>
          </table:table-cell>
          <table:table-cell table:style-name="ce9" office:value-type="string">
            <text:p>Skinsept Pur 1000ml</text:p>
          </table:table-cell>
          <table:table-cell table:style-name="ce8" office:value-type="float" office:value="15403">
            <text:p>15403</text:p>
          </table:table-cell>
          <table:table-cell table:style-name="ce9" office:value-type="string">
            <text:p>2026-03-16 14:29:13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17X.XXX.XXX.X3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Wzrok i słuch</text:p>
          </table:table-cell>
          <table:table-cell table:style-name="ce9" office:value-type="string">
            <text:p>Blephasol Płyn Micelarny Do Wrażliwych Powiek 100ml</text:p>
          </table:table-cell>
          <table:table-cell table:style-name="ce8" office:value-type="float" office:value="3432">
            <text:p>3432</text:p>
          </table:table-cell>
          <table:table-cell table:style-name="ce9" office:value-type="string">
            <text:p>2026-03-16 14:29:49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79.XXX.XXX.X4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</text:p>
          </table:table-cell>
          <table:table-cell table:style-name="ce9" office:value-type="string">
            <text:p>Inversion Femme Complex 90kaps.</text:p>
          </table:table-cell>
          <table:table-cell table:style-name="ce8" office:value-type="float" office:value="12016">
            <text:p>12016</text:p>
          </table:table-cell>
          <table:table-cell table:style-name="ce9" office:value-type="string">
            <text:p>2026-03-16 14:34:59</text:p>
          </table:table-cell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9" office:value-type="string">
            <text:p>15X.XXX.XXX.1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Opatrunki</text:p>
          </table:table-cell>
          <table:table-cell table:style-name="ce9" office:value-type="string">
            <text:p>Akutol Opatrunek plaster w sprayu 60ml</text:p>
          </table:table-cell>
          <table:table-cell table:style-name="ce8" office:value-type="float" office:value="10087">
            <text:p>10087</text:p>
          </table:table-cell>
          <table:table-cell table:style-name="ce9" office:value-type="string">
            <text:p>2026-03-16 14:35:15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19X.XXX.XXX.X2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nerały i witaminy</text:p>
          </table:table-cell>
          <table:table-cell table:style-name="ce9" office:value-type="string">
            <text:p>Mieloguard Glyco 30 kaps.</text:p>
          </table:table-cell>
          <table:table-cell table:style-name="ce8" office:value-type="float" office:value="17311">
            <text:p>17311</text:p>
          </table:table-cell>
          <table:table-cell table:style-name="ce9" office:value-type="string">
            <text:p>2026-03-16 14:36:09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83.XXX.XXX.9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Zioła</text:p>
          </table:table-cell>
          <table:table-cell table:style-name="ce9" office:value-type="string">
            <text:p>Flos Ziele Macierzanki 50g</text:p>
          </table:table-cell>
          <table:table-cell table:style-name="ce8" office:value-type="float" office:value="13242">
            <text:p>13242</text:p>
          </table:table-cell>
          <table:table-cell table:style-name="ce9" office:value-type="string">
            <text:p>2026-03-16 14:36:38</text:p>
          </table:table-cell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9" office:value-type="string">
            <text:p>89.XXX.XXX.X8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Vicks Vaporub maść 100g</text:p>
          </table:table-cell>
          <table:table-cell table:style-name="ce8" office:value-type="float" office:value="6979">
            <text:p>6979</text:p>
          </table:table-cell>
          <table:table-cell table:style-name="ce9" office:value-type="string">
            <text:p>2026-03-16 14:39:07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93.XXX.XXX.X5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</text:p>
          </table:table-cell>
          <table:table-cell table:style-name="ce9" office:value-type="string">
            <text:p>Inversion Femme Complex 90kaps.</text:p>
          </table:table-cell>
          <table:table-cell table:style-name="ce8" office:value-type="float" office:value="12016">
            <text:p>12016</text:p>
          </table:table-cell>
          <table:table-cell table:style-name="ce9" office:value-type="string">
            <text:p>2026-03-16 14:41:15</text:p>
          </table:table-cell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9" office:value-type="string">
            <text:p>14X.XXX.XXX.X4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moczowy i płciowy</text:p>
          </table:table-cell>
          <table:table-cell table:style-name="ce9" office:value-type="string">
            <text:p>Gynoxin Uno 0,6G 1kaps.</text:p>
          </table:table-cell>
          <table:table-cell table:style-name="ce8" office:value-type="float" office:value="10753">
            <text:p>10753</text:p>
          </table:table-cell>
          <table:table-cell table:style-name="ce9" office:value-type="string">
            <text:p>2026-03-16 14:43:14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18X.XXX.XXX.1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eparaty medycyny naturalnej</text:p>
          </table:table-cell>
          <table:table-cell table:style-name="ce9" office:value-type="string">
            <text:p>KRAUTERHOF żel z żywokostem 250ml</text:p>
          </table:table-cell>
          <table:table-cell table:style-name="ce8" office:value-type="float" office:value="11050">
            <text:p>11050</text:p>
          </table:table-cell>
          <table:table-cell table:style-name="ce9" office:value-type="string">
            <text:p>2026-03-16 14:43:22</text:p>
          </table:table-cell>
          <table:table-cell table:style-name="ce10" office:value-type="currency" office:currency="PLN" office:value="0.88">
            <text:p>0,88 zł</text:p>
          </table:table-cell>
          <table:table-cell table:style-name="ce8"/>
          <table:table-cell table:style-name="ce10" office:value-type="currency" office:currency="PLN" office:value="0.88">
            <text:p>0,88 zł</text:p>
          </table:table-cell>
          <table:table-cell table:style-name="ce8"/>
          <table:table-cell table:style-name="ce9" office:value-type="string">
            <text:p>5.XXX.XXX.X1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nerały i witaminy</text:p>
          </table:table-cell>
          <table:table-cell table:style-name="ce9" office:value-type="string">
            <text:p>BODYMAX PLUS Multiwitamina Odporność Energia 200 tab.</text:p>
          </table:table-cell>
          <table:table-cell table:style-name="ce8" office:value-type="float" office:value="16252">
            <text:p>16252</text:p>
          </table:table-cell>
          <table:table-cell table:style-name="ce9" office:value-type="string">
            <text:p>2026-03-16 14:44:24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83.XXX.XXX.7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Biuro i firma</text:p>
          </table:table-cell>
          <table:table-cell table:style-name="ce9" office:value-type="string">
            <text:p>Wyposażenie medyczne</text:p>
          </table:table-cell>
          <table:table-cell table:style-name="ce9" office:value-type="string">
            <text:p>Bd Becton Dickinson Becton Dickinson Igły Do Pena 100Szt. 0.23X4Mm 32G</text:p>
          </table:table-cell>
          <table:table-cell table:style-name="ce8" office:value-type="float" office:value="16950">
            <text:p>16950</text:p>
          </table:table-cell>
          <table:table-cell table:style-name="ce9" office:value-type="string">
            <text:p>2026-03-16 14:46:42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46.XXX.XXX.X4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Zioła</text:p>
          </table:table-cell>
          <table:table-cell table:style-name="ce9" office:value-type="string">
            <text:p>Flos Ziele Macierzanki 50g</text:p>
          </table:table-cell>
          <table:table-cell table:style-name="ce8" office:value-type="float" office:value="13242">
            <text:p>13242</text:p>
          </table:table-cell>
          <table:table-cell table:style-name="ce9" office:value-type="string">
            <text:p>2026-03-16 14:48:05</text:p>
          </table:table-cell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9" office:value-type="string">
            <text:p>89.XXX.XXX.X8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Serce i układ krążenia</text:p>
          </table:table-cell>
          <table:table-cell table:style-name="ce9" office:value-type="string">
            <text:p>Tanakan 90 tabletek</text:p>
          </table:table-cell>
          <table:table-cell table:style-name="ce8" office:value-type="float" office:value="6611">
            <text:p>6611</text:p>
          </table:table-cell>
          <table:table-cell table:style-name="ce9" office:value-type="string">
            <text:p>2026-03-16 14:56:45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89.XXX.XXX.1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Krem ochronny z witaminą A 20g</text:p>
          </table:table-cell>
          <table:table-cell table:style-name="ce8" office:value-type="float" office:value="4273">
            <text:p>4273</text:p>
          </table:table-cell>
          <table:table-cell table:style-name="ce9" office:value-type="string">
            <text:p>2026-03-16 14:58:44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5.XXX.XXX.2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OROGERMINA Spray do gardła 1 zestaw</text:p>
          </table:table-cell>
          <table:table-cell table:style-name="ce8" office:value-type="float" office:value="11706">
            <text:p>11706</text:p>
          </table:table-cell>
          <table:table-cell table:style-name="ce9" office:value-type="string">
            <text:p>2026-03-16 14:58:45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19X.XXX.XXX.6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 i trawienie</text:p>
          </table:table-cell>
          <table:table-cell table:style-name="ce9" office:value-type="string">
            <text:p>Estabiom Junior 20kaps.</text:p>
          </table:table-cell>
          <table:table-cell table:style-name="ce8" office:value-type="float" office:value="6953">
            <text:p>6953</text:p>
          </table:table-cell>
          <table:table-cell table:style-name="ce9" office:value-type="string">
            <text:p>2026-03-16 15:01:10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82.XXX.XXX.X9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Balsamy do ust</text:p>
          </table:table-cell>
          <table:table-cell table:style-name="ce9" office:value-type="string">
            <text:p>Tisane balsam do ust 4,7g</text:p>
          </table:table-cell>
          <table:table-cell table:style-name="ce8" office:value-type="float" office:value="11377">
            <text:p>11377</text:p>
          </table:table-cell>
          <table:table-cell table:style-name="ce9" office:value-type="string">
            <text:p>2026-03-16 15:01:20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83.XXX.XXX.5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Kremy do twarzy</text:p>
          </table:table-cell>
          <table:table-cell table:style-name="ce9" office:value-type="string">
            <text:p>Caudalie Vinoperfect Krem na Przebarwienia z Niacynamidem Refill, 50ml</text:p>
          </table:table-cell>
          <table:table-cell table:style-name="ce8" office:value-type="float" office:value="32166">
            <text:p>32166</text:p>
          </table:table-cell>
          <table:table-cell table:style-name="ce9" office:value-type="string">
            <text:p>2026-03-16 15:02:04</text:p>
          </table:table-cell>
          <table:table-cell table:style-name="ce10" office:value-type="currency" office:currency="PLN" office:value="1.02">
            <text:p>1,02 zł</text:p>
          </table:table-cell>
          <table:table-cell table:style-name="ce8"/>
          <table:table-cell table:style-name="ce10" office:value-type="currency" office:currency="PLN" office:value="1.02">
            <text:p>1,02 zł</text:p>
          </table:table-cell>
          <table:table-cell table:style-name="ce8"/>
          <table:table-cell table:style-name="ce9" office:value-type="string">
            <text:p>83.XXX.XXX.1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Balsamy do ust</text:p>
          </table:table-cell>
          <table:table-cell table:style-name="ce9" office:value-type="string">
            <text:p>Tisane balsam do ust 4,7g</text:p>
          </table:table-cell>
          <table:table-cell table:style-name="ce8" office:value-type="float" office:value="11377">
            <text:p>11377</text:p>
          </table:table-cell>
          <table:table-cell table:style-name="ce9" office:value-type="string">
            <text:p>2026-03-16 15:02:07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83.XXX.XXX.5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Balsamy do ust</text:p>
          </table:table-cell>
          <table:table-cell table:style-name="ce9" office:value-type="string">
            <text:p>Tisane balsam do ust 4,7g</text:p>
          </table:table-cell>
          <table:table-cell table:style-name="ce8" office:value-type="float" office:value="11377">
            <text:p>11377</text:p>
          </table:table-cell>
          <table:table-cell table:style-name="ce9" office:value-type="string">
            <text:p>2026-03-16 15:02:52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83.XXX.XXX.5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Kremy do twarzy</text:p>
          </table:table-cell>
          <table:table-cell table:style-name="ce9" office:value-type="string">
            <text:p>Caudalie Vinoperfect Glikolowy Krem Rozjaśniający na Noc Refill, 50ml</text:p>
          </table:table-cell>
          <table:table-cell table:style-name="ce8" office:value-type="float" office:value="32165">
            <text:p>32165</text:p>
          </table:table-cell>
          <table:table-cell table:style-name="ce9" office:value-type="string">
            <text:p>2026-03-16 15:03:19</text:p>
          </table:table-cell>
          <table:table-cell table:style-name="ce10" office:value-type="currency" office:currency="PLN" office:value="1.02">
            <text:p>1,02 zł</text:p>
          </table:table-cell>
          <table:table-cell table:style-name="ce8"/>
          <table:table-cell table:style-name="ce10" office:value-type="currency" office:currency="PLN" office:value="1.02">
            <text:p>1,02 zł</text:p>
          </table:table-cell>
          <table:table-cell table:style-name="ce8"/>
          <table:table-cell table:style-name="ce9" office:value-type="string">
            <text:p>83.XXX.XXX.1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moczowy i płciowy</text:p>
          </table:table-cell>
          <table:table-cell table:style-name="ce9" office:value-type="string">
            <text:p>Gynoxin Optima 200mg 3kaps.</text:p>
          </table:table-cell>
          <table:table-cell table:style-name="ce8" office:value-type="float" office:value="14231">
            <text:p>14231</text:p>
          </table:table-cell>
          <table:table-cell table:style-name="ce9" office:value-type="string">
            <text:p>2026-03-16 15:08:26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37.XXX.XXX.X1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Samoopalacze</text:p>
          </table:table-cell>
          <table:table-cell table:style-name="ce9" office:value-type="string">
            <text:p>CAUDALIE Samoopalające krople brązujące 15 ml</text:p>
          </table:table-cell>
          <table:table-cell table:style-name="ce8" office:value-type="float" office:value="31976">
            <text:p>31976</text:p>
          </table:table-cell>
          <table:table-cell table:style-name="ce9" office:value-type="string">
            <text:p>2026-03-16 15:09:12</text:p>
          </table:table-cell>
          <table:table-cell table:style-name="ce10" office:value-type="currency" office:currency="PLN" office:value="0.81">
            <text:p>0,81 zł</text:p>
          </table:table-cell>
          <table:table-cell table:style-name="ce8"/>
          <table:table-cell table:style-name="ce10" office:value-type="currency" office:currency="PLN" office:value="0.81">
            <text:p>0,81 zł</text:p>
          </table:table-cell>
          <table:table-cell table:style-name="ce8"/>
          <table:table-cell table:style-name="ce9" office:value-type="string">
            <text:p>89.XXX.XXX.X6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Kremy do twarzy</text:p>
          </table:table-cell>
          <table:table-cell table:style-name="ce9" office:value-type="string">
            <text:p>Krem Naturalis Wiesiołkowy Półtłusty na dzień i noc 50ml</text:p>
          </table:table-cell>
          <table:table-cell table:style-name="ce8" office:value-type="float" office:value="17394">
            <text:p>17394</text:p>
          </table:table-cell>
          <table:table-cell table:style-name="ce9" office:value-type="string">
            <text:p>2026-03-16 15:11:39</text:p>
          </table:table-cell>
          <table:table-cell table:style-name="ce10" office:value-type="currency" office:currency="PLN" office:value="1.02">
            <text:p>1,02 zł</text:p>
          </table:table-cell>
          <table:table-cell table:style-name="ce8"/>
          <table:table-cell table:style-name="ce10" office:value-type="currency" office:currency="PLN" office:value="1.02">
            <text:p>1,02 zł</text:p>
          </table:table-cell>
          <table:table-cell table:style-name="ce8"/>
          <table:table-cell table:style-name="ce9" office:value-type="string">
            <text:p>31.XXX.XXX.2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Kremy do twarzy</text:p>
          </table:table-cell>
          <table:table-cell table:style-name="ce9" office:value-type="string">
            <text:p>Krem Naturalis Wiesiołkowy Półtłusty na dzień i noc 50ml</text:p>
          </table:table-cell>
          <table:table-cell table:style-name="ce8" office:value-type="float" office:value="17394">
            <text:p>17394</text:p>
          </table:table-cell>
          <table:table-cell table:style-name="ce9" office:value-type="string">
            <text:p>2026-03-16 15:12:57</text:p>
          </table:table-cell>
          <table:table-cell table:style-name="ce10" office:value-type="currency" office:currency="PLN" office:value="1.02">
            <text:p>1,02 zł</text:p>
          </table:table-cell>
          <table:table-cell table:style-name="ce8"/>
          <table:table-cell table:style-name="ce10" office:value-type="currency" office:currency="PLN" office:value="1.02">
            <text:p>1,02 zł</text:p>
          </table:table-cell>
          <table:table-cell table:style-name="ce8"/>
          <table:table-cell table:style-name="ce9" office:value-type="string">
            <text:p>31.XXX.XXX.2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Samoopalacze</text:p>
          </table:table-cell>
          <table:table-cell table:style-name="ce9" office:value-type="string">
            <text:p>CAUDALIE Samoopalające krople brązujące 15 ml</text:p>
          </table:table-cell>
          <table:table-cell table:style-name="ce8" office:value-type="float" office:value="31976">
            <text:p>31976</text:p>
          </table:table-cell>
          <table:table-cell table:style-name="ce9" office:value-type="string">
            <text:p>2026-03-16 15:13:58</text:p>
          </table:table-cell>
          <table:table-cell table:style-name="ce10" office:value-type="currency" office:currency="PLN" office:value="0.81">
            <text:p>0,81 zł</text:p>
          </table:table-cell>
          <table:table-cell table:style-name="ce8"/>
          <table:table-cell table:style-name="ce10" office:value-type="currency" office:currency="PLN" office:value="0.81">
            <text:p>0,81 zł</text:p>
          </table:table-cell>
          <table:table-cell table:style-name="ce8"/>
          <table:table-cell table:style-name="ce9" office:value-type="string">
            <text:p>89.XXX.XXX.X6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Zestawy dermokosmetyków</text:p>
          </table:table-cell>
          <table:table-cell table:style-name="ce9" office:value-type="string">
            <text:p>Caudalie Vinoperfect Zestaw Wiosenny - Serum Rozjaśniające, 30ml + Krem na Dzień, 15ml + Krem na Noc, 15ml</text:p>
          </table:table-cell>
          <table:table-cell table:style-name="ce8" office:value-type="float" office:value="36451">
            <text:p>36451</text:p>
          </table:table-cell>
          <table:table-cell table:style-name="ce9" office:value-type="string">
            <text:p>2026-03-16 15:14:28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83.XXX.XXX.X1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Samoopalacze</text:p>
          </table:table-cell>
          <table:table-cell table:style-name="ce9" office:value-type="string">
            <text:p>CAUDALIE Samoopalające krople brązujące 15 ml</text:p>
          </table:table-cell>
          <table:table-cell table:style-name="ce8" office:value-type="float" office:value="31976">
            <text:p>31976</text:p>
          </table:table-cell>
          <table:table-cell table:style-name="ce9" office:value-type="string">
            <text:p>2026-03-16 15:14:35</text:p>
          </table:table-cell>
          <table:table-cell table:style-name="ce10" office:value-type="currency" office:currency="PLN" office:value="0.81">
            <text:p>0,81 zł</text:p>
          </table:table-cell>
          <table:table-cell table:style-name="ce8"/>
          <table:table-cell table:style-name="ce10" office:value-type="currency" office:currency="PLN" office:value="0.81">
            <text:p>0,81 zł</text:p>
          </table:table-cell>
          <table:table-cell table:style-name="ce8"/>
          <table:table-cell table:style-name="ce9" office:value-type="string">
            <text:p>89.XXX.XXX.X6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nerały i witaminy</text:p>
          </table:table-cell>
          <table:table-cell table:style-name="ce9" office:value-type="string">
            <text:p>Vitrum D3 Forte 2000 J.M. 120 kaps.</text:p>
          </table:table-cell>
          <table:table-cell table:style-name="ce8" office:value-type="float" office:value="5579">
            <text:p>5579</text:p>
          </table:table-cell>
          <table:table-cell table:style-name="ce9" office:value-type="string">
            <text:p>2026-03-16 15:16:16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31.XXX.XXX.X1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moczowy i płciowy</text:p>
          </table:table-cell>
          <table:table-cell table:style-name="ce9" office:value-type="string">
            <text:p>Furaginum MAX 100 mg 30 tab.</text:p>
          </table:table-cell>
          <table:table-cell table:style-name="ce8" office:value-type="float" office:value="19673">
            <text:p>19673</text:p>
          </table:table-cell>
          <table:table-cell table:style-name="ce9" office:value-type="string">
            <text:p>2026-03-16 15:18:37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91.XXX.XXX.5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Clotrimazolum Krem przeciwgrzybiczy 10mg/g 20g</text:p>
          </table:table-cell>
          <table:table-cell table:style-name="ce8" office:value-type="float" office:value="5940">
            <text:p>5940</text:p>
          </table:table-cell>
          <table:table-cell table:style-name="ce9" office:value-type="string">
            <text:p>2026-03-16 15:21:13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31.XXX.XXX.X5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Opatrunki</text:p>
          </table:table-cell>
          <table:table-cell table:style-name="ce9" office:value-type="string">
            <text:p>BACTIGRAS Opatrunek parafinowy z chlorhexydyną <text:s/>5cm * 5cm</text:p>
          </table:table-cell>
          <table:table-cell table:style-name="ce8" office:value-type="float" office:value="7649">
            <text:p>7649</text:p>
          </table:table-cell>
          <table:table-cell table:style-name="ce9" office:value-type="string">
            <text:p>2026-03-16 15:21:23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31.XXX.XXX.X0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Zioła</text:p>
          </table:table-cell>
          <table:table-cell table:style-name="ce9" office:value-type="string">
            <text:p>Zioła Mnicha Na trawienie 20tbx2g</text:p>
          </table:table-cell>
          <table:table-cell table:style-name="ce8" office:value-type="float" office:value="18546">
            <text:p>18546</text:p>
          </table:table-cell>
          <table:table-cell table:style-name="ce9" office:value-type="string">
            <text:p>2026-03-16 15:21:25</text:p>
          </table:table-cell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9" office:value-type="string">
            <text:p>18X.XXX.XXX.X5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nerwowy i pamięć</text:p>
          </table:table-cell>
          <table:table-cell table:style-name="ce9" office:value-type="string">
            <text:p>Tabletki NEOSEN Forte 30 szt.</text:p>
          </table:table-cell>
          <table:table-cell table:style-name="ce8" office:value-type="float" office:value="32291">
            <text:p>32291</text:p>
          </table:table-cell>
          <table:table-cell table:style-name="ce9" office:value-type="string">
            <text:p>2026-03-16 15:21:35</text:p>
          </table:table-cell>
          <table:table-cell table:style-name="ce10" office:value-type="currency" office:currency="PLN" office:value="0.74">
            <text:p>0,74 zł</text:p>
          </table:table-cell>
          <table:table-cell table:style-name="ce8"/>
          <table:table-cell table:style-name="ce10" office:value-type="currency" office:currency="PLN" office:value="0.74">
            <text:p>0,74 zł</text:p>
          </table:table-cell>
          <table:table-cell table:style-name="ce8"/>
          <table:table-cell table:style-name="ce9" office:value-type="string">
            <text:p>37.XXX.XXX.X3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Zioła</text:p>
          </table:table-cell>
          <table:table-cell table:style-name="ce9" office:value-type="string">
            <text:p>Zioła Mnicha Na trawienie 20tbx2g</text:p>
          </table:table-cell>
          <table:table-cell table:style-name="ce8" office:value-type="float" office:value="18546">
            <text:p>18546</text:p>
          </table:table-cell>
          <table:table-cell table:style-name="ce9" office:value-type="string">
            <text:p>2026-03-16 15:23:22</text:p>
          </table:table-cell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9" office:value-type="string">
            <text:p>18X.XXX.XXX.X5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moczowy i płciowy</text:p>
          </table:table-cell>
          <table:table-cell table:style-name="ce9" office:value-type="string">
            <text:p>Permen Med Forte Tabletki powlekane, na zaburzenia erekcji 4 szt.</text:p>
          </table:table-cell>
          <table:table-cell table:style-name="ce8" office:value-type="float" office:value="19672">
            <text:p>19672</text:p>
          </table:table-cell>
          <table:table-cell table:style-name="ce9" office:value-type="string">
            <text:p>2026-03-16 15:29:26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79.XXX.XXX.6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nerały i witaminy</text:p>
          </table:table-cell>
          <table:table-cell table:style-name="ce9" office:value-type="string">
            <text:p>Vitrum D3 Forte 2000 J.M. 120 kaps.</text:p>
          </table:table-cell>
          <table:table-cell table:style-name="ce8" office:value-type="float" office:value="5579">
            <text:p>5579</text:p>
          </table:table-cell>
          <table:table-cell table:style-name="ce9" office:value-type="string">
            <text:p>2026-03-16 15:30:29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31.XXX.XXX.X1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moczowy i płciowy</text:p>
          </table:table-cell>
          <table:table-cell table:style-name="ce9" office:value-type="string">
            <text:p>Permen Med Forte Tabletki powlekane, na zaburzenia erekcji 4 szt.</text:p>
          </table:table-cell>
          <table:table-cell table:style-name="ce8" office:value-type="float" office:value="19672">
            <text:p>19672</text:p>
          </table:table-cell>
          <table:table-cell table:style-name="ce9" office:value-type="string">
            <text:p>2026-03-16 15:31:42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79.XXX.XXX.6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Zestawy dermokosmetyków</text:p>
          </table:table-cell>
          <table:table-cell table:style-name="ce9" office:value-type="string">
            <text:p>Caudalie Vinoperfect Zestaw Wiosenny - Serum Rozjaśniające, 30ml + Krem na Dzień, 15ml + Krem na Noc, 15ml</text:p>
          </table:table-cell>
          <table:table-cell table:style-name="ce8" office:value-type="float" office:value="36451">
            <text:p>36451</text:p>
          </table:table-cell>
          <table:table-cell table:style-name="ce9" office:value-type="string">
            <text:p>2026-03-16 15:32:08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5.XXX.XXX.X5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ęśnie, stawy i kości</text:p>
          </table:table-cell>
          <table:table-cell table:style-name="ce9" office:value-type="string">
            <text:p>Voltaren Emulgel 11,6mg/g żel 50g</text:p>
          </table:table-cell>
          <table:table-cell table:style-name="ce8" office:value-type="float" office:value="7178">
            <text:p>7178</text:p>
          </table:table-cell>
          <table:table-cell table:style-name="ce9" office:value-type="string">
            <text:p>2026-03-16 15:35:41</text:p>
          </table:table-cell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9" office:value-type="string">
            <text:p>89.XXX.XXX.X6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Alergia</text:p>
          </table:table-cell>
          <table:table-cell table:style-name="ce9" office:value-type="string">
            <text:p>EctoAlerg krople do oczu 10ml</text:p>
          </table:table-cell>
          <table:table-cell table:style-name="ce8" office:value-type="float" office:value="8340">
            <text:p>8340</text:p>
          </table:table-cell>
          <table:table-cell table:style-name="ce9" office:value-type="string">
            <text:p>2026-03-16 15:40:05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18X.XXX.XXX.7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CLARVOX Complex Spray do gardła, 30ml</text:p>
          </table:table-cell>
          <table:table-cell table:style-name="ce8" office:value-type="float" office:value="32268">
            <text:p>32268</text:p>
          </table:table-cell>
          <table:table-cell table:style-name="ce9" office:value-type="string">
            <text:p>2026-03-16 15:41:56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83.XXX.XXX.X3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ciała</text:p>
          </table:table-cell>
          <table:table-cell table:style-name="ce9" office:value-type="string">
            <text:p>A-DERMA DERMALIBOUR+ CICA- Krem regenerujący 100ml</text:p>
          </table:table-cell>
          <table:table-cell table:style-name="ce8" office:value-type="float" office:value="10516">
            <text:p>10516</text:p>
          </table:table-cell>
          <table:table-cell table:style-name="ce9" office:value-type="string">
            <text:p>2026-03-16 15:42:38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5.XXX.XXX.6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Płyny do płukania ust</text:p>
          </table:table-cell>
          <table:table-cell table:style-name="ce9" office:value-type="string">
            <text:p>Schulke Octenident Mouthwash Płyn Do Higieny Jamy Ustnej 250ml</text:p>
          </table:table-cell>
          <table:table-cell table:style-name="ce8" office:value-type="float" office:value="15747">
            <text:p>15747</text:p>
          </table:table-cell>
          <table:table-cell table:style-name="ce9" office:value-type="string">
            <text:p>2026-03-16 15:44:01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18X.XXX.XXX.3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Glukometry i akcesoria dla diabetyków</text:p>
          </table:table-cell>
          <table:table-cell table:style-name="ce9" office:value-type="string">
            <text:p>Genexo Ixell</text:p>
          </table:table-cell>
          <table:table-cell table:style-name="ce8" office:value-type="float" office:value="23286">
            <text:p>23286</text:p>
          </table:table-cell>
          <table:table-cell table:style-name="ce9" office:value-type="string">
            <text:p>2026-03-16 15:51:04</text:p>
          </table:table-cell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9" office:value-type="string">
            <text:p>81.XXX.XXX.X1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moczowy i płciowy</text:p>
          </table:table-cell>
          <table:table-cell table:style-name="ce9" office:value-type="string">
            <text:p>Feminum Nawilżający Żel Intymny 75g</text:p>
          </table:table-cell>
          <table:table-cell table:style-name="ce8" office:value-type="float" office:value="19446">
            <text:p>19446</text:p>
          </table:table-cell>
          <table:table-cell table:style-name="ce9" office:value-type="string">
            <text:p>2026-03-16 15:52:22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91.XXX.XXX.1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Moda</text:p>
          </table:table-cell>
          <table:table-cell table:style-name="ce9" office:value-type="string">
            <text:p>Akcesoria do butów</text:p>
          </table:table-cell>
          <table:table-cell table:style-name="ce9" office:value-type="string">
            <text:p>Butosept Zestaw Do Dezynfekcji Stosowany Przy Grzybicy Stóp (Płyn 100Ml + Zasypka Dezynfekcyjna 50G)</text:p>
          </table:table-cell>
          <table:table-cell table:style-name="ce8" office:value-type="float" office:value="11956">
            <text:p>11956</text:p>
          </table:table-cell>
          <table:table-cell table:style-name="ce9" office:value-type="string">
            <text:p>2026-03-16 15:55:08</text:p>
          </table:table-cell>
          <table:table-cell table:style-name="ce10" office:value-type="currency" office:currency="PLN" office:value="0.85">
            <text:p>0,85 zł</text:p>
          </table:table-cell>
          <table:table-cell table:style-name="ce10" office:value-type="currency" office:currency="PLN" office:value="0">
            <text:p>0,00 zł</text:p>
          </table:table-cell>
          <table:table-cell table:style-name="ce10" office:value-type="currency" office:currency="PLN" office:value="0.85">
            <text:p>0,85 zł</text:p>
          </table:table-cell>
          <table:table-cell table:style-name="ce8" office:value-type="float" office:value="2">
            <text:p>2</text:p>
          </table:table-cell>
          <table:table-cell table:style-name="ce9" office:value-type="string">
            <text:p>79.XXX.XXX.3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Zioła</text:p>
          </table:table-cell>
          <table:table-cell table:style-name="ce9" office:value-type="string">
            <text:p>Zioła Mnicha Na trawienie 20tbx2g</text:p>
          </table:table-cell>
          <table:table-cell table:style-name="ce8" office:value-type="float" office:value="18546">
            <text:p>18546</text:p>
          </table:table-cell>
          <table:table-cell table:style-name="ce9" office:value-type="string">
            <text:p>2026-03-16 16:03:59</text:p>
          </table:table-cell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9" office:value-type="string">
            <text:p>18X.XXX.XXX.8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Akcesoria do ciśnieniomierzy</text:p>
          </table:table-cell>
          <table:table-cell table:style-name="ce9" office:value-type="string">
            <text:p>Diagnosis Zasilacz do ciśnieniomierzy AND</text:p>
          </table:table-cell>
          <table:table-cell table:style-name="ce8" office:value-type="float" office:value="35829">
            <text:p>35829</text:p>
          </table:table-cell>
          <table:table-cell table:style-name="ce9" office:value-type="string">
            <text:p>2026-03-16 16:04:38</text:p>
          </table:table-cell>
          <table:table-cell table:style-name="ce10" office:value-type="currency" office:currency="PLN" office:value="0.76">
            <text:p>0,76 zł</text:p>
          </table:table-cell>
          <table:table-cell table:style-name="ce8"/>
          <table:table-cell table:style-name="ce10" office:value-type="currency" office:currency="PLN" office:value="0.76">
            <text:p>0,76 zł</text:p>
          </table:table-cell>
          <table:table-cell table:style-name="ce8"/>
          <table:table-cell table:style-name="ce9" office:value-type="string">
            <text:p>83.XXX.XXX.4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Zioła</text:p>
          </table:table-cell>
          <table:table-cell table:style-name="ce9" office:value-type="string">
            <text:p>Flos: Jemioła ziele (visci herba) - 50g</text:p>
          </table:table-cell>
          <table:table-cell table:style-name="ce8" office:value-type="float" office:value="18486">
            <text:p>18486</text:p>
          </table:table-cell>
          <table:table-cell table:style-name="ce9" office:value-type="string">
            <text:p>2026-03-16 16:14:45</text:p>
          </table:table-cell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9" office:value-type="string">
            <text:p>37.XXX.XXX.X7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Clotrimazolum Krem przeciwgrzybiczy 10mg/g 20g</text:p>
          </table:table-cell>
          <table:table-cell table:style-name="ce8" office:value-type="float" office:value="5940">
            <text:p>5940</text:p>
          </table:table-cell>
          <table:table-cell table:style-name="ce9" office:value-type="string">
            <text:p>2026-03-16 16:14:47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31.XXX.XXX.3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CLARVOX Complex Spray do gardła, 30ml</text:p>
          </table:table-cell>
          <table:table-cell table:style-name="ce8" office:value-type="float" office:value="32268">
            <text:p>32268</text:p>
          </table:table-cell>
          <table:table-cell table:style-name="ce9" office:value-type="string">
            <text:p>2026-03-16 16:17:54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5.XXX.XXX.X3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Serce i układ krążenia</text:p>
          </table:table-cell>
          <table:table-cell table:style-name="ce9" office:value-type="string">
            <text:p>Procto-Glyvenol 30g</text:p>
          </table:table-cell>
          <table:table-cell table:style-name="ce8" office:value-type="float" office:value="578">
            <text:p>578</text:p>
          </table:table-cell>
          <table:table-cell table:style-name="ce9" office:value-type="string">
            <text:p>2026-03-16 16:22:15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94.XXX.XXX.X0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Zioła</text:p>
          </table:table-cell>
          <table:table-cell table:style-name="ce9" office:value-type="string">
            <text:p>Senes liść FIX 1 g 50 sasz.</text:p>
          </table:table-cell>
          <table:table-cell table:style-name="ce8" office:value-type="float" office:value="6404">
            <text:p>6404</text:p>
          </table:table-cell>
          <table:table-cell table:style-name="ce9" office:value-type="string">
            <text:p>2026-03-16 16:23:30</text:p>
          </table:table-cell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9" office:value-type="string">
            <text:p>84.XXX.XXX.X4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nerały i witaminy</text:p>
          </table:table-cell>
          <table:table-cell table:style-name="ce9" office:value-type="string">
            <text:p>Biofarm Vigalex D3 + K2 Max 60 tabl.</text:p>
          </table:table-cell>
          <table:table-cell table:style-name="ce8" office:value-type="float" office:value="18365">
            <text:p>18365</text:p>
          </table:table-cell>
          <table:table-cell table:style-name="ce9" office:value-type="string">
            <text:p>2026-03-16 16:29:36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78.XXX.XXX.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nerały i witaminy</text:p>
          </table:table-cell>
          <table:table-cell table:style-name="ce9" office:value-type="string">
            <text:p>Biofarm Vigalex D3 + K2 Max 60 tabl.</text:p>
          </table:table-cell>
          <table:table-cell table:style-name="ce8" office:value-type="float" office:value="18365">
            <text:p>18365</text:p>
          </table:table-cell>
          <table:table-cell table:style-name="ce9" office:value-type="string">
            <text:p>2026-03-16 16:30:41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78.XXX.XXX.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Ogród</text:p>
          </table:table-cell>
          <table:table-cell table:style-name="ce9" office:value-type="string">
            <text:p>Odstraszanie owadów</text:p>
          </table:table-cell>
          <table:table-cell table:style-name="ce9" office:value-type="string">
            <text:p>Kosmed Spray Na Komary Kleszcze I Meszki Powyżej 1. Roku Życia 100ml</text:p>
          </table:table-cell>
          <table:table-cell table:style-name="ce8" office:value-type="float" office:value="8585">
            <text:p>8585</text:p>
          </table:table-cell>
          <table:table-cell table:style-name="ce9" office:value-type="string">
            <text:p>2026-03-16 16:31:41</text:p>
          </table:table-cell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9" office:value-type="string">
            <text:p>10X.XXX.XXX.X4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Ogród</text:p>
          </table:table-cell>
          <table:table-cell table:style-name="ce9" office:value-type="string">
            <text:p>Odstraszanie owadów</text:p>
          </table:table-cell>
          <table:table-cell table:style-name="ce9" office:value-type="string">
            <text:p>Kosmed Spray Na Komary Kleszcze I Meszki Powyżej 1. Roku Życia 100ml</text:p>
          </table:table-cell>
          <table:table-cell table:style-name="ce8" office:value-type="float" office:value="8585">
            <text:p>8585</text:p>
          </table:table-cell>
          <table:table-cell table:style-name="ce9" office:value-type="string">
            <text:p>2026-03-16 16:32:36</text:p>
          </table:table-cell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9" office:value-type="string">
            <text:p>10X.XXX.XXX.X4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ozostałe suplementy</text:p>
          </table:table-cell>
          <table:table-cell table:style-name="ce9" office:value-type="string">
            <text:p>Czarnuszka 500Mg 60 Kaps</text:p>
          </table:table-cell>
          <table:table-cell table:style-name="ce8" office:value-type="float" office:value="11524">
            <text:p>11524</text:p>
          </table:table-cell>
          <table:table-cell table:style-name="ce9" office:value-type="string">
            <text:p>2026-03-16 16:33:59</text:p>
          </table:table-cell>
          <table:table-cell table:style-name="ce10" office:value-type="currency" office:currency="PLN" office:value="0.89">
            <text:p>0,89 zł</text:p>
          </table:table-cell>
          <table:table-cell table:style-name="ce8"/>
          <table:table-cell table:style-name="ce10" office:value-type="currency" office:currency="PLN" office:value="0.89">
            <text:p>0,89 zł</text:p>
          </table:table-cell>
          <table:table-cell table:style-name="ce8"/>
          <table:table-cell table:style-name="ce9" office:value-type="string">
            <text:p>18X.XXX.XXX.X1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Suplementy na wzrok i słuch</text:p>
          </table:table-cell>
          <table:table-cell table:style-name="ce9" office:value-type="string">
            <text:p>Aronta 30 tabl</text:p>
          </table:table-cell>
          <table:table-cell table:style-name="ce8" office:value-type="float" office:value="658">
            <text:p>658</text:p>
          </table:table-cell>
          <table:table-cell table:style-name="ce9" office:value-type="string">
            <text:p>2026-03-16 16:38:04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45.XXX.XXX.X1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moczowy i płciowy</text:p>
          </table:table-cell>
          <table:table-cell table:style-name="ce9" office:value-type="string">
            <text:p>Gynoxin Optima 200mg 3kaps.</text:p>
          </table:table-cell>
          <table:table-cell table:style-name="ce8" office:value-type="float" office:value="14231">
            <text:p>14231</text:p>
          </table:table-cell>
          <table:table-cell table:style-name="ce9" office:value-type="string">
            <text:p>2026-03-16 16:40:19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18X.XXX.XXX.X7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Suplementy na wzrok i słuch</text:p>
          </table:table-cell>
          <table:table-cell table:style-name="ce9" office:value-type="string">
            <text:p>Aronta 30 tabl</text:p>
          </table:table-cell>
          <table:table-cell table:style-name="ce8" office:value-type="float" office:value="658">
            <text:p>658</text:p>
          </table:table-cell>
          <table:table-cell table:style-name="ce9" office:value-type="string">
            <text:p>2026-03-16 16:40:23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45.XXX.XXX.X1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Akcesoria do ciśnieniomierzy</text:p>
          </table:table-cell>
          <table:table-cell table:style-name="ce9" office:value-type="string">
            <text:p>Diagnosis Zasilacz do ciśnieniomierzy AND</text:p>
          </table:table-cell>
          <table:table-cell table:style-name="ce8" office:value-type="float" office:value="35829">
            <text:p>35829</text:p>
          </table:table-cell>
          <table:table-cell table:style-name="ce9" office:value-type="string">
            <text:p>2026-03-16 16:41:27</text:p>
          </table:table-cell>
          <table:table-cell table:style-name="ce10" office:value-type="currency" office:currency="PLN" office:value="0.76">
            <text:p>0,76 zł</text:p>
          </table:table-cell>
          <table:table-cell table:style-name="ce8"/>
          <table:table-cell table:style-name="ce10" office:value-type="currency" office:currency="PLN" office:value="0.76">
            <text:p>0,76 zł</text:p>
          </table:table-cell>
          <table:table-cell table:style-name="ce8"/>
          <table:table-cell table:style-name="ce9" office:value-type="string">
            <text:p>83.XXX.XXX.4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ęśnie, stawy i kości</text:p>
          </table:table-cell>
          <table:table-cell table:style-name="ce9" office:value-type="string">
            <text:p>KARPAL AKUT maść, 50ml</text:p>
          </table:table-cell>
          <table:table-cell table:style-name="ce8" office:value-type="float" office:value="17004">
            <text:p>17004</text:p>
          </table:table-cell>
          <table:table-cell table:style-name="ce9" office:value-type="string">
            <text:p>2026-03-16 16:45:56</text:p>
          </table:table-cell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9" office:value-type="string">
            <text:p>37.XXX.XXX.2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Kremy do ciała</text:p>
          </table:table-cell>
          <table:table-cell table:style-name="ce9" office:value-type="string">
            <text:p>Gorvita Żel żywokostowy z jałowcem i MSM 200ml</text:p>
          </table:table-cell>
          <table:table-cell table:style-name="ce8" office:value-type="float" office:value="11273">
            <text:p>11273</text:p>
          </table:table-cell>
          <table:table-cell table:style-name="ce9" office:value-type="string">
            <text:p>2026-03-16 16:47:10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31.XXX.XXX.X7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Nizoral Krem 20mg/g 30 g</text:p>
          </table:table-cell>
          <table:table-cell table:style-name="ce8" office:value-type="float" office:value="9594">
            <text:p>9594</text:p>
          </table:table-cell>
          <table:table-cell table:style-name="ce9" office:value-type="string">
            <text:p>2026-03-16 16:47:56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79.XXX.XXX.X0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Opatrunki</text:p>
          </table:table-cell>
          <table:table-cell table:style-name="ce9" office:value-type="string">
            <text:p>Opatr.AQUACEL Ag Foam 10x10cm nieprzyl.x1</text:p>
          </table:table-cell>
          <table:table-cell table:style-name="ce8" office:value-type="float" office:value="7238">
            <text:p>7238</text:p>
          </table:table-cell>
          <table:table-cell table:style-name="ce9" office:value-type="string">
            <text:p>2026-03-16 16:48:06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83.XXX.XXX.X1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Bioderma Atoderm Intensive Żel Oczyszczający I Natłuszczający 1000ml</text:p>
          </table:table-cell>
          <table:table-cell table:style-name="ce8" office:value-type="float" office:value="21024">
            <text:p>21024</text:p>
          </table:table-cell>
          <table:table-cell table:style-name="ce9" office:value-type="string">
            <text:p>2026-03-16 16:52:45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17X.XXX.XXX.3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Suplementy na wzrok i słuch</text:p>
          </table:table-cell>
          <table:table-cell table:style-name="ce9" office:value-type="string">
            <text:p>Kropia Plus krople do oczu nawilżające 10ml</text:p>
          </table:table-cell>
          <table:table-cell table:style-name="ce8" office:value-type="float" office:value="29313">
            <text:p>29313</text:p>
          </table:table-cell>
          <table:table-cell table:style-name="ce9" office:value-type="string">
            <text:p>2026-03-16 16:53:45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77.XXX.XXX.X8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Lamisilatt Krem 10 mg/g 15g</text:p>
          </table:table-cell>
          <table:table-cell table:style-name="ce8" office:value-type="float" office:value="6122">
            <text:p>6122</text:p>
          </table:table-cell>
          <table:table-cell table:style-name="ce9" office:value-type="string">
            <text:p>2026-03-16 16:54:53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46.XXX.XXX.6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nerały i witaminy</text:p>
          </table:table-cell>
          <table:table-cell table:style-name="ce9" office:value-type="string">
            <text:p>ZYSKAJ ZDROWIE Multioptic 30 tabl</text:p>
          </table:table-cell>
          <table:table-cell table:style-name="ce8" office:value-type="float" office:value="17350">
            <text:p>17350</text:p>
          </table:table-cell>
          <table:table-cell table:style-name="ce9" office:value-type="string">
            <text:p>2026-03-16 17:00:11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88.XXX.XXX.2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Płyny do płukania ust</text:p>
          </table:table-cell>
          <table:table-cell table:style-name="ce9" office:value-type="string">
            <text:p>Schulke Octenident Mouthwash Płyn Do Higieny Jamy Ustnej 250ml</text:p>
          </table:table-cell>
          <table:table-cell table:style-name="ce8" office:value-type="float" office:value="15747">
            <text:p>15747</text:p>
          </table:table-cell>
          <table:table-cell table:style-name="ce9" office:value-type="string">
            <text:p>2026-03-16 17:00:33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37.XXX.XXX.X2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ciwbólowe</text:p>
          </table:table-cell>
          <table:table-cell table:style-name="ce9" office:value-type="string">
            <text:p>Saridon 20 tabl</text:p>
          </table:table-cell>
          <table:table-cell table:style-name="ce8" office:value-type="float" office:value="10464">
            <text:p>10464</text:p>
          </table:table-cell>
          <table:table-cell table:style-name="ce9" office:value-type="string">
            <text:p>2026-03-16 17:00:59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91.XXX.XXX.X3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Dla dziecka</text:p>
          </table:table-cell>
          <table:table-cell table:style-name="ce9" office:value-type="string">
            <text:p>Kosmetyki dla dzieci i niemowląt</text:p>
          </table:table-cell>
          <table:table-cell table:style-name="ce9" office:value-type="string">
            <text:p>Eloderm Szampon od 1. dnia życia 200ml</text:p>
          </table:table-cell>
          <table:table-cell table:style-name="ce8" office:value-type="float" office:value="248">
            <text:p>248</text:p>
          </table:table-cell>
          <table:table-cell table:style-name="ce9" office:value-type="string">
            <text:p>2026-03-16 17:02:35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5.XXX.XXX.8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Otrivin Menthol 1mg/ml Aerozol do nosa 10 ml</text:p>
          </table:table-cell>
          <table:table-cell table:style-name="ce8" office:value-type="float" office:value="14886">
            <text:p>14886</text:p>
          </table:table-cell>
          <table:table-cell table:style-name="ce9" office:value-type="string">
            <text:p>2026-03-16 17:09:27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37.XXX.XXX.7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Dla dziecka</text:p>
          </table:table-cell>
          <table:table-cell table:style-name="ce9" office:value-type="string">
            <text:p>Kosmetyki dla dzieci i niemowląt</text:p>
          </table:table-cell>
          <table:table-cell table:style-name="ce9" office:value-type="string">
            <text:p>Eloderm Szampon od 1. dnia życia 200ml</text:p>
          </table:table-cell>
          <table:table-cell table:style-name="ce8" office:value-type="float" office:value="248">
            <text:p>248</text:p>
          </table:table-cell>
          <table:table-cell table:style-name="ce9" office:value-type="string">
            <text:p>2026-03-16 17:12:28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5.XXX.XXX.8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Alergia</text:p>
          </table:table-cell>
          <table:table-cell table:style-name="ce9" office:value-type="string">
            <text:p>Cetip 10 tabl.</text:p>
          </table:table-cell>
          <table:table-cell table:style-name="ce8" office:value-type="float" office:value="394">
            <text:p>394</text:p>
          </table:table-cell>
          <table:table-cell table:style-name="ce9" office:value-type="string">
            <text:p>2026-03-16 17:14:55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94.XXX.XXX.1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Dla dziecka</text:p>
          </table:table-cell>
          <table:table-cell table:style-name="ce9" office:value-type="string">
            <text:p>Kosmetyki dla dzieci i niemowląt</text:p>
          </table:table-cell>
          <table:table-cell table:style-name="ce9" office:value-type="string">
            <text:p>Eloderm Szampon od 1. dnia życia 200ml</text:p>
          </table:table-cell>
          <table:table-cell table:style-name="ce8" office:value-type="float" office:value="248">
            <text:p>248</text:p>
          </table:table-cell>
          <table:table-cell table:style-name="ce9" office:value-type="string">
            <text:p>2026-03-16 17:16:54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5.XXX.XXX.8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ęśnie, stawy i kości</text:p>
          </table:table-cell>
          <table:table-cell table:style-name="ce9" office:value-type="string">
            <text:p>Go-On 25 Mg/2,5 ml Ampułko-Strzykawka 1 Szt.</text:p>
          </table:table-cell>
          <table:table-cell table:style-name="ce8" office:value-type="float" office:value="13773">
            <text:p>13773</text:p>
          </table:table-cell>
          <table:table-cell table:style-name="ce9" office:value-type="string">
            <text:p>2026-03-16 17:18:38</text:p>
          </table:table-cell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9" office:value-type="string">
            <text:p>5.XXX.XXX.9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Otrivin Menthol 1mg/ml Aerozol do nosa 10 ml</text:p>
          </table:table-cell>
          <table:table-cell table:style-name="ce8" office:value-type="float" office:value="14886">
            <text:p>14886</text:p>
          </table:table-cell>
          <table:table-cell table:style-name="ce9" office:value-type="string">
            <text:p>2026-03-16 17:19:16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37.XXX.XXX.X2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Kosmetyki do opalania</text:p>
          </table:table-cell>
          <table:table-cell table:style-name="ce9" office:value-type="string">
            <text:p>Caudalie Vinosun Protect Spf 30 Krem O Wysokiej Ochronie 50 ml</text:p>
          </table:table-cell>
          <table:table-cell table:style-name="ce8" office:value-type="float" office:value="28365">
            <text:p>28365</text:p>
          </table:table-cell>
          <table:table-cell table:style-name="ce9" office:value-type="string">
            <text:p>2026-03-16 17:20:24</text:p>
          </table:table-cell>
          <table:table-cell table:style-name="ce10" office:value-type="currency" office:currency="PLN" office:value="0.89">
            <text:p>0,89 zł</text:p>
          </table:table-cell>
          <table:table-cell table:style-name="ce8"/>
          <table:table-cell table:style-name="ce10" office:value-type="currency" office:currency="PLN" office:value="0.89">
            <text:p>0,89 zł</text:p>
          </table:table-cell>
          <table:table-cell table:style-name="ce8"/>
          <table:table-cell table:style-name="ce9" office:value-type="string">
            <text:p>15X.XXX.XXX.X3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nerały i witaminy</text:p>
          </table:table-cell>
          <table:table-cell table:style-name="ce9" office:value-type="string">
            <text:p>BODYMAX PLUS Multiwitamina Odporność Energia 200 tab.</text:p>
          </table:table-cell>
          <table:table-cell table:style-name="ce8" office:value-type="float" office:value="16252">
            <text:p>16252</text:p>
          </table:table-cell>
          <table:table-cell table:style-name="ce9" office:value-type="string">
            <text:p>2026-03-16 17:21:09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79.XXX.XXX.8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Otrivin Menthol 1mg/ml Aerozol do nosa 10 ml</text:p>
          </table:table-cell>
          <table:table-cell table:style-name="ce8" office:value-type="float" office:value="14886">
            <text:p>14886</text:p>
          </table:table-cell>
          <table:table-cell table:style-name="ce9" office:value-type="string">
            <text:p>2026-03-16 17:22:09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37.XXX.XXX.X2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Nizoral Krem 20mg/g 30 g</text:p>
          </table:table-cell>
          <table:table-cell table:style-name="ce8" office:value-type="float" office:value="9594">
            <text:p>9594</text:p>
          </table:table-cell>
          <table:table-cell table:style-name="ce9" office:value-type="string">
            <text:p>2026-03-16 17:25:19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31.XXX.XXX.X6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Alergia</text:p>
          </table:table-cell>
          <table:table-cell table:style-name="ce9" office:value-type="string">
            <text:p>Fenistil Krople doustne 1mg/1ml 20ml (Import równoległy)</text:p>
          </table:table-cell>
          <table:table-cell table:style-name="ce8" office:value-type="float" office:value="8335">
            <text:p>8335</text:p>
          </table:table-cell>
          <table:table-cell table:style-name="ce9" office:value-type="string">
            <text:p>2026-03-16 17:28:35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31.XXX.XXX.X4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Otrivin Menthol 1mg/ml Aerozol do nosa 10 ml</text:p>
          </table:table-cell>
          <table:table-cell table:style-name="ce8" office:value-type="float" office:value="14886">
            <text:p>14886</text:p>
          </table:table-cell>
          <table:table-cell table:style-name="ce9" office:value-type="string">
            <text:p>2026-03-16 17:31:36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37.XXX.XXX.X2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Nizoral Krem 20mg/g 30 g</text:p>
          </table:table-cell>
          <table:table-cell table:style-name="ce8" office:value-type="float" office:value="9594">
            <text:p>9594</text:p>
          </table:table-cell>
          <table:table-cell table:style-name="ce9" office:value-type="string">
            <text:p>2026-03-16 17:36:11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18X.XXX.XXX.X3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Stawy, mięśnie i kości</text:p>
          </table:table-cell>
          <table:table-cell table:style-name="ce9" office:value-type="string">
            <text:p>R-Flex Ultra Hydrolize 30sasz.</text:p>
          </table:table-cell>
          <table:table-cell table:style-name="ce8" office:value-type="float" office:value="10366">
            <text:p>10366</text:p>
          </table:table-cell>
          <table:table-cell table:style-name="ce9" office:value-type="string">
            <text:p>2026-03-16 17:36:51</text:p>
          </table:table-cell>
          <table:table-cell table:style-name="ce10" office:value-type="currency" office:currency="PLN" office:value="0.83">
            <text:p>0,83 zł</text:p>
          </table:table-cell>
          <table:table-cell table:style-name="ce8"/>
          <table:table-cell table:style-name="ce10" office:value-type="currency" office:currency="PLN" office:value="0.83">
            <text:p>0,83 zł</text:p>
          </table:table-cell>
          <table:table-cell table:style-name="ce8"/>
          <table:table-cell table:style-name="ce9" office:value-type="string">
            <text:p>95.XXX.XXX.X1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moczowy i płciowy</text:p>
          </table:table-cell>
          <table:table-cell table:style-name="ce9" office:value-type="string">
            <text:p>Furaginum MAX 100 mg 30 tab.</text:p>
          </table:table-cell>
          <table:table-cell table:style-name="ce8" office:value-type="float" office:value="19673">
            <text:p>19673</text:p>
          </table:table-cell>
          <table:table-cell table:style-name="ce9" office:value-type="string">
            <text:p>2026-03-16 17:37:45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37.XXX.XXX.X0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nerały i witaminy</text:p>
          </table:table-cell>
          <table:table-cell table:style-name="ce9" office:value-type="string">
            <text:p>Bonatium Karczoch 60 tabletek powlekanych</text:p>
          </table:table-cell>
          <table:table-cell table:style-name="ce8" office:value-type="float" office:value="18914">
            <text:p>18914</text:p>
          </table:table-cell>
          <table:table-cell table:style-name="ce9" office:value-type="string">
            <text:p>2026-03-16 17:44:02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94.XXX.XXX.X2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Suplementy dla seniorów</text:p>
          </table:table-cell>
          <table:table-cell table:style-name="ce9" office:value-type="string">
            <text:p>VITAPRIM Senior 60 tabl.</text:p>
          </table:table-cell>
          <table:table-cell table:style-name="ce8" office:value-type="float" office:value="32314">
            <text:p>32314</text:p>
          </table:table-cell>
          <table:table-cell table:style-name="ce9" office:value-type="string">
            <text:p>2026-03-16 17:44:03</text:p>
          </table:table-cell>
          <table:table-cell table:style-name="ce10" office:value-type="currency" office:currency="PLN" office:value="0.69">
            <text:p>0,69 zł</text:p>
          </table:table-cell>
          <table:table-cell table:style-name="ce8"/>
          <table:table-cell table:style-name="ce10" office:value-type="currency" office:currency="PLN" office:value="0.69">
            <text:p>0,69 zł</text:p>
          </table:table-cell>
          <table:table-cell table:style-name="ce8"/>
          <table:table-cell table:style-name="ce9" office:value-type="string">
            <text:p>89.XXX.XXX.X1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Dla dziecka</text:p>
          </table:table-cell>
          <table:table-cell table:style-name="ce9" office:value-type="string">
            <text:p>Kosmetyki dla dzieci i niemowląt</text:p>
          </table:table-cell>
          <table:table-cell table:style-name="ce9" office:value-type="string">
            <text:p>Eloderm Krem od 1. dnia życia 75 ml</text:p>
          </table:table-cell>
          <table:table-cell table:style-name="ce8" office:value-type="float" office:value="247">
            <text:p>247</text:p>
          </table:table-cell>
          <table:table-cell table:style-name="ce9" office:value-type="string">
            <text:p>2026-03-16 17:46:20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92.XXX.XXX.X1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ęśnie, stawy i kości</text:p>
          </table:table-cell>
          <table:table-cell table:style-name="ce9" office:value-type="string">
            <text:p>Borowina Lecznicza Pasta 1 Kg</text:p>
          </table:table-cell>
          <table:table-cell table:style-name="ce8" office:value-type="float" office:value="4899">
            <text:p>4899</text:p>
          </table:table-cell>
          <table:table-cell table:style-name="ce9" office:value-type="string">
            <text:p>2026-03-16 17:50:49</text:p>
          </table:table-cell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9" office:value-type="string">
            <text:p>83.XXX.XXX.X3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zieci i niemowlęta</text:p>
          </table:table-cell>
          <table:table-cell table:style-name="ce9" office:value-type="string">
            <text:p>Nurofen Forte dla dzieci 200 mg/5 ml Zawiesina o smaku truskawkowym 150 ml</text:p>
          </table:table-cell>
          <table:table-cell table:style-name="ce8" office:value-type="float" office:value="11065">
            <text:p>11065</text:p>
          </table:table-cell>
          <table:table-cell table:style-name="ce9" office:value-type="string">
            <text:p>2026-03-16 17:50:51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89.XXX.XXX.1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łciowy i moczowy</text:p>
          </table:table-cell>
          <table:table-cell table:style-name="ce9" office:value-type="string">
            <text:p>UroLact doustny Probiotyk Urologiczny 400mg, 10 kaps.</text:p>
          </table:table-cell>
          <table:table-cell table:style-name="ce8" office:value-type="float" office:value="19043">
            <text:p>19043</text:p>
          </table:table-cell>
          <table:table-cell table:style-name="ce9" office:value-type="string">
            <text:p>2026-03-16 17:51:25</text:p>
          </table:table-cell>
          <table:table-cell table:style-name="ce10" office:value-type="currency" office:currency="PLN" office:value="0.75">
            <text:p>0,75 zł</text:p>
          </table:table-cell>
          <table:table-cell table:style-name="ce8"/>
          <table:table-cell table:style-name="ce10" office:value-type="currency" office:currency="PLN" office:value="0.75">
            <text:p>0,75 zł</text:p>
          </table:table-cell>
          <table:table-cell table:style-name="ce8"/>
          <table:table-cell table:style-name="ce9" office:value-type="string">
            <text:p>91.XXX.XXX.X2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Glukometry i akcesoria dla diabetyków</text:p>
          </table:table-cell>
          <table:table-cell table:style-name="ce9" office:value-type="string">
            <text:p>Genexo Ixell</text:p>
          </table:table-cell>
          <table:table-cell table:style-name="ce8" office:value-type="float" office:value="23286">
            <text:p>23286</text:p>
          </table:table-cell>
          <table:table-cell table:style-name="ce9" office:value-type="string">
            <text:p>2026-03-16 17:54:27</text:p>
          </table:table-cell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9" office:value-type="string">
            <text:p>37.XXX.XXX.3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ęśnie, stawy i kości</text:p>
          </table:table-cell>
          <table:table-cell table:style-name="ce9" office:value-type="string">
            <text:p>Suplasyn 1-Shot 60 mg/6ml 1 ampułko-strzykawka</text:p>
          </table:table-cell>
          <table:table-cell table:style-name="ce8" office:value-type="float" office:value="26968">
            <text:p>26968</text:p>
          </table:table-cell>
          <table:table-cell table:style-name="ce9" office:value-type="string">
            <text:p>2026-03-16 17:57:07</text:p>
          </table:table-cell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9" office:value-type="string">
            <text:p>79.XXX.XXX.X8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ozostałe wyposażenie apteczek</text:p>
          </table:table-cell>
          <table:table-cell table:style-name="ce9" office:value-type="string">
            <text:p>Maga-Herba Benzyna apteczna, Maga-Herba, 100 ml</text:p>
          </table:table-cell>
          <table:table-cell table:style-name="ce8" office:value-type="float" office:value="10494">
            <text:p>10494</text:p>
          </table:table-cell>
          <table:table-cell table:style-name="ce9" office:value-type="string">
            <text:p>2026-03-16 18:00:21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79.XXX.XXX.X2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Wzrok i słuch</text:p>
          </table:table-cell>
          <table:table-cell table:style-name="ce9" office:value-type="string">
            <text:p>Optive Fusion Krople Do Oczu 10ml</text:p>
          </table:table-cell>
          <table:table-cell table:style-name="ce8" office:value-type="float" office:value="10260">
            <text:p>10260</text:p>
          </table:table-cell>
          <table:table-cell table:style-name="ce9" office:value-type="string">
            <text:p>2026-03-16 18:00:32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83.XXX.XXX.7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 i trawienie</text:p>
          </table:table-cell>
          <table:table-cell table:style-name="ce9" office:value-type="string">
            <text:p>Regulobon Prosz. 200g</text:p>
          </table:table-cell>
          <table:table-cell table:style-name="ce8" office:value-type="float" office:value="8247">
            <text:p>8247</text:p>
          </table:table-cell>
          <table:table-cell table:style-name="ce9" office:value-type="string">
            <text:p>2026-03-16 18:05:09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15X.XXX.XXX.X6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 i trawienie</text:p>
          </table:table-cell>
          <table:table-cell table:style-name="ce9" office:value-type="string">
            <text:p>Bonimed Gastrobon Na Trawienie Zioła Ojca Grzegorza 60kaps.</text:p>
          </table:table-cell>
          <table:table-cell table:style-name="ce8" office:value-type="float" office:value="16814">
            <text:p>16814</text:p>
          </table:table-cell>
          <table:table-cell table:style-name="ce9" office:value-type="string">
            <text:p>2026-03-16 18:09:12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37.XXX.XXX.6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Otrivin Menthol 1mg/ml Aerozol do nosa 10 ml</text:p>
          </table:table-cell>
          <table:table-cell table:style-name="ce8" office:value-type="float" office:value="14886">
            <text:p>14886</text:p>
          </table:table-cell>
          <table:table-cell table:style-name="ce9" office:value-type="string">
            <text:p>2026-03-16 18:10:13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10X.XXX.XXX.X9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Opatrunki</text:p>
          </table:table-cell>
          <table:table-cell table:style-name="ce9" office:value-type="string">
            <text:p>Opatr.AQUACEL Ag Foam 10x10cm nieprzyl.x1</text:p>
          </table:table-cell>
          <table:table-cell table:style-name="ce8" office:value-type="float" office:value="7238">
            <text:p>7238</text:p>
          </table:table-cell>
          <table:table-cell table:style-name="ce9" office:value-type="string">
            <text:p>2026-03-16 18:11:12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83.XXX.XXX.X2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Homeopatia</text:p>
          </table:table-cell>
          <table:table-cell table:style-name="ce9" office:value-type="string">
            <text:p>Boiron Argentum Nitricum 15CH 4 g</text:p>
          </table:table-cell>
          <table:table-cell table:style-name="ce8" office:value-type="float" office:value="21233">
            <text:p>21233</text:p>
          </table:table-cell>
          <table:table-cell table:style-name="ce9" office:value-type="string">
            <text:p>2026-03-16 18:12:48</text:p>
          </table:table-cell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9" office:value-type="string">
            <text:p>31.XXX.XXX.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ęśnie, stawy i kości</text:p>
          </table:table-cell>
          <table:table-cell table:style-name="ce9" office:value-type="string">
            <text:p>Biolevox HA 2,2% 2 ml żel dostawowy, 1 ampułkostrzykawka</text:p>
          </table:table-cell>
          <table:table-cell table:style-name="ce8" office:value-type="float" office:value="10623">
            <text:p>10623</text:p>
          </table:table-cell>
          <table:table-cell table:style-name="ce9" office:value-type="string">
            <text:p>2026-03-16 18:12:49</text:p>
          </table:table-cell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9" office:value-type="string">
            <text:p>46.XXX.XXX.X1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Chema-Elektromet Atopigo koncentrat do koncentrat do kąpieli 100g</text:p>
          </table:table-cell>
          <table:table-cell table:style-name="ce8" office:value-type="float" office:value="13988">
            <text:p>13988</text:p>
          </table:table-cell>
          <table:table-cell table:style-name="ce9" office:value-type="string">
            <text:p>2026-03-16 18:13:06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31.XXX.XXX.9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ciwbólowe</text:p>
          </table:table-cell>
          <table:table-cell table:style-name="ce9" office:value-type="string">
            <text:p>IBUPROM REGULAR 10 tabl.</text:p>
          </table:table-cell>
          <table:table-cell table:style-name="ce8" office:value-type="float" office:value="12">
            <text:p>12</text:p>
          </table:table-cell>
          <table:table-cell table:style-name="ce9" office:value-type="string">
            <text:p>2026-03-16 18:13:32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37.XXX.XXX.X7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ęśnie, stawy i kości</text:p>
          </table:table-cell>
          <table:table-cell table:style-name="ce9" office:value-type="string">
            <text:p>Biolevox HA 2,2% 2 ml żel dostawowy, 1 ampułkostrzykawka</text:p>
          </table:table-cell>
          <table:table-cell table:style-name="ce8" office:value-type="float" office:value="10623">
            <text:p>10623</text:p>
          </table:table-cell>
          <table:table-cell table:style-name="ce9" office:value-type="string">
            <text:p>2026-03-16 18:14:31</text:p>
          </table:table-cell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9" office:value-type="string">
            <text:p>46.XXX.XXX.X1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Mydła</text:p>
          </table:table-cell>
          <table:table-cell table:style-name="ce9" office:value-type="string">
            <text:p>Vinsvin Mydełko naturalne z nanosrebrem w płynie 500Ml</text:p>
          </table:table-cell>
          <table:table-cell table:style-name="ce8" office:value-type="float" office:value="4626">
            <text:p>4626</text:p>
          </table:table-cell>
          <table:table-cell table:style-name="ce9" office:value-type="string">
            <text:p>2026-03-16 18:15:13</text:p>
          </table:table-cell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9" office:value-type="string">
            <text:p>37.XXX.XXX.4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ciała</text:p>
          </table:table-cell>
          <table:table-cell table:style-name="ce9" office:value-type="string">
            <text:p>Drula Extra Forte krem depigmentacyjny 30ml</text:p>
          </table:table-cell>
          <table:table-cell table:style-name="ce8" office:value-type="float" office:value="16650">
            <text:p>16650</text:p>
          </table:table-cell>
          <table:table-cell table:style-name="ce9" office:value-type="string">
            <text:p>2026-03-16 18:15:33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21X.XXX.XXX.X5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 i trawienie</text:p>
          </table:table-cell>
          <table:table-cell table:style-name="ce9" office:value-type="string">
            <text:p>Triflora 40kaps.</text:p>
          </table:table-cell>
          <table:table-cell table:style-name="ce8" office:value-type="float" office:value="11607">
            <text:p>11607</text:p>
          </table:table-cell>
          <table:table-cell table:style-name="ce9" office:value-type="string">
            <text:p>2026-03-16 18:16:28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37.XXX.XXX.X5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moczowy i płciowy</text:p>
          </table:table-cell>
          <table:table-cell table:style-name="ce9" office:value-type="string">
            <text:p>Permen Med Forte Tabletki powlekane, na zaburzenia erekcji 4 szt.</text:p>
          </table:table-cell>
          <table:table-cell table:style-name="ce8" office:value-type="float" office:value="19672">
            <text:p>19672</text:p>
          </table:table-cell>
          <table:table-cell table:style-name="ce9" office:value-type="string">
            <text:p>2026-03-16 18:22:59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37.XXX.XXX.2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Nizoral Krem 20mg/g 30 g</text:p>
          </table:table-cell>
          <table:table-cell table:style-name="ce8" office:value-type="float" office:value="9594">
            <text:p>9594</text:p>
          </table:table-cell>
          <table:table-cell table:style-name="ce9" office:value-type="string">
            <text:p>2026-03-16 18:23:04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16X.XXX.XXX.6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Zioła</text:p>
          </table:table-cell>
          <table:table-cell table:style-name="ce9" office:value-type="string">
            <text:p>Lisc senesu ziolo pojed. Kawon 50g</text:p>
          </table:table-cell>
          <table:table-cell table:style-name="ce8" office:value-type="float" office:value="9568">
            <text:p>9568</text:p>
          </table:table-cell>
          <table:table-cell table:style-name="ce9" office:value-type="string">
            <text:p>2026-03-16 18:23:43</text:p>
          </table:table-cell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9" office:value-type="string">
            <text:p>83.XXX.XXX.9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Zioła</text:p>
          </table:table-cell>
          <table:table-cell table:style-name="ce9" office:value-type="string">
            <text:p>Lisc senesu ziolo pojed. Kawon 50g</text:p>
          </table:table-cell>
          <table:table-cell table:style-name="ce8" office:value-type="float" office:value="9568">
            <text:p>9568</text:p>
          </table:table-cell>
          <table:table-cell table:style-name="ce9" office:value-type="string">
            <text:p>2026-03-16 18:24:41</text:p>
          </table:table-cell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9" office:value-type="string">
            <text:p>83.XXX.XXX.9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Wzrok i słuch</text:p>
          </table:table-cell>
          <table:table-cell table:style-name="ce9" office:value-type="string">
            <text:p>Blephasol Płyn Micelarny Do Wrażliwych Powiek 100ml</text:p>
          </table:table-cell>
          <table:table-cell table:style-name="ce8" office:value-type="float" office:value="3432">
            <text:p>3432</text:p>
          </table:table-cell>
          <table:table-cell table:style-name="ce9" office:value-type="string">
            <text:p>2026-03-16 18:24:51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18X.XXX.XXX.X4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Nizoral Krem 20mg/g 30 g</text:p>
          </table:table-cell>
          <table:table-cell table:style-name="ce8" office:value-type="float" office:value="9594">
            <text:p>9594</text:p>
          </table:table-cell>
          <table:table-cell table:style-name="ce9" office:value-type="string">
            <text:p>2026-03-16 18:25:23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19X.XXX.XXX.X4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nerały i witaminy</text:p>
          </table:table-cell>
          <table:table-cell table:style-name="ce9" office:value-type="string">
            <text:p>Zyskaj Zdrowie Magnez+B1 B6 B12 30 tabl.</text:p>
          </table:table-cell>
          <table:table-cell table:style-name="ce8" office:value-type="float" office:value="17199">
            <text:p>17199</text:p>
          </table:table-cell>
          <table:table-cell table:style-name="ce9" office:value-type="string">
            <text:p>2026-03-16 18:27:17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31.XXX.XXX.5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eparaty medycyny naturalnej</text:p>
          </table:table-cell>
          <table:table-cell table:style-name="ce9" office:value-type="string">
            <text:p>Balsam Koński-Żel chłodzący 500ml /Jardin Naturel/</text:p>
          </table:table-cell>
          <table:table-cell table:style-name="ce8" office:value-type="float" office:value="13784">
            <text:p>13784</text:p>
          </table:table-cell>
          <table:table-cell table:style-name="ce9" office:value-type="string">
            <text:p>2026-03-16 18:28:01</text:p>
          </table:table-cell>
          <table:table-cell table:style-name="ce10" office:value-type="currency" office:currency="PLN" office:value="0.88">
            <text:p>0,88 zł</text:p>
          </table:table-cell>
          <table:table-cell table:style-name="ce8"/>
          <table:table-cell table:style-name="ce10" office:value-type="currency" office:currency="PLN" office:value="0.88">
            <text:p>0,88 zł</text:p>
          </table:table-cell>
          <table:table-cell table:style-name="ce8"/>
          <table:table-cell table:style-name="ce9" office:value-type="string">
            <text:p>83.XXX.XXX.X3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Opatrunki</text:p>
          </table:table-cell>
          <table:table-cell table:style-name="ce9" office:value-type="string">
            <text:p>ALLEVYN NON ADHESIVE Opatrunek hydropolowy 20x20cm</text:p>
          </table:table-cell>
          <table:table-cell table:style-name="ce8" office:value-type="float" office:value="17538">
            <text:p>17538</text:p>
          </table:table-cell>
          <table:table-cell table:style-name="ce9" office:value-type="string">
            <text:p>2026-03-16 18:28:32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31.XXX.XXX.X0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Środki na przeziębienie</text:p>
          </table:table-cell>
          <table:table-cell table:style-name="ce9" office:value-type="string">
            <text:p>CLARVOX Porzeczka 36 past.</text:p>
          </table:table-cell>
          <table:table-cell table:style-name="ce8" office:value-type="float" office:value="32270">
            <text:p>32270</text:p>
          </table:table-cell>
          <table:table-cell table:style-name="ce9" office:value-type="string">
            <text:p>2026-03-16 18:30:54</text:p>
          </table:table-cell>
          <table:table-cell table:style-name="ce10" office:value-type="currency" office:currency="PLN" office:value="0.83">
            <text:p>0,83 zł</text:p>
          </table:table-cell>
          <table:table-cell table:style-name="ce8"/>
          <table:table-cell table:style-name="ce10" office:value-type="currency" office:currency="PLN" office:value="0.83">
            <text:p>0,83 zł</text:p>
          </table:table-cell>
          <table:table-cell table:style-name="ce8"/>
          <table:table-cell table:style-name="ce9" office:value-type="string">
            <text:p>83.XXX.XXX.X87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</text:p>
          </table:table-cell>
          <table:table-cell table:style-name="ce9" office:value-type="string">
            <text:p>Rennie Antiacidum o smaku miętowym 24 tabletki do ssania</text:p>
          </table:table-cell>
          <table:table-cell table:style-name="ce8" office:value-type="float" office:value="7288">
            <text:p>7288</text:p>
          </table:table-cell>
          <table:table-cell table:style-name="ce9" office:value-type="string">
            <text:p>2026-03-16 18:32:53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37.XXX.XXX.X1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ciwbólowe</text:p>
          </table:table-cell>
          <table:table-cell table:style-name="ce9" office:value-type="string">
            <text:p>Dexak 25mg 30 tabletek</text:p>
          </table:table-cell>
          <table:table-cell table:style-name="ce8" office:value-type="float" office:value="16606">
            <text:p>16606</text:p>
          </table:table-cell>
          <table:table-cell table:style-name="ce9" office:value-type="string">
            <text:p>2026-03-16 18:34:38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92.XXX.XXX.X4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Zioła</text:p>
          </table:table-cell>
          <table:table-cell table:style-name="ce9" office:value-type="string">
            <text:p>Senes liść FIX 1 g 50 sasz.</text:p>
          </table:table-cell>
          <table:table-cell table:style-name="ce8" office:value-type="float" office:value="6404">
            <text:p>6404</text:p>
          </table:table-cell>
          <table:table-cell table:style-name="ce9" office:value-type="string">
            <text:p>2026-03-16 18:36:08</text:p>
          </table:table-cell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9" office:value-type="string">
            <text:p>84.XXX.XXX.X9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łyny i żele do dezynfekcji ran</text:p>
          </table:table-cell>
          <table:table-cell table:style-name="ce9" office:value-type="string">
            <text:p>Farmina Jodyna Hospital 800g</text:p>
          </table:table-cell>
          <table:table-cell table:style-name="ce8" office:value-type="float" office:value="8114">
            <text:p>8114</text:p>
          </table:table-cell>
          <table:table-cell table:style-name="ce9" office:value-type="string">
            <text:p>2026-03-16 18:37:38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31.XXX.XXX.X3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ALOEPANTEN ŻEL DO PIELĘGNACJI SKÓRY SUCHEJ I WRAŻLIWEJ 40G</text:p>
          </table:table-cell>
          <table:table-cell table:style-name="ce8" office:value-type="float" office:value="15022">
            <text:p>15022</text:p>
          </table:table-cell>
          <table:table-cell table:style-name="ce9" office:value-type="string">
            <text:p>2026-03-16 18:38:46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19X.XXX.XXX.X7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moczowy i płciowy</text:p>
          </table:table-cell>
          <table:table-cell table:style-name="ce9" office:value-type="string">
            <text:p>Gynoxin Optima 200mg 3kaps.</text:p>
          </table:table-cell>
          <table:table-cell table:style-name="ce8" office:value-type="float" office:value="9579">
            <text:p>9579</text:p>
          </table:table-cell>
          <table:table-cell table:style-name="ce9" office:value-type="string">
            <text:p>2026-03-16 18:40:55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5.XXX.XXX.3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nerały i witaminy</text:p>
          </table:table-cell>
          <table:table-cell table:style-name="ce9" office:value-type="string">
            <text:p>Biofarm Vigalex D3 + K2 Max 60 tabl.</text:p>
          </table:table-cell>
          <table:table-cell table:style-name="ce8" office:value-type="float" office:value="18365">
            <text:p>18365</text:p>
          </table:table-cell>
          <table:table-cell table:style-name="ce9" office:value-type="string">
            <text:p>2026-03-16 18:44:34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91.XXX.XXX.X4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ęśnie, stawy i kości</text:p>
          </table:table-cell>
          <table:table-cell table:style-name="ce9" office:value-type="string">
            <text:p>Suplasyn 1-Shot 60 mg/6ml 1 ampułko-strzykawka</text:p>
          </table:table-cell>
          <table:table-cell table:style-name="ce8" office:value-type="float" office:value="26968">
            <text:p>26968</text:p>
          </table:table-cell>
          <table:table-cell table:style-name="ce9" office:value-type="string">
            <text:p>2026-03-16 18:44:42</text:p>
          </table:table-cell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9" office:value-type="string">
            <text:p>37.XXX.XXX.X5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ęśnie, stawy i kości</text:p>
          </table:table-cell>
          <table:table-cell table:style-name="ce9" office:value-type="string">
            <text:p>Voltaren Emulgel 11,6mg/g żel 50g</text:p>
          </table:table-cell>
          <table:table-cell table:style-name="ce8" office:value-type="float" office:value="7178">
            <text:p>7178</text:p>
          </table:table-cell>
          <table:table-cell table:style-name="ce9" office:value-type="string">
            <text:p>2026-03-16 18:45:30</text:p>
          </table:table-cell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9" office:value-type="string">
            <text:p>87.XXX.XXX.X4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okarmowy</text:p>
          </table:table-cell>
          <table:table-cell table:style-name="ce9" office:value-type="string">
            <text:p>Espumisan 40 Mg/Ml Krople Doustne Emulsja 30ml</text:p>
          </table:table-cell>
          <table:table-cell table:style-name="ce8" office:value-type="float" office:value="19267">
            <text:p>19267</text:p>
          </table:table-cell>
          <table:table-cell table:style-name="ce9" office:value-type="string">
            <text:p>2026-03-16 18:47:14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5.XXX.XXX.3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Zestawy dermokosmetyków</text:p>
          </table:table-cell>
          <table:table-cell table:style-name="ce9" office:value-type="string">
            <text:p>Caudalie Vinoperfect Zestaw Wiosenny - Serum Rozjaśniające, 30ml + Krem na Dzień, 15ml + Krem na Noc, 15ml</text:p>
          </table:table-cell>
          <table:table-cell table:style-name="ce8" office:value-type="float" office:value="36451">
            <text:p>36451</text:p>
          </table:table-cell>
          <table:table-cell table:style-name="ce9" office:value-type="string">
            <text:p>2026-03-16 18:50:31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83.XXX.XXX.2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Uroda</text:p>
          </table:table-cell>
          <table:table-cell table:style-name="ce9" office:value-type="string">
            <text:p>Pozostałe kosmetyki do pielęgnacji ciała</text:p>
          </table:table-cell>
          <table:table-cell table:style-name="ce9" office:value-type="string">
            <text:p>Gorvita Maść Rokitnikowa Z Ekstraktem Z Nagietka 140Ml</text:p>
          </table:table-cell>
          <table:table-cell table:style-name="ce8" office:value-type="float" office:value="17250">
            <text:p>17250</text:p>
          </table:table-cell>
          <table:table-cell table:style-name="ce9" office:value-type="string">
            <text:p>2026-03-16 18:53:43</text:p>
          </table:table-cell>
          <table:table-cell table:style-name="ce10" office:value-type="currency" office:currency="PLN" office:value="0.75">
            <text:p>0,75 zł</text:p>
          </table:table-cell>
          <table:table-cell table:style-name="ce8"/>
          <table:table-cell table:style-name="ce10" office:value-type="currency" office:currency="PLN" office:value="0.75">
            <text:p>0,75 zł</text:p>
          </table:table-cell>
          <table:table-cell table:style-name="ce8"/>
          <table:table-cell table:style-name="ce9" office:value-type="string">
            <text:p>89.XXX.XXX.X1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płciowy i moczowy</text:p>
          </table:table-cell>
          <table:table-cell table:style-name="ce9" office:value-type="string">
            <text:p>Solinea Ferivag 14 Kaps Dopochwowe</text:p>
          </table:table-cell>
          <table:table-cell table:style-name="ce8" office:value-type="float" office:value="16741">
            <text:p>16741</text:p>
          </table:table-cell>
          <table:table-cell table:style-name="ce9" office:value-type="string">
            <text:p>2026-03-16 18:54:01</text:p>
          </table:table-cell>
          <table:table-cell table:style-name="ce10" office:value-type="currency" office:currency="PLN" office:value="0.75">
            <text:p>0,75 zł</text:p>
          </table:table-cell>
          <table:table-cell table:style-name="ce8"/>
          <table:table-cell table:style-name="ce10" office:value-type="currency" office:currency="PLN" office:value="0.75">
            <text:p>0,75 zł</text:p>
          </table:table-cell>
          <table:table-cell table:style-name="ce8"/>
          <table:table-cell table:style-name="ce9" office:value-type="string">
            <text:p>18X.XXX.XXX.X0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RatuŻel, 50ml</text:p>
          </table:table-cell>
          <table:table-cell table:style-name="ce8" office:value-type="float" office:value="14829">
            <text:p>14829</text:p>
          </table:table-cell>
          <table:table-cell table:style-name="ce9" office:value-type="string">
            <text:p>2026-03-16 18:55:17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89.XXX.XXX.X3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Stawy, mięśnie i kości</text:p>
          </table:table-cell>
          <table:table-cell table:style-name="ce9" office:value-type="string">
            <text:p>Phytomedica Promyalgan 120tabl.</text:p>
          </table:table-cell>
          <table:table-cell table:style-name="ce8" office:value-type="float" office:value="25920">
            <text:p>25920</text:p>
          </table:table-cell>
          <table:table-cell table:style-name="ce9" office:value-type="string">
            <text:p>2026-03-16 18:55:55</text:p>
          </table:table-cell>
          <table:table-cell table:style-name="ce10" office:value-type="currency" office:currency="PLN" office:value="0.83">
            <text:p>0,83 zł</text:p>
          </table:table-cell>
          <table:table-cell table:style-name="ce8"/>
          <table:table-cell table:style-name="ce10" office:value-type="currency" office:currency="PLN" office:value="0.83">
            <text:p>0,83 zł</text:p>
          </table:table-cell>
          <table:table-cell table:style-name="ce8"/>
          <table:table-cell table:style-name="ce9" office:value-type="string">
            <text:p>15X.XXX.XXX.58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Witaminy i minerały</text:p>
          </table:table-cell>
          <table:table-cell table:style-name="ce9" office:value-type="string">
            <text:p>Vigantol 10ml</text:p>
          </table:table-cell>
          <table:table-cell table:style-name="ce8" office:value-type="float" office:value="11269">
            <text:p>11269</text:p>
          </table:table-cell>
          <table:table-cell table:style-name="ce9" office:value-type="string">
            <text:p>2026-03-16 18:56:07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84.XXX.XXX.72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Maść Szałwiowa 25 G</text:p>
          </table:table-cell>
          <table:table-cell table:style-name="ce8" office:value-type="float" office:value="9164">
            <text:p>9164</text:p>
          </table:table-cell>
          <table:table-cell table:style-name="ce9" office:value-type="string">
            <text:p>2026-03-16 18:56:31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79.XXX.XXX.X2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Glukometry i akcesoria dla diabetyków</text:p>
          </table:table-cell>
          <table:table-cell table:style-name="ce9" office:value-type="string">
            <text:p>Accu-Check Active</text:p>
          </table:table-cell>
          <table:table-cell table:style-name="ce8" office:value-type="float" office:value="19537">
            <text:p>19537</text:p>
          </table:table-cell>
          <table:table-cell table:style-name="ce9" office:value-type="string">
            <text:p>2026-03-16 18:56:39</text:p>
          </table:table-cell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10" office:value-type="currency" office:currency="PLN" office:value="0.68">
            <text:p>0,68 zł</text:p>
          </table:table-cell>
          <table:table-cell table:style-name="ce8"/>
          <table:table-cell table:style-name="ce9" office:value-type="string">
            <text:p>89.XXX.XXX.75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ziębienie i grypa</text:p>
          </table:table-cell>
          <table:table-cell table:style-name="ce9" office:value-type="string">
            <text:p>Otrivin Ipra Max 0,5mg + 0,6mg Aerozol do nosa 10ml</text:p>
          </table:table-cell>
          <table:table-cell table:style-name="ce8" office:value-type="float" office:value="6211">
            <text:p>6211</text:p>
          </table:table-cell>
          <table:table-cell table:style-name="ce9" office:value-type="string">
            <text:p>2026-03-16 18:57:23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37.XXX.XXX.3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Suplementy na wzrok i słuch</text:p>
          </table:table-cell>
          <table:table-cell table:style-name="ce9" office:value-type="string">
            <text:p>Resvega 60 kaps.</text:p>
          </table:table-cell>
          <table:table-cell table:style-name="ce8" office:value-type="float" office:value="283">
            <text:p>283</text:p>
          </table:table-cell>
          <table:table-cell table:style-name="ce9" office:value-type="string">
            <text:p>2026-03-16 18:58:07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83.XXX.XXX.2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łyny i żele do dezynfekcji ran</text:p>
          </table:table-cell>
          <table:table-cell table:style-name="ce9" office:value-type="string">
            <text:p>Farmina Jodyna Hospital 800g</text:p>
          </table:table-cell>
          <table:table-cell table:style-name="ce8" office:value-type="float" office:value="8114">
            <text:p>8114</text:p>
          </table:table-cell>
          <table:table-cell table:style-name="ce9" office:value-type="string">
            <text:p>2026-03-16 18:59:03</text:p>
          </table:table-cell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10" office:value-type="currency" office:currency="PLN" office:value="0.62">
            <text:p>0,62 zł</text:p>
          </table:table-cell>
          <table:table-cell table:style-name="ce8"/>
          <table:table-cell table:style-name="ce9" office:value-type="string">
            <text:p>83.XXX.XXX.X5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Akcesoria do ciśnieniomierzy</text:p>
          </table:table-cell>
          <table:table-cell table:style-name="ce9" office:value-type="string">
            <text:p>Diagnosis Zasilacz do ciśnieniomierzy AND</text:p>
          </table:table-cell>
          <table:table-cell table:style-name="ce8" office:value-type="float" office:value="35829">
            <text:p>35829</text:p>
          </table:table-cell>
          <table:table-cell table:style-name="ce9" office:value-type="string">
            <text:p>2026-03-16 19:00:59</text:p>
          </table:table-cell>
          <table:table-cell table:style-name="ce10" office:value-type="currency" office:currency="PLN" office:value="0.76">
            <text:p>0,76 zł</text:p>
          </table:table-cell>
          <table:table-cell table:style-name="ce8"/>
          <table:table-cell table:style-name="ce10" office:value-type="currency" office:currency="PLN" office:value="0.76">
            <text:p>0,76 zł</text:p>
          </table:table-cell>
          <table:table-cell table:style-name="ce8"/>
          <table:table-cell table:style-name="ce9" office:value-type="string">
            <text:p>37.XXX.XXX.6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Suplementy dla dzieci</text:p>
          </table:table-cell>
          <table:table-cell table:style-name="ce9" office:value-type="string">
            <text:p>4Lacti Baby krople 5 ml</text:p>
          </table:table-cell>
          <table:table-cell table:style-name="ce8" office:value-type="float" office:value="3183">
            <text:p>3183</text:p>
          </table:table-cell>
          <table:table-cell table:style-name="ce9" office:value-type="string">
            <text:p>2026-03-16 19:03:15</text:p>
          </table:table-cell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10" office:value-type="currency" office:currency="PLN" office:value="0.79">
            <text:p>0,79 zł</text:p>
          </table:table-cell>
          <table:table-cell table:style-name="ce8"/>
          <table:table-cell table:style-name="ce9" office:value-type="string">
            <text:p>31.XXX.XXX.X0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Rzuć palenie</text:p>
          </table:table-cell>
          <table:table-cell table:style-name="ce9" office:value-type="string">
            <text:p>NIQUITIN przezroczysty, plastry transdermalne, 21 mg / 24 h, 7 szt</text:p>
          </table:table-cell>
          <table:table-cell table:style-name="ce8" office:value-type="float" office:value="9593">
            <text:p>9593</text:p>
          </table:table-cell>
          <table:table-cell table:style-name="ce9" office:value-type="string">
            <text:p>2026-03-16 19:10:27</text:p>
          </table:table-cell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10" office:value-type="currency" office:currency="PLN" office:value="0.87">
            <text:p>0,87 zł</text:p>
          </table:table-cell>
          <table:table-cell table:style-name="ce8"/>
          <table:table-cell table:style-name="ce9" office:value-type="string">
            <text:p>81.XXX.XXX.1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Termometry</text:p>
          </table:table-cell>
          <table:table-cell table:style-name="ce9" office:value-type="string">
            <text:p>DIAGNOSTIC NC300</text:p>
          </table:table-cell>
          <table:table-cell table:style-name="ce8" office:value-type="float" office:value="22101">
            <text:p>22101</text:p>
          </table:table-cell>
          <table:table-cell table:style-name="ce9" office:value-type="string">
            <text:p>2026-03-16 19:12:12</text:p>
          </table:table-cell>
          <table:table-cell table:style-name="ce10" office:value-type="currency" office:currency="PLN" office:value="1.03">
            <text:p>1,03 zł</text:p>
          </table:table-cell>
          <table:table-cell table:style-name="ce8"/>
          <table:table-cell table:style-name="ce10" office:value-type="currency" office:currency="PLN" office:value="1.03">
            <text:p>1,03 zł</text:p>
          </table:table-cell>
          <table:table-cell table:style-name="ce8"/>
          <table:table-cell table:style-name="ce9" office:value-type="string">
            <text:p>18X.XXX.XXX.X4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Zoxin-med Szampon leczniczy przeciwłupieżowy 60ml</text:p>
          </table:table-cell>
          <table:table-cell table:style-name="ce8" office:value-type="float" office:value="27925">
            <text:p>27925</text:p>
          </table:table-cell>
          <table:table-cell table:style-name="ce9" office:value-type="string">
            <text:p>2026-03-16 19:13:26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91.XXX.XXX.X7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 i leki dermatologiczne</text:p>
          </table:table-cell>
          <table:table-cell table:style-name="ce9" office:value-type="string">
            <text:p>Ketoxin Forte Wzmacniający Szampon Przeciwłupieżowy 6 ml</text:p>
          </table:table-cell>
          <table:table-cell table:style-name="ce8" office:value-type="float" office:value="4234">
            <text:p>4234</text:p>
          </table:table-cell>
          <table:table-cell table:style-name="ce9" office:value-type="string">
            <text:p>2026-03-16 19:14:57</text:p>
          </table:table-cell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10" office:value-type="currency" office:currency="PLN" office:value="0.72">
            <text:p>0,72 zł</text:p>
          </table:table-cell>
          <table:table-cell table:style-name="ce8"/>
          <table:table-cell table:style-name="ce9" office:value-type="string">
            <text:p>37.XXX.XXX.X0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ozostałe artykuły medyczne i rehabilitacyjne</text:p>
          </table:table-cell>
          <table:table-cell table:style-name="ce9" office:value-type="string">
            <text:p>Stanmark Stopper MDW 11 1 szt.</text:p>
          </table:table-cell>
          <table:table-cell table:style-name="ce8" office:value-type="float" office:value="9877">
            <text:p>9877</text:p>
          </table:table-cell>
          <table:table-cell table:style-name="ce9" office:value-type="string">
            <text:p>2026-03-16 19:17:11</text:p>
          </table:table-cell>
          <table:table-cell table:style-name="ce10" office:value-type="currency" office:currency="PLN" office:value="0.92">
            <text:p>0,92 zł</text:p>
          </table:table-cell>
          <table:table-cell table:style-name="ce8"/>
          <table:table-cell table:style-name="ce10" office:value-type="currency" office:currency="PLN" office:value="0.92">
            <text:p>0,92 zł</text:p>
          </table:table-cell>
          <table:table-cell table:style-name="ce8"/>
          <table:table-cell table:style-name="ce9" office:value-type="string">
            <text:p>83.XXX.XXX.3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Minerały i witaminy</text:p>
          </table:table-cell>
          <table:table-cell table:style-name="ce9" office:value-type="string">
            <text:p>Sufrin 60tabl.</text:p>
          </table:table-cell>
          <table:table-cell table:style-name="ce8" office:value-type="float" office:value="5345">
            <text:p>5345</text:p>
          </table:table-cell>
          <table:table-cell table:style-name="ce9" office:value-type="string">
            <text:p>2026-03-16 19:20:16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31.XXX.XXX.X04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Układ moczowy i płciowy</text:p>
          </table:table-cell>
          <table:table-cell table:style-name="ce9" office:value-type="string">
            <text:p>Gynoxin Uno 0,6G 1kaps.</text:p>
          </table:table-cell>
          <table:table-cell table:style-name="ce8" office:value-type="float" office:value="10753">
            <text:p>10753</text:p>
          </table:table-cell>
          <table:table-cell table:style-name="ce9" office:value-type="string">
            <text:p>2026-03-16 19:40:10</text:p>
          </table:table-cell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10" office:value-type="currency" office:currency="PLN" office:value="0.8">
            <text:p>0,80 zł</text:p>
          </table:table-cell>
          <table:table-cell table:style-name="ce8"/>
          <table:table-cell table:style-name="ce9" office:value-type="string">
            <text:p>31.XXX.XXX.23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Nutrikosmetyki</text:p>
          </table:table-cell>
          <table:table-cell table:style-name="ce9" office:value-type="string">
            <text:p>Healing Herbal Szampon Leczniczy Przeciwłupieżowy 200ml</text:p>
          </table:table-cell>
          <table:table-cell table:style-name="ce8" office:value-type="float" office:value="7758">
            <text:p>7758</text:p>
          </table:table-cell>
          <table:table-cell table:style-name="ce9" office:value-type="string">
            <text:p>2026-03-16 19:42:51</text:p>
          </table:table-cell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9" office:value-type="string">
            <text:p>46.XXX.XXX.X21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Ciśnieniomierze</text:p>
          </table:table-cell>
          <table:table-cell table:style-name="ce9" office:value-type="string">
            <text:p>Omron M2+ Ciśnieniomierz naramienny HEM-7188</text:p>
          </table:table-cell>
          <table:table-cell table:style-name="ce8" office:value-type="float" office:value="33270">
            <text:p>33270</text:p>
          </table:table-cell>
          <table:table-cell table:style-name="ce9" office:value-type="string">
            <text:p>2026-03-16 20:03:12</text:p>
          </table:table-cell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10" office:value-type="currency" office:currency="PLN" office:value="0.93">
            <text:p>0,93 zł</text:p>
          </table:table-cell>
          <table:table-cell table:style-name="ce8"/>
          <table:table-cell table:style-name="ce9" office:value-type="string">
            <text:p>83.XXX.XXX.3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ciwbólowe</text:p>
          </table:table-cell>
          <table:table-cell table:style-name="ce9" office:value-type="string">
            <text:p>Saridon 20 tabl</text:p>
          </table:table-cell>
          <table:table-cell table:style-name="ce8" office:value-type="float" office:value="10464">
            <text:p>10464</text:p>
          </table:table-cell>
          <table:table-cell table:style-name="ce9" office:value-type="string">
            <text:p>2026-03-16 22:33:07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10X.XXX.XXX.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ciwbólowe</text:p>
          </table:table-cell>
          <table:table-cell table:style-name="ce9" office:value-type="string">
            <text:p>Saridon 20 tabl</text:p>
          </table:table-cell>
          <table:table-cell table:style-name="ce8" office:value-type="float" office:value="10464">
            <text:p>10464</text:p>
          </table:table-cell>
          <table:table-cell table:style-name="ce9" office:value-type="string">
            <text:p>2026-03-16 23:03:48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10X.XXX.XXX.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Przeciwbólowe</text:p>
          </table:table-cell>
          <table:table-cell table:style-name="ce9" office:value-type="string">
            <text:p>Saridon 20 tabl</text:p>
          </table:table-cell>
          <table:table-cell table:style-name="ce8" office:value-type="float" office:value="10464">
            <text:p>10464</text:p>
          </table:table-cell>
          <table:table-cell table:style-name="ce9" office:value-type="string">
            <text:p>2026-03-16 23:04:36</text:p>
          </table:table-cell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10" office:value-type="currency" office:currency="PLN" office:value="0.73">
            <text:p>0,73 zł</text:p>
          </table:table-cell>
          <table:table-cell table:style-name="ce8"/>
          <table:table-cell table:style-name="ce9" office:value-type="string">
            <text:p>10X.XXX.XXX.6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Zestawy dermokosmetyków</text:p>
          </table:table-cell>
          <table:table-cell table:style-name="ce9" office:value-type="string">
            <text:p>Vichy Neovadiol Magistral Zestaw Xmass 2025 (krem na dzień, 50 ml + krem na noc, 50 ml)</text:p>
          </table:table-cell>
          <table:table-cell table:style-name="ce8" office:value-type="float" office:value="32656">
            <text:p>32656</text:p>
          </table:table-cell>
          <table:table-cell table:style-name="ce9" office:value-type="string">
            <text:p>2026-03-17 02:27:39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45.XXX.XXX.X20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Bioderma Atoderm Intensive Żel Oczyszczający I Natłuszczający 1000ml</text:p>
          </table:table-cell>
          <table:table-cell table:style-name="ce8" office:value-type="float" office:value="21024">
            <text:p>21024</text:p>
          </table:table-cell>
          <table:table-cell table:style-name="ce9" office:value-type="string">
            <text:p>2026-03-17 11:08:54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37.XXX.XXX.X39</text:p>
          </table:table-cell>
          <table:table-cell table:style-name="ce8"/>
          <table:table-cell table:number-columns-repeated="1013"/>
        </table:table-row>
        <table:table-row table:style-name="ro8">
          <table:table-cell table:style-name="ce5" office:value-type="string">
            <text:p>Zdrowie</text:p>
          </table:table-cell>
          <table:table-cell table:style-name="ce9" office:value-type="string">
            <text:p>Dermokosmetyki do twarzy</text:p>
          </table:table-cell>
          <table:table-cell table:style-name="ce9" office:value-type="string">
            <text:p>Avene Sunsimed Ka Bardzo Wysoka Ochrona 80ml</text:p>
          </table:table-cell>
          <table:table-cell table:style-name="ce8" office:value-type="float" office:value="28241">
            <text:p>28241</text:p>
          </table:table-cell>
          <table:table-cell table:style-name="ce9" office:value-type="string">
            <text:p>2026-03-17 12:35:53</text:p>
          </table:table-cell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10" office:value-type="currency" office:currency="PLN" office:value="0.95">
            <text:p>0,95 zł</text:p>
          </table:table-cell>
          <table:table-cell table:style-name="ce8"/>
          <table:table-cell table:style-name="ce9" office:value-type="string">
            <text:p>93.XXX.XXX.X25</text:p>
          </table:table-cell>
          <table:table-cell table:style-name="ce8"/>
          <table:table-cell table:number-columns-repeated="1013"/>
        </table:table-row>
        <table:table-row table:style-name="ro9" table:number-rows-repeated="104745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Raport_przejsc_2026_03_15_2026_" table:style-name="ta3" table:print="false">
        <table:table-column table:style-name="co15" table:default-cell-style-name="ce7"/>
        <table:table-column table:style-name="co16" table:default-cell-style-name="ce7"/>
        <table:table-column table:style-name="co17" table:number-columns-repeated="1022" table:default-cell-style-name="ce7"/>
        <table:table-row table:style-name="ro11">
          <table:table-cell table:style-name="ce11" office:value-type="string" table:number-columns-spanned="3" table:number-rows-spanned="1">
            <text:p>Raport_przejsc_2026_03_15_2026_03_17 — tabela przestawna</text:p>
          </table:table-cell>
          <table:covered-table-cell table:number-columns-repeated="2" table:style-name="ce18"/>
          <table:table-cell table:number-columns-repeated="1021"/>
        </table:table-row>
        <table:table-row table:style-name="ro7">
          <table:table-cell table:style-name="ce12" office:value-type="string">
            <text:p>Produkt</text:p>
          </table:table-cell>
          <table:table-cell table:style-name="ce19" office:value-type="string">
            <text:p>Id_produktu_w_sklepie</text:p>
          </table:table-cell>
          <table:table-cell table:style-name="ce25"/>
          <table:table-cell table:number-columns-repeated="1021"/>
        </table:table-row>
        <table:table-row table:style-name="ro7">
          <table:table-cell table:style-name="ce13" office:value-type="string">
            <text:p>(pusty)</text:p>
          </table:table-cell>
          <table:table-cell table:style-name="ce20" office:value-type="string">
            <text:p>(pusty)</text:p>
          </table:table-cell>
          <table:table-cell table:style-name="ce26"/>
          <table:table-cell table:number-columns-repeated="1021"/>
        </table:table-row>
        <table:table-row table:style-name="ro12">
          <table:table-cell table:style-name="ce14" office:value-type="string">
            <text:p>(pusty) Wynik</text:p>
          </table:table-cell>
          <table:table-cell table:style-name="ce21"/>
          <table:table-cell table:style-name="ce27"/>
          <table:table-cell table:number-columns-repeated="1021"/>
        </table:table-row>
        <table:table-row table:style-name="ro12">
          <table:table-cell table:style-name="ce13" office:value-type="string">
            <text:p>4 Liver 45kaps. Colfarm</text:p>
          </table:table-cell>
          <table:table-cell table:style-name="ce20" office:value-type="float" office:value="15926">
            <text:p>15926</text:p>
          </table:table-cell>
          <table:table-cell table:style-name="ce28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4 Liver 45kaps. Colfarm Wynik</text:p>
          </table:table-cell>
          <table:table-cell table:style-name="ce21"/>
          <table:table-cell table:style-name="ce29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4Lacti Baby krople 5 ml</text:p>
          </table:table-cell>
          <table:table-cell table:style-name="ce20" office:value-type="float" office:value="3183">
            <text:p>3183</text:p>
          </table:table-cell>
          <table:table-cell table:style-name="ce28" office:value-type="currency" office:currency="PLN" office:value="0.79">
            <text:p>0,79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4Lacti Baby krople 5 ml Wynik</text:p>
          </table:table-cell>
          <table:table-cell table:style-name="ce21"/>
          <table:table-cell table:style-name="ce29" office:value-type="currency" office:currency="PLN" office:value="0.79">
            <text:p>0,79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A-DERMA DERMALIBOUR+ CICA- Krem regenerujący 100ml</text:p>
          </table:table-cell>
          <table:table-cell table:style-name="ce20" office:value-type="float" office:value="10516">
            <text:p>10516</text:p>
          </table:table-cell>
          <table:table-cell table:style-name="ce28" office:value-type="currency" office:currency="PLN" office:value="1.9">
            <text:p>1,9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A-DERMA DERMALIBOUR+ CICA- Krem regenerujący 100ml Wynik</text:p>
          </table:table-cell>
          <table:table-cell table:style-name="ce21"/>
          <table:table-cell table:style-name="ce29" office:value-type="currency" office:currency="PLN" office:value="1.9">
            <text:p>1,9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A-DERMA DERMALIBOUR+ CICA- Krem regenerujący 50ml</text:p>
          </table:table-cell>
          <table:table-cell table:style-name="ce20" office:value-type="float" office:value="10517">
            <text:p>10517</text:p>
          </table:table-cell>
          <table:table-cell table:style-name="ce28" office:value-type="currency" office:currency="PLN" office:value="0.95">
            <text:p>0,95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A-DERMA DERMALIBOUR+ CICA- Krem regenerujący 50ml Wynik</text:p>
          </table:table-cell>
          <table:table-cell table:style-name="ce21"/>
          <table:table-cell table:style-name="ce29" office:value-type="currency" office:currency="PLN" office:value="0.95">
            <text:p>0,95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A-Derma Zestaw Exomega Control Zestaw: Balsam Emolient 200Ml + Olejek Emolient 100Ml</text:p>
          </table:table-cell>
          <table:table-cell table:style-name="ce20" office:value-type="float" office:value="31901">
            <text:p>31901</text:p>
          </table:table-cell>
          <table:table-cell table:style-name="ce28" office:value-type="currency" office:currency="PLN" office:value="0.79">
            <text:p>0,79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A-Derma Zestaw Exomega Control Zestaw: Balsam Emolient 200Ml + Olejek Emolient 100Ml Wynik</text:p>
          </table:table-cell>
          <table:table-cell table:style-name="ce21"/>
          <table:table-cell table:style-name="ce29" office:value-type="currency" office:currency="PLN" office:value="0.79">
            <text:p>0,79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Abbott Freestyle Libre 2 Sensor 1szt.</text:p>
          </table:table-cell>
          <table:table-cell table:style-name="ce20" office:value-type="float" office:value="32071">
            <text:p>32071</text:p>
          </table:table-cell>
          <table:table-cell table:style-name="ce28" office:value-type="currency" office:currency="PLN" office:value="1.36">
            <text:p>1,36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Abbott Freestyle Libre 2 Sensor 1szt. Wynik</text:p>
          </table:table-cell>
          <table:table-cell table:style-name="ce21"/>
          <table:table-cell table:style-name="ce29" office:value-type="currency" office:currency="PLN" office:value="1.36">
            <text:p>1,36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Accu-Check Active</text:p>
          </table:table-cell>
          <table:table-cell table:style-name="ce20" office:value-type="float" office:value="19537">
            <text:p>19537</text:p>
          </table:table-cell>
          <table:table-cell table:style-name="ce28" office:value-type="currency" office:currency="PLN" office:value="3.4">
            <text:p>3,4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Accu-Check Active Wynik</text:p>
          </table:table-cell>
          <table:table-cell table:style-name="ce21"/>
          <table:table-cell table:style-name="ce29" office:value-type="currency" office:currency="PLN" office:value="3.4">
            <text:p>3,4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Accu-Chek Nakłuwacz FastClix + 6 lancetów</text:p>
          </table:table-cell>
          <table:table-cell table:style-name="ce20" office:value-type="float" office:value="8385">
            <text:p>8385</text:p>
          </table:table-cell>
          <table:table-cell table:style-name="ce28" office:value-type="currency" office:currency="PLN" office:value="4.76">
            <text:p>4,76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Accu-Chek Nakłuwacz FastClix + 6 lancetów Wynik</text:p>
          </table:table-cell>
          <table:table-cell table:style-name="ce21"/>
          <table:table-cell table:style-name="ce29" office:value-type="currency" office:currency="PLN" office:value="4.76">
            <text:p>4,76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AeroChamber Plus Flow-Vu komora inhalacyjna z ustnikiem po 5 roku życia niebieska</text:p>
          </table:table-cell>
          <table:table-cell table:style-name="ce20" office:value-type="float" office:value="15983">
            <text:p>15983</text:p>
          </table:table-cell>
          <table:table-cell table:style-name="ce28" office:value-type="currency" office:currency="PLN" office:value="0.76">
            <text:p>0,76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AeroChamber Plus Flow-Vu komora inhalacyjna z ustnikiem po 5 roku życia niebieska Wynik</text:p>
          </table:table-cell>
          <table:table-cell table:style-name="ce21"/>
          <table:table-cell table:style-name="ce29" office:value-type="currency" office:currency="PLN" office:value="0.76">
            <text:p>0,76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AFLOFARM Nivelium med krem dermatologiczny 250ml</text:p>
          </table:table-cell>
          <table:table-cell table:style-name="ce20" office:value-type="float" office:value="8641">
            <text:p>8641</text:p>
          </table:table-cell>
          <table:table-cell table:style-name="ce28" office:value-type="currency" office:currency="PLN" office:value="6.65">
            <text:p>6,65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AFLOFARM Nivelium med krem dermatologiczny 250ml Wynik</text:p>
          </table:table-cell>
          <table:table-cell table:style-name="ce21"/>
          <table:table-cell table:style-name="ce29" office:value-type="currency" office:currency="PLN" office:value="6.65">
            <text:p>6,65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Akutol Opatrunek plaster w sprayu 60ml</text:p>
          </table:table-cell>
          <table:table-cell table:style-name="ce20" office:value-type="float" office:value="10087">
            <text:p>10087</text:p>
          </table:table-cell>
          <table:table-cell table:style-name="ce28" office:value-type="currency" office:currency="PLN" office:value="1.86">
            <text:p>1,86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Akutol Opatrunek plaster w sprayu 60ml Wynik</text:p>
          </table:table-cell>
          <table:table-cell table:style-name="ce21"/>
          <table:table-cell table:style-name="ce29" office:value-type="currency" office:currency="PLN" office:value="1.86">
            <text:p>1,86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Alfofarm Sora Med płyn do zwalczania wszawicy 100ml</text:p>
          </table:table-cell>
          <table:table-cell table:style-name="ce20" office:value-type="float" office:value="18130">
            <text:p>18130</text:p>
          </table:table-cell>
          <table:table-cell table:style-name="ce28" office:value-type="currency" office:currency="PLN" office:value="2.88">
            <text:p>2,88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Alfofarm Sora Med płyn do zwalczania wszawicy 100ml Wynik</text:p>
          </table:table-cell>
          <table:table-cell table:style-name="ce21"/>
          <table:table-cell table:style-name="ce29" office:value-type="currency" office:currency="PLN" office:value="2.88">
            <text:p>2,88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Alka-Seltzer 324 mg tabletki musujące 10 szt.</text:p>
          </table:table-cell>
          <table:table-cell table:style-name="ce20" office:value-type="float" office:value="15060">
            <text:p>15060</text:p>
          </table:table-cell>
          <table:table-cell table:style-name="ce28" office:value-type="currency" office:currency="PLN" office:value="0.73">
            <text:p>0,73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Alka-Seltzer 324 mg tabletki musujące 10 szt. Wynik</text:p>
          </table:table-cell>
          <table:table-cell table:style-name="ce21"/>
          <table:table-cell table:style-name="ce29" office:value-type="currency" office:currency="PLN" office:value="0.73">
            <text:p>0,73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Allergika Krem na powieki MED 15ml</text:p>
          </table:table-cell>
          <table:table-cell table:style-name="ce20" office:value-type="float" office:value="11734">
            <text:p>11734</text:p>
          </table:table-cell>
          <table:table-cell table:style-name="ce28" office:value-type="currency" office:currency="PLN" office:value="2.85">
            <text:p>2,85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Allergika Krem na powieki MED 15ml Wynik</text:p>
          </table:table-cell>
          <table:table-cell table:style-name="ce21"/>
          <table:table-cell table:style-name="ce29" office:value-type="currency" office:currency="PLN" office:value="2.85">
            <text:p>2,85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Allergika, Krem do twarzy MED, 50 ml</text:p>
          </table:table-cell>
          <table:table-cell table:style-name="ce20" office:value-type="float" office:value="11733">
            <text:p>11733</text:p>
          </table:table-cell>
          <table:table-cell table:style-name="ce28" office:value-type="currency" office:currency="PLN" office:value="0.95">
            <text:p>0,95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Allergika, Krem do twarzy MED, 50 ml Wynik</text:p>
          </table:table-cell>
          <table:table-cell table:style-name="ce21"/>
          <table:table-cell table:style-name="ce29" office:value-type="currency" office:currency="PLN" office:value="0.95">
            <text:p>0,95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ALLEVYN NON ADHESIVE Opatrunek hydropolowy 20x20cm</text:p>
          </table:table-cell>
          <table:table-cell table:style-name="ce20" office:value-type="float" office:value="17538">
            <text:p>17538</text:p>
          </table:table-cell>
          <table:table-cell table:style-name="ce28" office:value-type="currency" office:currency="PLN" office:value="0.62">
            <text:p>0,62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ALLEVYN NON ADHESIVE Opatrunek hydropolowy 20x20cm Wynik</text:p>
          </table:table-cell>
          <table:table-cell table:style-name="ce21"/>
          <table:table-cell table:style-name="ce29" office:value-type="currency" office:currency="PLN" office:value="0.62">
            <text:p>0,62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ALLEVYN NON-ADHESIVE opatrunek 10x10cm - 1 sztuka</text:p>
          </table:table-cell>
          <table:table-cell table:style-name="ce20" office:value-type="float" office:value="7852">
            <text:p>7852</text:p>
          </table:table-cell>
          <table:table-cell table:style-name="ce28" office:value-type="currency" office:currency="PLN" office:value="0.62">
            <text:p>0,62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ALLEVYN NON-ADHESIVE opatrunek 10x10cm - 1 sztuka Wynik</text:p>
          </table:table-cell>
          <table:table-cell table:style-name="ce21"/>
          <table:table-cell table:style-name="ce29" office:value-type="currency" office:currency="PLN" office:value="0.62">
            <text:p>0,62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ALOEPANTEN ŻEL DO PIELĘGNACJI SKÓRY SUCHEJ I WRAŻLIWEJ 40G</text:p>
          </table:table-cell>
          <table:table-cell table:style-name="ce20" office:value-type="float" office:value="15022">
            <text:p>15022</text:p>
          </table:table-cell>
          <table:table-cell table:style-name="ce28" office:value-type="currency" office:currency="PLN" office:value="0.72">
            <text:p>0,72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ALOEPANTEN ŻEL DO PIELĘGNACJI SKÓRY SUCHEJ I WRAŻLIWEJ 40G Wynik</text:p>
          </table:table-cell>
          <table:table-cell table:style-name="ce21"/>
          <table:table-cell table:style-name="ce29" office:value-type="currency" office:currency="PLN" office:value="0.72">
            <text:p>0,72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Alugastrin 40 tabletek</text:p>
          </table:table-cell>
          <table:table-cell table:style-name="ce20" office:value-type="float" office:value="5864">
            <text:p>5864</text:p>
          </table:table-cell>
          <table:table-cell table:style-name="ce28" office:value-type="currency" office:currency="PLN" office:value="2.92">
            <text:p>2,92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Alugastrin 40 tabletek Wynik</text:p>
          </table:table-cell>
          <table:table-cell table:style-name="ce21"/>
          <table:table-cell table:style-name="ce29" office:value-type="currency" office:currency="PLN" office:value="2.92">
            <text:p>2,92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Amaderm Szampon Przeciwłupieżowy 150ml</text:p>
          </table:table-cell>
          <table:table-cell table:style-name="ce20" office:value-type="float" office:value="13949">
            <text:p>13949</text:p>
          </table:table-cell>
          <table:table-cell table:style-name="ce28" office:value-type="currency" office:currency="PLN" office:value="0.95">
            <text:p>0,95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Amaderm Szampon Przeciwłupieżowy 150ml Wynik</text:p>
          </table:table-cell>
          <table:table-cell table:style-name="ce21"/>
          <table:table-cell table:style-name="ce29" office:value-type="currency" office:currency="PLN" office:value="0.95">
            <text:p>0,95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Amara Cynkokrem Go! 50ml</text:p>
          </table:table-cell>
          <table:table-cell table:style-name="ce20" office:value-type="float" office:value="16539">
            <text:p>16539</text:p>
          </table:table-cell>
          <table:table-cell table:style-name="ce28" office:value-type="currency" office:currency="PLN" office:value="1.46">
            <text:p>1,46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Amara Cynkokrem Go! 50ml Wynik</text:p>
          </table:table-cell>
          <table:table-cell table:style-name="ce21"/>
          <table:table-cell table:style-name="ce29" office:value-type="currency" office:currency="PLN" office:value="1.46">
            <text:p>1,46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ANNA Wazelina kosmetyczna z witaminami A+E 50g</text:p>
          </table:table-cell>
          <table:table-cell table:style-name="ce20" office:value-type="float" office:value="9548">
            <text:p>9548</text:p>
          </table:table-cell>
          <table:table-cell table:style-name="ce28" office:value-type="currency" office:currency="PLN" office:value="1.86">
            <text:p>1,86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ANNA Wazelina kosmetyczna z witaminami A+E 50g Wynik</text:p>
          </table:table-cell>
          <table:table-cell table:style-name="ce21"/>
          <table:table-cell table:style-name="ce29" office:value-type="currency" office:currency="PLN" office:value="1.86">
            <text:p>1,86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Anty Kleszcz Przyrząd Do Usuwania Kleszczy 1szt.</text:p>
          </table:table-cell>
          <table:table-cell table:style-name="ce20" office:value-type="float" office:value="13664">
            <text:p>13664</text:p>
          </table:table-cell>
          <table:table-cell table:style-name="ce28" office:value-type="currency" office:currency="PLN" office:value="0.92">
            <text:p>0,92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Anty Kleszcz Przyrząd Do Usuwania Kleszczy 1szt. Wynik</text:p>
          </table:table-cell>
          <table:table-cell table:style-name="ce21"/>
          <table:table-cell table:style-name="ce29" office:value-type="currency" office:currency="PLN" office:value="0.92">
            <text:p>0,92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APAP Ból i Gorączka C Plus 10 tab. mus.</text:p>
          </table:table-cell>
          <table:table-cell table:style-name="ce20" office:value-type="float" office:value="11252">
            <text:p>11252</text:p>
          </table:table-cell>
          <table:table-cell table:style-name="ce28" office:value-type="currency" office:currency="PLN" office:value="2.4">
            <text:p>2,4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APAP Ból i Gorączka C Plus 10 tab. mus. Wynik</text:p>
          </table:table-cell>
          <table:table-cell table:style-name="ce21"/>
          <table:table-cell table:style-name="ce29" office:value-type="currency" office:currency="PLN" office:value="2.4">
            <text:p>2,4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Aqua Gel opatrunek hydrożelowy 10x12cm 1 szt.</text:p>
          </table:table-cell>
          <table:table-cell table:style-name="ce20" office:value-type="float" office:value="6772">
            <text:p>6772</text:p>
          </table:table-cell>
          <table:table-cell table:style-name="ce28" office:value-type="currency" office:currency="PLN" office:value="3.72">
            <text:p>3,72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Aqua Gel opatrunek hydrożelowy 10x12cm 1 szt. Wynik</text:p>
          </table:table-cell>
          <table:table-cell table:style-name="ce21"/>
          <table:table-cell table:style-name="ce29" office:value-type="currency" office:currency="PLN" office:value="3.72">
            <text:p>3,72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ArgenTussin Gardło, smak miętowo-cytrynowy 16 pastylek</text:p>
          </table:table-cell>
          <table:table-cell table:style-name="ce20" office:value-type="float" office:value="13334">
            <text:p>13334</text:p>
          </table:table-cell>
          <table:table-cell table:style-name="ce28" office:value-type="currency" office:currency="PLN" office:value="4">
            <text:p>4,00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ArgenTussin Gardło, smak miętowo-cytrynowy 16 pastylek Wynik</text:p>
          </table:table-cell>
          <table:table-cell table:style-name="ce21"/>
          <table:table-cell table:style-name="ce29" office:value-type="currency" office:currency="PLN" office:value="4">
            <text:p>4,0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Aronta 30 tabl</text:p>
          </table:table-cell>
          <table:table-cell table:style-name="ce20" office:value-type="float" office:value="658">
            <text:p>658</text:p>
          </table:table-cell>
          <table:table-cell table:style-name="ce28" office:value-type="currency" office:currency="PLN" office:value="7.11">
            <text:p>7,11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Aronta 30 tabl Wynik</text:p>
          </table:table-cell>
          <table:table-cell table:style-name="ce21"/>
          <table:table-cell table:style-name="ce29" office:value-type="currency" office:currency="PLN" office:value="7.11">
            <text:p>7,11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Aspirin 500mg 10 tabletek</text:p>
          </table:table-cell>
          <table:table-cell table:style-name="ce20" office:value-type="float" office:value="16095">
            <text:p>16095</text:p>
          </table:table-cell>
          <table:table-cell table:style-name="ce28" office:value-type="currency" office:currency="PLN" office:value="1.6">
            <text:p>1,6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Aspirin 500mg 10 tabletek Wynik</text:p>
          </table:table-cell>
          <table:table-cell table:style-name="ce21"/>
          <table:table-cell table:style-name="ce29" office:value-type="currency" office:currency="PLN" office:value="1.6">
            <text:p>1,6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Aspirin Cardio 100mg 28 tabl</text:p>
          </table:table-cell>
          <table:table-cell table:style-name="ce20" office:value-type="float" office:value="16094">
            <text:p>16094</text:p>
          </table:table-cell>
          <table:table-cell table:style-name="ce28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Aspirin Cardio 100mg 28 tabl Wynik</text:p>
          </table:table-cell>
          <table:table-cell table:style-name="ce21"/>
          <table:table-cell table:style-name="ce29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AVENE BARDZO WYSOKA OCHRONA CLEANANCE Koloryzujący SPF50+ 50ml</text:p>
          </table:table-cell>
          <table:table-cell table:style-name="ce20" office:value-type="float" office:value="13971">
            <text:p>13971</text:p>
          </table:table-cell>
          <table:table-cell table:style-name="ce28" office:value-type="currency" office:currency="PLN" office:value="0.95">
            <text:p>0,95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AVENE BARDZO WYSOKA OCHRONA CLEANANCE Koloryzujący SPF50+ 50ml Wynik</text:p>
          </table:table-cell>
          <table:table-cell table:style-name="ce21"/>
          <table:table-cell table:style-name="ce29" office:value-type="currency" office:currency="PLN" office:value="0.95">
            <text:p>0,95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Avene COLD CREAM Krem 40ml</text:p>
          </table:table-cell>
          <table:table-cell table:style-name="ce20" office:value-type="float" office:value="3813">
            <text:p>3813</text:p>
          </table:table-cell>
          <table:table-cell table:style-name="ce28" office:value-type="currency" office:currency="PLN" office:value="2.85">
            <text:p>2,85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Avene COLD CREAM Krem 40ml Wynik</text:p>
          </table:table-cell>
          <table:table-cell table:style-name="ce21"/>
          <table:table-cell table:style-name="ce29" office:value-type="currency" office:currency="PLN" office:value="2.85">
            <text:p>2,85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Avene Dermabsolu Krem Na Noc 50ml + Pod Oczy 15ml</text:p>
          </table:table-cell>
          <table:table-cell table:style-name="ce20" office:value-type="float" office:value="32643">
            <text:p>32643</text:p>
          </table:table-cell>
          <table:table-cell table:style-name="ce28" office:value-type="currency" office:currency="PLN" office:value="5.7">
            <text:p>5,70 zł</text:p>
          </table:table-cell>
          <table:table-cell table:number-columns-repeated="1021"/>
        </table:table-row>
        <table:table-row table:style-name="ro15">
          <table:table-cell table:style-name="ce14" office:value-type="string">
            <text:p>Avene Dermabsolu Krem Na Noc 50ml + Pod Oczy 15ml Wynik</text:p>
          </table:table-cell>
          <table:table-cell table:style-name="ce21"/>
          <table:table-cell table:style-name="ce29" office:value-type="currency" office:currency="PLN" office:value="5.7">
            <text:p>5,7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Avène Dermabsolu Redensifying Day Cream Krem <text:s/>Modelujący Na Dzień Przeciw Zmarszczkom 50Ml</text:p>
          </table:table-cell>
          <table:table-cell table:style-name="ce20" office:value-type="float" office:value="31926">
            <text:p>31926</text:p>
          </table:table-cell>
          <table:table-cell table:style-name="ce28" office:value-type="currency" office:currency="PLN" office:value="1.9">
            <text:p>1,9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Avène Dermabsolu Redensifying Day Cream Krem <text:s/>Modelujący Na Dzień Przeciw Zmarszczkom 50Ml Wynik</text:p>
          </table:table-cell>
          <table:table-cell table:style-name="ce21"/>
          <table:table-cell table:style-name="ce29" office:value-type="currency" office:currency="PLN" office:value="1.9">
            <text:p>1,9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Avene Hyaluron Activ B3 Krem Na Noc 50ml + Pod Oczy 15ml</text:p>
          </table:table-cell>
          <table:table-cell table:style-name="ce20" office:value-type="float" office:value="32646">
            <text:p>32646</text:p>
          </table:table-cell>
          <table:table-cell table:style-name="ce28" office:value-type="currency" office:currency="PLN" office:value="7.6">
            <text:p>7,60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Avene Hyaluron Activ B3 Krem Na Noc 50ml + Pod Oczy 15ml Wynik</text:p>
          </table:table-cell>
          <table:table-cell table:style-name="ce21"/>
          <table:table-cell table:style-name="ce29" office:value-type="currency" office:currency="PLN" office:value="7.6">
            <text:p>7,6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Avene HYALURON ACTIV B3 Krem odbudowujący komórki 50ml</text:p>
          </table:table-cell>
          <table:table-cell table:style-name="ce20" office:value-type="float" office:value="19009">
            <text:p>19009</text:p>
          </table:table-cell>
          <table:table-cell table:style-name="ce28" office:value-type="currency" office:currency="PLN" office:value="0.95">
            <text:p>0,95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Avene HYALURON ACTIV B3 Krem odbudowujący komórki 50ml Wynik</text:p>
          </table:table-cell>
          <table:table-cell table:style-name="ce21"/>
          <table:table-cell table:style-name="ce29" office:value-type="currency" office:currency="PLN" office:value="0.95">
            <text:p>0,95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Avene HYDRANCE Krem nawilżający bogata konsystencja 40ml</text:p>
          </table:table-cell>
          <table:table-cell table:style-name="ce20" office:value-type="float" office:value="8601">
            <text:p>8601</text:p>
          </table:table-cell>
          <table:table-cell table:style-name="ce28" office:value-type="currency" office:currency="PLN" office:value="1.9">
            <text:p>1,9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Avene HYDRANCE Krem nawilżający bogata konsystencja 40ml Wynik</text:p>
          </table:table-cell>
          <table:table-cell table:style-name="ce21"/>
          <table:table-cell table:style-name="ce29" office:value-type="currency" office:currency="PLN" office:value="1.9">
            <text:p>1,9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Avene HYDRANCE UV Lekki krem nawilżający SPF 30 40ml</text:p>
          </table:table-cell>
          <table:table-cell table:style-name="ce20" office:value-type="float" office:value="9958">
            <text:p>9958</text:p>
          </table:table-cell>
          <table:table-cell table:style-name="ce28" office:value-type="currency" office:currency="PLN" office:value="4.75">
            <text:p>4,75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Avene HYDRANCE UV Lekki krem nawilżający SPF 30 40ml Wynik</text:p>
          </table:table-cell>
          <table:table-cell table:style-name="ce21"/>
          <table:table-cell table:style-name="ce29" office:value-type="currency" office:currency="PLN" office:value="4.75">
            <text:p>4,75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Avene Sunsimed Ka Bardzo Wysoka Ochrona 80ml</text:p>
          </table:table-cell>
          <table:table-cell table:style-name="ce20" office:value-type="float" office:value="28241">
            <text:p>28241</text:p>
          </table:table-cell>
          <table:table-cell table:style-name="ce28" office:value-type="currency" office:currency="PLN" office:value="9.5">
            <text:p>9,5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Avene Sunsimed Ka Bardzo Wysoka Ochrona 80ml Wynik</text:p>
          </table:table-cell>
          <table:table-cell table:style-name="ce21"/>
          <table:table-cell table:style-name="ce29" office:value-type="currency" office:currency="PLN" office:value="9.5">
            <text:p>9,5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Avene Xeracalm A.D Krem uzupełniający lipidy 400ml</text:p>
          </table:table-cell>
          <table:table-cell table:style-name="ce20" office:value-type="float" office:value="19702">
            <text:p>19702</text:p>
          </table:table-cell>
          <table:table-cell table:style-name="ce28" office:value-type="currency" office:currency="PLN" office:value="1.9">
            <text:p>1,90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Avene Xeracalm A.D Krem uzupełniający lipidy 400ml Wynik</text:p>
          </table:table-cell>
          <table:table-cell table:style-name="ce21"/>
          <table:table-cell table:style-name="ce29" office:value-type="currency" office:currency="PLN" office:value="1.9">
            <text:p>1,9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Avene XERACALM NUTRITION Balsam nawilżający 200 ml</text:p>
          </table:table-cell>
          <table:table-cell table:style-name="ce20" office:value-type="float" office:value="19417">
            <text:p>19417</text:p>
          </table:table-cell>
          <table:table-cell table:style-name="ce28" office:value-type="currency" office:currency="PLN" office:value="0.95">
            <text:p>0,95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Avene XERACALM NUTRITION Balsam nawilżający 200 ml Wynik</text:p>
          </table:table-cell>
          <table:table-cell table:style-name="ce21"/>
          <table:table-cell table:style-name="ce29" office:value-type="currency" office:currency="PLN" office:value="0.95">
            <text:p>0,95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BACTIGRAS Opatrunek Gazowy Nasączony Parafiną I Chlorheksydyną 10cm x 10cm 10szt.</text:p>
          </table:table-cell>
          <table:table-cell table:style-name="ce20" office:value-type="float" office:value="9185">
            <text:p>9185</text:p>
          </table:table-cell>
          <table:table-cell table:style-name="ce28" office:value-type="currency" office:currency="PLN" office:value="3.1">
            <text:p>3,10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BACTIGRAS Opatrunek Gazowy Nasączony Parafiną I Chlorheksydyną 10cm x 10cm 10szt. Wynik</text:p>
          </table:table-cell>
          <table:table-cell table:style-name="ce21"/>
          <table:table-cell table:style-name="ce29" office:value-type="currency" office:currency="PLN" office:value="3.1">
            <text:p>3,1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BACTIGRAS Opatrunek parafinowy z chlorhexydyną <text:s/>5cm * 5cm</text:p>
          </table:table-cell>
          <table:table-cell table:style-name="ce20" office:value-type="float" office:value="7649">
            <text:p>7649</text:p>
          </table:table-cell>
          <table:table-cell table:style-name="ce28" office:value-type="currency" office:currency="PLN" office:value="0.62">
            <text:p>0,62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BACTIGRAS Opatrunek parafinowy z chlorhexydyną <text:s/>5cm * 5cm Wynik</text:p>
          </table:table-cell>
          <table:table-cell table:style-name="ce21"/>
          <table:table-cell table:style-name="ce29" office:value-type="currency" office:currency="PLN" office:value="0.62">
            <text:p>0,62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Balsam Koński-Żel chłodzący 500ml /Jardin Naturel/</text:p>
          </table:table-cell>
          <table:table-cell table:style-name="ce20" office:value-type="float" office:value="13784">
            <text:p>13784</text:p>
          </table:table-cell>
          <table:table-cell table:style-name="ce28" office:value-type="currency" office:currency="PLN" office:value="0.88">
            <text:p>0,88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Balsam Koński-Żel chłodzący 500ml /Jardin Naturel/ Wynik</text:p>
          </table:table-cell>
          <table:table-cell table:style-name="ce21"/>
          <table:table-cell table:style-name="ce29" office:value-type="currency" office:currency="PLN" office:value="0.88">
            <text:p>0,88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Bd Becton Dickinson Becton Dickinson Igły Do Pena 100Szt. 0.23X4Mm 32G</text:p>
          </table:table-cell>
          <table:table-cell table:style-name="ce20" office:value-type="float" office:value="16950">
            <text:p>16950</text:p>
          </table:table-cell>
          <table:table-cell table:style-name="ce28" office:value-type="currency" office:currency="PLN" office:value="0.79">
            <text:p>0,79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Bd Becton Dickinson Becton Dickinson Igły Do Pena 100Szt. 0.23X4Mm 32G Wynik</text:p>
          </table:table-cell>
          <table:table-cell table:style-name="ce21"/>
          <table:table-cell table:style-name="ce29" office:value-type="currency" office:currency="PLN" office:value="0.79">
            <text:p>0,79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Bebilon HMF Wzmacniacz mleka kobiecego 50x1g</text:p>
          </table:table-cell>
          <table:table-cell table:style-name="ce20" office:value-type="float" office:value="18684">
            <text:p>18684</text:p>
          </table:table-cell>
          <table:table-cell table:style-name="ce28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Bebilon HMF Wzmacniacz mleka kobiecego 50x1g Wynik</text:p>
          </table:table-cell>
          <table:table-cell table:style-name="ce21"/>
          <table:table-cell table:style-name="ce29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Bebilon Nenatal Premium Płyn 24X70Ml</text:p>
          </table:table-cell>
          <table:table-cell table:style-name="ce20" office:value-type="float" office:value="12210">
            <text:p>12210</text:p>
          </table:table-cell>
          <table:table-cell table:style-name="ce28" office:value-type="currency" office:currency="PLN" office:value="1.6">
            <text:p>1,60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Bebilon Nenatal Premium Płyn 24X70Ml Wynik</text:p>
          </table:table-cell>
          <table:table-cell table:style-name="ce21"/>
          <table:table-cell table:style-name="ce29" office:value-type="currency" office:currency="PLN" office:value="1.6">
            <text:p>1,6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Bebon Colica! kateter rektalny na kolkę dla niemowląt 5 szt.</text:p>
          </table:table-cell>
          <table:table-cell table:style-name="ce20" office:value-type="float" office:value="16508">
            <text:p>16508</text:p>
          </table:table-cell>
          <table:table-cell table:style-name="ce28" office:value-type="currency" office:currency="PLN" office:value="0.79">
            <text:p>0,79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Bebon Colica! kateter rektalny na kolkę dla niemowląt 5 szt. Wynik</text:p>
          </table:table-cell>
          <table:table-cell table:style-name="ce21"/>
          <table:table-cell table:style-name="ce29" office:value-type="currency" office:currency="PLN" office:value="0.79">
            <text:p>0,79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Berimal Forte 60kaps.</text:p>
          </table:table-cell>
          <table:table-cell table:style-name="ce20" office:value-type="float" office:value="19109">
            <text:p>19109</text:p>
          </table:table-cell>
          <table:table-cell table:style-name="ce28" office:value-type="currency" office:currency="PLN" office:value="5.81">
            <text:p>5,81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Berimal Forte 60kaps. Wynik</text:p>
          </table:table-cell>
          <table:table-cell table:style-name="ce21"/>
          <table:table-cell table:style-name="ce29" office:value-type="currency" office:currency="PLN" office:value="5.81">
            <text:p>5,81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Biobaby Dentinox Żel Na Ząbkowanie Łagodzący</text:p>
          </table:table-cell>
          <table:table-cell table:style-name="ce20" office:value-type="float" office:value="9256">
            <text:p>9256</text:p>
          </table:table-cell>
          <table:table-cell table:style-name="ce28" office:value-type="currency" office:currency="PLN" office:value="0.73">
            <text:p>0,73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Biobaby Dentinox Żel Na Ząbkowanie Łagodzący Wynik</text:p>
          </table:table-cell>
          <table:table-cell table:style-name="ce21"/>
          <table:table-cell table:style-name="ce29" office:value-type="currency" office:currency="PLN" office:value="0.73">
            <text:p>0,73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Bioderma Atoderm Intensive Żel Oczyszczający I Natłuszczający 1000ml</text:p>
          </table:table-cell>
          <table:table-cell table:style-name="ce20" office:value-type="float" office:value="21024">
            <text:p>21024</text:p>
          </table:table-cell>
          <table:table-cell table:style-name="ce28" office:value-type="currency" office:currency="PLN" office:value="3.8">
            <text:p>3,8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Bioderma Atoderm Intensive Żel Oczyszczający I Natłuszczający 1000ml Wynik</text:p>
          </table:table-cell>
          <table:table-cell table:style-name="ce21"/>
          <table:table-cell table:style-name="ce29" office:value-type="currency" office:currency="PLN" office:value="3.8">
            <text:p>3,8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Biofarm Vigalex D3 + K2 Max 60 tabl.</text:p>
          </table:table-cell>
          <table:table-cell table:style-name="ce20" office:value-type="float" office:value="18365">
            <text:p>18365</text:p>
          </table:table-cell>
          <table:table-cell table:style-name="ce28" office:value-type="currency" office:currency="PLN" office:value="5.6">
            <text:p>5,6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Biofarm Vigalex D3 + K2 Max 60 tabl. Wynik</text:p>
          </table:table-cell>
          <table:table-cell table:style-name="ce21"/>
          <table:table-cell table:style-name="ce29" office:value-type="currency" office:currency="PLN" office:value="5.6">
            <text:p>5,6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Biolevox HA 2,2% 2 ml żel dostawowy, 1 ampułkostrzykawka</text:p>
          </table:table-cell>
          <table:table-cell table:style-name="ce20" office:value-type="float" office:value="10623">
            <text:p>10623</text:p>
          </table:table-cell>
          <table:table-cell table:style-name="ce28" office:value-type="currency" office:currency="PLN" office:value="1.74">
            <text:p>1,74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Biolevox HA 2,2% 2 ml żel dostawowy, 1 ampułkostrzykawka Wynik</text:p>
          </table:table-cell>
          <table:table-cell table:style-name="ce21"/>
          <table:table-cell table:style-name="ce29" office:value-type="currency" office:currency="PLN" office:value="1.74">
            <text:p>1,74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Biovena Health Panthenol Krem 30g</text:p>
          </table:table-cell>
          <table:table-cell table:style-name="ce20" office:value-type="float" office:value="14209">
            <text:p>14209</text:p>
          </table:table-cell>
          <table:table-cell table:style-name="ce28" office:value-type="currency" office:currency="PLN" office:value="1.44">
            <text:p>1,44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Biovena Health Panthenol Krem 30g Wynik</text:p>
          </table:table-cell>
          <table:table-cell table:style-name="ce21"/>
          <table:table-cell table:style-name="ce29" office:value-type="currency" office:currency="PLN" office:value="1.44">
            <text:p>1,44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Biovital Odporność Spray 10ml</text:p>
          </table:table-cell>
          <table:table-cell table:style-name="ce20" office:value-type="float" office:value="19643">
            <text:p>19643</text:p>
          </table:table-cell>
          <table:table-cell table:style-name="ce28" office:value-type="currency" office:currency="PLN" office:value="1.6">
            <text:p>1,6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Biovital Odporność Spray 10ml Wynik</text:p>
          </table:table-cell>
          <table:table-cell table:style-name="ce21"/>
          <table:table-cell table:style-name="ce29" office:value-type="currency" office:currency="PLN" office:value="1.6">
            <text:p>1,6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Bisacodyl VP 5 mg 30 tabletek dojelitowych</text:p>
          </table:table-cell>
          <table:table-cell table:style-name="ce20" office:value-type="float" office:value="3429">
            <text:p>3429</text:p>
          </table:table-cell>
          <table:table-cell table:style-name="ce28" office:value-type="currency" office:currency="PLN" office:value="0.73">
            <text:p>0,73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Bisacodyl VP 5 mg 30 tabletek dojelitowych Wynik</text:p>
          </table:table-cell>
          <table:table-cell table:style-name="ce21"/>
          <table:table-cell table:style-name="ce29" office:value-type="currency" office:currency="PLN" office:value="0.73">
            <text:p>0,73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Blephasol Płyn Micelarny Do Wrażliwych Powiek 100ml</text:p>
          </table:table-cell>
          <table:table-cell table:style-name="ce20" office:value-type="float" office:value="3432">
            <text:p>3432</text:p>
          </table:table-cell>
          <table:table-cell table:style-name="ce28" office:value-type="currency" office:currency="PLN" office:value="3.2">
            <text:p>3,2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Blephasol Płyn Micelarny Do Wrażliwych Powiek 100ml Wynik</text:p>
          </table:table-cell>
          <table:table-cell table:style-name="ce21"/>
          <table:table-cell table:style-name="ce29" office:value-type="currency" office:currency="PLN" office:value="3.2">
            <text:p>3,2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Błonnik dla dzieci + probiotyki 100 g</text:p>
          </table:table-cell>
          <table:table-cell table:style-name="ce20" office:value-type="float" office:value="11947">
            <text:p>11947</text:p>
          </table:table-cell>
          <table:table-cell table:style-name="ce28" office:value-type="currency" office:currency="PLN" office:value="3.95">
            <text:p>3,95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Błonnik dla dzieci + probiotyki 100 g Wynik</text:p>
          </table:table-cell>
          <table:table-cell table:style-name="ce21"/>
          <table:table-cell table:style-name="ce29" office:value-type="currency" office:currency="PLN" office:value="3.95">
            <text:p>3,95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BODYMAX PLUS Multiwitamina Odporność Energia 200 tab.</text:p>
          </table:table-cell>
          <table:table-cell table:style-name="ce20" office:value-type="float" office:value="16252">
            <text:p>16252</text:p>
          </table:table-cell>
          <table:table-cell table:style-name="ce28" office:value-type="currency" office:currency="PLN" office:value="14.4">
            <text:p>14,4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BODYMAX PLUS Multiwitamina Odporność Energia 200 tab. Wynik</text:p>
          </table:table-cell>
          <table:table-cell table:style-name="ce21"/>
          <table:table-cell table:style-name="ce29" office:value-type="currency" office:currency="PLN" office:value="14.4">
            <text:p>14,4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Boiron Argentum Nitricum 15CH 4 g</text:p>
          </table:table-cell>
          <table:table-cell table:style-name="ce20" office:value-type="float" office:value="21233">
            <text:p>21233</text:p>
          </table:table-cell>
          <table:table-cell table:style-name="ce28" office:value-type="currency" office:currency="PLN" office:value="0.87">
            <text:p>0,87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Boiron Argentum Nitricum 15CH 4 g Wynik</text:p>
          </table:table-cell>
          <table:table-cell table:style-name="ce21"/>
          <table:table-cell table:style-name="ce29" office:value-type="currency" office:currency="PLN" office:value="0.87">
            <text:p>0,87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Bonatium Karczoch 60 tabletek powlekanych</text:p>
          </table:table-cell>
          <table:table-cell table:style-name="ce20" office:value-type="float" office:value="18914">
            <text:p>18914</text:p>
          </table:table-cell>
          <table:table-cell table:style-name="ce28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Bonatium Karczoch 60 tabletek powlekanych Wynik</text:p>
          </table:table-cell>
          <table:table-cell table:style-name="ce21"/>
          <table:table-cell table:style-name="ce29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Bonimed Gastrobon Na Trawienie Zioła Ojca Grzegorza 60kaps.</text:p>
          </table:table-cell>
          <table:table-cell table:style-name="ce20" office:value-type="float" office:value="16814">
            <text:p>16814</text:p>
          </table:table-cell>
          <table:table-cell table:style-name="ce28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Bonimed Gastrobon Na Trawienie Zioła Ojca Grzegorza 60kaps. Wynik</text:p>
          </table:table-cell>
          <table:table-cell table:style-name="ce21"/>
          <table:table-cell table:style-name="ce29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BONIMED Pectobonisol 40gram</text:p>
          </table:table-cell>
          <table:table-cell table:style-name="ce20" office:value-type="float" office:value="19230">
            <text:p>19230</text:p>
          </table:table-cell>
          <table:table-cell table:style-name="ce28" office:value-type="currency" office:currency="PLN" office:value="0.88">
            <text:p>0,88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BONIMED Pectobonisol 40gram Wynik</text:p>
          </table:table-cell>
          <table:table-cell table:style-name="ce21"/>
          <table:table-cell table:style-name="ce29" office:value-type="currency" office:currency="PLN" office:value="0.88">
            <text:p>0,88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Borowina Lecznicza Pasta 1 Kg</text:p>
          </table:table-cell>
          <table:table-cell table:style-name="ce20" office:value-type="float" office:value="4899">
            <text:p>4899</text:p>
          </table:table-cell>
          <table:table-cell table:style-name="ce28" office:value-type="currency" office:currency="PLN" office:value="9.57">
            <text:p>9,57 zł</text:p>
          </table:table-cell>
          <table:table-cell table:number-columns-repeated="1021"/>
        </table:table-row>
        <table:table-row table:style-name="ro15">
          <table:table-cell table:style-name="ce14" office:value-type="string">
            <text:p>Borowina Lecznicza Pasta 1 Kg Wynik</text:p>
          </table:table-cell>
          <table:table-cell table:style-name="ce21"/>
          <table:table-cell table:style-name="ce29" office:value-type="currency" office:currency="PLN" office:value="9.57">
            <text:p>9,57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Butosept Zestaw Do Dezynfekcji Stosowany Przy Grzybicy Stóp (Płyn 100Ml + Zasypka Dezynfekcyjna 50G)</text:p>
          </table:table-cell>
          <table:table-cell table:style-name="ce20" office:value-type="float" office:value="11956">
            <text:p>11956</text:p>
          </table:table-cell>
          <table:table-cell table:style-name="ce28" office:value-type="currency" office:currency="PLN" office:value="0.85">
            <text:p>0,85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Butosept Zestaw Do Dezynfekcji Stosowany Przy Grzybicy Stóp (Płyn 100Ml + Zasypka Dezynfekcyjna 50G) Wynik</text:p>
          </table:table-cell>
          <table:table-cell table:style-name="ce21"/>
          <table:table-cell table:style-name="ce29" office:value-type="currency" office:currency="PLN" office:value="0.85">
            <text:p>0,85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CAUDALIE PREMIER CRU RICHE Krem o bogatej konsystencji Anti - Age 50 ml</text:p>
          </table:table-cell>
          <table:table-cell table:style-name="ce20" office:value-type="float" office:value="31983">
            <text:p>31983</text:p>
          </table:table-cell>
          <table:table-cell table:style-name="ce28" office:value-type="currency" office:currency="PLN" office:value="0.95">
            <text:p>0,95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CAUDALIE PREMIER CRU RICHE Krem o bogatej konsystencji Anti - Age 50 ml Wynik</text:p>
          </table:table-cell>
          <table:table-cell table:style-name="ce21"/>
          <table:table-cell table:style-name="ce29" office:value-type="currency" office:currency="PLN" office:value="0.95">
            <text:p>0,95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CAUDALIE Samoopalające krople brązujące 15 ml</text:p>
          </table:table-cell>
          <table:table-cell table:style-name="ce20" office:value-type="float" office:value="31976">
            <text:p>31976</text:p>
          </table:table-cell>
          <table:table-cell table:style-name="ce28" office:value-type="currency" office:currency="PLN" office:value="4.86">
            <text:p>4,86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CAUDALIE Samoopalające krople brązujące 15 ml Wynik</text:p>
          </table:table-cell>
          <table:table-cell table:style-name="ce21"/>
          <table:table-cell table:style-name="ce29" office:value-type="currency" office:currency="PLN" office:value="4.86">
            <text:p>4,86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Caudalie Vinoperfect Glikolowy Krem Rozjaśniający na Noc Refill, 50ml</text:p>
          </table:table-cell>
          <table:table-cell table:style-name="ce20" office:value-type="float" office:value="32165">
            <text:p>32165</text:p>
          </table:table-cell>
          <table:table-cell table:style-name="ce28" office:value-type="currency" office:currency="PLN" office:value="1.02">
            <text:p>1,02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Caudalie Vinoperfect Glikolowy Krem Rozjaśniający na Noc Refill, 50ml Wynik</text:p>
          </table:table-cell>
          <table:table-cell table:style-name="ce21"/>
          <table:table-cell table:style-name="ce29" office:value-type="currency" office:currency="PLN" office:value="1.02">
            <text:p>1,02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Caudalie Vinoperfect Krem na Przebarwienia z Niacynamidem Refill, 50ml</text:p>
          </table:table-cell>
          <table:table-cell table:style-name="ce20" office:value-type="float" office:value="32166">
            <text:p>32166</text:p>
          </table:table-cell>
          <table:table-cell table:style-name="ce28" office:value-type="currency" office:currency="PLN" office:value="1.02">
            <text:p>1,02 zł</text:p>
          </table:table-cell>
          <table:table-cell table:number-columns-repeated="1021"/>
        </table:table-row>
        <table:table-row table:style-name="ro15">
          <table:table-cell table:style-name="ce14" office:value-type="string">
            <text:p>Caudalie Vinoperfect Krem na Przebarwienia z Niacynamidem Refill, 50ml Wynik</text:p>
          </table:table-cell>
          <table:table-cell table:style-name="ce21"/>
          <table:table-cell table:style-name="ce29" office:value-type="currency" office:currency="PLN" office:value="1.02">
            <text:p>1,02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Caudalie Vinoperfect Radiance Serum Complexion Correcting Serum Rozjaśniające Przebarwienia 30 ml</text:p>
          </table:table-cell>
          <table:table-cell table:style-name="ce20" office:value-type="float" office:value="28345">
            <text:p>28345</text:p>
          </table:table-cell>
          <table:table-cell table:style-name="ce28" office:value-type="currency" office:currency="PLN" office:value="1.03">
            <text:p>1,03 zł</text:p>
          </table:table-cell>
          <table:table-cell table:number-columns-repeated="1021"/>
        </table:table-row>
        <table:table-row table:style-name="ro15">
          <table:table-cell table:style-name="ce14" office:value-type="string">
            <text:p>Caudalie Vinoperfect Radiance Serum Complexion Correcting Serum Rozjaśniające Przebarwienia 30 ml Wynik</text:p>
          </table:table-cell>
          <table:table-cell table:style-name="ce21"/>
          <table:table-cell table:style-name="ce29" office:value-type="currency" office:currency="PLN" office:value="1.03">
            <text:p>1,03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Caudalie Vinoperfect Zestaw Wiosenny - Serum Rozjaśniające, 30ml + Krem na Dzień, 15ml + Krem na Noc, 15ml</text:p>
          </table:table-cell>
          <table:table-cell table:style-name="ce20" office:value-type="float" office:value="36451">
            <text:p>36451</text:p>
          </table:table-cell>
          <table:table-cell table:style-name="ce28" office:value-type="currency" office:currency="PLN" office:value="9.5">
            <text:p>9,5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Caudalie Vinoperfect Zestaw Wiosenny - Serum Rozjaśniające, 30ml + Krem na Dzień, 15ml + Krem na Noc, 15ml Wynik</text:p>
          </table:table-cell>
          <table:table-cell table:style-name="ce21"/>
          <table:table-cell table:style-name="ce29" office:value-type="currency" office:currency="PLN" office:value="9.5">
            <text:p>9,5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Caudalie Vinopure Fluid matująco nawilżający 60 ml</text:p>
          </table:table-cell>
          <table:table-cell table:style-name="ce20" office:value-type="float" office:value="32413">
            <text:p>32413</text:p>
          </table:table-cell>
          <table:table-cell table:style-name="ce28" office:value-type="currency" office:currency="PLN" office:value="0.92">
            <text:p>0,92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Caudalie Vinopure Fluid matująco nawilżający 60 ml Wynik</text:p>
          </table:table-cell>
          <table:table-cell table:style-name="ce21"/>
          <table:table-cell table:style-name="ce29" office:value-type="currency" office:currency="PLN" office:value="0.92">
            <text:p>0,92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Caudalie Vinopure Zestaw Startowy dla Skóry Trądzikowej</text:p>
          </table:table-cell>
          <table:table-cell table:style-name="ce20" office:value-type="float" office:value="32416">
            <text:p>32416</text:p>
          </table:table-cell>
          <table:table-cell table:style-name="ce28" office:value-type="currency" office:currency="PLN" office:value="2.37">
            <text:p>2,37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Caudalie Vinopure Zestaw Startowy dla Skóry Trądzikowej Wynik</text:p>
          </table:table-cell>
          <table:table-cell table:style-name="ce21"/>
          <table:table-cell table:style-name="ce29" office:value-type="currency" office:currency="PLN" office:value="2.37">
            <text:p>2,37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Caudalie Vinosun Protect Spf 30 Krem O Wysokiej Ochronie 50 ml</text:p>
          </table:table-cell>
          <table:table-cell table:style-name="ce20" office:value-type="float" office:value="28365">
            <text:p>28365</text:p>
          </table:table-cell>
          <table:table-cell table:style-name="ce28" office:value-type="currency" office:currency="PLN" office:value="0.89">
            <text:p>0,89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Caudalie Vinosun Protect Spf 30 Krem O Wysokiej Ochronie 50 ml Wynik</text:p>
          </table:table-cell>
          <table:table-cell table:style-name="ce21"/>
          <table:table-cell table:style-name="ce29" office:value-type="currency" office:currency="PLN" office:value="0.89">
            <text:p>0,89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CeraVe Regenerujący krem do rąk 50ml</text:p>
          </table:table-cell>
          <table:table-cell table:style-name="ce20" office:value-type="float" office:value="3515">
            <text:p>3515</text:p>
          </table:table-cell>
          <table:table-cell table:style-name="ce28" office:value-type="currency" office:currency="PLN" office:value="0.95">
            <text:p>0,95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CeraVe Regenerujący krem do rąk 50ml Wynik</text:p>
          </table:table-cell>
          <table:table-cell table:style-name="ce21"/>
          <table:table-cell table:style-name="ce29" office:value-type="currency" office:currency="PLN" office:value="0.95">
            <text:p>0,95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Cetaphil Pro Redness Control krem nawilżający na noc 50ml</text:p>
          </table:table-cell>
          <table:table-cell table:style-name="ce20" office:value-type="float" office:value="10145">
            <text:p>10145</text:p>
          </table:table-cell>
          <table:table-cell table:style-name="ce28" office:value-type="currency" office:currency="PLN" office:value="0.95">
            <text:p>0,95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Cetaphil Pro Redness Control krem nawilżający na noc 50ml Wynik</text:p>
          </table:table-cell>
          <table:table-cell table:style-name="ce21"/>
          <table:table-cell table:style-name="ce29" office:value-type="currency" office:currency="PLN" office:value="0.95">
            <text:p>0,95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Cetip 10 tabl.</text:p>
          </table:table-cell>
          <table:table-cell table:style-name="ce20" office:value-type="float" office:value="394">
            <text:p>394</text:p>
          </table:table-cell>
          <table:table-cell table:style-name="ce28" office:value-type="currency" office:currency="PLN" office:value="3.2">
            <text:p>3,2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Cetip 10 tabl. Wynik</text:p>
          </table:table-cell>
          <table:table-cell table:style-name="ce21"/>
          <table:table-cell table:style-name="ce29" office:value-type="currency" office:currency="PLN" office:value="3.2">
            <text:p>3,2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Cewnik Foleya urologiczny silikonowy CH 16/10ml Romed</text:p>
          </table:table-cell>
          <table:table-cell table:style-name="ce20" office:value-type="float" office:value="12347">
            <text:p>12347</text:p>
          </table:table-cell>
          <table:table-cell table:style-name="ce28" office:value-type="currency" office:currency="PLN" office:value="0.92">
            <text:p>0,92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Cewnik Foleya urologiczny silikonowy CH 16/10ml Romed Wynik</text:p>
          </table:table-cell>
          <table:table-cell table:style-name="ce21"/>
          <table:table-cell table:style-name="ce29" office:value-type="currency" office:currency="PLN" office:value="0.92">
            <text:p>0,92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Chema-Elektromet Atopigo koncentrat do koncentrat do kąpieli 100g</text:p>
          </table:table-cell>
          <table:table-cell table:style-name="ce20" office:value-type="float" office:value="13988">
            <text:p>13988</text:p>
          </table:table-cell>
          <table:table-cell table:style-name="ce28" office:value-type="currency" office:currency="PLN" office:value="2.16">
            <text:p>2,16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Chema-Elektromet Atopigo koncentrat do koncentrat do kąpieli 100g Wynik</text:p>
          </table:table-cell>
          <table:table-cell table:style-name="ce21"/>
          <table:table-cell table:style-name="ce29" office:value-type="currency" office:currency="PLN" office:value="2.16">
            <text:p>2,16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Cholinex Pastylki do ssania w stanach zapalnych gardła i jamy ustnej 16 szt.</text:p>
          </table:table-cell>
          <table:table-cell table:style-name="ce20" office:value-type="float" office:value="10620">
            <text:p>10620</text:p>
          </table:table-cell>
          <table:table-cell table:style-name="ce28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Cholinex Pastylki do ssania w stanach zapalnych gardła i jamy ustnej 16 szt. Wynik</text:p>
          </table:table-cell>
          <table:table-cell table:style-name="ce21"/>
          <table:table-cell table:style-name="ce29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CLARITINE ALLERGY SYROP 60ML</text:p>
          </table:table-cell>
          <table:table-cell table:style-name="ce20" office:value-type="float" office:value="3574">
            <text:p>3574</text:p>
          </table:table-cell>
          <table:table-cell table:style-name="ce28" office:value-type="currency" office:currency="PLN" office:value="3.2">
            <text:p>3,2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CLARITINE ALLERGY SYROP 60ML Wynik</text:p>
          </table:table-cell>
          <table:table-cell table:style-name="ce21"/>
          <table:table-cell table:style-name="ce29" office:value-type="currency" office:currency="PLN" office:value="3.2">
            <text:p>3,2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CLARVOX Complex Spray do gardła, 30ml</text:p>
          </table:table-cell>
          <table:table-cell table:style-name="ce20" office:value-type="float" office:value="32268">
            <text:p>32268</text:p>
          </table:table-cell>
          <table:table-cell table:style-name="ce28" office:value-type="currency" office:currency="PLN" office:value="2.4">
            <text:p>2,4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CLARVOX Complex Spray do gardła, 30ml Wynik</text:p>
          </table:table-cell>
          <table:table-cell table:style-name="ce21"/>
          <table:table-cell table:style-name="ce29" office:value-type="currency" office:currency="PLN" office:value="2.4">
            <text:p>2,4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CLARVOX Porzeczka 36 past.</text:p>
          </table:table-cell>
          <table:table-cell table:style-name="ce20" office:value-type="float" office:value="32270">
            <text:p>32270</text:p>
          </table:table-cell>
          <table:table-cell table:style-name="ce28" office:value-type="currency" office:currency="PLN" office:value="3.32">
            <text:p>3,32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CLARVOX Porzeczka 36 past. Wynik</text:p>
          </table:table-cell>
          <table:table-cell table:style-name="ce21"/>
          <table:table-cell table:style-name="ce29" office:value-type="currency" office:currency="PLN" office:value="3.32">
            <text:p>3,32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CLIMAFEM Plus 30 tabl.</text:p>
          </table:table-cell>
          <table:table-cell table:style-name="ce20" office:value-type="float" office:value="32274">
            <text:p>32274</text:p>
          </table:table-cell>
          <table:table-cell table:style-name="ce28" office:value-type="currency" office:currency="PLN" office:value="2.25">
            <text:p>2,25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CLIMAFEM Plus 30 tabl. Wynik</text:p>
          </table:table-cell>
          <table:table-cell table:style-name="ce21"/>
          <table:table-cell table:style-name="ce29" office:value-type="currency" office:currency="PLN" office:value="2.25">
            <text:p>2,25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Clotrimazolum Krem przeciwgrzybiczy 10mg/g 20g</text:p>
          </table:table-cell>
          <table:table-cell table:style-name="ce20" office:value-type="float" office:value="5940">
            <text:p>5940</text:p>
          </table:table-cell>
          <table:table-cell table:style-name="ce28" office:value-type="currency" office:currency="PLN" office:value="2.88">
            <text:p>2,88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Clotrimazolum Krem przeciwgrzybiczy 10mg/g 20g Wynik</text:p>
          </table:table-cell>
          <table:table-cell table:style-name="ce21"/>
          <table:table-cell table:style-name="ce29" office:value-type="currency" office:currency="PLN" office:value="2.88">
            <text:p>2,88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Contractubex 50g</text:p>
          </table:table-cell>
          <table:table-cell table:style-name="ce20" office:value-type="float" office:value="5948">
            <text:p>5948</text:p>
          </table:table-cell>
          <table:table-cell table:style-name="ce28" office:value-type="currency" office:currency="PLN" office:value="0.72">
            <text:p>0,72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Contractubex 50g Wynik</text:p>
          </table:table-cell>
          <table:table-cell table:style-name="ce21"/>
          <table:table-cell table:style-name="ce29" office:value-type="currency" office:currency="PLN" office:value="0.72">
            <text:p>0,72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CONTROLY SMARKACZ Aspirator kataru dla dzieci, 1 szt.</text:p>
          </table:table-cell>
          <table:table-cell table:style-name="ce20" office:value-type="float" office:value="19588">
            <text:p>19588</text:p>
          </table:table-cell>
          <table:table-cell table:style-name="ce28" office:value-type="currency" office:currency="PLN" office:value="0.93">
            <text:p>0,93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CONTROLY SMARKACZ Aspirator kataru dla dzieci, 1 szt. Wynik</text:p>
          </table:table-cell>
          <table:table-cell table:style-name="ce21"/>
          <table:table-cell table:style-name="ce29" office:value-type="currency" office:currency="PLN" office:value="0.93">
            <text:p>0,93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Convatec Granuflex Obramowany Bordered Opatrunek Hydrokoloidowy 6X6Cm 1Szt</text:p>
          </table:table-cell>
          <table:table-cell table:style-name="ce20" office:value-type="float" office:value="16874">
            <text:p>16874</text:p>
          </table:table-cell>
          <table:table-cell table:style-name="ce28" office:value-type="currency" office:currency="PLN" office:value="0.62">
            <text:p>0,62 zł</text:p>
          </table:table-cell>
          <table:table-cell table:number-columns-repeated="1021"/>
        </table:table-row>
        <table:table-row table:style-name="ro15">
          <table:table-cell table:style-name="ce14" office:value-type="string">
            <text:p>Convatec Granuflex Obramowany Bordered Opatrunek Hydrokoloidowy 6X6Cm 1Szt Wynik</text:p>
          </table:table-cell>
          <table:table-cell table:style-name="ce21"/>
          <table:table-cell table:style-name="ce29" office:value-type="currency" office:currency="PLN" office:value="0.62">
            <text:p>0,62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CONVATEC LTD. CONVATEC LTD. GRANUFLEX EXTRA THIN Opatrunek hydrokoloidowy 10cm x 10cm 1 szt.</text:p>
          </table:table-cell>
          <table:table-cell table:style-name="ce20" office:value-type="float" office:value="8496">
            <text:p>8496</text:p>
          </table:table-cell>
          <table:table-cell table:style-name="ce28" office:value-type="currency" office:currency="PLN" office:value="0.62">
            <text:p>0,62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CONVATEC LTD. CONVATEC LTD. GRANUFLEX EXTRA THIN Opatrunek hydrokoloidowy 10cm x 10cm 1 szt. Wynik</text:p>
          </table:table-cell>
          <table:table-cell table:style-name="ce21"/>
          <table:table-cell table:style-name="ce29" office:value-type="currency" office:currency="PLN" office:value="0.62">
            <text:p>0,62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Czarnuszka 500Mg 60 Kaps</text:p>
          </table:table-cell>
          <table:table-cell table:style-name="ce20" office:value-type="float" office:value="11524">
            <text:p>11524</text:p>
          </table:table-cell>
          <table:table-cell table:style-name="ce28" office:value-type="currency" office:currency="PLN" office:value="0.89">
            <text:p>0,89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Czarnuszka 500Mg 60 Kaps Wynik</text:p>
          </table:table-cell>
          <table:table-cell table:style-name="ce21"/>
          <table:table-cell table:style-name="ce29" office:value-type="currency" office:currency="PLN" office:value="0.89">
            <text:p>0,89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Daktarin 20mg/g, krem 30g</text:p>
          </table:table-cell>
          <table:table-cell table:style-name="ce20" office:value-type="float" office:value="9326">
            <text:p>9326</text:p>
          </table:table-cell>
          <table:table-cell table:style-name="ce28" office:value-type="currency" office:currency="PLN" office:value="2.88">
            <text:p>2,88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Daktarin 20mg/g, krem 30g Wynik</text:p>
          </table:table-cell>
          <table:table-cell table:style-name="ce21"/>
          <table:table-cell table:style-name="ce29" office:value-type="currency" office:currency="PLN" office:value="2.88">
            <text:p>2,88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Daopro 30 Minitabl. Dojelitowych</text:p>
          </table:table-cell>
          <table:table-cell table:style-name="ce20" office:value-type="float" office:value="19374">
            <text:p>19374</text:p>
          </table:table-cell>
          <table:table-cell table:style-name="ce28" office:value-type="currency" office:currency="PLN" office:value="5.6">
            <text:p>5,6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Daopro 30 Minitabl. Dojelitowych Wynik</text:p>
          </table:table-cell>
          <table:table-cell table:style-name="ce21"/>
          <table:table-cell table:style-name="ce29" office:value-type="currency" office:currency="PLN" office:value="5.6">
            <text:p>5,6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Delfarma Skinscabin Płyn 120ml</text:p>
          </table:table-cell>
          <table:table-cell table:style-name="ce20" office:value-type="float" office:value="13970">
            <text:p>13970</text:p>
          </table:table-cell>
          <table:table-cell table:style-name="ce28" office:value-type="currency" office:currency="PLN" office:value="1.86">
            <text:p>1,86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Delfarma Skinscabin Płyn 120ml Wynik</text:p>
          </table:table-cell>
          <table:table-cell table:style-name="ce21"/>
          <table:table-cell table:style-name="ce29" office:value-type="currency" office:currency="PLN" office:value="1.86">
            <text:p>1,86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Dentbox pudełko na protezy zębowe</text:p>
          </table:table-cell>
          <table:table-cell table:style-name="ce20" office:value-type="float" office:value="13732">
            <text:p>13732</text:p>
          </table:table-cell>
          <table:table-cell table:style-name="ce28" office:value-type="currency" office:currency="PLN" office:value="0.73">
            <text:p>0,73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Dentbox pudełko na protezy zębowe Wynik</text:p>
          </table:table-cell>
          <table:table-cell table:style-name="ce21"/>
          <table:table-cell table:style-name="ce29" office:value-type="currency" office:currency="PLN" office:value="0.73">
            <text:p>0,73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Depan 01004011</text:p>
          </table:table-cell>
          <table:table-cell table:style-name="ce20" office:value-type="float" office:value="18210">
            <text:p>18210</text:p>
          </table:table-cell>
          <table:table-cell table:style-name="ce28" office:value-type="currency" office:currency="PLN" office:value="1.03">
            <text:p>1,03 zł</text:p>
          </table:table-cell>
          <table:table-cell table:number-columns-repeated="1021"/>
        </table:table-row>
        <table:table-row table:style-name="ro15">
          <table:table-cell table:style-name="ce14" office:value-type="string">
            <text:p>Depan 01004011 Wynik</text:p>
          </table:table-cell>
          <table:table-cell table:style-name="ce21"/>
          <table:table-cell table:style-name="ce29" office:value-type="currency" office:currency="PLN" office:value="1.03">
            <text:p>1,03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Dermedic Sunbrella Fotostabilny Krem Ochronny Do Twarzy SPF50+ Skóra tłusta i mieszana 50 g</text:p>
          </table:table-cell>
          <table:table-cell table:style-name="ce20" office:value-type="float" office:value="3703">
            <text:p>3703</text:p>
          </table:table-cell>
          <table:table-cell table:style-name="ce28" office:value-type="currency" office:currency="PLN" office:value="2.85">
            <text:p>2,85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Dermedic Sunbrella Fotostabilny Krem Ochronny Do Twarzy SPF50+ Skóra tłusta i mieszana 50 g Wynik</text:p>
          </table:table-cell>
          <table:table-cell table:style-name="ce21"/>
          <table:table-cell table:style-name="ce29" office:value-type="currency" office:currency="PLN" office:value="2.85">
            <text:p>2,85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Dexak 25mg 30 tabletek</text:p>
          </table:table-cell>
          <table:table-cell table:style-name="ce20" office:value-type="float" office:value="16606">
            <text:p>16606</text:p>
          </table:table-cell>
          <table:table-cell table:style-name="ce28" office:value-type="currency" office:currency="PLN" office:value="0.73">
            <text:p>0,73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Dexak 25mg 30 tabletek Wynik</text:p>
          </table:table-cell>
          <table:table-cell table:style-name="ce21"/>
          <table:table-cell table:style-name="ce29" office:value-type="currency" office:currency="PLN" office:value="0.73">
            <text:p>0,73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Dexak SL 25mg granulat 10 saszetek</text:p>
          </table:table-cell>
          <table:table-cell table:style-name="ce20" office:value-type="float" office:value="15153">
            <text:p>15153</text:p>
          </table:table-cell>
          <table:table-cell table:style-name="ce28" office:value-type="currency" office:currency="PLN" office:value="1.46">
            <text:p>1,46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Dexak SL 25mg granulat 10 saszetek Wynik</text:p>
          </table:table-cell>
          <table:table-cell table:style-name="ce21"/>
          <table:table-cell table:style-name="ce29" office:value-type="currency" office:currency="PLN" office:value="1.46">
            <text:p>1,46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Dexak SL 25mg granulat 20 saszetek</text:p>
          </table:table-cell>
          <table:table-cell table:style-name="ce20" office:value-type="float" office:value="16603">
            <text:p>16603</text:p>
          </table:table-cell>
          <table:table-cell table:style-name="ce28" office:value-type="currency" office:currency="PLN" office:value="1.46">
            <text:p>1,46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Dexak SL 25mg granulat 20 saszetek Wynik</text:p>
          </table:table-cell>
          <table:table-cell table:style-name="ce21"/>
          <table:table-cell table:style-name="ce29" office:value-type="currency" office:currency="PLN" office:value="1.46">
            <text:p>1,46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Diaderma Olejek Marchewkowy Do Utrwalania Opalenizny 30 ml</text:p>
          </table:table-cell>
          <table:table-cell table:style-name="ce20" office:value-type="float" office:value="4751">
            <text:p>4751</text:p>
          </table:table-cell>
          <table:table-cell table:style-name="ce28" office:value-type="currency" office:currency="PLN" office:value="0.73">
            <text:p>0,73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Diaderma Olejek Marchewkowy Do Utrwalania Opalenizny 30 ml Wynik</text:p>
          </table:table-cell>
          <table:table-cell table:style-name="ce21"/>
          <table:table-cell table:style-name="ce29" office:value-type="currency" office:currency="PLN" office:value="0.73">
            <text:p>0,73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Diagnosis TEST OWULACYJNY LH VITAM X 5 SzT</text:p>
          </table:table-cell>
          <table:table-cell table:style-name="ce20" office:value-type="float" office:value="5406">
            <text:p>5406</text:p>
          </table:table-cell>
          <table:table-cell table:style-name="ce28" office:value-type="currency" office:currency="PLN" office:value="0.74">
            <text:p>0,74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Diagnosis TEST OWULACYJNY LH VITAM X 5 SzT Wynik</text:p>
          </table:table-cell>
          <table:table-cell table:style-name="ce21"/>
          <table:table-cell table:style-name="ce29" office:value-type="currency" office:currency="PLN" office:value="0.74">
            <text:p>0,74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Diagnosis Zasilacz do ciśnieniomierzy AND</text:p>
          </table:table-cell>
          <table:table-cell table:style-name="ce20" office:value-type="float" office:value="35829">
            <text:p>35829</text:p>
          </table:table-cell>
          <table:table-cell table:style-name="ce28" office:value-type="currency" office:currency="PLN" office:value="2.28">
            <text:p>2,28 zł</text:p>
          </table:table-cell>
          <table:table-cell table:number-columns-repeated="1021"/>
        </table:table-row>
        <table:table-row table:style-name="ro15">
          <table:table-cell table:style-name="ce14" office:value-type="string">
            <text:p>Diagnosis Zasilacz do ciśnieniomierzy AND Wynik</text:p>
          </table:table-cell>
          <table:table-cell table:style-name="ce21"/>
          <table:table-cell table:style-name="ce29" office:value-type="currency" office:currency="PLN" office:value="2.28">
            <text:p>2,28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Diagnosis Zestaw Akcesoriów Do Inhalacji Dla Dorosłych Z Regulacją Wielkości Cząsteczek</text:p>
          </table:table-cell>
          <table:table-cell table:style-name="ce20" office:value-type="float" office:value="18525">
            <text:p>18525</text:p>
          </table:table-cell>
          <table:table-cell table:style-name="ce28" office:value-type="currency" office:currency="PLN" office:value="0.76">
            <text:p>0,76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Diagnosis Zestaw Akcesoriów Do Inhalacji Dla Dorosłych Z Regulacją Wielkości Cząsteczek Wynik</text:p>
          </table:table-cell>
          <table:table-cell table:style-name="ce21"/>
          <table:table-cell table:style-name="ce29" office:value-type="currency" office:currency="PLN" office:value="0.76">
            <text:p>0,76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Diagnostic Inhalator PRO Mesh</text:p>
          </table:table-cell>
          <table:table-cell table:style-name="ce20" office:value-type="float" office:value="12540">
            <text:p>12540</text:p>
          </table:table-cell>
          <table:table-cell table:style-name="ce28" office:value-type="currency" office:currency="PLN" office:value="1.03">
            <text:p>1,03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Diagnostic Inhalator PRO Mesh Wynik</text:p>
          </table:table-cell>
          <table:table-cell table:style-name="ce21"/>
          <table:table-cell table:style-name="ce29" office:value-type="currency" office:currency="PLN" office:value="1.03">
            <text:p>1,03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DIAGNOSTIC NC300</text:p>
          </table:table-cell>
          <table:table-cell table:style-name="ce20" office:value-type="float" office:value="22101">
            <text:p>22101</text:p>
          </table:table-cell>
          <table:table-cell table:style-name="ce28" office:value-type="currency" office:currency="PLN" office:value="1.03">
            <text:p>1,03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DIAGNOSTIC NC300 Wynik</text:p>
          </table:table-cell>
          <table:table-cell table:style-name="ce21"/>
          <table:table-cell table:style-name="ce29" office:value-type="currency" office:currency="PLN" office:value="1.03">
            <text:p>1,03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Drula Extra Forte krem depigmentacyjny 30ml</text:p>
          </table:table-cell>
          <table:table-cell table:style-name="ce20" office:value-type="float" office:value="16650">
            <text:p>16650</text:p>
          </table:table-cell>
          <table:table-cell table:style-name="ce28" office:value-type="currency" office:currency="PLN" office:value="0.95">
            <text:p>0,95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Drula Extra Forte krem depigmentacyjny 30ml Wynik</text:p>
          </table:table-cell>
          <table:table-cell table:style-name="ce21"/>
          <table:table-cell table:style-name="ce29" office:value-type="currency" office:currency="PLN" office:value="0.95">
            <text:p>0,95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DUCRAY ANACAPS Reactiv, 3x30kapsułek</text:p>
          </table:table-cell>
          <table:table-cell table:style-name="ce20" office:value-type="float" office:value="18922">
            <text:p>18922</text:p>
          </table:table-cell>
          <table:table-cell table:style-name="ce28" office:value-type="currency" office:currency="PLN" office:value="1.58">
            <text:p>1,58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DUCRAY ANACAPS Reactiv, 3x30kapsułek Wynik</text:p>
          </table:table-cell>
          <table:table-cell table:style-name="ce21"/>
          <table:table-cell table:style-name="ce29" office:value-type="currency" office:currency="PLN" office:value="1.58">
            <text:p>1,58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DUCRAY DEXYANE MED Wyrób medyczny krem kojąco-regenerujący 100ml</text:p>
          </table:table-cell>
          <table:table-cell table:style-name="ce20" office:value-type="float" office:value="31945">
            <text:p>31945</text:p>
          </table:table-cell>
          <table:table-cell table:style-name="ce28" office:value-type="currency" office:currency="PLN" office:value="1.9">
            <text:p>1,90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DUCRAY DEXYANE MED Wyrób medyczny krem kojąco-regenerujący 100ml Wynik</text:p>
          </table:table-cell>
          <table:table-cell table:style-name="ce21"/>
          <table:table-cell table:style-name="ce29" office:value-type="currency" office:currency="PLN" office:value="1.9">
            <text:p>1,9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DUCRAY DEXYANE MED Wyrób medyczny krem kojąco-regenerujący 30ml</text:p>
          </table:table-cell>
          <table:table-cell table:style-name="ce20" office:value-type="float" office:value="31946">
            <text:p>31946</text:p>
          </table:table-cell>
          <table:table-cell table:style-name="ce28" office:value-type="currency" office:currency="PLN" office:value="0.95">
            <text:p>0,95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DUCRAY DEXYANE MED Wyrób medyczny krem kojąco-regenerujący 30ml Wynik</text:p>
          </table:table-cell>
          <table:table-cell table:style-name="ce21"/>
          <table:table-cell table:style-name="ce29" office:value-type="currency" office:currency="PLN" office:value="0.95">
            <text:p>0,95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Ducray Keracnyl Reapir Krem Odbudowujący 50ml</text:p>
          </table:table-cell>
          <table:table-cell table:style-name="ce20" office:value-type="float" office:value="19520">
            <text:p>19520</text:p>
          </table:table-cell>
          <table:table-cell table:style-name="ce28" office:value-type="currency" office:currency="PLN" office:value="0.95">
            <text:p>0,95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Ducray Keracnyl Reapir Krem Odbudowujący 50ml Wynik</text:p>
          </table:table-cell>
          <table:table-cell table:style-name="ce21"/>
          <table:table-cell table:style-name="ce29" office:value-type="currency" office:currency="PLN" office:value="0.95">
            <text:p>0,95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DUCRAY KERACNYL Repair Balsam do ust 15ml</text:p>
          </table:table-cell>
          <table:table-cell table:style-name="ce20" office:value-type="float" office:value="32640">
            <text:p>32640</text:p>
          </table:table-cell>
          <table:table-cell table:style-name="ce28" office:value-type="currency" office:currency="PLN" office:value="4.75">
            <text:p>4,75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DUCRAY KERACNYL Repair Balsam do ust 15ml Wynik</text:p>
          </table:table-cell>
          <table:table-cell table:style-name="ce21"/>
          <table:table-cell table:style-name="ce29" office:value-type="currency" office:currency="PLN" office:value="4.75">
            <text:p>4,75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Dulcobis czopki na zaparcia 6 szt.</text:p>
          </table:table-cell>
          <table:table-cell table:style-name="ce20" office:value-type="float" office:value="8472">
            <text:p>8472</text:p>
          </table:table-cell>
          <table:table-cell table:style-name="ce28" office:value-type="currency" office:currency="PLN" office:value="4.38">
            <text:p>4,38 zł</text:p>
          </table:table-cell>
          <table:table-cell table:number-columns-repeated="1021"/>
        </table:table-row>
        <table:table-row table:style-name="ro8">
          <table:table-cell table:style-name="ce14" office:value-type="string">
            <text:p>Dulcobis czopki na zaparcia 6 szt. Wynik</text:p>
          </table:table-cell>
          <table:table-cell table:style-name="ce21"/>
          <table:table-cell table:style-name="ce29" office:value-type="currency" office:currency="PLN" office:value="4.38">
            <text:p>4,38 zł</text:p>
          </table:table-cell>
          <table:table-cell table:number-columns-repeated="1021"/>
        </table:table-row>
        <table:table-row table:style-name="ro13">
          <table:table-cell table:style-name="ce15" office:value-type="string">
            <text:p>Dulcobis Lek Na Zaparcia 5mg 40tabl.</text:p>
          </table:table-cell>
          <table:table-cell table:style-name="ce22" office:value-type="float" office:value="295">
            <text:p>295</text:p>
          </table:table-cell>
          <table:table-cell table:style-name="ce30" office:value-type="currency" office:currency="PLN" office:value="1.46">
            <text:p>1,46 zł</text:p>
          </table:table-cell>
          <table:table-cell table:number-columns-repeated="1021"/>
        </table:table-row>
        <table:table-row table:style-name="ro12">
          <table:table-cell table:style-name="ce16"/>
          <table:table-cell table:style-name="ce23" office:value-type="float" office:value="10698">
            <text:p>10698</text:p>
          </table:table-cell>
          <table:table-cell table:style-name="ce31" office:value-type="currency" office:currency="PLN" office:value="2.19">
            <text:p>2,19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Dulcobis Lek Na Zaparcia 5mg 40tabl. Wynik</text:p>
          </table:table-cell>
          <table:table-cell table:style-name="ce21"/>
          <table:table-cell table:style-name="ce29" office:value-type="currency" office:currency="PLN" office:value="3.65">
            <text:p>3,65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EctoAlerg krople do oczu 10ml</text:p>
          </table:table-cell>
          <table:table-cell table:style-name="ce20" office:value-type="float" office:value="8340">
            <text:p>8340</text:p>
          </table:table-cell>
          <table:table-cell table:style-name="ce28" office:value-type="currency" office:currency="PLN" office:value="4">
            <text:p>4,0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EctoAlerg krople do oczu 10ml Wynik</text:p>
          </table:table-cell>
          <table:table-cell table:style-name="ce21"/>
          <table:table-cell table:style-name="ce29" office:value-type="currency" office:currency="PLN" office:value="4">
            <text:p>4,0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ECTOGEL Żel do oczu z ektoiną 10ml</text:p>
          </table:table-cell>
          <table:table-cell table:style-name="ce20" office:value-type="float" office:value="14067">
            <text:p>14067</text:p>
          </table:table-cell>
          <table:table-cell table:style-name="ce28" office:value-type="currency" office:currency="PLN" office:value="0.79">
            <text:p>0,79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ECTOGEL Żel do oczu z ektoiną 10ml Wynik</text:p>
          </table:table-cell>
          <table:table-cell table:style-name="ce21"/>
          <table:table-cell table:style-name="ce29" office:value-type="currency" office:currency="PLN" office:value="0.79">
            <text:p>0,79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Elissa Maść majerankowa 25g</text:p>
          </table:table-cell>
          <table:table-cell table:style-name="ce20" office:value-type="float" office:value="4515">
            <text:p>4515</text:p>
          </table:table-cell>
          <table:table-cell table:style-name="ce28" office:value-type="currency" office:currency="PLN" office:value="0.76">
            <text:p>0,76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Elissa Maść majerankowa 25g Wynik</text:p>
          </table:table-cell>
          <table:table-cell table:style-name="ce21"/>
          <table:table-cell table:style-name="ce29" office:value-type="currency" office:currency="PLN" office:value="0.76">
            <text:p>0,76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Eloderm Krem od 1. dnia życia 75 ml</text:p>
          </table:table-cell>
          <table:table-cell table:style-name="ce20" office:value-type="float" office:value="247">
            <text:p>247</text:p>
          </table:table-cell>
          <table:table-cell table:style-name="ce28" office:value-type="currency" office:currency="PLN" office:value="0.73">
            <text:p>0,73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Eloderm Krem od 1. dnia życia 75 ml Wynik</text:p>
          </table:table-cell>
          <table:table-cell table:style-name="ce21"/>
          <table:table-cell table:style-name="ce29" office:value-type="currency" office:currency="PLN" office:value="0.73">
            <text:p>0,73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Eloderm Szampon od 1. dnia życia 200ml</text:p>
          </table:table-cell>
          <table:table-cell table:style-name="ce20" office:value-type="float" office:value="248">
            <text:p>248</text:p>
          </table:table-cell>
          <table:table-cell table:style-name="ce28" office:value-type="currency" office:currency="PLN" office:value="2.19">
            <text:p>2,19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Eloderm Szampon od 1. dnia życia 200ml Wynik</text:p>
          </table:table-cell>
          <table:table-cell table:style-name="ce21"/>
          <table:table-cell table:style-name="ce29" office:value-type="currency" office:currency="PLN" office:value="2.19">
            <text:p>2,19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Emolium A -Topic Trójaktywna emulsja do ciała do skóry atopowej, 200 ml</text:p>
          </table:table-cell>
          <table:table-cell table:style-name="ce20" office:value-type="float" office:value="14970">
            <text:p>14970</text:p>
          </table:table-cell>
          <table:table-cell table:style-name="ce28" office:value-type="currency" office:currency="PLN" office:value="1.9">
            <text:p>1,9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Emolium A -Topic Trójaktywna emulsja do ciała do skóry atopowej, 200 ml Wynik</text:p>
          </table:table-cell>
          <table:table-cell table:style-name="ce21"/>
          <table:table-cell table:style-name="ce29" office:value-type="currency" office:currency="PLN" office:value="1.9">
            <text:p>1,9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Emolium Dermocare emulsja do kąpieli 400ml</text:p>
          </table:table-cell>
          <table:table-cell table:style-name="ce20" office:value-type="float" office:value="326">
            <text:p>326</text:p>
          </table:table-cell>
          <table:table-cell table:style-name="ce28" office:value-type="currency" office:currency="PLN" office:value="0.95">
            <text:p>0,95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Emolium Dermocare emulsja do kąpieli 400ml Wynik</text:p>
          </table:table-cell>
          <table:table-cell table:style-name="ce21"/>
          <table:table-cell table:style-name="ce29" office:value-type="currency" office:currency="PLN" office:value="0.95">
            <text:p>0,95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Emolium DERMOCARE Emulsja na suchą skórę głowy 100ml</text:p>
          </table:table-cell>
          <table:table-cell table:style-name="ce20" office:value-type="float" office:value="335">
            <text:p>335</text:p>
          </table:table-cell>
          <table:table-cell table:style-name="ce28" office:value-type="currency" office:currency="PLN" office:value="19">
            <text:p>19,0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Emolium DERMOCARE Emulsja na suchą skórę głowy 100ml Wynik</text:p>
          </table:table-cell>
          <table:table-cell table:style-name="ce21"/>
          <table:table-cell table:style-name="ce29" office:value-type="currency" office:currency="PLN" office:value="19">
            <text:p>19,0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Emolium DERMOCARE Krem przeciw odparzeniom 75ml</text:p>
          </table:table-cell>
          <table:table-cell table:style-name="ce20" office:value-type="float" office:value="337">
            <text:p>337</text:p>
          </table:table-cell>
          <table:table-cell table:style-name="ce28" office:value-type="currency" office:currency="PLN" office:value="4.75">
            <text:p>4,75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Emolium DERMOCARE Krem przeciw odparzeniom 75ml Wynik</text:p>
          </table:table-cell>
          <table:table-cell table:style-name="ce21"/>
          <table:table-cell table:style-name="ce29" office:value-type="currency" office:currency="PLN" office:value="4.75">
            <text:p>4,75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Emolium Dermocare Nawilżający Olejek do mycia 400 ml</text:p>
          </table:table-cell>
          <table:table-cell table:style-name="ce20" office:value-type="float" office:value="7660">
            <text:p>7660</text:p>
          </table:table-cell>
          <table:table-cell table:style-name="ce28" office:value-type="currency" office:currency="PLN" office:value="8.55">
            <text:p>8,55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Emolium Dermocare Nawilżający Olejek do mycia 400 ml Wynik</text:p>
          </table:table-cell>
          <table:table-cell table:style-name="ce21"/>
          <table:table-cell table:style-name="ce29" office:value-type="currency" office:currency="PLN" office:value="8.55">
            <text:p>8,55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Emolium INTENSIVE Krem specjalny 75ml</text:p>
          </table:table-cell>
          <table:table-cell table:style-name="ce20" office:value-type="float" office:value="3892">
            <text:p>3892</text:p>
          </table:table-cell>
          <table:table-cell table:style-name="ce28" office:value-type="currency" office:currency="PLN" office:value="16.15">
            <text:p>16,15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Emolium INTENSIVE Krem specjalny 75ml Wynik</text:p>
          </table:table-cell>
          <table:table-cell table:style-name="ce21"/>
          <table:table-cell table:style-name="ce29" office:value-type="currency" office:currency="PLN" office:value="16.15">
            <text:p>16,15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Espumisan 40 Mg/Ml Krople Doustne Emulsja 30ml</text:p>
          </table:table-cell>
          <table:table-cell table:style-name="ce20" office:value-type="float" office:value="19267">
            <text:p>19267</text:p>
          </table:table-cell>
          <table:table-cell table:style-name="ce28" office:value-type="currency" office:currency="PLN" office:value="0.73">
            <text:p>0,73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Espumisan 40 Mg/Ml Krople Doustne Emulsja 30ml Wynik</text:p>
          </table:table-cell>
          <table:table-cell table:style-name="ce21"/>
          <table:table-cell table:style-name="ce29" office:value-type="currency" office:currency="PLN" office:value="0.73">
            <text:p>0,73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Estabiom Junior 20kaps.</text:p>
          </table:table-cell>
          <table:table-cell table:style-name="ce20" office:value-type="float" office:value="6953">
            <text:p>6953</text:p>
          </table:table-cell>
          <table:table-cell table:style-name="ce28" office:value-type="currency" office:currency="PLN" office:value="10.4">
            <text:p>10,4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Estabiom Junior 20kaps. Wynik</text:p>
          </table:table-cell>
          <table:table-cell table:style-name="ce21"/>
          <table:table-cell table:style-name="ce29" office:value-type="currency" office:currency="PLN" office:value="10.4">
            <text:p>10,4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Euphrasia Świetlik Krople Do Oczu 10ml</text:p>
          </table:table-cell>
          <table:table-cell table:style-name="ce20" office:value-type="float" office:value="13982">
            <text:p>13982</text:p>
          </table:table-cell>
          <table:table-cell table:style-name="ce28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Euphrasia Świetlik Krople Do Oczu 10ml Wynik</text:p>
          </table:table-cell>
          <table:table-cell table:style-name="ce21"/>
          <table:table-cell table:style-name="ce29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Eva/Qu czopki przeciw zaparciom 6 czopków</text:p>
          </table:table-cell>
          <table:table-cell table:style-name="ce20" office:value-type="float" office:value="3918">
            <text:p>3918</text:p>
          </table:table-cell>
          <table:table-cell table:style-name="ce28" office:value-type="currency" office:currency="PLN" office:value="5.11">
            <text:p>5,11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Eva/Qu czopki przeciw zaparciom 6 czopków Wynik</text:p>
          </table:table-cell>
          <table:table-cell table:style-name="ce21"/>
          <table:table-cell table:style-name="ce29" office:value-type="currency" office:currency="PLN" office:value="5.11">
            <text:p>5,11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Excilor Leczenie grzybicy paznokci 3,3ml</text:p>
          </table:table-cell>
          <table:table-cell table:style-name="ce20" office:value-type="float" office:value="3920">
            <text:p>3920</text:p>
          </table:table-cell>
          <table:table-cell table:style-name="ce28" office:value-type="currency" office:currency="PLN" office:value="2.16">
            <text:p>2,16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Excilor Leczenie grzybicy paznokci 3,3ml Wynik</text:p>
          </table:table-cell>
          <table:table-cell table:style-name="ce21"/>
          <table:table-cell table:style-name="ce29" office:value-type="currency" office:currency="PLN" office:value="2.16">
            <text:p>2,16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Farmapia Maść Propolisowa Wspomagająca Gojenie Ran 7% 30g</text:p>
          </table:table-cell>
          <table:table-cell table:style-name="ce20" office:value-type="float" office:value="9761">
            <text:p>9761</text:p>
          </table:table-cell>
          <table:table-cell table:style-name="ce28" office:value-type="currency" office:currency="PLN" office:value="0.93">
            <text:p>0,93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Farmapia Maść Propolisowa Wspomagająca Gojenie Ran 7% 30g Wynik</text:p>
          </table:table-cell>
          <table:table-cell table:style-name="ce21"/>
          <table:table-cell table:style-name="ce29" office:value-type="currency" office:currency="PLN" office:value="0.93">
            <text:p>0,93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Farmina Jodyna Hospital 800g</text:p>
          </table:table-cell>
          <table:table-cell table:style-name="ce20" office:value-type="float" office:value="8114">
            <text:p>8114</text:p>
          </table:table-cell>
          <table:table-cell table:style-name="ce28" office:value-type="currency" office:currency="PLN" office:value="3.72">
            <text:p>3,72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Farmina Jodyna Hospital 800g Wynik</text:p>
          </table:table-cell>
          <table:table-cell table:style-name="ce21"/>
          <table:table-cell table:style-name="ce29" office:value-type="currency" office:currency="PLN" office:value="3.72">
            <text:p>3,72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FARMONA Jantar szampon enzymatyczny z wyciągiem z bursztynu 330ml</text:p>
          </table:table-cell>
          <table:table-cell table:style-name="ce20" office:value-type="float" office:value="16987">
            <text:p>16987</text:p>
          </table:table-cell>
          <table:table-cell table:style-name="ce28" office:value-type="currency" office:currency="PLN" office:value="0.88">
            <text:p>0,88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FARMONA Jantar szampon enzymatyczny z wyciągiem z bursztynu 330ml Wynik</text:p>
          </table:table-cell>
          <table:table-cell table:style-name="ce21"/>
          <table:table-cell table:style-name="ce29" office:value-type="currency" office:currency="PLN" office:value="0.88">
            <text:p>0,88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Feminum Nawilżający Żel Intymny 75g</text:p>
          </table:table-cell>
          <table:table-cell table:style-name="ce20" office:value-type="float" office:value="19446">
            <text:p>19446</text:p>
          </table:table-cell>
          <table:table-cell table:style-name="ce28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Feminum Nawilżający Żel Intymny 75g Wynik</text:p>
          </table:table-cell>
          <table:table-cell table:style-name="ce21"/>
          <table:table-cell table:style-name="ce29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Fenistil Krople doustne 1mg/1ml 20ml (Import równoległy)</text:p>
          </table:table-cell>
          <table:table-cell table:style-name="ce20" office:value-type="float" office:value="8335">
            <text:p>8335</text:p>
          </table:table-cell>
          <table:table-cell table:style-name="ce28" office:value-type="currency" office:currency="PLN" office:value="7.2">
            <text:p>7,20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Fenistil Krople doustne 1mg/1ml 20ml (Import równoległy) Wynik</text:p>
          </table:table-cell>
          <table:table-cell table:style-name="ce21"/>
          <table:table-cell table:style-name="ce29" office:value-type="currency" office:currency="PLN" office:value="7.2">
            <text:p>7,2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Flos Ziele Macierzanki 50g</text:p>
          </table:table-cell>
          <table:table-cell table:style-name="ce20" office:value-type="float" office:value="13242">
            <text:p>13242</text:p>
          </table:table-cell>
          <table:table-cell table:style-name="ce28" office:value-type="currency" office:currency="PLN" office:value="1.36">
            <text:p>1,36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Flos Ziele Macierzanki 50g Wynik</text:p>
          </table:table-cell>
          <table:table-cell table:style-name="ce21"/>
          <table:table-cell table:style-name="ce29" office:value-type="currency" office:currency="PLN" office:value="1.36">
            <text:p>1,36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Flos: Brzoza liść (betulae folium) - 50g</text:p>
          </table:table-cell>
          <table:table-cell table:style-name="ce20" office:value-type="float" office:value="12132">
            <text:p>12132</text:p>
          </table:table-cell>
          <table:table-cell table:style-name="ce28" office:value-type="currency" office:currency="PLN" office:value="0.68">
            <text:p>0,68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Flos: Brzoza liść (betulae folium) - 50g Wynik</text:p>
          </table:table-cell>
          <table:table-cell table:style-name="ce21"/>
          <table:table-cell table:style-name="ce29" office:value-type="currency" office:currency="PLN" office:value="0.68">
            <text:p>0,68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Flos: Jemioła ziele (visci herba) - 50g</text:p>
          </table:table-cell>
          <table:table-cell table:style-name="ce20" office:value-type="float" office:value="18486">
            <text:p>18486</text:p>
          </table:table-cell>
          <table:table-cell table:style-name="ce28" office:value-type="currency" office:currency="PLN" office:value="0.68">
            <text:p>0,68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Flos: Jemioła ziele (visci herba) - 50g Wynik</text:p>
          </table:table-cell>
          <table:table-cell table:style-name="ce21"/>
          <table:table-cell table:style-name="ce29" office:value-type="currency" office:currency="PLN" office:value="0.68">
            <text:p>0,68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Fluimucil Forte 600mg 10tabl.</text:p>
          </table:table-cell>
          <table:table-cell table:style-name="ce20" office:value-type="float" office:value="11787">
            <text:p>11787</text:p>
          </table:table-cell>
          <table:table-cell table:style-name="ce28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Fluimucil Forte 600mg 10tabl. Wynik</text:p>
          </table:table-cell>
          <table:table-cell table:style-name="ce21"/>
          <table:table-cell table:style-name="ce29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Furaginum MAX 100 mg 30 tab.</text:p>
          </table:table-cell>
          <table:table-cell table:style-name="ce20" office:value-type="float" office:value="19673">
            <text:p>19673</text:p>
          </table:table-cell>
          <table:table-cell table:style-name="ce28" office:value-type="currency" office:currency="PLN" office:value="4">
            <text:p>4,00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Furaginum MAX 100 mg 30 tab. Wynik</text:p>
          </table:table-cell>
          <table:table-cell table:style-name="ce21"/>
          <table:table-cell table:style-name="ce29" office:value-type="currency" office:currency="PLN" office:value="4">
            <text:p>4,0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FUSSBAD Gehwol Sól ziołowa z lawendą do kąpieli stóp 10x20 g</text:p>
          </table:table-cell>
          <table:table-cell table:style-name="ce20" office:value-type="float" office:value="4022">
            <text:p>4022</text:p>
          </table:table-cell>
          <table:table-cell table:style-name="ce28" office:value-type="currency" office:currency="PLN" office:value="1.54">
            <text:p>1,54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FUSSBAD Gehwol Sól ziołowa z lawendą do kąpieli stóp 10x20 g Wynik</text:p>
          </table:table-cell>
          <table:table-cell table:style-name="ce21"/>
          <table:table-cell table:style-name="ce29" office:value-type="currency" office:currency="PLN" office:value="1.54">
            <text:p>1,54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Fytofontana Gyntima Czopki Dopochwowe Probiotica 10szt.</text:p>
          </table:table-cell>
          <table:table-cell table:style-name="ce20" office:value-type="float" office:value="5827">
            <text:p>5827</text:p>
          </table:table-cell>
          <table:table-cell table:style-name="ce28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Fytofontana Gyntima Czopki Dopochwowe Probiotica 10szt. Wynik</text:p>
          </table:table-cell>
          <table:table-cell table:style-name="ce21"/>
          <table:table-cell table:style-name="ce29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Gal Tran 100kaps.</text:p>
          </table:table-cell>
          <table:table-cell table:style-name="ce20" office:value-type="float" office:value="5427">
            <text:p>5427</text:p>
          </table:table-cell>
          <table:table-cell table:style-name="ce28" office:value-type="currency" office:currency="PLN" office:value="0.83">
            <text:p>0,83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Gal Tran 100kaps. Wynik</text:p>
          </table:table-cell>
          <table:table-cell table:style-name="ce21"/>
          <table:table-cell table:style-name="ce29" office:value-type="currency" office:currency="PLN" office:value="0.83">
            <text:p>0,83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Gelacet 120kaps.</text:p>
          </table:table-cell>
          <table:table-cell table:style-name="ce20" office:value-type="float" office:value="13430">
            <text:p>13430</text:p>
          </table:table-cell>
          <table:table-cell table:style-name="ce28" office:value-type="currency" office:currency="PLN" office:value="0.93">
            <text:p>0,93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Gelacet 120kaps. Wynik</text:p>
          </table:table-cell>
          <table:table-cell table:style-name="ce21"/>
          <table:table-cell table:style-name="ce29" office:value-type="currency" office:currency="PLN" office:value="0.93">
            <text:p>0,93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Genexo Ixell</text:p>
          </table:table-cell>
          <table:table-cell table:style-name="ce20" office:value-type="float" office:value="23286">
            <text:p>23286</text:p>
          </table:table-cell>
          <table:table-cell table:style-name="ce28" office:value-type="currency" office:currency="PLN" office:value="3.4">
            <text:p>3,4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Genexo Ixell Wynik</text:p>
          </table:table-cell>
          <table:table-cell table:style-name="ce21"/>
          <table:table-cell table:style-name="ce29" office:value-type="currency" office:currency="PLN" office:value="3.4">
            <text:p>3,4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Gensupen 2 wstrzykiwacz do insuliny <text:s/>turkusowy 1szt.</text:p>
          </table:table-cell>
          <table:table-cell table:style-name="ce20" office:value-type="float" office:value="16836">
            <text:p>16836</text:p>
          </table:table-cell>
          <table:table-cell table:style-name="ce28" office:value-type="currency" office:currency="PLN" office:value="0.68">
            <text:p>0,68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Gensupen 2 wstrzykiwacz do insuliny <text:s/>turkusowy 1szt. Wynik</text:p>
          </table:table-cell>
          <table:table-cell table:style-name="ce21"/>
          <table:table-cell table:style-name="ce29" office:value-type="currency" office:currency="PLN" office:value="0.68">
            <text:p>0,68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Go-On 25 Mg/2,5 ml Ampułko-Strzykawka 1 Szt.</text:p>
          </table:table-cell>
          <table:table-cell table:style-name="ce20" office:value-type="float" office:value="13773">
            <text:p>13773</text:p>
          </table:table-cell>
          <table:table-cell table:style-name="ce28" office:value-type="currency" office:currency="PLN" office:value="2.61">
            <text:p>2,61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Go-On 25 Mg/2,5 ml Ampułko-Strzykawka 1 Szt. Wynik</text:p>
          </table:table-cell>
          <table:table-cell table:style-name="ce21"/>
          <table:table-cell table:style-name="ce29" office:value-type="currency" office:currency="PLN" office:value="2.61">
            <text:p>2,61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Goprazol Max 0,02g 14 kaps.</text:p>
          </table:table-cell>
          <table:table-cell table:style-name="ce20" office:value-type="float" office:value="12494">
            <text:p>12494</text:p>
          </table:table-cell>
          <table:table-cell table:style-name="ce28" office:value-type="currency" office:currency="PLN" office:value="0.73">
            <text:p>0,73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Goprazol Max 0,02g 14 kaps. Wynik</text:p>
          </table:table-cell>
          <table:table-cell table:style-name="ce21"/>
          <table:table-cell table:style-name="ce29" office:value-type="currency" office:currency="PLN" office:value="0.73">
            <text:p>0,73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Gorvita Babka Płesznik Mielona 150g</text:p>
          </table:table-cell>
          <table:table-cell table:style-name="ce20" office:value-type="float" office:value="16104">
            <text:p>16104</text:p>
          </table:table-cell>
          <table:table-cell table:style-name="ce28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Gorvita Babka Płesznik Mielona 150g Wynik</text:p>
          </table:table-cell>
          <table:table-cell table:style-name="ce21"/>
          <table:table-cell table:style-name="ce29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Gorvita Maść końska rozgrzewająca 250 ml</text:p>
          </table:table-cell>
          <table:table-cell table:style-name="ce20" office:value-type="float" office:value="17239">
            <text:p>17239</text:p>
          </table:table-cell>
          <table:table-cell table:style-name="ce28" office:value-type="currency" office:currency="PLN" office:value="1.52">
            <text:p>1,52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Gorvita Maść końska rozgrzewająca 250 ml Wynik</text:p>
          </table:table-cell>
          <table:table-cell table:style-name="ce21"/>
          <table:table-cell table:style-name="ce29" office:value-type="currency" office:currency="PLN" office:value="1.52">
            <text:p>1,52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Gorvita Maść Rokitnikowa Z Ekstraktem Z Nagietka 140Ml</text:p>
          </table:table-cell>
          <table:table-cell table:style-name="ce20" office:value-type="float" office:value="17250">
            <text:p>17250</text:p>
          </table:table-cell>
          <table:table-cell table:style-name="ce28" office:value-type="currency" office:currency="PLN" office:value="2.25">
            <text:p>2,25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Gorvita Maść Rokitnikowa Z Ekstraktem Z Nagietka 140Ml Wynik</text:p>
          </table:table-cell>
          <table:table-cell table:style-name="ce21"/>
          <table:table-cell table:style-name="ce29" office:value-type="currency" office:currency="PLN" office:value="2.25">
            <text:p>2,25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GORVITA Puder rodzinny pielęgnacyjny 50ml</text:p>
          </table:table-cell>
          <table:table-cell table:style-name="ce20" office:value-type="float" office:value="17905">
            <text:p>17905</text:p>
          </table:table-cell>
          <table:table-cell table:style-name="ce28" office:value-type="currency" office:currency="PLN" office:value="0.76">
            <text:p>0,76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GORVITA Puder rodzinny pielęgnacyjny 50ml Wynik</text:p>
          </table:table-cell>
          <table:table-cell table:style-name="ce21"/>
          <table:table-cell table:style-name="ce29" office:value-type="currency" office:currency="PLN" office:value="0.76">
            <text:p>0,76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Gorvita Żel żywokostowy z jałowcem i MSM 200ml</text:p>
          </table:table-cell>
          <table:table-cell table:style-name="ce20" office:value-type="float" office:value="11273">
            <text:p>11273</text:p>
          </table:table-cell>
          <table:table-cell table:style-name="ce28" office:value-type="currency" office:currency="PLN" office:value="4.74">
            <text:p>4,74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Gorvita Żel żywokostowy z jałowcem i MSM 200ml Wynik</text:p>
          </table:table-cell>
          <table:table-cell table:style-name="ce21"/>
          <table:table-cell table:style-name="ce29" office:value-type="currency" office:currency="PLN" office:value="4.74">
            <text:p>4,74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Granudacyn Roztwór do płukania ran 1000 ml</text:p>
          </table:table-cell>
          <table:table-cell table:style-name="ce20" office:value-type="float" office:value="16873">
            <text:p>16873</text:p>
          </table:table-cell>
          <table:table-cell table:style-name="ce28" office:value-type="currency" office:currency="PLN" office:value="0.72">
            <text:p>0,72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Granudacyn Roztwór do płukania ran 1000 ml Wynik</text:p>
          </table:table-cell>
          <table:table-cell table:style-name="ce21"/>
          <table:table-cell table:style-name="ce29" office:value-type="currency" office:currency="PLN" office:value="0.72">
            <text:p>0,72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Granuflex opatrunek hydrokoloidowy 20x20cm 1szt</text:p>
          </table:table-cell>
          <table:table-cell table:style-name="ce20" office:value-type="float" office:value="11589">
            <text:p>11589</text:p>
          </table:table-cell>
          <table:table-cell table:style-name="ce28" office:value-type="currency" office:currency="PLN" office:value="1.24">
            <text:p>1,24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Granuflex opatrunek hydrokoloidowy 20x20cm 1szt Wynik</text:p>
          </table:table-cell>
          <table:table-cell table:style-name="ce21"/>
          <table:table-cell table:style-name="ce29" office:value-type="currency" office:currency="PLN" office:value="1.24">
            <text:p>1,24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Gynauxil 10 Globulek Dopochwowych</text:p>
          </table:table-cell>
          <table:table-cell table:style-name="ce20" office:value-type="float" office:value="30023">
            <text:p>30023</text:p>
          </table:table-cell>
          <table:table-cell table:style-name="ce28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8">
          <table:table-cell table:style-name="ce14" office:value-type="string">
            <text:p>Gynauxil 10 Globulek Dopochwowych Wynik</text:p>
          </table:table-cell>
          <table:table-cell table:style-name="ce21"/>
          <table:table-cell table:style-name="ce29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3">
          <table:table-cell table:style-name="ce15" office:value-type="string">
            <text:p>Gynoxin Optima 200mg 3kaps.</text:p>
          </table:table-cell>
          <table:table-cell table:style-name="ce22" office:value-type="float" office:value="9579">
            <text:p>9579</text:p>
          </table:table-cell>
          <table:table-cell table:style-name="ce30" office:value-type="currency" office:currency="PLN" office:value="8.8">
            <text:p>8,80 zł</text:p>
          </table:table-cell>
          <table:table-cell table:number-columns-repeated="1021"/>
        </table:table-row>
        <table:table-row table:style-name="ro12">
          <table:table-cell table:style-name="ce16"/>
          <table:table-cell table:style-name="ce23" office:value-type="float" office:value="14231">
            <text:p>14231</text:p>
          </table:table-cell>
          <table:table-cell table:style-name="ce31" office:value-type="currency" office:currency="PLN" office:value="1.6">
            <text:p>1,60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Gynoxin Optima 200mg 3kaps. Wynik</text:p>
          </table:table-cell>
          <table:table-cell table:style-name="ce21"/>
          <table:table-cell table:style-name="ce29" office:value-type="currency" office:currency="PLN" office:value="10.4">
            <text:p>10,4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Gynoxin Uno 0,6G 1kaps.</text:p>
          </table:table-cell>
          <table:table-cell table:style-name="ce20" office:value-type="float" office:value="10753">
            <text:p>10753</text:p>
          </table:table-cell>
          <table:table-cell table:style-name="ce28" office:value-type="currency" office:currency="PLN" office:value="4.8">
            <text:p>4,80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Gynoxin Uno 0,6G 1kaps. Wynik</text:p>
          </table:table-cell>
          <table:table-cell table:style-name="ce21"/>
          <table:table-cell table:style-name="ce29" office:value-type="currency" office:currency="PLN" office:value="4.8">
            <text:p>4,8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Gynoxin Uno 1kaps.</text:p>
          </table:table-cell>
          <table:table-cell table:style-name="ce20" office:value-type="float" office:value="10956">
            <text:p>10956</text:p>
          </table:table-cell>
          <table:table-cell table:style-name="ce28" office:value-type="currency" office:currency="PLN" office:value="1.6">
            <text:p>1,6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Gynoxin Uno 1kaps. Wynik</text:p>
          </table:table-cell>
          <table:table-cell table:style-name="ce21"/>
          <table:table-cell table:style-name="ce29" office:value-type="currency" office:currency="PLN" office:value="1.6">
            <text:p>1,6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Hartmann Atrauman Ag opatrunek z maścią 5cm x 5cm 1szt.</text:p>
          </table:table-cell>
          <table:table-cell table:style-name="ce20" office:value-type="float" office:value="7724">
            <text:p>7724</text:p>
          </table:table-cell>
          <table:table-cell table:style-name="ce28" office:value-type="currency" office:currency="PLN" office:value="2.48">
            <text:p>2,48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Hartmann Atrauman Ag opatrunek z maścią 5cm x 5cm 1szt. Wynik</text:p>
          </table:table-cell>
          <table:table-cell table:style-name="ce21"/>
          <table:table-cell table:style-name="ce29" office:value-type="currency" office:currency="PLN" office:value="2.48">
            <text:p>2,48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HASCO Maść tranowa 20g</text:p>
          </table:table-cell>
          <table:table-cell table:style-name="ce20" office:value-type="float" office:value="6148">
            <text:p>6148</text:p>
          </table:table-cell>
          <table:table-cell table:style-name="ce28" office:value-type="currency" office:currency="PLN" office:value="0.72">
            <text:p>0,72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HASCO Maść tranowa 20g Wynik</text:p>
          </table:table-cell>
          <table:table-cell table:style-name="ce21"/>
          <table:table-cell table:style-name="ce29" office:value-type="currency" office:currency="PLN" office:value="0.72">
            <text:p>0,72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HASCO VITAMINIUM A+E x 30 tabl. HASCO</text:p>
          </table:table-cell>
          <table:table-cell table:style-name="ce20" office:value-type="float" office:value="6384">
            <text:p>6384</text:p>
          </table:table-cell>
          <table:table-cell table:style-name="ce28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HASCO VITAMINIUM A+E x 30 tabl. HASCO Wynik</text:p>
          </table:table-cell>
          <table:table-cell table:style-name="ce21"/>
          <table:table-cell table:style-name="ce29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Healing Herbal Szampon Leczniczy Przeciwłupieżowy 200ml</text:p>
          </table:table-cell>
          <table:table-cell table:style-name="ce20" office:value-type="float" office:value="7758">
            <text:p>7758</text:p>
          </table:table-cell>
          <table:table-cell table:style-name="ce28" office:value-type="currency" office:currency="PLN" office:value="0.93">
            <text:p>0,93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Healing Herbal Szampon Leczniczy Przeciwłupieżowy 200ml Wynik</text:p>
          </table:table-cell>
          <table:table-cell table:style-name="ce21"/>
          <table:table-cell table:style-name="ce29" office:value-type="currency" office:currency="PLN" office:value="0.93">
            <text:p>0,93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HEEL Nervoheel N 50 tabl.</text:p>
          </table:table-cell>
          <table:table-cell table:style-name="ce20" office:value-type="float" office:value="7939">
            <text:p>7939</text:p>
          </table:table-cell>
          <table:table-cell table:style-name="ce28" office:value-type="currency" office:currency="PLN" office:value="0.87">
            <text:p>0,87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HEEL Nervoheel N 50 tabl. Wynik</text:p>
          </table:table-cell>
          <table:table-cell table:style-name="ce21"/>
          <table:table-cell table:style-name="ce29" office:value-type="currency" office:currency="PLN" office:value="0.87">
            <text:p>0,87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Heel-Nux Vomica krople zaburzenia żoładkowo jelitowe 30 ml</text:p>
          </table:table-cell>
          <table:table-cell table:style-name="ce20" office:value-type="float" office:value="12509">
            <text:p>12509</text:p>
          </table:table-cell>
          <table:table-cell table:style-name="ce28" office:value-type="currency" office:currency="PLN" office:value="1.74">
            <text:p>1,74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Heel-Nux Vomica krople zaburzenia żoładkowo jelitowe 30 ml Wynik</text:p>
          </table:table-cell>
          <table:table-cell table:style-name="ce21"/>
          <table:table-cell table:style-name="ce29" office:value-type="currency" office:currency="PLN" office:value="1.74">
            <text:p>1,74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Hepa Complex 60tabl.</text:p>
          </table:table-cell>
          <table:table-cell table:style-name="ce20" office:value-type="float" office:value="13776">
            <text:p>13776</text:p>
          </table:table-cell>
          <table:table-cell table:style-name="ce28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Hepa Complex 60tabl. Wynik</text:p>
          </table:table-cell>
          <table:table-cell table:style-name="ce21"/>
          <table:table-cell table:style-name="ce29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Heparol 30tabl.</text:p>
          </table:table-cell>
          <table:table-cell table:style-name="ce20" office:value-type="float" office:value="8214">
            <text:p>8214</text:p>
          </table:table-cell>
          <table:table-cell table:style-name="ce28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Heparol 30tabl. Wynik</text:p>
          </table:table-cell>
          <table:table-cell table:style-name="ce21"/>
          <table:table-cell table:style-name="ce29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Hevipoint Lek przeciw opryszczce warg i twarzy 30 tabletek</text:p>
          </table:table-cell>
          <table:table-cell table:style-name="ce20" office:value-type="float" office:value="4109">
            <text:p>4109</text:p>
          </table:table-cell>
          <table:table-cell table:style-name="ce28" office:value-type="currency" office:currency="PLN" office:value="4.38">
            <text:p>4,38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Hevipoint Lek przeciw opryszczce warg i twarzy 30 tabletek Wynik</text:p>
          </table:table-cell>
          <table:table-cell table:style-name="ce21"/>
          <table:table-cell table:style-name="ce29" office:value-type="currency" office:currency="PLN" office:value="4.38">
            <text:p>4,38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Hirudoid Żel na krwiaki i obrzęki oraz zapalenie żył 40 g</text:p>
          </table:table-cell>
          <table:table-cell table:style-name="ce20" office:value-type="float" office:value="19762">
            <text:p>19762</text:p>
          </table:table-cell>
          <table:table-cell table:style-name="ce28" office:value-type="currency" office:currency="PLN" office:value="0.72">
            <text:p>0,72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Hirudoid Żel na krwiaki i obrzęki oraz zapalenie żył 40 g Wynik</text:p>
          </table:table-cell>
          <table:table-cell table:style-name="ce21"/>
          <table:table-cell table:style-name="ce29" office:value-type="currency" office:currency="PLN" office:value="0.72">
            <text:p>0,72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HIRUPAR żel do nóg z wyciągiem z pijawek 100 g</text:p>
          </table:table-cell>
          <table:table-cell table:style-name="ce20" office:value-type="float" office:value="9907">
            <text:p>9907</text:p>
          </table:table-cell>
          <table:table-cell table:style-name="ce28" office:value-type="currency" office:currency="PLN" office:value="0.88">
            <text:p>0,88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HIRUPAR żel do nóg z wyciągiem z pijawek 100 g Wynik</text:p>
          </table:table-cell>
          <table:table-cell table:style-name="ce21"/>
          <table:table-cell table:style-name="ce29" office:value-type="currency" office:currency="PLN" office:value="0.88">
            <text:p>0,88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HYDROCOLL opatrunek hydrokoloidowy jałowy 10cmx10cm - 1 sztuka</text:p>
          </table:table-cell>
          <table:table-cell table:style-name="ce20" office:value-type="float" office:value="8563">
            <text:p>8563</text:p>
          </table:table-cell>
          <table:table-cell table:style-name="ce28" office:value-type="currency" office:currency="PLN" office:value="0.62">
            <text:p>0,62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HYDROCOLL opatrunek hydrokoloidowy jałowy 10cmx10cm - 1 sztuka Wynik</text:p>
          </table:table-cell>
          <table:table-cell table:style-name="ce21"/>
          <table:table-cell table:style-name="ce29" office:value-type="currency" office:currency="PLN" office:value="0.62">
            <text:p>0,62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HYDROCOLL Thin opatrunek hydrokoloidowy 10cmx10cm - 1 sztuka</text:p>
          </table:table-cell>
          <table:table-cell table:style-name="ce20" office:value-type="float" office:value="14536">
            <text:p>14536</text:p>
          </table:table-cell>
          <table:table-cell table:style-name="ce28" office:value-type="currency" office:currency="PLN" office:value="1.86">
            <text:p>1,86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HYDROCOLL Thin opatrunek hydrokoloidowy 10cmx10cm - 1 sztuka Wynik</text:p>
          </table:table-cell>
          <table:table-cell table:style-name="ce21"/>
          <table:table-cell table:style-name="ce29" office:value-type="currency" office:currency="PLN" office:value="1.86">
            <text:p>1,86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Hydronea Citron Baby 10sasz.</text:p>
          </table:table-cell>
          <table:table-cell table:style-name="ce20" office:value-type="float" office:value="13442">
            <text:p>13442</text:p>
          </table:table-cell>
          <table:table-cell table:style-name="ce28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Hydronea Citron Baby 10sasz. Wynik</text:p>
          </table:table-cell>
          <table:table-cell table:style-name="ce21"/>
          <table:table-cell table:style-name="ce29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HYDROSAL 24 tabl. musujące</text:p>
          </table:table-cell>
          <table:table-cell table:style-name="ce20" office:value-type="float" office:value="32281">
            <text:p>32281</text:p>
          </table:table-cell>
          <table:table-cell table:style-name="ce28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HYDROSAL 24 tabl. musujące Wynik</text:p>
          </table:table-cell>
          <table:table-cell table:style-name="ce21"/>
          <table:table-cell table:style-name="ce29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HYDROSLIMMER 30 tabl.</text:p>
          </table:table-cell>
          <table:table-cell table:style-name="ce20" office:value-type="float" office:value="32282">
            <text:p>32282</text:p>
          </table:table-cell>
          <table:table-cell table:style-name="ce28" office:value-type="currency" office:currency="PLN" office:value="5.6">
            <text:p>5,6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HYDROSLIMMER 30 tabl. Wynik</text:p>
          </table:table-cell>
          <table:table-cell table:style-name="ce21"/>
          <table:table-cell table:style-name="ce29" office:value-type="currency" office:currency="PLN" office:value="5.6">
            <text:p>5,6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IBUPROM REGULAR 10 tabl.</text:p>
          </table:table-cell>
          <table:table-cell table:style-name="ce20" office:value-type="float" office:value="12">
            <text:p>12</text:p>
          </table:table-cell>
          <table:table-cell table:style-name="ce28" office:value-type="currency" office:currency="PLN" office:value="2.92">
            <text:p>2,92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IBUPROM REGULAR 10 tabl. Wynik</text:p>
          </table:table-cell>
          <table:table-cell table:style-name="ce21"/>
          <table:table-cell table:style-name="ce29" office:value-type="currency" office:currency="PLN" office:value="2.92">
            <text:p>2,92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Infarma Trading Atoxil Enterosorbent 10sasz.</text:p>
          </table:table-cell>
          <table:table-cell table:style-name="ce20" office:value-type="float" office:value="32154">
            <text:p>32154</text:p>
          </table:table-cell>
          <table:table-cell table:style-name="ce28" office:value-type="currency" office:currency="PLN" office:value="0.73">
            <text:p>0,73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Infarma Trading Atoxil Enterosorbent 10sasz. Wynik</text:p>
          </table:table-cell>
          <table:table-cell table:style-name="ce21"/>
          <table:table-cell table:style-name="ce29" office:value-type="currency" office:currency="PLN" office:value="0.73">
            <text:p>0,73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Inpharm Betadine Roztwór Na Skórę 0,1g/ml 30ml</text:p>
          </table:table-cell>
          <table:table-cell table:style-name="ce20" office:value-type="float" office:value="16180">
            <text:p>16180</text:p>
          </table:table-cell>
          <table:table-cell table:style-name="ce28" office:value-type="currency" office:currency="PLN" office:value="1.44">
            <text:p>1,44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Inpharm Betadine Roztwór Na Skórę 0,1g/ml 30ml Wynik</text:p>
          </table:table-cell>
          <table:table-cell table:style-name="ce21"/>
          <table:table-cell table:style-name="ce29" office:value-type="currency" office:currency="PLN" office:value="1.44">
            <text:p>1,44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Intec Medical Zestaw Akcesoriów Do Inhalatora Pro Intec Z Maską Dla Dzieci</text:p>
          </table:table-cell>
          <table:table-cell table:style-name="ce20" office:value-type="float" office:value="4164">
            <text:p>4164</text:p>
          </table:table-cell>
          <table:table-cell table:style-name="ce28" office:value-type="currency" office:currency="PLN" office:value="3.04">
            <text:p>3,04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Intec Medical Zestaw Akcesoriów Do Inhalatora Pro Intec Z Maską Dla Dzieci Wynik</text:p>
          </table:table-cell>
          <table:table-cell table:style-name="ce21"/>
          <table:table-cell table:style-name="ce29" office:value-type="currency" office:currency="PLN" office:value="3.04">
            <text:p>3,04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Inversion Femme Complex 90kaps.</text:p>
          </table:table-cell>
          <table:table-cell table:style-name="ce20" office:value-type="float" office:value="12016">
            <text:p>12016</text:p>
          </table:table-cell>
          <table:table-cell table:style-name="ce28" office:value-type="currency" office:currency="PLN" office:value="14.88">
            <text:p>14,88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Inversion Femme Complex 90kaps. Wynik</text:p>
          </table:table-cell>
          <table:table-cell table:style-name="ce21"/>
          <table:table-cell table:style-name="ce29" office:value-type="currency" office:currency="PLN" office:value="14.88">
            <text:p>14,88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Iwostin Capillin krem wzmacniający na naczynka SPF20 bogata konsystencja 40ml</text:p>
          </table:table-cell>
          <table:table-cell table:style-name="ce20" office:value-type="float" office:value="10586">
            <text:p>10586</text:p>
          </table:table-cell>
          <table:table-cell table:style-name="ce28" office:value-type="currency" office:currency="PLN" office:value="0.95">
            <text:p>0,95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Iwostin Capillin krem wzmacniający na naczynka SPF20 bogata konsystencja 40ml Wynik</text:p>
          </table:table-cell>
          <table:table-cell table:style-name="ce21"/>
          <table:table-cell table:style-name="ce29" office:value-type="currency" office:currency="PLN" office:value="0.95">
            <text:p>0,95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Iwostin Hydro Sensitia Intensywnie nawilżające serum, 30 ml</text:p>
          </table:table-cell>
          <table:table-cell table:style-name="ce20" office:value-type="float" office:value="14083">
            <text:p>14083</text:p>
          </table:table-cell>
          <table:table-cell table:style-name="ce28" office:value-type="currency" office:currency="PLN" office:value="3.8">
            <text:p>3,8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Iwostin Hydro Sensitia Intensywnie nawilżające serum, 30 ml Wynik</text:p>
          </table:table-cell>
          <table:table-cell table:style-name="ce21"/>
          <table:table-cell table:style-name="ce29" office:value-type="currency" office:currency="PLN" office:value="3.8">
            <text:p>3,8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Juvit Multi krople doustne 10ml</text:p>
          </table:table-cell>
          <table:table-cell table:style-name="ce20" office:value-type="float" office:value="6099">
            <text:p>6099</text:p>
          </table:table-cell>
          <table:table-cell table:style-name="ce28" office:value-type="currency" office:currency="PLN" office:value="11.06">
            <text:p>11,06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Juvit Multi krople doustne 10ml Wynik</text:p>
          </table:table-cell>
          <table:table-cell table:style-name="ce21"/>
          <table:table-cell table:style-name="ce29" office:value-type="currency" office:currency="PLN" office:value="11.06">
            <text:p>11,06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Kailas Ajurwedyjski Krem Z Himalajskich Ziół Na Problemy Skórne 8 G</text:p>
          </table:table-cell>
          <table:table-cell table:style-name="ce20" office:value-type="float" office:value="12019">
            <text:p>12019</text:p>
          </table:table-cell>
          <table:table-cell table:style-name="ce28" office:value-type="currency" office:currency="PLN" office:value="0.76">
            <text:p>0,76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Kailas Ajurwedyjski Krem Z Himalajskich Ziół Na Problemy Skórne 8 G Wynik</text:p>
          </table:table-cell>
          <table:table-cell table:style-name="ce21"/>
          <table:table-cell table:style-name="ce29" office:value-type="currency" office:currency="PLN" office:value="0.76">
            <text:p>0,76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Kapsułki Herbapol na Uspokojenie 30 szt.</text:p>
          </table:table-cell>
          <table:table-cell table:style-name="ce20" office:value-type="float" office:value="10626">
            <text:p>10626</text:p>
          </table:table-cell>
          <table:table-cell table:style-name="ce28" office:value-type="currency" office:currency="PLN" office:value="0.74">
            <text:p>0,74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Kapsułki Herbapol na Uspokojenie 30 szt. Wynik</text:p>
          </table:table-cell>
          <table:table-cell table:style-name="ce21"/>
          <table:table-cell table:style-name="ce29" office:value-type="currency" office:currency="PLN" office:value="0.74">
            <text:p>0,74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KARPAL AKUT maść, 50ml</text:p>
          </table:table-cell>
          <table:table-cell table:style-name="ce20" office:value-type="float" office:value="17004">
            <text:p>17004</text:p>
          </table:table-cell>
          <table:table-cell table:style-name="ce28" office:value-type="currency" office:currency="PLN" office:value="1.74">
            <text:p>1,74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KARPAL AKUT maść, 50ml Wynik</text:p>
          </table:table-cell>
          <table:table-cell table:style-name="ce21"/>
          <table:table-cell table:style-name="ce29" office:value-type="currency" office:currency="PLN" office:value="1.74">
            <text:p>1,74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Kebene Plus 20 tabl</text:p>
          </table:table-cell>
          <table:table-cell table:style-name="ce20" office:value-type="float" office:value="17015">
            <text:p>17015</text:p>
          </table:table-cell>
          <table:table-cell table:style-name="ce28" office:value-type="currency" office:currency="PLN" office:value="0.73">
            <text:p>0,73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Kebene Plus 20 tabl Wynik</text:p>
          </table:table-cell>
          <table:table-cell table:style-name="ce21"/>
          <table:table-cell table:style-name="ce29" office:value-type="currency" office:currency="PLN" office:value="0.73">
            <text:p>0,73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Kej Gruszka z kanką nr 9</text:p>
          </table:table-cell>
          <table:table-cell table:style-name="ce20" office:value-type="float" office:value="16885">
            <text:p>16885</text:p>
          </table:table-cell>
          <table:table-cell table:style-name="ce28" office:value-type="currency" office:currency="PLN" office:value="0.92">
            <text:p>0,92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Kej Gruszka z kanką nr 9 Wynik</text:p>
          </table:table-cell>
          <table:table-cell table:style-name="ce21"/>
          <table:table-cell table:style-name="ce29" office:value-type="currency" office:currency="PLN" office:value="0.92">
            <text:p>0,92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Ketoxin Forte Wzmacniający Szampon Przeciwłupieżowy 6 ml</text:p>
          </table:table-cell>
          <table:table-cell table:style-name="ce20" office:value-type="float" office:value="4234">
            <text:p>4234</text:p>
          </table:table-cell>
          <table:table-cell table:style-name="ce28" office:value-type="currency" office:currency="PLN" office:value="0.72">
            <text:p>0,72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Ketoxin Forte Wzmacniający Szampon Przeciwłupieżowy 6 ml Wynik</text:p>
          </table:table-cell>
          <table:table-cell table:style-name="ce21"/>
          <table:table-cell table:style-name="ce29" office:value-type="currency" office:currency="PLN" office:value="0.72">
            <text:p>0,72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Kikgel Microdacyn Hydrogel Żel Do Dezynfekcji Ran 60G</text:p>
          </table:table-cell>
          <table:table-cell table:style-name="ce20" office:value-type="float" office:value="17309">
            <text:p>17309</text:p>
          </table:table-cell>
          <table:table-cell table:style-name="ce28" office:value-type="currency" office:currency="PLN" office:value="0.62">
            <text:p>0,62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Kikgel Microdacyn Hydrogel Żel Do Dezynfekcji Ran 60G Wynik</text:p>
          </table:table-cell>
          <table:table-cell table:style-name="ce21"/>
          <table:table-cell table:style-name="ce29" office:value-type="currency" office:currency="PLN" office:value="0.62">
            <text:p>0,62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Klorane Chinina Zestaw Przeciw Wypadaniu Włosów – Szampon, 400 ml + Odżywka, 200 ml</text:p>
          </table:table-cell>
          <table:table-cell table:style-name="ce20" office:value-type="float" office:value="32607">
            <text:p>32607</text:p>
          </table:table-cell>
          <table:table-cell table:style-name="ce28" office:value-type="currency" office:currency="PLN" office:value="2.37">
            <text:p>2,37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Klorane Chinina Zestaw Przeciw Wypadaniu Włosów – Szampon, 400 ml + Odżywka, 200 ml Wynik</text:p>
          </table:table-cell>
          <table:table-cell table:style-name="ce21"/>
          <table:table-cell table:style-name="ce29" office:value-type="currency" office:currency="PLN" office:value="2.37">
            <text:p>2,37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Komfortowe Majteczki Jednorazowe Dla Kobiet Rozmiar 38 X 7 Sztuk</text:p>
          </table:table-cell>
          <table:table-cell table:style-name="ce20" office:value-type="float" office:value="13815">
            <text:p>13815</text:p>
          </table:table-cell>
          <table:table-cell table:style-name="ce28" office:value-type="currency" office:currency="PLN" office:value="0.62">
            <text:p>0,62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Komfortowe Majteczki Jednorazowe Dla Kobiet Rozmiar 38 X 7 Sztuk Wynik</text:p>
          </table:table-cell>
          <table:table-cell table:style-name="ce21"/>
          <table:table-cell table:style-name="ce29" office:value-type="currency" office:currency="PLN" office:value="0.62">
            <text:p>0,62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Komora inhalacyjna AeroChamber Plus Flow</text:p>
          </table:table-cell>
          <table:table-cell table:style-name="ce20" office:value-type="float" office:value="11457">
            <text:p>11457</text:p>
          </table:table-cell>
          <table:table-cell table:style-name="ce28" office:value-type="currency" office:currency="PLN" office:value="0.76">
            <text:p>0,76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Komora inhalacyjna AeroChamber Plus Flow Wynik</text:p>
          </table:table-cell>
          <table:table-cell table:style-name="ce21"/>
          <table:table-cell table:style-name="ce29" office:value-type="currency" office:currency="PLN" office:value="0.76">
            <text:p>0,76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Kosmed Spray Na Komary Kleszcze I Meszki Powyżej 1. Roku Życia 100ml</text:p>
          </table:table-cell>
          <table:table-cell table:style-name="ce20" office:value-type="float" office:value="8585">
            <text:p>8585</text:p>
          </table:table-cell>
          <table:table-cell table:style-name="ce28" office:value-type="currency" office:currency="PLN" office:value="1.86">
            <text:p>1,86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Kosmed Spray Na Komary Kleszcze I Meszki Powyżej 1. Roku Życia 100ml Wynik</text:p>
          </table:table-cell>
          <table:table-cell table:style-name="ce21"/>
          <table:table-cell table:style-name="ce29" office:value-type="currency" office:currency="PLN" office:value="1.86">
            <text:p>1,86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KRAUTERHOF żel z żywokostem 250ml</text:p>
          </table:table-cell>
          <table:table-cell table:style-name="ce20" office:value-type="float" office:value="11050">
            <text:p>11050</text:p>
          </table:table-cell>
          <table:table-cell table:style-name="ce28" office:value-type="currency" office:currency="PLN" office:value="0.88">
            <text:p>0,88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KRAUTERHOF żel z żywokostem 250ml Wynik</text:p>
          </table:table-cell>
          <table:table-cell table:style-name="ce21"/>
          <table:table-cell table:style-name="ce29" office:value-type="currency" office:currency="PLN" office:value="0.88">
            <text:p>0,88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Krem Allergika z olejkiem z wiesiołka 20% na dzień i noc 100ml</text:p>
          </table:table-cell>
          <table:table-cell table:style-name="ce20" office:value-type="float" office:value="11735">
            <text:p>11735</text:p>
          </table:table-cell>
          <table:table-cell table:style-name="ce28" office:value-type="currency" office:currency="PLN" office:value="1.02">
            <text:p>1,02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Krem Allergika z olejkiem z wiesiołka 20% na dzień i noc 100ml Wynik</text:p>
          </table:table-cell>
          <table:table-cell table:style-name="ce21"/>
          <table:table-cell table:style-name="ce29" office:value-type="currency" office:currency="PLN" office:value="1.02">
            <text:p>1,02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Krem ANIDA odżywczo-regenerujący olejek arganowy na dzień i noc 100ml</text:p>
          </table:table-cell>
          <table:table-cell table:style-name="ce20" office:value-type="float" office:value="16033">
            <text:p>16033</text:p>
          </table:table-cell>
          <table:table-cell table:style-name="ce28" office:value-type="currency" office:currency="PLN" office:value="1.02">
            <text:p>1,02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Krem ANIDA odżywczo-regenerujący olejek arganowy na dzień i noc 100ml Wynik</text:p>
          </table:table-cell>
          <table:table-cell table:style-name="ce21"/>
          <table:table-cell table:style-name="ce29" office:value-type="currency" office:currency="PLN" office:value="1.02">
            <text:p>1,02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Krem Avena Ochronny Z Witaminą A Tuba Na Dzień I Noc 25g</text:p>
          </table:table-cell>
          <table:table-cell table:style-name="ce20" office:value-type="float" office:value="4274">
            <text:p>4274</text:p>
          </table:table-cell>
          <table:table-cell table:style-name="ce28" office:value-type="currency" office:currency="PLN" office:value="2.04">
            <text:p>2,04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Krem Avena Ochronny Z Witaminą A Tuba Na Dzień I Noc 25g Wynik</text:p>
          </table:table-cell>
          <table:table-cell table:style-name="ce21"/>
          <table:table-cell table:style-name="ce29" office:value-type="currency" office:currency="PLN" office:value="2.04">
            <text:p>2,04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Krem Naturalis Wiesiołkowy Półtłusty na dzień i noc 50ml</text:p>
          </table:table-cell>
          <table:table-cell table:style-name="ce20" office:value-type="float" office:value="17394">
            <text:p>17394</text:p>
          </table:table-cell>
          <table:table-cell table:style-name="ce28" office:value-type="currency" office:currency="PLN" office:value="3.06">
            <text:p>3,06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Krem Naturalis Wiesiołkowy Półtłusty na dzień i noc 50ml Wynik</text:p>
          </table:table-cell>
          <table:table-cell table:style-name="ce21"/>
          <table:table-cell table:style-name="ce29" office:value-type="currency" office:currency="PLN" office:value="3.06">
            <text:p>3,06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Krem Nuxe Prodigieuse Florale Zestaw z kosmetyczką podróżną 2024</text:p>
          </table:table-cell>
          <table:table-cell table:style-name="ce20" office:value-type="float" office:value="28311">
            <text:p>28311</text:p>
          </table:table-cell>
          <table:table-cell table:style-name="ce28" office:value-type="currency" office:currency="PLN" office:value="10.45">
            <text:p>10,45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Krem Nuxe Prodigieuse Florale Zestaw z kosmetyczką podróżną 2024 Wynik</text:p>
          </table:table-cell>
          <table:table-cell table:style-name="ce21"/>
          <table:table-cell table:style-name="ce29" office:value-type="currency" office:currency="PLN" office:value="10.45">
            <text:p>10,45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Krem ochronny z witaminą A 20g</text:p>
          </table:table-cell>
          <table:table-cell table:style-name="ce20" office:value-type="float" office:value="4273">
            <text:p>4273</text:p>
          </table:table-cell>
          <table:table-cell table:style-name="ce28" office:value-type="currency" office:currency="PLN" office:value="0.72">
            <text:p>0,72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Krem ochronny z witaminą A 20g Wynik</text:p>
          </table:table-cell>
          <table:table-cell table:style-name="ce21"/>
          <table:table-cell table:style-name="ce29" office:value-type="currency" office:currency="PLN" office:value="0.72">
            <text:p>0,72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Kropia Plus krople do oczu nawilżające 10ml</text:p>
          </table:table-cell>
          <table:table-cell table:style-name="ce20" office:value-type="float" office:value="29313">
            <text:p>29313</text:p>
          </table:table-cell>
          <table:table-cell table:style-name="ce28" office:value-type="currency" office:currency="PLN" office:value="5.53">
            <text:p>5,53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Kropia Plus krople do oczu nawilżające 10ml Wynik</text:p>
          </table:table-cell>
          <table:table-cell table:style-name="ce21"/>
          <table:table-cell table:style-name="ce29" office:value-type="currency" office:currency="PLN" office:value="5.53">
            <text:p>5,53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Krynica Zdrój Kryniczanka Lekko Gazowana 18 x 1,5L</text:p>
          </table:table-cell>
          <table:table-cell table:style-name="ce20" office:value-type="float" office:value="18444">
            <text:p>18444</text:p>
          </table:table-cell>
          <table:table-cell table:style-name="ce28" office:value-type="currency" office:currency="PLN" office:value="0.63">
            <text:p>0,63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Krynica Zdrój Kryniczanka Lekko Gazowana 18 x 1,5L Wynik</text:p>
          </table:table-cell>
          <table:table-cell table:style-name="ce21"/>
          <table:table-cell table:style-name="ce29" office:value-type="currency" office:currency="PLN" office:value="0.63">
            <text:p>0,63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La Roche-Posay Hyalu B5 Aquagel Żel Nawilżający Spf 30 50Ml</text:p>
          </table:table-cell>
          <table:table-cell table:style-name="ce20" office:value-type="float" office:value="18852">
            <text:p>18852</text:p>
          </table:table-cell>
          <table:table-cell table:style-name="ce28" office:value-type="currency" office:currency="PLN" office:value="4.75">
            <text:p>4,75 zł</text:p>
          </table:table-cell>
          <table:table-cell table:number-columns-repeated="1021"/>
        </table:table-row>
        <table:table-row table:style-name="ro15">
          <table:table-cell table:style-name="ce14" office:value-type="string">
            <text:p>La Roche-Posay Hyalu B5 Aquagel Żel Nawilżający Spf 30 50Ml Wynik</text:p>
          </table:table-cell>
          <table:table-cell table:style-name="ce21"/>
          <table:table-cell table:style-name="ce29" office:value-type="currency" office:currency="PLN" office:value="4.75">
            <text:p>4,75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La Roche-Posay Toleriane Ultra Dermallergo serum nawilżająco-kojące do skóry wrażliwej i alergicznej 20 ml</text:p>
          </table:table-cell>
          <table:table-cell table:style-name="ce20" office:value-type="float" office:value="10512">
            <text:p>10512</text:p>
          </table:table-cell>
          <table:table-cell table:style-name="ce28" office:value-type="currency" office:currency="PLN" office:value="2.85">
            <text:p>2,85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La Roche-Posay Toleriane Ultra Dermallergo serum nawilżająco-kojące do skóry wrażliwej i alergicznej 20 ml Wynik</text:p>
          </table:table-cell>
          <table:table-cell table:style-name="ce21"/>
          <table:table-cell table:style-name="ce29" office:value-type="currency" office:currency="PLN" office:value="2.85">
            <text:p>2,85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LABORATORIA POLFA ŁÓDŹ SP. Z O.O. OPATRUNEK URGOCLEAN AG 10 X 10CM</text:p>
          </table:table-cell>
          <table:table-cell table:style-name="ce20" office:value-type="float" office:value="10151">
            <text:p>10151</text:p>
          </table:table-cell>
          <table:table-cell table:style-name="ce28" office:value-type="currency" office:currency="PLN" office:value="0.62">
            <text:p>0,62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LABORATORIA POLFA ŁÓDŹ SP. Z O.O. OPATRUNEK URGOCLEAN AG 10 X 10CM Wynik</text:p>
          </table:table-cell>
          <table:table-cell table:style-name="ce21"/>
          <table:table-cell table:style-name="ce29" office:value-type="currency" office:currency="PLN" office:value="0.62">
            <text:p>0,62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Lactulose-MIP syrop 9,75g/15ml 1000ml</text:p>
          </table:table-cell>
          <table:table-cell table:style-name="ce20" office:value-type="float" office:value="7759">
            <text:p>7759</text:p>
          </table:table-cell>
          <table:table-cell table:style-name="ce28" office:value-type="currency" office:currency="PLN" office:value="2.92">
            <text:p>2,92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Lactulose-MIP syrop 9,75g/15ml 1000ml Wynik</text:p>
          </table:table-cell>
          <table:table-cell table:style-name="ce21"/>
          <table:table-cell table:style-name="ce29" office:value-type="currency" office:currency="PLN" office:value="2.92">
            <text:p>2,92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Lamisilatt Krem 10 mg/g 15g</text:p>
          </table:table-cell>
          <table:table-cell table:style-name="ce20" office:value-type="float" office:value="6122">
            <text:p>6122</text:p>
          </table:table-cell>
          <table:table-cell table:style-name="ce28" office:value-type="currency" office:currency="PLN" office:value="3.6">
            <text:p>3,6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Lamisilatt Krem 10 mg/g 15g Wynik</text:p>
          </table:table-cell>
          <table:table-cell table:style-name="ce21"/>
          <table:table-cell table:style-name="ce29" office:value-type="currency" office:currency="PLN" office:value="3.6">
            <text:p>3,6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LEHNING Urarthone krople 250 ml</text:p>
          </table:table-cell>
          <table:table-cell table:style-name="ce20" office:value-type="float" office:value="12034">
            <text:p>12034</text:p>
          </table:table-cell>
          <table:table-cell table:style-name="ce28" office:value-type="currency" office:currency="PLN" office:value="0.87">
            <text:p>0,87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LEHNING Urarthone krople 250 ml Wynik</text:p>
          </table:table-cell>
          <table:table-cell table:style-name="ce21"/>
          <table:table-cell table:style-name="ce29" office:value-type="currency" office:currency="PLN" office:value="0.87">
            <text:p>0,87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Leukoplast Cuticell Paraffin Plaster Impregnowany Parafiną 5szt</text:p>
          </table:table-cell>
          <table:table-cell table:style-name="ce20" office:value-type="float" office:value="11751">
            <text:p>11751</text:p>
          </table:table-cell>
          <table:table-cell table:style-name="ce28" office:value-type="currency" office:currency="PLN" office:value="0.62">
            <text:p>0,62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Leukoplast Cuticell Paraffin Plaster Impregnowany Parafiną 5szt Wynik</text:p>
          </table:table-cell>
          <table:table-cell table:style-name="ce21"/>
          <table:table-cell table:style-name="ce29" office:value-type="currency" office:currency="PLN" office:value="0.62">
            <text:p>0,62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Lisc senesu ziolo pojed. Kawon 50g</text:p>
          </table:table-cell>
          <table:table-cell table:style-name="ce20" office:value-type="float" office:value="9568">
            <text:p>9568</text:p>
          </table:table-cell>
          <table:table-cell table:style-name="ce28" office:value-type="currency" office:currency="PLN" office:value="1.36">
            <text:p>1,36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Lisc senesu ziolo pojed. Kawon 50g Wynik</text:p>
          </table:table-cell>
          <table:table-cell table:style-name="ce21"/>
          <table:table-cell table:style-name="ce29" office:value-type="currency" office:currency="PLN" office:value="1.36">
            <text:p>1,36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Livenorm 30kaps.</text:p>
          </table:table-cell>
          <table:table-cell table:style-name="ce20" office:value-type="float" office:value="9836">
            <text:p>9836</text:p>
          </table:table-cell>
          <table:table-cell table:style-name="ce28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Livenorm 30kaps. Wynik</text:p>
          </table:table-cell>
          <table:table-cell table:style-name="ce21"/>
          <table:table-cell table:style-name="ce29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Maga-Herba Benzyna apteczna, Maga-Herba, 100 ml</text:p>
          </table:table-cell>
          <table:table-cell table:style-name="ce20" office:value-type="float" office:value="10494">
            <text:p>10494</text:p>
          </table:table-cell>
          <table:table-cell table:style-name="ce28" office:value-type="currency" office:currency="PLN" office:value="0.62">
            <text:p>0,62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Maga-Herba Benzyna apteczna, Maga-Herba, 100 ml Wynik</text:p>
          </table:table-cell>
          <table:table-cell table:style-name="ce21"/>
          <table:table-cell table:style-name="ce29" office:value-type="currency" office:currency="PLN" office:value="0.62">
            <text:p>0,62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Maść ichtiolowa 30g</text:p>
          </table:table-cell>
          <table:table-cell table:style-name="ce20" office:value-type="float" office:value="17225">
            <text:p>17225</text:p>
          </table:table-cell>
          <table:table-cell table:style-name="ce28" office:value-type="currency" office:currency="PLN" office:value="0.72">
            <text:p>0,72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Maść ichtiolowa 30g Wynik</text:p>
          </table:table-cell>
          <table:table-cell table:style-name="ce21"/>
          <table:table-cell table:style-name="ce29" office:value-type="currency" office:currency="PLN" office:value="0.72">
            <text:p>0,72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MAŚĆ KOŃSKA chłodząca Dr.Natura 350g+150g</text:p>
          </table:table-cell>
          <table:table-cell table:style-name="ce20" office:value-type="float" office:value="14480">
            <text:p>14480</text:p>
          </table:table-cell>
          <table:table-cell table:style-name="ce28" office:value-type="currency" office:currency="PLN" office:value="0.76">
            <text:p>0,76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MAŚĆ KOŃSKA chłodząca Dr.Natura 350g+150g Wynik</text:p>
          </table:table-cell>
          <table:table-cell table:style-name="ce21"/>
          <table:table-cell table:style-name="ce29" office:value-type="currency" office:currency="PLN" office:value="0.76">
            <text:p>0,76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Maść Szałwiowa 25 G</text:p>
          </table:table-cell>
          <table:table-cell table:style-name="ce20" office:value-type="float" office:value="9164">
            <text:p>9164</text:p>
          </table:table-cell>
          <table:table-cell table:style-name="ce28" office:value-type="currency" office:currency="PLN" office:value="3.6">
            <text:p>3,6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Maść Szałwiowa 25 G Wynik</text:p>
          </table:table-cell>
          <table:table-cell table:style-name="ce21"/>
          <table:table-cell table:style-name="ce29" office:value-type="currency" office:currency="PLN" office:value="3.6">
            <text:p>3,6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MED SYSTEM Pompka do baniek bezogniowych 1 szt.</text:p>
          </table:table-cell>
          <table:table-cell table:style-name="ce20" office:value-type="float" office:value="17842">
            <text:p>17842</text:p>
          </table:table-cell>
          <table:table-cell table:style-name="ce28" office:value-type="currency" office:currency="PLN" office:value="0.86">
            <text:p>0,86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MED SYSTEM Pompka do baniek bezogniowych 1 szt. Wynik</text:p>
          </table:table-cell>
          <table:table-cell table:style-name="ce21"/>
          <table:table-cell table:style-name="ce29" office:value-type="currency" office:currency="PLN" office:value="0.86">
            <text:p>0,86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Microlife MT 16C2</text:p>
          </table:table-cell>
          <table:table-cell table:style-name="ce20" office:value-type="float" office:value="9695">
            <text:p>9695</text:p>
          </table:table-cell>
          <table:table-cell table:style-name="ce28" office:value-type="currency" office:currency="PLN" office:value="24.72">
            <text:p>24,72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Microlife MT 16C2 Wynik</text:p>
          </table:table-cell>
          <table:table-cell table:style-name="ce21"/>
          <table:table-cell table:style-name="ce29" office:value-type="currency" office:currency="PLN" office:value="24.72">
            <text:p>24,72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Microlife Termometr NC 200</text:p>
          </table:table-cell>
          <table:table-cell table:style-name="ce20" office:value-type="float" office:value="9262">
            <text:p>9262</text:p>
          </table:table-cell>
          <table:table-cell table:style-name="ce28" office:value-type="currency" office:currency="PLN" office:value="1.03">
            <text:p>1,03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Microlife Termometr NC 200 Wynik</text:p>
          </table:table-cell>
          <table:table-cell table:style-name="ce21"/>
          <table:table-cell table:style-name="ce29" office:value-type="currency" office:currency="PLN" office:value="1.03">
            <text:p>1,03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Mieloguard Glyco 30 kaps.</text:p>
          </table:table-cell>
          <table:table-cell table:style-name="ce20" office:value-type="float" office:value="17311">
            <text:p>17311</text:p>
          </table:table-cell>
          <table:table-cell table:style-name="ce28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Mieloguard Glyco 30 kaps. Wynik</text:p>
          </table:table-cell>
          <table:table-cell table:style-name="ce21"/>
          <table:table-cell table:style-name="ce29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Miovelia Nac 15 kaps.</text:p>
          </table:table-cell>
          <table:table-cell table:style-name="ce20" office:value-type="float" office:value="11821">
            <text:p>11821</text:p>
          </table:table-cell>
          <table:table-cell table:style-name="ce28" office:value-type="currency" office:currency="PLN" office:value="6.75">
            <text:p>6,75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Miovelia Nac 15 kaps. Wynik</text:p>
          </table:table-cell>
          <table:table-cell table:style-name="ce21"/>
          <table:table-cell table:style-name="ce29" office:value-type="currency" office:currency="PLN" office:value="6.75">
            <text:p>6,75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Mosbito Opaska Odstraszająca Komary i Meszki 1szt</text:p>
          </table:table-cell>
          <table:table-cell table:style-name="ce20" office:value-type="float" office:value="4597">
            <text:p>4597</text:p>
          </table:table-cell>
          <table:table-cell table:style-name="ce28" office:value-type="currency" office:currency="PLN" office:value="0.93">
            <text:p>0,93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Mosbito Opaska Odstraszająca Komary i Meszki 1szt Wynik</text:p>
          </table:table-cell>
          <table:table-cell table:style-name="ce21"/>
          <table:table-cell table:style-name="ce29" office:value-type="currency" office:currency="PLN" office:value="0.93">
            <text:p>0,93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MULTIVITAMINUM AMS FORTE Tabletki zwiększony niedobór witamin 90tabl.</text:p>
          </table:table-cell>
          <table:table-cell table:style-name="ce20" office:value-type="float" office:value="17354">
            <text:p>17354</text:p>
          </table:table-cell>
          <table:table-cell table:style-name="ce28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MULTIVITAMINUM AMS FORTE Tabletki zwiększony niedobór witamin 90tabl. Wynik</text:p>
          </table:table-cell>
          <table:table-cell table:style-name="ce21"/>
          <table:table-cell table:style-name="ce29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MYLAN Legalon 140 20 kaps</text:p>
          </table:table-cell>
          <table:table-cell table:style-name="ce20" office:value-type="float" office:value="17151">
            <text:p>17151</text:p>
          </table:table-cell>
          <table:table-cell table:style-name="ce28" office:value-type="currency" office:currency="PLN" office:value="0.73">
            <text:p>0,73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MYLAN Legalon 140 20 kaps Wynik</text:p>
          </table:table-cell>
          <table:table-cell table:style-name="ce21"/>
          <table:table-cell table:style-name="ce29" office:value-type="currency" office:currency="PLN" office:value="0.73">
            <text:p>0,73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Nakłuwacz AccuChek Softclix KIT + 25 lancetów</text:p>
          </table:table-cell>
          <table:table-cell table:style-name="ce20" office:value-type="float" office:value="13662">
            <text:p>13662</text:p>
          </table:table-cell>
          <table:table-cell table:style-name="ce28" office:value-type="currency" office:currency="PLN" office:value="2.04">
            <text:p>2,04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Nakłuwacz AccuChek Softclix KIT + 25 lancetów Wynik</text:p>
          </table:table-cell>
          <table:table-cell table:style-name="ce21"/>
          <table:table-cell table:style-name="ce29" office:value-type="currency" office:currency="PLN" office:value="2.04">
            <text:p>2,04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Natur C Active 500mg 100 tabletek</text:p>
          </table:table-cell>
          <table:table-cell table:style-name="ce20" office:value-type="float" office:value="13834">
            <text:p>13834</text:p>
          </table:table-cell>
          <table:table-cell table:style-name="ce28" office:value-type="currency" office:currency="PLN" office:value="1.6">
            <text:p>1,6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Natur C Active 500mg 100 tabletek Wynik</text:p>
          </table:table-cell>
          <table:table-cell table:style-name="ce21"/>
          <table:table-cell table:style-name="ce29" office:value-type="currency" office:currency="PLN" office:value="1.6">
            <text:p>1,6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Natur Produkt Vedixin Intense 10ml</text:p>
          </table:table-cell>
          <table:table-cell table:style-name="ce20" office:value-type="float" office:value="28091">
            <text:p>28091</text:p>
          </table:table-cell>
          <table:table-cell table:style-name="ce28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Natur Produkt Vedixin Intense 10ml Wynik</text:p>
          </table:table-cell>
          <table:table-cell table:style-name="ce21"/>
          <table:table-cell table:style-name="ce29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Natuwit, Olej z czarnuszki egipskiej 250ml</text:p>
          </table:table-cell>
          <table:table-cell table:style-name="ce20" office:value-type="float" office:value="13502">
            <text:p>13502</text:p>
          </table:table-cell>
          <table:table-cell table:style-name="ce28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Natuwit, Olej z czarnuszki egipskiej 250ml Wynik</text:p>
          </table:table-cell>
          <table:table-cell table:style-name="ce21"/>
          <table:table-cell table:style-name="ce29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NESTLE NAN OPTIPRO Plus 1 HM-O Mleko Początkowe dla niemowląt od urodzenia 400g</text:p>
          </table:table-cell>
          <table:table-cell table:style-name="ce20" office:value-type="float" office:value="17320">
            <text:p>17320</text:p>
          </table:table-cell>
          <table:table-cell table:style-name="ce28" office:value-type="currency" office:currency="PLN" office:value="8">
            <text:p>8,00 zł</text:p>
          </table:table-cell>
          <table:table-cell table:number-columns-repeated="1021"/>
        </table:table-row>
        <table:table-row table:style-name="ro15">
          <table:table-cell table:style-name="ce14" office:value-type="string">
            <text:p>NESTLE NAN OPTIPRO Plus 1 HM-O Mleko Początkowe dla niemowląt od urodzenia 400g Wynik</text:p>
          </table:table-cell>
          <table:table-cell table:style-name="ce21"/>
          <table:table-cell table:style-name="ce29" office:value-type="currency" office:currency="PLN" office:value="8">
            <text:p>8,0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NESTLE NAN OPTIPRO Plus 1 HM-O Mleko Początkowe dla niemowląt od urodzenia W Płynie 32x70ml</text:p>
          </table:table-cell>
          <table:table-cell table:style-name="ce20" office:value-type="float" office:value="17321">
            <text:p>17321</text:p>
          </table:table-cell>
          <table:table-cell table:style-name="ce28" office:value-type="currency" office:currency="PLN" office:value="2.4">
            <text:p>2,40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NESTLE NAN OPTIPRO Plus 1 HM-O Mleko Początkowe dla niemowląt od urodzenia W Płynie 32x70ml Wynik</text:p>
          </table:table-cell>
          <table:table-cell table:style-name="ce21"/>
          <table:table-cell table:style-name="ce29" office:value-type="currency" office:currency="PLN" office:value="2.4">
            <text:p>2,4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Nexon Pharma Islandzki Medic+ Spray Do Gardła Z Nanosrebrem 30ml</text:p>
          </table:table-cell>
          <table:table-cell table:style-name="ce20" office:value-type="float" office:value="26817">
            <text:p>26817</text:p>
          </table:table-cell>
          <table:table-cell table:style-name="ce28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Nexon Pharma Islandzki Medic+ Spray Do Gardła Z Nanosrebrem 30ml Wynik</text:p>
          </table:table-cell>
          <table:table-cell table:style-name="ce21"/>
          <table:table-cell table:style-name="ce29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Niacynobaza 25% Skoncentrowane serum z niacynamidem 30g</text:p>
          </table:table-cell>
          <table:table-cell table:style-name="ce20" office:value-type="float" office:value="32421">
            <text:p>32421</text:p>
          </table:table-cell>
          <table:table-cell table:style-name="ce28" office:value-type="currency" office:currency="PLN" office:value="1.03">
            <text:p>1,03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Niacynobaza 25% Skoncentrowane serum z niacynamidem 30g Wynik</text:p>
          </table:table-cell>
          <table:table-cell table:style-name="ce21"/>
          <table:table-cell table:style-name="ce29" office:value-type="currency" office:currency="PLN" office:value="1.03">
            <text:p>1,03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NIQUITIN przezroczysty, plastry transdermalne, 21 mg / 24 h, 7 szt</text:p>
          </table:table-cell>
          <table:table-cell table:style-name="ce20" office:value-type="float" office:value="9593">
            <text:p>9593</text:p>
          </table:table-cell>
          <table:table-cell table:style-name="ce28" office:value-type="currency" office:currency="PLN" office:value="9.57">
            <text:p>9,57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NIQUITIN przezroczysty, plastry transdermalne, 21 mg / 24 h, 7 szt Wynik</text:p>
          </table:table-cell>
          <table:table-cell table:style-name="ce21"/>
          <table:table-cell table:style-name="ce29" office:value-type="currency" office:currency="PLN" office:value="9.57">
            <text:p>9,57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Nizoral Krem 20mg/g 30 g</text:p>
          </table:table-cell>
          <table:table-cell table:style-name="ce20" office:value-type="float" office:value="9594">
            <text:p>9594</text:p>
          </table:table-cell>
          <table:table-cell table:style-name="ce28" office:value-type="currency" office:currency="PLN" office:value="12.24">
            <text:p>12,24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Nizoral Krem 20mg/g 30 g Wynik</text:p>
          </table:table-cell>
          <table:table-cell table:style-name="ce21"/>
          <table:table-cell table:style-name="ce29" office:value-type="currency" office:currency="PLN" office:value="12.24">
            <text:p>12,24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NordFarm Glukozamina 500 Plus 90tabl.</text:p>
          </table:table-cell>
          <table:table-cell table:style-name="ce20" office:value-type="float" office:value="4048">
            <text:p>4048</text:p>
          </table:table-cell>
          <table:table-cell table:style-name="ce28" office:value-type="currency" office:currency="PLN" office:value="5.81">
            <text:p>5,81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NordFarm Glukozamina 500 Plus 90tabl. Wynik</text:p>
          </table:table-cell>
          <table:table-cell table:style-name="ce21"/>
          <table:table-cell table:style-name="ce29" office:value-type="currency" office:currency="PLN" office:value="5.81">
            <text:p>5,81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Noris Pharma Enteroflor 20kaps.</text:p>
          </table:table-cell>
          <table:table-cell table:style-name="ce20" office:value-type="float" office:value="32275">
            <text:p>32275</text:p>
          </table:table-cell>
          <table:table-cell table:style-name="ce28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5">
          <table:table-cell table:style-name="ce14" office:value-type="string">
            <text:p>Noris Pharma Enteroflor 20kaps. Wynik</text:p>
          </table:table-cell>
          <table:table-cell table:style-name="ce21"/>
          <table:table-cell table:style-name="ce29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NORIS PHARMA Vitaprim D3 Forte 4000 + K2, 60 kaps. -&gt; Wysyłka w 24h już za 3,99zł! [Odbiór w Żabce]</text:p>
          </table:table-cell>
          <table:table-cell table:style-name="ce20" office:value-type="float" office:value="32311">
            <text:p>32311</text:p>
          </table:table-cell>
          <table:table-cell table:style-name="ce28" office:value-type="currency" office:currency="PLN" office:value="1.6">
            <text:p>1,6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NORIS PHARMA Vitaprim D3 Forte 4000 + K2, 60 kaps. -&gt; Wysyłka w 24h już za 3,99zł! [Odbiór w Żabce] Wynik</text:p>
          </table:table-cell>
          <table:table-cell table:style-name="ce21"/>
          <table:table-cell table:style-name="ce29" office:value-type="currency" office:currency="PLN" office:value="1.6">
            <text:p>1,6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Nova T 380 Cu380Ag Wkładka Antykoncepcyjna 1szt.</text:p>
          </table:table-cell>
          <table:table-cell table:style-name="ce20" office:value-type="float" office:value="10602">
            <text:p>10602</text:p>
          </table:table-cell>
          <table:table-cell table:style-name="ce28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Nova T 380 Cu380Ag Wkładka Antykoncepcyjna 1szt. Wynik</text:p>
          </table:table-cell>
          <table:table-cell table:style-name="ce21"/>
          <table:table-cell table:style-name="ce29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NOVATIV Grinotussan syrop 120ml</text:p>
          </table:table-cell>
          <table:table-cell table:style-name="ce20" office:value-type="float" office:value="19736">
            <text:p>19736</text:p>
          </table:table-cell>
          <table:table-cell table:style-name="ce28" office:value-type="currency" office:currency="PLN" office:value="0.83">
            <text:p>0,83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NOVATIV Grinotussan syrop 120ml Wynik</text:p>
          </table:table-cell>
          <table:table-cell table:style-name="ce21"/>
          <table:table-cell table:style-name="ce29" office:value-type="currency" office:currency="PLN" office:value="0.83">
            <text:p>0,83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Nurofen Forte dla dzieci 200 mg/5 ml Zawiesina o smaku truskawkowym 150 ml</text:p>
          </table:table-cell>
          <table:table-cell table:style-name="ce20" office:value-type="float" office:value="11065">
            <text:p>11065</text:p>
          </table:table-cell>
          <table:table-cell table:style-name="ce28" office:value-type="currency" office:currency="PLN" office:value="0.79">
            <text:p>0,79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Nurofen Forte dla dzieci 200 mg/5 ml Zawiesina o smaku truskawkowym 150 ml Wynik</text:p>
          </table:table-cell>
          <table:table-cell table:style-name="ce21"/>
          <table:table-cell table:style-name="ce29" office:value-type="currency" office:currency="PLN" office:value="0.79">
            <text:p>0,79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Nutramigen 3 LGG Complete proszek 400g</text:p>
          </table:table-cell>
          <table:table-cell table:style-name="ce20" office:value-type="float" office:value="9721">
            <text:p>9721</text:p>
          </table:table-cell>
          <table:table-cell table:style-name="ce28" office:value-type="currency" office:currency="PLN" office:value="0.94">
            <text:p>0,94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Nutramigen 3 LGG Complete proszek 400g Wynik</text:p>
          </table:table-cell>
          <table:table-cell table:style-name="ce21"/>
          <table:table-cell table:style-name="ce29" office:value-type="currency" office:currency="PLN" office:value="0.94">
            <text:p>0,94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Nutricia Nutrison Protein Intense Butelka 500ml</text:p>
          </table:table-cell>
          <table:table-cell table:style-name="ce20" office:value-type="float" office:value="28426">
            <text:p>28426</text:p>
          </table:table-cell>
          <table:table-cell table:style-name="ce28" office:value-type="currency" office:currency="PLN" office:value="0.79">
            <text:p>0,79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Nutricia Nutrison Protein Intense Butelka 500ml Wynik</text:p>
          </table:table-cell>
          <table:table-cell table:style-name="ce21"/>
          <table:table-cell table:style-name="ce29" office:value-type="currency" office:currency="PLN" office:value="0.79">
            <text:p>0,79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Nutridrink preparat odżywczy smak owoce leśne 4x125ml</text:p>
          </table:table-cell>
          <table:table-cell table:style-name="ce20" office:value-type="float" office:value="886">
            <text:p>886</text:p>
          </table:table-cell>
          <table:table-cell table:style-name="ce28" office:value-type="currency" office:currency="PLN" office:value="0.79">
            <text:p>0,79 zł</text:p>
          </table:table-cell>
          <table:table-cell table:number-columns-repeated="1021"/>
        </table:table-row>
        <table:table-row table:style-name="ro15">
          <table:table-cell table:style-name="ce14" office:value-type="string">
            <text:p>Nutridrink preparat odżywczy smak owoce leśne 4x125ml Wynik</text:p>
          </table:table-cell>
          <table:table-cell table:style-name="ce21"/>
          <table:table-cell table:style-name="ce29" office:value-type="currency" office:currency="PLN" office:value="0.79">
            <text:p>0,79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Nuxe Hair Prodigieux Odżywcza Maska 30ml + Nabłyszczający Szampon 50ml + Nabłyszczająca Odżywka 30ml</text:p>
          </table:table-cell>
          <table:table-cell table:style-name="ce20" office:value-type="float" office:value="28305">
            <text:p>28305</text:p>
          </table:table-cell>
          <table:table-cell table:style-name="ce28" office:value-type="currency" office:currency="PLN" office:value="1.9">
            <text:p>1,90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Nuxe Hair Prodigieux Odżywcza Maska 30ml + Nabłyszczający Szampon 50ml + Nabłyszczająca Odżywka 30ml Wynik</text:p>
          </table:table-cell>
          <table:table-cell table:style-name="ce21"/>
          <table:table-cell table:style-name="ce29" office:value-type="currency" office:currency="PLN" office:value="1.9">
            <text:p>1,9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Nuxe Nuxuriance Gold Ultraodżywczy Krem Do Twarzy 50ml + Balsam Pod Oczy 15ml</text:p>
          </table:table-cell>
          <table:table-cell table:style-name="ce20" office:value-type="float" office:value="31961">
            <text:p>31961</text:p>
          </table:table-cell>
          <table:table-cell table:style-name="ce28" office:value-type="currency" office:currency="PLN" office:value="0.95">
            <text:p>0,95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Nuxe Nuxuriance Gold Ultraodżywczy Krem Do Twarzy 50ml + Balsam Pod Oczy 15ml Wynik</text:p>
          </table:table-cell>
          <table:table-cell table:style-name="ce21"/>
          <table:table-cell table:style-name="ce29" office:value-type="currency" office:currency="PLN" office:value="0.95">
            <text:p>0,95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Nuxe Zestaw - Huile Prodigieuse</text:p>
          </table:table-cell>
          <table:table-cell table:style-name="ce20" office:value-type="float" office:value="19670">
            <text:p>19670</text:p>
          </table:table-cell>
          <table:table-cell table:style-name="ce28" office:value-type="currency" office:currency="PLN" office:value="0.95">
            <text:p>0,95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Nuxe Zestaw - Huile Prodigieuse Wynik</text:p>
          </table:table-cell>
          <table:table-cell table:style-name="ce21"/>
          <table:table-cell table:style-name="ce29" office:value-type="currency" office:currency="PLN" office:value="0.95">
            <text:p>0,95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Obesimed Forte 42 kaps</text:p>
          </table:table-cell>
          <table:table-cell table:style-name="ce20" office:value-type="float" office:value="24778">
            <text:p>24778</text:p>
          </table:table-cell>
          <table:table-cell table:style-name="ce28" office:value-type="currency" office:currency="PLN" office:value="1.19">
            <text:p>1,19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Obesimed Forte 42 kaps Wynik</text:p>
          </table:table-cell>
          <table:table-cell table:style-name="ce21"/>
          <table:table-cell table:style-name="ce29" office:value-type="currency" office:currency="PLN" office:value="1.19">
            <text:p>1,19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Oktaseptal – aerozol z oktenidyną do dezynfekcji i odkażania ran, 250 ml</text:p>
          </table:table-cell>
          <table:table-cell table:style-name="ce20" office:value-type="float" office:value="11025">
            <text:p>11025</text:p>
          </table:table-cell>
          <table:table-cell table:style-name="ce28" office:value-type="currency" office:currency="PLN" office:value="0.62">
            <text:p>0,62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Oktaseptal – aerozol z oktenidyną do dezynfekcji i odkażania ran, 250 ml Wynik</text:p>
          </table:table-cell>
          <table:table-cell table:style-name="ce21"/>
          <table:table-cell table:style-name="ce29" office:value-type="currency" office:currency="PLN" office:value="0.62">
            <text:p>0,62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Omron M2+ Ciśnieniomierz naramienny HEM-7188</text:p>
          </table:table-cell>
          <table:table-cell table:style-name="ce20" office:value-type="float" office:value="33270">
            <text:p>33270</text:p>
          </table:table-cell>
          <table:table-cell table:style-name="ce28" office:value-type="currency" office:currency="PLN" office:value="0.93">
            <text:p>0,93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Omron M2+ Ciśnieniomierz naramienny HEM-7188 Wynik</text:p>
          </table:table-cell>
          <table:table-cell table:style-name="ce21"/>
          <table:table-cell table:style-name="ce29" office:value-type="currency" office:currency="PLN" office:value="0.93">
            <text:p>0,93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Omron M4 Intelli It</text:p>
          </table:table-cell>
          <table:table-cell table:style-name="ce20" office:value-type="float" office:value="29699">
            <text:p>29699</text:p>
          </table:table-cell>
          <table:table-cell table:style-name="ce28" office:value-type="currency" office:currency="PLN" office:value="0.93">
            <text:p>0,93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Omron M4 Intelli It Wynik</text:p>
          </table:table-cell>
          <table:table-cell table:style-name="ce21"/>
          <table:table-cell table:style-name="ce29" office:value-type="currency" office:currency="PLN" office:value="0.93">
            <text:p>0,93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One Touch Delica Plus Lancety 100Szt.</text:p>
          </table:table-cell>
          <table:table-cell table:style-name="ce20" office:value-type="float" office:value="8494">
            <text:p>8494</text:p>
          </table:table-cell>
          <table:table-cell table:style-name="ce28" office:value-type="currency" office:currency="PLN" office:value="1.36">
            <text:p>1,36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One Touch Delica Plus Lancety 100Szt. Wynik</text:p>
          </table:table-cell>
          <table:table-cell table:style-name="ce21"/>
          <table:table-cell table:style-name="ce29" office:value-type="currency" office:currency="PLN" office:value="1.36">
            <text:p>1,36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Opatr.AQUACEL Ag Foam 10x10cm nieprzyl.x1</text:p>
          </table:table-cell>
          <table:table-cell table:style-name="ce20" office:value-type="float" office:value="7238">
            <text:p>7238</text:p>
          </table:table-cell>
          <table:table-cell table:style-name="ce28" office:value-type="currency" office:currency="PLN" office:value="1.24">
            <text:p>1,24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Opatr.AQUACEL Ag Foam 10x10cm nieprzyl.x1 Wynik</text:p>
          </table:table-cell>
          <table:table-cell table:style-name="ce21"/>
          <table:table-cell table:style-name="ce29" office:value-type="currency" office:currency="PLN" office:value="1.24">
            <text:p>1,24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Opatr.BACTIGRAS z chlorhex. 15x20 1 szt.</text:p>
          </table:table-cell>
          <table:table-cell table:style-name="ce20" office:value-type="float" office:value="15330">
            <text:p>15330</text:p>
          </table:table-cell>
          <table:table-cell table:style-name="ce28" office:value-type="currency" office:currency="PLN" office:value="0.62">
            <text:p>0,62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Opatr.BACTIGRAS z chlorhex. 15x20 1 szt. Wynik</text:p>
          </table:table-cell>
          <table:table-cell table:style-name="ce21"/>
          <table:table-cell table:style-name="ce29" office:value-type="currency" office:currency="PLN" office:value="0.62">
            <text:p>0,62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Opatr.Vliwazell wysoce chłonny 10x20 25szt</text:p>
          </table:table-cell>
          <table:table-cell table:style-name="ce20" office:value-type="float" office:value="12823">
            <text:p>12823</text:p>
          </table:table-cell>
          <table:table-cell table:style-name="ce28" office:value-type="currency" office:currency="PLN" office:value="1.24">
            <text:p>1,24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Opatr.Vliwazell wysoce chłonny 10x20 25szt Wynik</text:p>
          </table:table-cell>
          <table:table-cell table:style-name="ce21"/>
          <table:table-cell table:style-name="ce29" office:value-type="currency" office:currency="PLN" office:value="1.24">
            <text:p>1,24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OPTICall Plus maść na powieki 20 g</text:p>
          </table:table-cell>
          <table:table-cell table:style-name="ce20" office:value-type="float" office:value="14984">
            <text:p>14984</text:p>
          </table:table-cell>
          <table:table-cell table:style-name="ce28" office:value-type="currency" office:currency="PLN" office:value="2.37">
            <text:p>2,37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OPTICall Plus maść na powieki 20 g Wynik</text:p>
          </table:table-cell>
          <table:table-cell table:style-name="ce21"/>
          <table:table-cell table:style-name="ce29" office:value-type="currency" office:currency="PLN" office:value="2.37">
            <text:p>2,37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Optive Fusion Krople Do Oczu 10ml</text:p>
          </table:table-cell>
          <table:table-cell table:style-name="ce20" office:value-type="float" office:value="10260">
            <text:p>10260</text:p>
          </table:table-cell>
          <table:table-cell table:style-name="ce28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Optive Fusion Krople Do Oczu 10ml Wynik</text:p>
          </table:table-cell>
          <table:table-cell table:style-name="ce21"/>
          <table:table-cell table:style-name="ce29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OROGERMINA Spray do gardła 1 zestaw</text:p>
          </table:table-cell>
          <table:table-cell table:style-name="ce20" office:value-type="float" office:value="11706">
            <text:p>11706</text:p>
          </table:table-cell>
          <table:table-cell table:style-name="ce28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OROGERMINA Spray do gardła 1 zestaw Wynik</text:p>
          </table:table-cell>
          <table:table-cell table:style-name="ce21"/>
          <table:table-cell table:style-name="ce29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Orsalit tabs 24 tabl musujące + Magnez z wit.B6 10 tabl musujących</text:p>
          </table:table-cell>
          <table:table-cell table:style-name="ce20" office:value-type="float" office:value="17594">
            <text:p>17594</text:p>
          </table:table-cell>
          <table:table-cell table:style-name="ce28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Orsalit tabs 24 tabl musujące + Magnez z wit.B6 10 tabl musujących Wynik</text:p>
          </table:table-cell>
          <table:table-cell table:style-name="ce21"/>
          <table:table-cell table:style-name="ce29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Oscillococcinum na przeziębienie i grypę 30 dawek x 1 g</text:p>
          </table:table-cell>
          <table:table-cell table:style-name="ce20" office:value-type="float" office:value="4856">
            <text:p>4856</text:p>
          </table:table-cell>
          <table:table-cell table:style-name="ce28" office:value-type="currency" office:currency="PLN" office:value="4">
            <text:p>4,0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Oscillococcinum na przeziębienie i grypę 30 dawek x 1 g Wynik</text:p>
          </table:table-cell>
          <table:table-cell table:style-name="ce21"/>
          <table:table-cell table:style-name="ce29" office:value-type="currency" office:currency="PLN" office:value="4">
            <text:p>4,0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Otinum 0,2g/g Krople Do Uszu 10g</text:p>
          </table:table-cell>
          <table:table-cell table:style-name="ce20" office:value-type="float" office:value="15762">
            <text:p>15762</text:p>
          </table:table-cell>
          <table:table-cell table:style-name="ce28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Otinum 0,2g/g Krople Do Uszu 10g Wynik</text:p>
          </table:table-cell>
          <table:table-cell table:style-name="ce21"/>
          <table:table-cell table:style-name="ce29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Otrivin 1mg/ml 10ml</text:p>
          </table:table-cell>
          <table:table-cell table:style-name="ce20" office:value-type="float" office:value="72">
            <text:p>72</text:p>
          </table:table-cell>
          <table:table-cell table:style-name="ce28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Otrivin 1mg/ml 10ml Wynik</text:p>
          </table:table-cell>
          <table:table-cell table:style-name="ce21"/>
          <table:table-cell table:style-name="ce29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Otrivin Ipra Max 0,5mg + 0,6mg Aerozol do nosa 10ml</text:p>
          </table:table-cell>
          <table:table-cell table:style-name="ce20" office:value-type="float" office:value="6211">
            <text:p>6211</text:p>
          </table:table-cell>
          <table:table-cell table:style-name="ce28" office:value-type="currency" office:currency="PLN" office:value="5.6">
            <text:p>5,6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Otrivin Ipra Max 0,5mg + 0,6mg Aerozol do nosa 10ml Wynik</text:p>
          </table:table-cell>
          <table:table-cell table:style-name="ce21"/>
          <table:table-cell table:style-name="ce29" office:value-type="currency" office:currency="PLN" office:value="5.6">
            <text:p>5,6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Otrivin Menthol 1mg/ml Aerozol do nosa 10 ml</text:p>
          </table:table-cell>
          <table:table-cell table:style-name="ce20" office:value-type="float" office:value="14886">
            <text:p>14886</text:p>
          </table:table-cell>
          <table:table-cell table:style-name="ce28" office:value-type="currency" office:currency="PLN" office:value="24.8">
            <text:p>24,8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Otrivin Menthol 1mg/ml Aerozol do nosa 10 ml Wynik</text:p>
          </table:table-cell>
          <table:table-cell table:style-name="ce21"/>
          <table:table-cell table:style-name="ce29" office:value-type="currency" office:currency="PLN" office:value="24.8">
            <text:p>24,8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Ozonella Oliwka Ozonowana 100 ml</text:p>
          </table:table-cell>
          <table:table-cell table:style-name="ce20" office:value-type="float" office:value="13559">
            <text:p>13559</text:p>
          </table:table-cell>
          <table:table-cell table:style-name="ce28" office:value-type="currency" office:currency="PLN" office:value="0.88">
            <text:p>0,88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Ozonella Oliwka Ozonowana 100 ml Wynik</text:p>
          </table:table-cell>
          <table:table-cell table:style-name="ce21"/>
          <table:table-cell table:style-name="ce29" office:value-type="currency" office:currency="PLN" office:value="0.88">
            <text:p>0,88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Pani Teresa Opaska Elastyczna Nadgarstek Długa M</text:p>
          </table:table-cell>
          <table:table-cell table:style-name="ce20" office:value-type="float" office:value="4799">
            <text:p>4799</text:p>
          </table:table-cell>
          <table:table-cell table:style-name="ce28" office:value-type="currency" office:currency="PLN" office:value="0.67">
            <text:p>0,67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Pani Teresa Opaska Elastyczna Nadgarstek Długa M Wynik</text:p>
          </table:table-cell>
          <table:table-cell table:style-name="ce21"/>
          <table:table-cell table:style-name="ce29" office:value-type="currency" office:currency="PLN" office:value="0.67">
            <text:p>0,67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PANI TERESA® <text:s/>PT 0306 Opaska elastyczna stawu nadgarstkowego - krótka</text:p>
          </table:table-cell>
          <table:table-cell table:style-name="ce20" office:value-type="float" office:value="9007">
            <text:p>9007</text:p>
          </table:table-cell>
          <table:table-cell table:style-name="ce28" office:value-type="currency" office:currency="PLN" office:value="0.67">
            <text:p>0,67 zł</text:p>
          </table:table-cell>
          <table:table-cell table:number-columns-repeated="1021"/>
        </table:table-row>
        <table:table-row table:style-name="ro15">
          <table:table-cell table:style-name="ce14" office:value-type="string">
            <text:p>PANI TERESA® <text:s/>PT 0306 Opaska elastyczna stawu nadgarstkowego - krótka Wynik</text:p>
          </table:table-cell>
          <table:table-cell table:style-name="ce21"/>
          <table:table-cell table:style-name="ce29" office:value-type="currency" office:currency="PLN" office:value="0.67">
            <text:p>0,67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PANI TERESA® CLASSIC PT 0403 Pończochy medyczne uciskowe 2 klasa kompresji (czubek otwarty, długie, beż, rozm. XL)</text:p>
          </table:table-cell>
          <table:table-cell table:style-name="ce20" office:value-type="float" office:value="15373">
            <text:p>15373</text:p>
          </table:table-cell>
          <table:table-cell table:style-name="ce28" office:value-type="currency" office:currency="PLN" office:value="0.82">
            <text:p>0,82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PANI TERESA® CLASSIC PT 0403 Pończochy medyczne uciskowe 2 klasa kompresji (czubek otwarty, długie, beż, rozm. XL) Wynik</text:p>
          </table:table-cell>
          <table:table-cell table:style-name="ce21"/>
          <table:table-cell table:style-name="ce29" office:value-type="currency" office:currency="PLN" office:value="0.82">
            <text:p>0,82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Pantoprazol Teva 20 mg 14 tabl.</text:p>
          </table:table-cell>
          <table:table-cell table:style-name="ce20" office:value-type="float" office:value="9938">
            <text:p>9938</text:p>
          </table:table-cell>
          <table:table-cell table:style-name="ce28" office:value-type="currency" office:currency="PLN" office:value="6.57">
            <text:p>6,57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Pantoprazol Teva 20 mg 14 tabl. Wynik</text:p>
          </table:table-cell>
          <table:table-cell table:style-name="ce21"/>
          <table:table-cell table:style-name="ce29" office:value-type="currency" office:currency="PLN" office:value="6.57">
            <text:p>6,57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Paraderm Psoric D krem 85 g</text:p>
          </table:table-cell>
          <table:table-cell table:style-name="ce20" office:value-type="float" office:value="9499">
            <text:p>9499</text:p>
          </table:table-cell>
          <table:table-cell table:style-name="ce28" office:value-type="currency" office:currency="PLN" office:value="1.9">
            <text:p>1,90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Paraderm Psoric D krem 85 g Wynik</text:p>
          </table:table-cell>
          <table:table-cell table:style-name="ce21"/>
          <table:table-cell table:style-name="ce29" office:value-type="currency" office:currency="PLN" office:value="1.9">
            <text:p>1,9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Paramedica Paraderm Forte Szampon Z Dziegciem Ichtiolem I Cyclopiroxem 150g</text:p>
          </table:table-cell>
          <table:table-cell table:style-name="ce20" office:value-type="float" office:value="15339">
            <text:p>15339</text:p>
          </table:table-cell>
          <table:table-cell table:style-name="ce28" office:value-type="currency" office:currency="PLN" office:value="0.72">
            <text:p>0,72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Paramedica Paraderm Forte Szampon Z Dziegciem Ichtiolem I Cyclopiroxem 150g Wynik</text:p>
          </table:table-cell>
          <table:table-cell table:style-name="ce21"/>
          <table:table-cell table:style-name="ce29" office:value-type="currency" office:currency="PLN" office:value="0.72">
            <text:p>0,72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Paski One Touch Select test 50szt.</text:p>
          </table:table-cell>
          <table:table-cell table:style-name="ce20" office:value-type="float" office:value="7681">
            <text:p>7681</text:p>
          </table:table-cell>
          <table:table-cell table:style-name="ce28" office:value-type="currency" office:currency="PLN" office:value="0.68">
            <text:p>0,68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Paski One Touch Select test 50szt. Wynik</text:p>
          </table:table-cell>
          <table:table-cell table:style-name="ce21"/>
          <table:table-cell table:style-name="ce29" office:value-type="currency" office:currency="PLN" office:value="0.68">
            <text:p>0,68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Permen Med Forte Tabletki powlekane, na zaburzenia erekcji 4 szt.</text:p>
          </table:table-cell>
          <table:table-cell table:style-name="ce20" office:value-type="float" office:value="19672">
            <text:p>19672</text:p>
          </table:table-cell>
          <table:table-cell table:style-name="ce28" office:value-type="currency" office:currency="PLN" office:value="3.2">
            <text:p>3,2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Permen Med Forte Tabletki powlekane, na zaburzenia erekcji 4 szt. Wynik</text:p>
          </table:table-cell>
          <table:table-cell table:style-name="ce21"/>
          <table:table-cell table:style-name="ce29" office:value-type="currency" office:currency="PLN" office:value="3.2">
            <text:p>3,2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Pharmapoint Legalon 140, 20kaps</text:p>
          </table:table-cell>
          <table:table-cell table:style-name="ce20" office:value-type="float" office:value="19282">
            <text:p>19282</text:p>
          </table:table-cell>
          <table:table-cell table:style-name="ce28" office:value-type="currency" office:currency="PLN" office:value="2.19">
            <text:p>2,19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Pharmapoint Legalon 140, 20kaps Wynik</text:p>
          </table:table-cell>
          <table:table-cell table:style-name="ce21"/>
          <table:table-cell table:style-name="ce29" office:value-type="currency" office:currency="PLN" office:value="2.19">
            <text:p>2,19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Pharmatech Olejek dla zakatarzonych 10ml</text:p>
          </table:table-cell>
          <table:table-cell table:style-name="ce20" office:value-type="float" office:value="19392">
            <text:p>19392</text:p>
          </table:table-cell>
          <table:table-cell table:style-name="ce28" office:value-type="currency" office:currency="PLN" office:value="2.79">
            <text:p>2,79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Pharmatech Olejek dla zakatarzonych 10ml Wynik</text:p>
          </table:table-cell>
          <table:table-cell table:style-name="ce21"/>
          <table:table-cell table:style-name="ce29" office:value-type="currency" office:currency="PLN" office:value="2.79">
            <text:p>2,79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Pharmnew Urocal SD 40 tabletek</text:p>
          </table:table-cell>
          <table:table-cell table:style-name="ce20" office:value-type="float" office:value="18328">
            <text:p>18328</text:p>
          </table:table-cell>
          <table:table-cell table:style-name="ce28" office:value-type="currency" office:currency="PLN" office:value="0.75">
            <text:p>0,75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Pharmnew Urocal SD 40 tabletek Wynik</text:p>
          </table:table-cell>
          <table:table-cell table:style-name="ce21"/>
          <table:table-cell table:style-name="ce29" office:value-type="currency" office:currency="PLN" office:value="0.75">
            <text:p>0,75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Phytomedica Promyalgan 120tabl.</text:p>
          </table:table-cell>
          <table:table-cell table:style-name="ce20" office:value-type="float" office:value="25920">
            <text:p>25920</text:p>
          </table:table-cell>
          <table:table-cell table:style-name="ce28" office:value-type="currency" office:currency="PLN" office:value="1.66">
            <text:p>1,66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Phytomedica Promyalgan 120tabl. Wynik</text:p>
          </table:table-cell>
          <table:table-cell table:style-name="ce21"/>
          <table:table-cell table:style-name="ce29" office:value-type="currency" office:currency="PLN" office:value="1.66">
            <text:p>1,66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PhytoPharm Dentosept PEN ulga w bólu żel 3,3ml</text:p>
          </table:table-cell>
          <table:table-cell table:style-name="ce20" office:value-type="float" office:value="10415">
            <text:p>10415</text:p>
          </table:table-cell>
          <table:table-cell table:style-name="ce28" office:value-type="currency" office:currency="PLN" office:value="0.73">
            <text:p>0,73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PhytoPharm Dentosept PEN ulga w bólu żel 3,3ml Wynik</text:p>
          </table:table-cell>
          <table:table-cell table:style-name="ce21"/>
          <table:table-cell table:style-name="ce29" office:value-type="currency" office:currency="PLN" office:value="0.73">
            <text:p>0,73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Pierre Fabre Elgydium Pasta Do Zębów Z Kompleksem Fluorinol Protect + 75ml</text:p>
          </table:table-cell>
          <table:table-cell table:style-name="ce20" office:value-type="float" office:value="29833">
            <text:p>29833</text:p>
          </table:table-cell>
          <table:table-cell table:style-name="ce28" office:value-type="currency" office:currency="PLN" office:value="2.01">
            <text:p>2,01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Pierre Fabre Elgydium Pasta Do Zębów Z Kompleksem Fluorinol Protect + 75ml Wynik</text:p>
          </table:table-cell>
          <table:table-cell table:style-name="ce21"/>
          <table:table-cell table:style-name="ce29" office:value-type="currency" office:currency="PLN" office:value="2.01">
            <text:p>2,01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Polcrom Krople do oczu 10ml 2x5ml</text:p>
          </table:table-cell>
          <table:table-cell table:style-name="ce20" office:value-type="float" office:value="6243">
            <text:p>6243</text:p>
          </table:table-cell>
          <table:table-cell table:style-name="ce28" office:value-type="currency" office:currency="PLN" office:value="2.4">
            <text:p>2,4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Polcrom Krople do oczu 10ml 2x5ml Wynik</text:p>
          </table:table-cell>
          <table:table-cell table:style-name="ce21"/>
          <table:table-cell table:style-name="ce29" office:value-type="currency" office:currency="PLN" office:value="2.4">
            <text:p>2,4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Polfarmex Calcifos 500 Mg X 150 Tabl</text:p>
          </table:table-cell>
          <table:table-cell table:style-name="ce20" office:value-type="float" office:value="18941">
            <text:p>18941</text:p>
          </table:table-cell>
          <table:table-cell table:style-name="ce28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Polfarmex Calcifos 500 Mg X 150 Tabl Wynik</text:p>
          </table:table-cell>
          <table:table-cell table:style-name="ce21"/>
          <table:table-cell table:style-name="ce29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Polopiryna S 300mg 10 tabl.</text:p>
          </table:table-cell>
          <table:table-cell table:style-name="ce20" office:value-type="float" office:value="28021">
            <text:p>28021</text:p>
          </table:table-cell>
          <table:table-cell table:style-name="ce28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Polopiryna S 300mg 10 tabl. Wynik</text:p>
          </table:table-cell>
          <table:table-cell table:style-name="ce21"/>
          <table:table-cell table:style-name="ce29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Pozytywne Konopie Maść Konopna Cbd 30ml</text:p>
          </table:table-cell>
          <table:table-cell table:style-name="ce20" office:value-type="float" office:value="32202">
            <text:p>32202</text:p>
          </table:table-cell>
          <table:table-cell table:style-name="ce28" office:value-type="currency" office:currency="PLN" office:value="0.76">
            <text:p>0,76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Pozytywne Konopie Maść Konopna Cbd 30ml Wynik</text:p>
          </table:table-cell>
          <table:table-cell table:style-name="ce21"/>
          <table:table-cell table:style-name="ce29" office:value-type="currency" office:currency="PLN" office:value="0.76">
            <text:p>0,76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Primaflor Multi 10kaps.</text:p>
          </table:table-cell>
          <table:table-cell table:style-name="ce20" office:value-type="float" office:value="32298">
            <text:p>32298</text:p>
          </table:table-cell>
          <table:table-cell table:style-name="ce28" office:value-type="currency" office:currency="PLN" office:value="3.2">
            <text:p>3,20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Primaflor Multi 10kaps. Wynik</text:p>
          </table:table-cell>
          <table:table-cell table:style-name="ce21"/>
          <table:table-cell table:style-name="ce29" office:value-type="currency" office:currency="PLN" office:value="3.2">
            <text:p>3,2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Procto-Glyvenol 30g</text:p>
          </table:table-cell>
          <table:table-cell table:style-name="ce20" office:value-type="float" office:value="578">
            <text:p>578</text:p>
          </table:table-cell>
          <table:table-cell table:style-name="ce28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Procto-Glyvenol 30g Wynik</text:p>
          </table:table-cell>
          <table:table-cell table:style-name="ce21"/>
          <table:table-cell table:style-name="ce29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Proderma Mazidło Gojące Na Suchą Popękaną Skórę 30G</text:p>
          </table:table-cell>
          <table:table-cell table:style-name="ce20" office:value-type="float" office:value="14569">
            <text:p>14569</text:p>
          </table:table-cell>
          <table:table-cell table:style-name="ce28" office:value-type="currency" office:currency="PLN" office:value="2.37">
            <text:p>2,37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Proderma Mazidło Gojące Na Suchą Popękaną Skórę 30G Wynik</text:p>
          </table:table-cell>
          <table:table-cell table:style-name="ce21"/>
          <table:table-cell table:style-name="ce29" office:value-type="currency" office:currency="PLN" office:value="2.37">
            <text:p>2,37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Produkt</text:p>
          </table:table-cell>
          <table:table-cell table:style-name="ce20" office:value-type="string">
            <text:p>Id_produktu_w_sklepie</text:p>
          </table:table-cell>
          <table:table-cell table:style-name="ce26"/>
          <table:table-cell table:number-columns-repeated="1021"/>
        </table:table-row>
        <table:table-row table:style-name="ro13">
          <table:table-cell table:style-name="ce14" office:value-type="string">
            <text:p>Produkt Wynik</text:p>
          </table:table-cell>
          <table:table-cell table:style-name="ce21"/>
          <table:table-cell table:style-name="ce27"/>
          <table:table-cell table:number-columns-repeated="1021"/>
        </table:table-row>
        <table:table-row table:style-name="ro12">
          <table:table-cell table:style-name="ce13" office:value-type="string">
            <text:p>Profarm - Olejek Manuka 10 ml.</text:p>
          </table:table-cell>
          <table:table-cell table:style-name="ce20" office:value-type="float" office:value="11086">
            <text:p>11086</text:p>
          </table:table-cell>
          <table:table-cell table:style-name="ce28" office:value-type="currency" office:currency="PLN" office:value="0.93">
            <text:p>0,93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Profarm - Olejek Manuka 10 ml. Wynik</text:p>
          </table:table-cell>
          <table:table-cell table:style-name="ce21"/>
          <table:table-cell table:style-name="ce29" office:value-type="currency" office:currency="PLN" office:value="0.93">
            <text:p>0,93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Proskin Lf 30szt.</text:p>
          </table:table-cell>
          <table:table-cell table:style-name="ce20" office:value-type="float" office:value="12932">
            <text:p>12932</text:p>
          </table:table-cell>
          <table:table-cell table:style-name="ce28" office:value-type="currency" office:currency="PLN" office:value="1.86">
            <text:p>1,86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Proskin Lf 30szt. Wynik</text:p>
          </table:table-cell>
          <table:table-cell table:style-name="ce21"/>
          <table:table-cell table:style-name="ce29" office:value-type="currency" office:currency="PLN" office:value="1.86">
            <text:p>1,86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Prurifem Kadefarm 30ml</text:p>
          </table:table-cell>
          <table:table-cell table:style-name="ce20" office:value-type="float" office:value="5129">
            <text:p>5129</text:p>
          </table:table-cell>
          <table:table-cell table:style-name="ce28" office:value-type="currency" office:currency="PLN" office:value="2.4">
            <text:p>2,40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Prurifem Kadefarm 30ml Wynik</text:p>
          </table:table-cell>
          <table:table-cell table:style-name="ce21"/>
          <table:table-cell table:style-name="ce29" office:value-type="currency" office:currency="PLN" office:value="2.4">
            <text:p>2,4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Puwer Slim Liver 30tabl.</text:p>
          </table:table-cell>
          <table:table-cell table:style-name="ce20" office:value-type="float" office:value="11857">
            <text:p>11857</text:p>
          </table:table-cell>
          <table:table-cell table:style-name="ce28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Puwer Slim Liver 30tabl. Wynik</text:p>
          </table:table-cell>
          <table:table-cell table:style-name="ce21"/>
          <table:table-cell table:style-name="ce29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R-Flex Ultra Hydrolize 30sasz.</text:p>
          </table:table-cell>
          <table:table-cell table:style-name="ce20" office:value-type="float" office:value="10366">
            <text:p>10366</text:p>
          </table:table-cell>
          <table:table-cell table:style-name="ce28" office:value-type="currency" office:currency="PLN" office:value="2.49">
            <text:p>2,49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R-Flex Ultra Hydrolize 30sasz. Wynik</text:p>
          </table:table-cell>
          <table:table-cell table:style-name="ce21"/>
          <table:table-cell table:style-name="ce29" office:value-type="currency" office:currency="PLN" office:value="2.49">
            <text:p>2,49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Rabka Spa Minerale Spray Mgiełka Solankowa 200 ml</text:p>
          </table:table-cell>
          <table:table-cell table:style-name="ce20" office:value-type="float" office:value="17911">
            <text:p>17911</text:p>
          </table:table-cell>
          <table:table-cell table:style-name="ce28" office:value-type="currency" office:currency="PLN" office:value="0.72">
            <text:p>0,72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Rabka Spa Minerale Spray Mgiełka Solankowa 200 ml Wynik</text:p>
          </table:table-cell>
          <table:table-cell table:style-name="ce21"/>
          <table:table-cell table:style-name="ce29" office:value-type="currency" office:currency="PLN" office:value="0.72">
            <text:p>0,72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Rada Blistex Balsam Do Ust Nourish sztyft 3,7G</text:p>
          </table:table-cell>
          <table:table-cell table:style-name="ce20" office:value-type="float" office:value="16242">
            <text:p>16242</text:p>
          </table:table-cell>
          <table:table-cell table:style-name="ce28" office:value-type="currency" office:currency="PLN" office:value="0.62">
            <text:p>0,62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Rada Blistex Balsam Do Ust Nourish sztyft 3,7G Wynik</text:p>
          </table:table-cell>
          <table:table-cell table:style-name="ce21"/>
          <table:table-cell table:style-name="ce29" office:value-type="currency" office:currency="PLN" office:value="0.62">
            <text:p>0,62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RatuŻel, 50ml</text:p>
          </table:table-cell>
          <table:table-cell table:style-name="ce20" office:value-type="float" office:value="14829">
            <text:p>14829</text:p>
          </table:table-cell>
          <table:table-cell table:style-name="ce28" office:value-type="currency" office:currency="PLN" office:value="1.44">
            <text:p>1,44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RatuŻel, 50ml Wynik</text:p>
          </table:table-cell>
          <table:table-cell table:style-name="ce21"/>
          <table:table-cell table:style-name="ce29" office:value-type="currency" office:currency="PLN" office:value="1.44">
            <text:p>1,44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Reckitt Benckiser Nurofen Dla Dzieci Forte Trus 150ml</text:p>
          </table:table-cell>
          <table:table-cell table:style-name="ce20" office:value-type="float" office:value="10768">
            <text:p>10768</text:p>
          </table:table-cell>
          <table:table-cell table:style-name="ce28" office:value-type="currency" office:currency="PLN" office:value="1.58">
            <text:p>1,58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Reckitt Benckiser Nurofen Dla Dzieci Forte Trus 150ml Wynik</text:p>
          </table:table-cell>
          <table:table-cell table:style-name="ce21"/>
          <table:table-cell table:style-name="ce29" office:value-type="currency" office:currency="PLN" office:value="1.58">
            <text:p>1,58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Regulobon Prosz. 200g</text:p>
          </table:table-cell>
          <table:table-cell table:style-name="ce20" office:value-type="float" office:value="8247">
            <text:p>8247</text:p>
          </table:table-cell>
          <table:table-cell table:style-name="ce28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Regulobon Prosz. 200g Wynik</text:p>
          </table:table-cell>
          <table:table-cell table:style-name="ce21"/>
          <table:table-cell table:style-name="ce29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Rennie Antacidum Smak Miętowy 24 Tabl. Do Rozgryzania I Żucia Inpharm</text:p>
          </table:table-cell>
          <table:table-cell table:style-name="ce20" office:value-type="float" office:value="17996">
            <text:p>17996</text:p>
          </table:table-cell>
          <table:table-cell table:style-name="ce28" office:value-type="currency" office:currency="PLN" office:value="1.46">
            <text:p>1,46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Rennie Antacidum Smak Miętowy 24 Tabl. Do Rozgryzania I Żucia Inpharm Wynik</text:p>
          </table:table-cell>
          <table:table-cell table:style-name="ce21"/>
          <table:table-cell table:style-name="ce29" office:value-type="currency" office:currency="PLN" office:value="1.46">
            <text:p>1,46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Rennie Antiacidum o smaku miętowym 24 tabletki do ssania</text:p>
          </table:table-cell>
          <table:table-cell table:style-name="ce20" office:value-type="float" office:value="7288">
            <text:p>7288</text:p>
          </table:table-cell>
          <table:table-cell table:style-name="ce28" office:value-type="currency" office:currency="PLN" office:value="1.46">
            <text:p>1,46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Rennie Antiacidum o smaku miętowym 24 tabletki do ssania Wynik</text:p>
          </table:table-cell>
          <table:table-cell table:style-name="ce21"/>
          <table:table-cell table:style-name="ce29" office:value-type="currency" office:currency="PLN" office:value="1.46">
            <text:p>1,46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Rennie Antiacidum o smaku miętowym 48 tabletek do ssania</text:p>
          </table:table-cell>
          <table:table-cell table:style-name="ce20" office:value-type="float" office:value="15795">
            <text:p>15795</text:p>
          </table:table-cell>
          <table:table-cell table:style-name="ce28" office:value-type="currency" office:currency="PLN" office:value="6.57">
            <text:p>6,57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Rennie Antiacidum o smaku miętowym 48 tabletek do ssania Wynik</text:p>
          </table:table-cell>
          <table:table-cell table:style-name="ce21"/>
          <table:table-cell table:style-name="ce29" office:value-type="currency" office:currency="PLN" office:value="6.57">
            <text:p>6,57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Reprintic Krem ochronny do codziennej pielęgnacji tatuaży SPF 15 100 ml</text:p>
          </table:table-cell>
          <table:table-cell table:style-name="ce20" office:value-type="float" office:value="13610">
            <text:p>13610</text:p>
          </table:table-cell>
          <table:table-cell table:style-name="ce28" office:value-type="currency" office:currency="PLN" office:value="0.75">
            <text:p>0,75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Reprintic Krem ochronny do codziennej pielęgnacji tatuaży SPF 15 100 ml Wynik</text:p>
          </table:table-cell>
          <table:table-cell table:style-name="ce21"/>
          <table:table-cell table:style-name="ce29" office:value-type="currency" office:currency="PLN" office:value="0.75">
            <text:p>0,75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Resvega 60 kaps.</text:p>
          </table:table-cell>
          <table:table-cell table:style-name="ce20" office:value-type="float" office:value="283">
            <text:p>283</text:p>
          </table:table-cell>
          <table:table-cell table:style-name="ce28" office:value-type="currency" office:currency="PLN" office:value="0.79">
            <text:p>0,79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Resvega 60 kaps. Wynik</text:p>
          </table:table-cell>
          <table:table-cell table:style-name="ce21"/>
          <table:table-cell table:style-name="ce29" office:value-type="currency" office:currency="PLN" office:value="0.79">
            <text:p>0,79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Roche Diabetes Care Paski Do Glukozy Accu Check Instant 100 szt</text:p>
          </table:table-cell>
          <table:table-cell table:style-name="ce20" office:value-type="float" office:value="3191">
            <text:p>3191</text:p>
          </table:table-cell>
          <table:table-cell table:style-name="ce28" office:value-type="currency" office:currency="PLN" office:value="1.36">
            <text:p>1,36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Roche Diabetes Care Paski Do Glukozy Accu Check Instant 100 szt Wynik</text:p>
          </table:table-cell>
          <table:table-cell table:style-name="ce21"/>
          <table:table-cell table:style-name="ce29" office:value-type="currency" office:currency="PLN" office:value="1.36">
            <text:p>1,36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Romed Igła ROMED 0,5 x 16mm 100 szt.</text:p>
          </table:table-cell>
          <table:table-cell table:style-name="ce20" office:value-type="float" office:value="15208">
            <text:p>15208</text:p>
          </table:table-cell>
          <table:table-cell table:style-name="ce28" office:value-type="currency" office:currency="PLN" office:value="0.79">
            <text:p>0,79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Romed Igła ROMED 0,5 x 16mm 100 szt. Wynik</text:p>
          </table:table-cell>
          <table:table-cell table:style-name="ce21"/>
          <table:table-cell table:style-name="ce29" office:value-type="currency" office:currency="PLN" office:value="0.79">
            <text:p>0,79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Romed Worek Na Mocz Ze Spustem 2,0 L 1 Szt</text:p>
          </table:table-cell>
          <table:table-cell table:style-name="ce20" office:value-type="float" office:value="14672">
            <text:p>14672</text:p>
          </table:table-cell>
          <table:table-cell table:style-name="ce28" office:value-type="currency" office:currency="PLN" office:value="0.79">
            <text:p>0,79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Romed Worek Na Mocz Ze Spustem 2,0 L 1 Szt Wynik</text:p>
          </table:table-cell>
          <table:table-cell table:style-name="ce21"/>
          <table:table-cell table:style-name="ce29" office:value-type="currency" office:currency="PLN" office:value="0.79">
            <text:p>0,79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Salviafarm Żel z kasztanowcem na przemęczone nogi 200ml</text:p>
          </table:table-cell>
          <table:table-cell table:style-name="ce20" office:value-type="float" office:value="18515">
            <text:p>18515</text:p>
          </table:table-cell>
          <table:table-cell table:style-name="ce28" office:value-type="currency" office:currency="PLN" office:value="0.88">
            <text:p>0,88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Salviafarm Żel z kasztanowcem na przemęczone nogi 200ml Wynik</text:p>
          </table:table-cell>
          <table:table-cell table:style-name="ce21"/>
          <table:table-cell table:style-name="ce29" office:value-type="currency" office:currency="PLN" office:value="0.88">
            <text:p>0,88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Saridon 20 tabl</text:p>
          </table:table-cell>
          <table:table-cell table:style-name="ce20" office:value-type="float" office:value="10464">
            <text:p>10464</text:p>
          </table:table-cell>
          <table:table-cell table:style-name="ce28" office:value-type="currency" office:currency="PLN" office:value="2.92">
            <text:p>2,92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Saridon 20 tabl Wynik</text:p>
          </table:table-cell>
          <table:table-cell table:style-name="ce21"/>
          <table:table-cell table:style-name="ce29" office:value-type="currency" office:currency="PLN" office:value="2.92">
            <text:p>2,92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Schulke Octenident Mouthwash Płyn Do Higieny Jamy Ustnej 250ml</text:p>
          </table:table-cell>
          <table:table-cell table:style-name="ce20" office:value-type="float" office:value="15747">
            <text:p>15747</text:p>
          </table:table-cell>
          <table:table-cell table:style-name="ce28" office:value-type="currency" office:currency="PLN" office:value="1.24">
            <text:p>1,24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Schulke Octenident Mouthwash Płyn Do Higieny Jamy Ustnej 250ml Wynik</text:p>
          </table:table-cell>
          <table:table-cell table:style-name="ce21"/>
          <table:table-cell table:style-name="ce29" office:value-type="currency" office:currency="PLN" office:value="1.24">
            <text:p>1,24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Seboradin Spray Odsiwiający Do Włosów Forte 200ml</text:p>
          </table:table-cell>
          <table:table-cell table:style-name="ce20" office:value-type="float" office:value="26469">
            <text:p>26469</text:p>
          </table:table-cell>
          <table:table-cell table:style-name="ce28" office:value-type="currency" office:currency="PLN" office:value="3.95">
            <text:p>3,95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Seboradin Spray Odsiwiający Do Włosów Forte 200ml Wynik</text:p>
          </table:table-cell>
          <table:table-cell table:style-name="ce21"/>
          <table:table-cell table:style-name="ce29" office:value-type="currency" office:currency="PLN" office:value="3.95">
            <text:p>3,95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Senes liść FIX 1 g 50 sasz.</text:p>
          </table:table-cell>
          <table:table-cell table:style-name="ce20" office:value-type="float" office:value="6404">
            <text:p>6404</text:p>
          </table:table-cell>
          <table:table-cell table:style-name="ce28" office:value-type="currency" office:currency="PLN" office:value="2.04">
            <text:p>2,04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Senes liść FIX 1 g 50 sasz. Wynik</text:p>
          </table:table-cell>
          <table:table-cell table:style-name="ce21"/>
          <table:table-cell table:style-name="ce29" office:value-type="currency" office:currency="PLN" office:value="2.04">
            <text:p>2,04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SIROWA POLAND SP. Z O.O. PIC OPTISOFT COMFORT PLASTER NA OKO 10 SZTUK</text:p>
          </table:table-cell>
          <table:table-cell table:style-name="ce20" office:value-type="float" office:value="11848">
            <text:p>11848</text:p>
          </table:table-cell>
          <table:table-cell table:style-name="ce28" office:value-type="currency" office:currency="PLN" office:value="0.62">
            <text:p>0,62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SIROWA POLAND SP. Z O.O. PIC OPTISOFT COMFORT PLASTER NA OKO 10 SZTUK Wynik</text:p>
          </table:table-cell>
          <table:table-cell table:style-name="ce21"/>
          <table:table-cell table:style-name="ce29" office:value-type="currency" office:currency="PLN" office:value="0.62">
            <text:p>0,62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Skinoren Krem 30g</text:p>
          </table:table-cell>
          <table:table-cell table:style-name="ce20" office:value-type="float" office:value="10861">
            <text:p>10861</text:p>
          </table:table-cell>
          <table:table-cell table:style-name="ce28" office:value-type="currency" office:currency="PLN" office:value="2.16">
            <text:p>2,16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Skinoren Krem 30g Wynik</text:p>
          </table:table-cell>
          <table:table-cell table:style-name="ce21"/>
          <table:table-cell table:style-name="ce29" office:value-type="currency" office:currency="PLN" office:value="2.16">
            <text:p>2,16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Skinsept Pur 1000ml</text:p>
          </table:table-cell>
          <table:table-cell table:style-name="ce20" office:value-type="float" office:value="15403">
            <text:p>15403</text:p>
          </table:table-cell>
          <table:table-cell table:style-name="ce28" office:value-type="currency" office:currency="PLN" office:value="1.24">
            <text:p>1,24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Skinsept Pur 1000ml Wynik</text:p>
          </table:table-cell>
          <table:table-cell table:style-name="ce21"/>
          <table:table-cell table:style-name="ce29" office:value-type="currency" office:currency="PLN" office:value="1.24">
            <text:p>1,24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Skinsept Pur Płyn do odkażania skóry 350ml</text:p>
          </table:table-cell>
          <table:table-cell table:style-name="ce20" office:value-type="float" office:value="5291">
            <text:p>5291</text:p>
          </table:table-cell>
          <table:table-cell table:style-name="ce28" office:value-type="currency" office:currency="PLN" office:value="0.62">
            <text:p>0,62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Skinsept Pur Płyn do odkażania skóry 350ml Wynik</text:p>
          </table:table-cell>
          <table:table-cell table:style-name="ce21"/>
          <table:table-cell table:style-name="ce29" office:value-type="currency" office:currency="PLN" office:value="0.62">
            <text:p>0,62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Smith Nephew Bactigras z chlorhexyd. 15x20cm 10 szt.</text:p>
          </table:table-cell>
          <table:table-cell table:style-name="ce20" office:value-type="float" office:value="13551">
            <text:p>13551</text:p>
          </table:table-cell>
          <table:table-cell table:style-name="ce28" office:value-type="currency" office:currency="PLN" office:value="1.24">
            <text:p>1,24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Smith Nephew Bactigras z chlorhexyd. 15x20cm 10 szt. Wynik</text:p>
          </table:table-cell>
          <table:table-cell table:style-name="ce21"/>
          <table:table-cell table:style-name="ce29" office:value-type="currency" office:currency="PLN" office:value="1.24">
            <text:p>1,24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Softeye Duo Krople Do Oczu 10ml</text:p>
          </table:table-cell>
          <table:table-cell table:style-name="ce20" office:value-type="float" office:value="19605">
            <text:p>19605</text:p>
          </table:table-cell>
          <table:table-cell table:style-name="ce28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Softeye Duo Krople Do Oczu 10ml Wynik</text:p>
          </table:table-cell>
          <table:table-cell table:style-name="ce21"/>
          <table:table-cell table:style-name="ce29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SOLGAR WITAMINY I MINERAŁY PRENATALNE 60 tabl</text:p>
          </table:table-cell>
          <table:table-cell table:style-name="ce20" office:value-type="float" office:value="740">
            <text:p>740</text:p>
          </table:table-cell>
          <table:table-cell table:style-name="ce28" office:value-type="currency" office:currency="PLN" office:value="0.81">
            <text:p>0,81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SOLGAR WITAMINY I MINERAŁY PRENATALNE 60 tabl Wynik</text:p>
          </table:table-cell>
          <table:table-cell table:style-name="ce21"/>
          <table:table-cell table:style-name="ce29" office:value-type="currency" office:currency="PLN" office:value="0.81">
            <text:p>0,81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Solinea Ferivag 14 Kaps Dopochwowe</text:p>
          </table:table-cell>
          <table:table-cell table:style-name="ce20" office:value-type="float" office:value="16741">
            <text:p>16741</text:p>
          </table:table-cell>
          <table:table-cell table:style-name="ce28" office:value-type="currency" office:currency="PLN" office:value="0.75">
            <text:p>0,75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Solinea Ferivag 14 Kaps Dopochwowe Wynik</text:p>
          </table:table-cell>
          <table:table-cell table:style-name="ce21"/>
          <table:table-cell table:style-name="ce29" office:value-type="currency" office:currency="PLN" office:value="0.75">
            <text:p>0,75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Sora Protect - aerozol na włosy zapobiegający wszawicy 50ml</text:p>
          </table:table-cell>
          <table:table-cell table:style-name="ce20" office:value-type="float" office:value="6881">
            <text:p>6881</text:p>
          </table:table-cell>
          <table:table-cell table:style-name="ce28" office:value-type="currency" office:currency="PLN" office:value="6.48">
            <text:p>6,48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Sora Protect - aerozol na włosy zapobiegający wszawicy 50ml Wynik</text:p>
          </table:table-cell>
          <table:table-cell table:style-name="ce21"/>
          <table:table-cell table:style-name="ce29" office:value-type="currency" office:currency="PLN" office:value="6.48">
            <text:p>6,48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Stanmark Stopper MDW 11 1 szt.</text:p>
          </table:table-cell>
          <table:table-cell table:style-name="ce20" office:value-type="float" office:value="9877">
            <text:p>9877</text:p>
          </table:table-cell>
          <table:table-cell table:style-name="ce28" office:value-type="currency" office:currency="PLN" office:value="0.92">
            <text:p>0,92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Stanmark Stopper MDW 11 1 szt. Wynik</text:p>
          </table:table-cell>
          <table:table-cell table:style-name="ce21"/>
          <table:table-cell table:style-name="ce29" office:value-type="currency" office:currency="PLN" office:value="0.92">
            <text:p>0,92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Stop Hemo Tampony hemostatyczne <text:s/>5szt.</text:p>
          </table:table-cell>
          <table:table-cell table:style-name="ce20" office:value-type="float" office:value="11602">
            <text:p>11602</text:p>
          </table:table-cell>
          <table:table-cell table:style-name="ce28" office:value-type="currency" office:currency="PLN" office:value="1.24">
            <text:p>1,24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Stop Hemo Tampony hemostatyczne <text:s/>5szt. Wynik</text:p>
          </table:table-cell>
          <table:table-cell table:style-name="ce21"/>
          <table:table-cell table:style-name="ce29" office:value-type="currency" office:currency="PLN" office:value="1.24">
            <text:p>1,24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Strzykawka Cewnikowa Janetta 50Ml</text:p>
          </table:table-cell>
          <table:table-cell table:style-name="ce20" office:value-type="float" office:value="18161">
            <text:p>18161</text:p>
          </table:table-cell>
          <table:table-cell table:style-name="ce28" office:value-type="currency" office:currency="PLN" office:value="0.79">
            <text:p>0,79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Strzykawka Cewnikowa Janetta 50Ml Wynik</text:p>
          </table:table-cell>
          <table:table-cell table:style-name="ce21"/>
          <table:table-cell table:style-name="ce29" office:value-type="currency" office:currency="PLN" office:value="0.79">
            <text:p>0,79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Sufrin 60tabl.</text:p>
          </table:table-cell>
          <table:table-cell table:style-name="ce20" office:value-type="float" office:value="5345">
            <text:p>5345</text:p>
          </table:table-cell>
          <table:table-cell table:style-name="ce28" office:value-type="currency" office:currency="PLN" office:value="5.6">
            <text:p>5,6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Sufrin 60tabl. Wynik</text:p>
          </table:table-cell>
          <table:table-cell table:style-name="ce21"/>
          <table:table-cell table:style-name="ce29" office:value-type="currency" office:currency="PLN" office:value="5.6">
            <text:p>5,6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Suplasyn 1-Shot 60 mg/6ml 1 ampułko-strzykawka</text:p>
          </table:table-cell>
          <table:table-cell table:style-name="ce20" office:value-type="float" office:value="26968">
            <text:p>26968</text:p>
          </table:table-cell>
          <table:table-cell table:style-name="ce28" office:value-type="currency" office:currency="PLN" office:value="3.48">
            <text:p>3,48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Suplasyn 1-Shot 60 mg/6ml 1 ampułko-strzykawka Wynik</text:p>
          </table:table-cell>
          <table:table-cell table:style-name="ce21"/>
          <table:table-cell table:style-name="ce29" office:value-type="currency" office:currency="PLN" office:value="3.48">
            <text:p>3,48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Sylimarol Gastro 30kaps.</text:p>
          </table:table-cell>
          <table:table-cell table:style-name="ce20" office:value-type="float" office:value="11530">
            <text:p>11530</text:p>
          </table:table-cell>
          <table:table-cell table:style-name="ce28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Sylimarol Gastro 30kaps. Wynik</text:p>
          </table:table-cell>
          <table:table-cell table:style-name="ce21"/>
          <table:table-cell table:style-name="ce29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Tabletki MAGPRIM Skurcz 30 szt.</text:p>
          </table:table-cell>
          <table:table-cell table:style-name="ce20" office:value-type="float" office:value="32288">
            <text:p>32288</text:p>
          </table:table-cell>
          <table:table-cell table:style-name="ce28" office:value-type="currency" office:currency="PLN" office:value="1.48">
            <text:p>1,48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Tabletki MAGPRIM Skurcz 30 szt. Wynik</text:p>
          </table:table-cell>
          <table:table-cell table:style-name="ce21"/>
          <table:table-cell table:style-name="ce29" office:value-type="currency" office:currency="PLN" office:value="1.48">
            <text:p>1,48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Tabletki NEOSEN Forte 30 szt.</text:p>
          </table:table-cell>
          <table:table-cell table:style-name="ce20" office:value-type="float" office:value="32291">
            <text:p>32291</text:p>
          </table:table-cell>
          <table:table-cell table:style-name="ce28" office:value-type="currency" office:currency="PLN" office:value="2.22">
            <text:p>2,22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Tabletki NEOSEN Forte 30 szt. Wynik</text:p>
          </table:table-cell>
          <table:table-cell table:style-name="ce21"/>
          <table:table-cell table:style-name="ce29" office:value-type="currency" office:currency="PLN" office:value="2.22">
            <text:p>2,22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Tabletki NervoCalm Forte 20 szt.</text:p>
          </table:table-cell>
          <table:table-cell table:style-name="ce20" office:value-type="float" office:value="12744">
            <text:p>12744</text:p>
          </table:table-cell>
          <table:table-cell table:style-name="ce28" office:value-type="currency" office:currency="PLN" office:value="7.11">
            <text:p>7,11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Tabletki NervoCalm Forte 20 szt. Wynik</text:p>
          </table:table-cell>
          <table:table-cell table:style-name="ce21"/>
          <table:table-cell table:style-name="ce29" office:value-type="currency" office:currency="PLN" office:value="7.11">
            <text:p>7,11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Tabletki Neurotynox D 30 szt.</text:p>
          </table:table-cell>
          <table:table-cell table:style-name="ce20" office:value-type="float" office:value="4684">
            <text:p>4684</text:p>
          </table:table-cell>
          <table:table-cell table:style-name="ce28" office:value-type="currency" office:currency="PLN" office:value="2.22">
            <text:p>2,22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Tabletki Neurotynox D 30 szt. Wynik</text:p>
          </table:table-cell>
          <table:table-cell table:style-name="ce21"/>
          <table:table-cell table:style-name="ce29" office:value-type="currency" office:currency="PLN" office:value="2.22">
            <text:p>2,22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Tabletki uspokajające AMS 30 szt.</text:p>
          </table:table-cell>
          <table:table-cell table:style-name="ce20" office:value-type="float" office:value="18200">
            <text:p>18200</text:p>
          </table:table-cell>
          <table:table-cell table:style-name="ce28" office:value-type="currency" office:currency="PLN" office:value="0.74">
            <text:p>0,74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Tabletki uspokajające AMS 30 szt. Wynik</text:p>
          </table:table-cell>
          <table:table-cell table:style-name="ce21"/>
          <table:table-cell table:style-name="ce29" office:value-type="currency" office:currency="PLN" office:value="0.74">
            <text:p>0,74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Tanakan 40 Mg 30 Tabl.</text:p>
          </table:table-cell>
          <table:table-cell table:style-name="ce20" office:value-type="float" office:value="19454">
            <text:p>19454</text:p>
          </table:table-cell>
          <table:table-cell table:style-name="ce28" office:value-type="currency" office:currency="PLN" office:value="0.79">
            <text:p>0,79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Tanakan 40 Mg 30 Tabl. Wynik</text:p>
          </table:table-cell>
          <table:table-cell table:style-name="ce21"/>
          <table:table-cell table:style-name="ce29" office:value-type="currency" office:currency="PLN" office:value="0.79">
            <text:p>0,79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Tanakan 90 tabletek</text:p>
          </table:table-cell>
          <table:table-cell table:style-name="ce20" office:value-type="float" office:value="6611">
            <text:p>6611</text:p>
          </table:table-cell>
          <table:table-cell table:style-name="ce28" office:value-type="currency" office:currency="PLN" office:value="2.4">
            <text:p>2,4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Tanakan 90 tabletek Wynik</text:p>
          </table:table-cell>
          <table:table-cell table:style-name="ce21"/>
          <table:table-cell table:style-name="ce29" office:value-type="currency" office:currency="PLN" office:value="2.4">
            <text:p>2,4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Tecweld Icemix sztuczny lód w aerozolu 400ml</text:p>
          </table:table-cell>
          <table:table-cell table:style-name="ce20" office:value-type="float" office:value="4136">
            <text:p>4136</text:p>
          </table:table-cell>
          <table:table-cell table:style-name="ce28" office:value-type="currency" office:currency="PLN" office:value="3.72">
            <text:p>3,72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Tecweld Icemix sztuczny lód w aerozolu 400ml Wynik</text:p>
          </table:table-cell>
          <table:table-cell table:style-name="ce21"/>
          <table:table-cell table:style-name="ce29" office:value-type="currency" office:currency="PLN" office:value="3.72">
            <text:p>3,72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Test OraQuick na obecność wirusa HIV</text:p>
          </table:table-cell>
          <table:table-cell table:style-name="ce20" office:value-type="float" office:value="19586">
            <text:p>19586</text:p>
          </table:table-cell>
          <table:table-cell table:style-name="ce28" office:value-type="currency" office:currency="PLN" office:value="2.96">
            <text:p>2,96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Test OraQuick na obecność wirusa HIV Wynik</text:p>
          </table:table-cell>
          <table:table-cell table:style-name="ce21"/>
          <table:table-cell table:style-name="ce29" office:value-type="currency" office:currency="PLN" office:value="2.96">
            <text:p>2,96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Tiorfan 10 kapsułek</text:p>
          </table:table-cell>
          <table:table-cell table:style-name="ce20" office:value-type="float" office:value="5416">
            <text:p>5416</text:p>
          </table:table-cell>
          <table:table-cell table:style-name="ce28" office:value-type="currency" office:currency="PLN" office:value="0.73">
            <text:p>0,73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Tiorfan 10 kapsułek Wynik</text:p>
          </table:table-cell>
          <table:table-cell table:style-name="ce21"/>
          <table:table-cell table:style-name="ce29" office:value-type="currency" office:currency="PLN" office:value="0.73">
            <text:p>0,73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Tisane balsam do ust 4,7g</text:p>
          </table:table-cell>
          <table:table-cell table:style-name="ce20" office:value-type="float" office:value="11377">
            <text:p>11377</text:p>
          </table:table-cell>
          <table:table-cell table:style-name="ce28" office:value-type="currency" office:currency="PLN" office:value="3.1">
            <text:p>3,1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Tisane balsam do ust 4,7g Wynik</text:p>
          </table:table-cell>
          <table:table-cell table:style-name="ce21"/>
          <table:table-cell table:style-name="ce29" office:value-type="currency" office:currency="PLN" office:value="3.1">
            <text:p>3,1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Tisane FARM Żel propolisowy 6g</text:p>
          </table:table-cell>
          <table:table-cell table:style-name="ce20" office:value-type="float" office:value="18277">
            <text:p>18277</text:p>
          </table:table-cell>
          <table:table-cell table:style-name="ce28" office:value-type="currency" office:currency="PLN" office:value="15.84">
            <text:p>15,84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Tisane FARM Żel propolisowy 6g Wynik</text:p>
          </table:table-cell>
          <table:table-cell table:style-name="ce21"/>
          <table:table-cell table:style-name="ce29" office:value-type="currency" office:currency="PLN" office:value="15.84">
            <text:p>15,84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Travislim x 30tabl.</text:p>
          </table:table-cell>
          <table:table-cell table:style-name="ce20" office:value-type="float" office:value="32304">
            <text:p>32304</text:p>
          </table:table-cell>
          <table:table-cell table:style-name="ce28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Travislim x 30tabl. Wynik</text:p>
          </table:table-cell>
          <table:table-cell table:style-name="ce21"/>
          <table:table-cell table:style-name="ce29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Trb Chemedica Artivit 2x15 Fiolek</text:p>
          </table:table-cell>
          <table:table-cell table:style-name="ce20" office:value-type="float" office:value="28278">
            <text:p>28278</text:p>
          </table:table-cell>
          <table:table-cell table:style-name="ce28" office:value-type="currency" office:currency="PLN" office:value="1.66">
            <text:p>1,66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Trb Chemedica Artivit 2x15 Fiolek Wynik</text:p>
          </table:table-cell>
          <table:table-cell table:style-name="ce21"/>
          <table:table-cell table:style-name="ce29" office:value-type="currency" office:currency="PLN" office:value="1.66">
            <text:p>1,66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Triflora 40kaps.</text:p>
          </table:table-cell>
          <table:table-cell table:style-name="ce20" office:value-type="float" office:value="11607">
            <text:p>11607</text:p>
          </table:table-cell>
          <table:table-cell table:style-name="ce28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Triflora 40kaps. Wynik</text:p>
          </table:table-cell>
          <table:table-cell table:style-name="ce21"/>
          <table:table-cell table:style-name="ce29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trilac 20 kaps</text:p>
          </table:table-cell>
          <table:table-cell table:style-name="ce20" office:value-type="float" office:value="5438">
            <text:p>5438</text:p>
          </table:table-cell>
          <table:table-cell table:style-name="ce28" office:value-type="currency" office:currency="PLN" office:value="2.92">
            <text:p>2,92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trilac 20 kaps Wynik</text:p>
          </table:table-cell>
          <table:table-cell table:style-name="ce21"/>
          <table:table-cell table:style-name="ce29" office:value-type="currency" office:currency="PLN" office:value="2.92">
            <text:p>2,92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Troxerutin żel 0,02 g/1g 30g</text:p>
          </table:table-cell>
          <table:table-cell table:style-name="ce20" office:value-type="float" office:value="18301">
            <text:p>18301</text:p>
          </table:table-cell>
          <table:table-cell table:style-name="ce28" office:value-type="currency" office:currency="PLN" office:value="1.44">
            <text:p>1,44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Troxerutin żel 0,02 g/1g 30g Wynik</text:p>
          </table:table-cell>
          <table:table-cell table:style-name="ce21"/>
          <table:table-cell table:style-name="ce29" office:value-type="currency" office:currency="PLN" office:value="1.44">
            <text:p>1,44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TZMO Pojemnik do dobowej zbiórki moczu tulipan 2,5 l</text:p>
          </table:table-cell>
          <table:table-cell table:style-name="ce20" office:value-type="float" office:value="6579">
            <text:p>6579</text:p>
          </table:table-cell>
          <table:table-cell table:style-name="ce28" office:value-type="currency" office:currency="PLN" office:value="0.92">
            <text:p>0,92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TZMO Pojemnik do dobowej zbiórki moczu tulipan 2,5 l Wynik</text:p>
          </table:table-cell>
          <table:table-cell table:style-name="ce21"/>
          <table:table-cell table:style-name="ce29" office:value-type="currency" office:currency="PLN" office:value="0.92">
            <text:p>0,92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Ultraflex 60kaps.</text:p>
          </table:table-cell>
          <table:table-cell table:style-name="ce20" office:value-type="float" office:value="32305">
            <text:p>32305</text:p>
          </table:table-cell>
          <table:table-cell table:style-name="ce28" office:value-type="currency" office:currency="PLN" office:value="1.66">
            <text:p>1,66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Ultraflex 60kaps. Wynik</text:p>
          </table:table-cell>
          <table:table-cell table:style-name="ce21"/>
          <table:table-cell table:style-name="ce29" office:value-type="currency" office:currency="PLN" office:value="1.66">
            <text:p>1,66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Uniben Silver aerozol 30ml</text:p>
          </table:table-cell>
          <table:table-cell table:style-name="ce20" office:value-type="float" office:value="6908">
            <text:p>6908</text:p>
          </table:table-cell>
          <table:table-cell table:style-name="ce28" office:value-type="currency" office:currency="PLN" office:value="1.6">
            <text:p>1,6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Uniben Silver aerozol 30ml Wynik</text:p>
          </table:table-cell>
          <table:table-cell table:style-name="ce21"/>
          <table:table-cell table:style-name="ce29" office:value-type="currency" office:currency="PLN" office:value="1.6">
            <text:p>1,6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UPSARIN C, 20 tabletek musujących</text:p>
          </table:table-cell>
          <table:table-cell table:style-name="ce20" office:value-type="float" office:value="6364">
            <text:p>6364</text:p>
          </table:table-cell>
          <table:table-cell table:style-name="ce28" office:value-type="currency" office:currency="PLN" office:value="4.8">
            <text:p>4,80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UPSARIN C, 20 tabletek musujących Wynik</text:p>
          </table:table-cell>
          <table:table-cell table:style-name="ce21"/>
          <table:table-cell table:style-name="ce29" office:value-type="currency" office:currency="PLN" office:value="4.8">
            <text:p>4,8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Urgo Opryszczka 3ml</text:p>
          </table:table-cell>
          <table:table-cell table:style-name="ce20" office:value-type="float" office:value="8304">
            <text:p>8304</text:p>
          </table:table-cell>
          <table:table-cell table:style-name="ce28" office:value-type="currency" office:currency="PLN" office:value="0.73">
            <text:p>0,73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Urgo Opryszczka 3ml Wynik</text:p>
          </table:table-cell>
          <table:table-cell table:style-name="ce21"/>
          <table:table-cell table:style-name="ce29" office:value-type="currency" office:currency="PLN" office:value="0.73">
            <text:p>0,73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UROFEM Control 60 tabl.</text:p>
          </table:table-cell>
          <table:table-cell table:style-name="ce20" office:value-type="float" office:value="32306">
            <text:p>32306</text:p>
          </table:table-cell>
          <table:table-cell table:style-name="ce28" office:value-type="currency" office:currency="PLN" office:value="3">
            <text:p>3,00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UROFEM Control 60 tabl. Wynik</text:p>
          </table:table-cell>
          <table:table-cell table:style-name="ce21"/>
          <table:table-cell table:style-name="ce29" office:value-type="currency" office:currency="PLN" office:value="3">
            <text:p>3,0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UROFEM Żurawina 60 tabl.</text:p>
          </table:table-cell>
          <table:table-cell table:style-name="ce20" office:value-type="float" office:value="32307">
            <text:p>32307</text:p>
          </table:table-cell>
          <table:table-cell table:style-name="ce28" office:value-type="currency" office:currency="PLN" office:value="0.75">
            <text:p>0,75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UROFEM Żurawina 60 tabl. Wynik</text:p>
          </table:table-cell>
          <table:table-cell table:style-name="ce21"/>
          <table:table-cell table:style-name="ce29" office:value-type="currency" office:currency="PLN" office:value="0.75">
            <text:p>0,75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UroLact doustny Probiotyk Urologiczny 400mg, 10 kaps.</text:p>
          </table:table-cell>
          <table:table-cell table:style-name="ce20" office:value-type="float" office:value="19043">
            <text:p>19043</text:p>
          </table:table-cell>
          <table:table-cell table:style-name="ce28" office:value-type="currency" office:currency="PLN" office:value="2.25">
            <text:p>2,25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UroLact doustny Probiotyk Urologiczny 400mg, 10 kaps. Wynik</text:p>
          </table:table-cell>
          <table:table-cell table:style-name="ce21"/>
          <table:table-cell table:style-name="ce29" office:value-type="currency" office:currency="PLN" office:value="2.25">
            <text:p>2,25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Uzdrowisko Krynica Zdrój Kryniczanka lekko gazowana 0,5l</text:p>
          </table:table-cell>
          <table:table-cell table:style-name="ce20" office:value-type="float" office:value="18442">
            <text:p>18442</text:p>
          </table:table-cell>
          <table:table-cell table:style-name="ce28" office:value-type="currency" office:currency="PLN" office:value="0.63">
            <text:p>0,63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Uzdrowisko Krynica Zdrój Kryniczanka lekko gazowana 0,5l Wynik</text:p>
          </table:table-cell>
          <table:table-cell table:style-name="ce21"/>
          <table:table-cell table:style-name="ce29" office:value-type="currency" office:currency="PLN" office:value="0.63">
            <text:p>0,63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Van Oostveen Medical Strzykawka Tuberkulinowa 1ml + Igła 0,3x13 Szt</text:p>
          </table:table-cell>
          <table:table-cell table:style-name="ce20" office:value-type="float" office:value="11603">
            <text:p>11603</text:p>
          </table:table-cell>
          <table:table-cell table:style-name="ce28" office:value-type="currency" office:currency="PLN" office:value="1.58">
            <text:p>1,58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Van Oostveen Medical Strzykawka Tuberkulinowa 1ml + Igła 0,3x13 Szt Wynik</text:p>
          </table:table-cell>
          <table:table-cell table:style-name="ce21"/>
          <table:table-cell table:style-name="ce29" office:value-type="currency" office:currency="PLN" office:value="1.58">
            <text:p>1,58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Venoruton Gel 40 g</text:p>
          </table:table-cell>
          <table:table-cell table:style-name="ce20" office:value-type="float" office:value="11789">
            <text:p>11789</text:p>
          </table:table-cell>
          <table:table-cell table:style-name="ce28" office:value-type="currency" office:currency="PLN" office:value="1.6">
            <text:p>1,6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Venoruton Gel 40 g Wynik</text:p>
          </table:table-cell>
          <table:table-cell table:style-name="ce21"/>
          <table:table-cell table:style-name="ce29" office:value-type="currency" office:currency="PLN" office:value="1.6">
            <text:p>1,6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Verdin Fix Zioła Z Owocami Leśnymi 20 saszetek</text:p>
          </table:table-cell>
          <table:table-cell table:style-name="ce20" office:value-type="float" office:value="18355">
            <text:p>18355</text:p>
          </table:table-cell>
          <table:table-cell table:style-name="ce28" office:value-type="currency" office:currency="PLN" office:value="2.72">
            <text:p>2,72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Verdin Fix Zioła Z Owocami Leśnymi 20 saszetek Wynik</text:p>
          </table:table-cell>
          <table:table-cell table:style-name="ce21"/>
          <table:table-cell table:style-name="ce29" office:value-type="currency" office:currency="PLN" office:value="2.72">
            <text:p>2,72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Vichy Dercos Szampon Przeciwłupieżowy Włosy Suche Uzupełnienie 500ml</text:p>
          </table:table-cell>
          <table:table-cell table:style-name="ce20" office:value-type="float" office:value="35697">
            <text:p>35697</text:p>
          </table:table-cell>
          <table:table-cell table:style-name="ce28" office:value-type="currency" office:currency="PLN" office:value="7.6">
            <text:p>7,60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Vichy Dercos Szampon Przeciwłupieżowy Włosy Suche Uzupełnienie 500ml Wynik</text:p>
          </table:table-cell>
          <table:table-cell table:style-name="ce21"/>
          <table:table-cell table:style-name="ce29" office:value-type="currency" office:currency="PLN" office:value="7.6">
            <text:p>7,6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Vichy Neovadiol Magistral Zestaw Xmass 2025 (krem na dzień, 50 ml + krem na noc, 50 ml)</text:p>
          </table:table-cell>
          <table:table-cell table:style-name="ce20" office:value-type="float" office:value="32656">
            <text:p>32656</text:p>
          </table:table-cell>
          <table:table-cell table:style-name="ce28" office:value-type="currency" office:currency="PLN" office:value="0.95">
            <text:p>0,95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Vichy Neovadiol Magistral Zestaw Xmass 2025 (krem na dzień, 50 ml + krem na noc, 50 ml) Wynik</text:p>
          </table:table-cell>
          <table:table-cell table:style-name="ce21"/>
          <table:table-cell table:style-name="ce29" office:value-type="currency" office:currency="PLN" office:value="0.95">
            <text:p>0,95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Vicks Vaporub maść 100g</text:p>
          </table:table-cell>
          <table:table-cell table:style-name="ce20" office:value-type="float" office:value="6979">
            <text:p>6979</text:p>
          </table:table-cell>
          <table:table-cell table:style-name="ce28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Vicks Vaporub maść 100g Wynik</text:p>
          </table:table-cell>
          <table:table-cell table:style-name="ce21"/>
          <table:table-cell table:style-name="ce29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Vigantol 10ml</text:p>
          </table:table-cell>
          <table:table-cell table:style-name="ce20" office:value-type="float" office:value="11269">
            <text:p>11269</text:p>
          </table:table-cell>
          <table:table-cell table:style-name="ce28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Vigantol 10ml Wynik</text:p>
          </table:table-cell>
          <table:table-cell table:style-name="ce21"/>
          <table:table-cell table:style-name="ce29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Vinsvin Mydełko naturalne z nanosrebrem w płynie 500Ml</text:p>
          </table:table-cell>
          <table:table-cell table:style-name="ce20" office:value-type="float" office:value="4626">
            <text:p>4626</text:p>
          </table:table-cell>
          <table:table-cell table:style-name="ce28" office:value-type="currency" office:currency="PLN" office:value="3.4">
            <text:p>3,4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Vinsvin Mydełko naturalne z nanosrebrem w płynie 500Ml Wynik</text:p>
          </table:table-cell>
          <table:table-cell table:style-name="ce21"/>
          <table:table-cell table:style-name="ce29" office:value-type="currency" office:currency="PLN" office:value="3.4">
            <text:p>3,4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VIS Dolomit 0,5 g 100 tabletek</text:p>
          </table:table-cell>
          <table:table-cell table:style-name="ce20" office:value-type="float" office:value="3728">
            <text:p>3728</text:p>
          </table:table-cell>
          <table:table-cell table:style-name="ce28" office:value-type="currency" office:currency="PLN" office:value="1.74">
            <text:p>1,74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VIS Dolomit 0,5 g 100 tabletek Wynik</text:p>
          </table:table-cell>
          <table:table-cell table:style-name="ce21"/>
          <table:table-cell table:style-name="ce29" office:value-type="currency" office:currency="PLN" office:value="1.74">
            <text:p>1,74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Vita-miner Prenatal 60 tabl</text:p>
          </table:table-cell>
          <table:table-cell table:style-name="ce20" office:value-type="float" office:value="369">
            <text:p>369</text:p>
          </table:table-cell>
          <table:table-cell table:style-name="ce28" office:value-type="currency" office:currency="PLN" office:value="0.81">
            <text:p>0,81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Vita-miner Prenatal 60 tabl Wynik</text:p>
          </table:table-cell>
          <table:table-cell table:style-name="ce21"/>
          <table:table-cell table:style-name="ce29" office:value-type="currency" office:currency="PLN" office:value="0.81">
            <text:p>0,81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VITAPRIM Senior 60 tabl.</text:p>
          </table:table-cell>
          <table:table-cell table:style-name="ce20" office:value-type="float" office:value="32314">
            <text:p>32314</text:p>
          </table:table-cell>
          <table:table-cell table:style-name="ce28" office:value-type="currency" office:currency="PLN" office:value="2.76">
            <text:p>2,76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VITAPRIM Senior 60 tabl. Wynik</text:p>
          </table:table-cell>
          <table:table-cell table:style-name="ce21"/>
          <table:table-cell table:style-name="ce29" office:value-type="currency" office:currency="PLN" office:value="2.76">
            <text:p>2,76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Vitrum D3 Forte 2000 J.M. 120 kaps.</text:p>
          </table:table-cell>
          <table:table-cell table:style-name="ce20" office:value-type="float" office:value="5579">
            <text:p>5579</text:p>
          </table:table-cell>
          <table:table-cell table:style-name="ce28" office:value-type="currency" office:currency="PLN" office:value="1.6">
            <text:p>1,60 zł</text:p>
          </table:table-cell>
          <table:table-cell table:number-columns-repeated="1021"/>
        </table:table-row>
        <table:table-row table:style-name="ro14">
          <table:table-cell table:style-name="ce14" office:value-type="string">
            <text:p>Vitrum D3 Forte 2000 J.M. 120 kaps. Wynik</text:p>
          </table:table-cell>
          <table:table-cell table:style-name="ce21"/>
          <table:table-cell table:style-name="ce29" office:value-type="currency" office:currency="PLN" office:value="1.6">
            <text:p>1,6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VITTER Calcium z Vit. C FORTE o smaku pomarańczowym, 20 tab. musujących</text:p>
          </table:table-cell>
          <table:table-cell table:style-name="ce20" office:value-type="float" office:value="15027">
            <text:p>15027</text:p>
          </table:table-cell>
          <table:table-cell table:style-name="ce28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VITTER Calcium z Vit. C FORTE o smaku pomarańczowym, 20 tab. musujących Wynik</text:p>
          </table:table-cell>
          <table:table-cell table:style-name="ce21"/>
          <table:table-cell table:style-name="ce29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Vivomixx Mikrokapsułki 10 mld 30 kapsułek</text:p>
          </table:table-cell>
          <table:table-cell table:style-name="ce20" office:value-type="float" office:value="596">
            <text:p>596</text:p>
          </table:table-cell>
          <table:table-cell table:style-name="ce28" office:value-type="currency" office:currency="PLN" office:value="2.37">
            <text:p>2,37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Vivomixx Mikrokapsułki 10 mld 30 kapsułek Wynik</text:p>
          </table:table-cell>
          <table:table-cell table:style-name="ce21"/>
          <table:table-cell table:style-name="ce29" office:value-type="currency" office:currency="PLN" office:value="2.37">
            <text:p>2,37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Voltaren Emulgel 1% żel 0,01 g/g 100 g (Import równoległy)</text:p>
          </table:table-cell>
          <table:table-cell table:style-name="ce20" office:value-type="float" office:value="14669">
            <text:p>14669</text:p>
          </table:table-cell>
          <table:table-cell table:style-name="ce28" office:value-type="currency" office:currency="PLN" office:value="4.35">
            <text:p>4,35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Voltaren Emulgel 1% żel 0,01 g/g 100 g (Import równoległy) Wynik</text:p>
          </table:table-cell>
          <table:table-cell table:style-name="ce21"/>
          <table:table-cell table:style-name="ce29" office:value-type="currency" office:currency="PLN" office:value="4.35">
            <text:p>4,35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Voltaren Emulgel 11,6mg/g żel 50g</text:p>
          </table:table-cell>
          <table:table-cell table:style-name="ce20" office:value-type="float" office:value="7178">
            <text:p>7178</text:p>
          </table:table-cell>
          <table:table-cell table:style-name="ce28" office:value-type="currency" office:currency="PLN" office:value="5.22">
            <text:p>5,22 zł</text:p>
          </table:table-cell>
          <table:table-cell table:number-columns-repeated="1021"/>
        </table:table-row>
        <table:table-row table:style-name="ro15">
          <table:table-cell table:style-name="ce14" office:value-type="string">
            <text:p>Voltaren Emulgel 11,6mg/g żel 50g Wynik</text:p>
          </table:table-cell>
          <table:table-cell table:style-name="ce21"/>
          <table:table-cell table:style-name="ce29" office:value-type="currency" office:currency="PLN" office:value="5.22">
            <text:p>5,22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WALMARK Omega 3-6-9 Kapsułki z kompleksem olejów rybiego, lnianego i z ogórecznika 30 szt.</text:p>
          </table:table-cell>
          <table:table-cell table:style-name="ce20" office:value-type="float" office:value="17493">
            <text:p>17493</text:p>
          </table:table-cell>
          <table:table-cell table:style-name="ce28" office:value-type="currency" office:currency="PLN" office:value="1.66">
            <text:p>1,66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WALMARK Omega 3-6-9 Kapsułki z kompleksem olejów rybiego, lnianego i z ogórecznika 30 szt. Wynik</text:p>
          </table:table-cell>
          <table:table-cell table:style-name="ce21"/>
          <table:table-cell table:style-name="ce29" office:value-type="currency" office:currency="PLN" office:value="1.66">
            <text:p>1,66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Wellion Symphar Test Paskowy 50 szt.</text:p>
          </table:table-cell>
          <table:table-cell table:style-name="ce20" office:value-type="float" office:value="9226">
            <text:p>9226</text:p>
          </table:table-cell>
          <table:table-cell table:style-name="ce28" office:value-type="currency" office:currency="PLN" office:value="0.68">
            <text:p>0,68 zł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Wellion Symphar Test Paskowy 50 szt. Wynik</text:p>
          </table:table-cell>
          <table:table-cell table:style-name="ce21"/>
          <table:table-cell table:style-name="ce29" office:value-type="currency" office:currency="PLN" office:value="0.68">
            <text:p>0,68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XENNA balance 6 sasz.</text:p>
          </table:table-cell>
          <table:table-cell table:style-name="ce20" office:value-type="float" office:value="10167">
            <text:p>10167</text:p>
          </table:table-cell>
          <table:table-cell table:style-name="ce28" office:value-type="currency" office:currency="PLN" office:value="0.73">
            <text:p>0,73 zł</text:p>
          </table:table-cell>
          <table:table-cell table:number-columns-repeated="1021"/>
        </table:table-row>
        <table:table-row table:style-name="ro8">
          <table:table-cell table:style-name="ce14" office:value-type="string">
            <text:p>XENNA balance 6 sasz. Wynik</text:p>
          </table:table-cell>
          <table:table-cell table:style-name="ce21"/>
          <table:table-cell table:style-name="ce29" office:value-type="currency" office:currency="PLN" office:value="0.73">
            <text:p>0,73 zł</text:p>
          </table:table-cell>
          <table:table-cell table:number-columns-repeated="1021"/>
        </table:table-row>
        <table:table-row table:style-name="ro13">
          <table:table-cell table:style-name="ce15" office:value-type="string">
            <text:p>Zambon Fluimucil Forte 600 Mg 10 Tabl.</text:p>
          </table:table-cell>
          <table:table-cell table:style-name="ce22" office:value-type="float" office:value="3997">
            <text:p>3997</text:p>
          </table:table-cell>
          <table:table-cell table:style-name="ce30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2">
          <table:table-cell table:style-name="ce16"/>
          <table:table-cell table:style-name="ce23" office:value-type="float" office:value="18574">
            <text:p>18574</text:p>
          </table:table-cell>
          <table:table-cell table:style-name="ce31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Zambon Fluimucil Forte 600 Mg 10 Tabl. Wynik</text:p>
          </table:table-cell>
          <table:table-cell table:style-name="ce21"/>
          <table:table-cell table:style-name="ce29" office:value-type="currency" office:currency="PLN" office:value="1.6">
            <text:p>1,6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Zarys Worek Do Zbiórki Moczu Odpływ T 2l</text:p>
          </table:table-cell>
          <table:table-cell table:style-name="ce20" office:value-type="float" office:value="5632">
            <text:p>5632</text:p>
          </table:table-cell>
          <table:table-cell table:style-name="ce28" office:value-type="currency" office:currency="PLN" office:value="1.84">
            <text:p>1,84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Zarys Worek Do Zbiórki Moczu Odpływ T 2l Wynik</text:p>
          </table:table-cell>
          <table:table-cell table:style-name="ce21"/>
          <table:table-cell table:style-name="ce29" office:value-type="currency" office:currency="PLN" office:value="1.84">
            <text:p>1,84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Zatoxin Katar I Alergia Spray Do Nosa 30Ml</text:p>
          </table:table-cell>
          <table:table-cell table:style-name="ce20" office:value-type="float" office:value="15846">
            <text:p>15846</text:p>
          </table:table-cell>
          <table:table-cell table:style-name="ce28" office:value-type="currency" office:currency="PLN" office:value="4.8">
            <text:p>4,8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Zatoxin Katar I Alergia Spray Do Nosa 30Ml Wynik</text:p>
          </table:table-cell>
          <table:table-cell table:style-name="ce21"/>
          <table:table-cell table:style-name="ce29" office:value-type="currency" office:currency="PLN" office:value="4.8">
            <text:p>4,8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Ziaja Sopot Sun Krem Przeciw Zmarszczkom Spf30 60 ml</text:p>
          </table:table-cell>
          <table:table-cell table:style-name="ce20" office:value-type="float" office:value="5749">
            <text:p>5749</text:p>
          </table:table-cell>
          <table:table-cell table:style-name="ce28" office:value-type="currency" office:currency="PLN" office:value="0.89">
            <text:p>0,89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Ziaja Sopot Sun Krem Przeciw Zmarszczkom Spf30 60 ml Wynik</text:p>
          </table:table-cell>
          <table:table-cell table:style-name="ce21"/>
          <table:table-cell table:style-name="ce29" office:value-type="currency" office:currency="PLN" office:value="0.89">
            <text:p>0,89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Zioł.Koszyczek Arniki zioło pojed. 25 g</text:p>
          </table:table-cell>
          <table:table-cell table:style-name="ce20" office:value-type="float" office:value="18460">
            <text:p>18460</text:p>
          </table:table-cell>
          <table:table-cell table:style-name="ce28" office:value-type="currency" office:currency="PLN" office:value="1.36">
            <text:p>1,36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Zioł.Koszyczek Arniki zioło pojed. 25 g Wynik</text:p>
          </table:table-cell>
          <table:table-cell table:style-name="ce21"/>
          <table:table-cell table:style-name="ce29" office:value-type="currency" office:currency="PLN" office:value="1.36">
            <text:p>1,36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Zioła Mnicha Na cholesterol 20tbx2g</text:p>
          </table:table-cell>
          <table:table-cell table:style-name="ce20" office:value-type="float" office:value="14716">
            <text:p>14716</text:p>
          </table:table-cell>
          <table:table-cell table:style-name="ce28" office:value-type="currency" office:currency="PLN" office:value="1.36">
            <text:p>1,36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Zioła Mnicha Na cholesterol 20tbx2g Wynik</text:p>
          </table:table-cell>
          <table:table-cell table:style-name="ce21"/>
          <table:table-cell table:style-name="ce29" office:value-type="currency" office:currency="PLN" office:value="1.36">
            <text:p>1,36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Zioła Mnicha Na cukier 20tbx2g</text:p>
          </table:table-cell>
          <table:table-cell table:style-name="ce20" office:value-type="float" office:value="27922">
            <text:p>27922</text:p>
          </table:table-cell>
          <table:table-cell table:style-name="ce28" office:value-type="currency" office:currency="PLN" office:value="1.36">
            <text:p>1,36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Zioła Mnicha Na cukier 20tbx2g Wynik</text:p>
          </table:table-cell>
          <table:table-cell table:style-name="ce21"/>
          <table:table-cell table:style-name="ce29" office:value-type="currency" office:currency="PLN" office:value="1.36">
            <text:p>1,36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Zioła Mnicha Na odchudzanie 20tbx2g</text:p>
          </table:table-cell>
          <table:table-cell table:style-name="ce20" office:value-type="float" office:value="18545">
            <text:p>18545</text:p>
          </table:table-cell>
          <table:table-cell table:style-name="ce28" office:value-type="currency" office:currency="PLN" office:value="3.4">
            <text:p>3,4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Zioła Mnicha Na odchudzanie 20tbx2g Wynik</text:p>
          </table:table-cell>
          <table:table-cell table:style-name="ce21"/>
          <table:table-cell table:style-name="ce29" office:value-type="currency" office:currency="PLN" office:value="3.4">
            <text:p>3,4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Zioła Mnicha Na trawienie 20tbx2g</text:p>
          </table:table-cell>
          <table:table-cell table:style-name="ce20" office:value-type="float" office:value="18546">
            <text:p>18546</text:p>
          </table:table-cell>
          <table:table-cell table:style-name="ce28" office:value-type="currency" office:currency="PLN" office:value="2.72">
            <text:p>2,72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Zioła Mnicha Na trawienie 20tbx2g Wynik</text:p>
          </table:table-cell>
          <table:table-cell table:style-name="ce21"/>
          <table:table-cell table:style-name="ce29" office:value-type="currency" office:currency="PLN" office:value="2.72">
            <text:p>2,72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Zoxin-med Szampon leczniczy przeciwłupieżowy 60ml</text:p>
          </table:table-cell>
          <table:table-cell table:style-name="ce20" office:value-type="float" office:value="27925">
            <text:p>27925</text:p>
          </table:table-cell>
          <table:table-cell table:style-name="ce28" office:value-type="currency" office:currency="PLN" office:value="0.72">
            <text:p>0,72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Zoxin-med Szampon leczniczy przeciwłupieżowy 60ml Wynik</text:p>
          </table:table-cell>
          <table:table-cell table:style-name="ce21"/>
          <table:table-cell table:style-name="ce29" office:value-type="currency" office:currency="PLN" office:value="0.72">
            <text:p>0,72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Zyskaj Zdrowie Magnez+B1 B6 B12 30 tabl.</text:p>
          </table:table-cell>
          <table:table-cell table:style-name="ce20" office:value-type="float" office:value="17199">
            <text:p>17199</text:p>
          </table:table-cell>
          <table:table-cell table:style-name="ce28" office:value-type="currency" office:currency="PLN" office:value="2.4">
            <text:p>2,4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Zyskaj Zdrowie Magnez+B1 B6 B12 30 tabl. Wynik</text:p>
          </table:table-cell>
          <table:table-cell table:style-name="ce21"/>
          <table:table-cell table:style-name="ce29" office:value-type="currency" office:currency="PLN" office:value="2.4">
            <text:p>2,4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ZYSKAJ ZDROWIE Multioptic 30 tabl</text:p>
          </table:table-cell>
          <table:table-cell table:style-name="ce20" office:value-type="float" office:value="17350">
            <text:p>17350</text:p>
          </table:table-cell>
          <table:table-cell table:style-name="ce28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ZYSKAJ ZDROWIE Multioptic 30 tabl Wynik</text:p>
          </table:table-cell>
          <table:table-cell table:style-name="ce21"/>
          <table:table-cell table:style-name="ce29" office:value-type="currency" office:currency="PLN" office:value="0.8">
            <text:p>0,80 zł</text:p>
          </table:table-cell>
          <table:table-cell table:number-columns-repeated="1021"/>
        </table:table-row>
        <table:table-row table:style-name="ro12">
          <table:table-cell table:style-name="ce13" office:value-type="string">
            <text:p>Zyskaj Zdrowie Żel kasztanowy z rutyną 350g</text:p>
          </table:table-cell>
          <table:table-cell table:style-name="ce20" office:value-type="float" office:value="17011">
            <text:p>17011</text:p>
          </table:table-cell>
          <table:table-cell table:style-name="ce28" office:value-type="currency" office:currency="PLN" office:value="2.31">
            <text:p>2,31 zł</text:p>
          </table:table-cell>
          <table:table-cell table:number-columns-repeated="1021"/>
        </table:table-row>
        <table:table-row table:style-name="ro7">
          <table:table-cell table:style-name="ce14" office:value-type="string">
            <text:p>Zyskaj Zdrowie Żel kasztanowy z rutyną 350g Wynik</text:p>
          </table:table-cell>
          <table:table-cell table:style-name="ce21"/>
          <table:table-cell table:style-name="ce29" office:value-type="currency" office:currency="PLN" office:value="2.31">
            <text:p>2,31 zł</text:p>
          </table:table-cell>
          <table:table-cell table:number-columns-repeated="1021"/>
        </table:table-row>
        <table:table-row table:style-name="ro7">
          <table:table-cell table:style-name="ce17" office:value-type="string">
            <text:p>Suma Wynik</text:p>
          </table:table-cell>
          <table:table-cell table:style-name="ce24"/>
          <table:table-cell table:style-name="ce32" office:value-type="currency" office:currency="PLN" office:value="905.459999999995">
            <text:p>905,46 zł</text:p>
          </table:table-cell>
          <table:table-cell table:number-columns-repeated="1021"/>
        </table:table-row>
        <table:table-row table:style-name="ro9" table:number-rows-repeated="104780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CENEO-obrobione " table:style-name="ta4" table:print="false">
        <office:forms form:automatic-focus="false" form:apply-design-mode="false"/>
        <table:table-column table:style-name="co18" table:number-columns-repeated="1024" table:default-cell-style-name="Default"/>
        <table:table-row table:style-name="ro16">
          <table:table-cell table:style-name="ce33" office:value-type="string">
            <text:p>Produkt</text:p>
          </table:table-cell>
          <table:table-cell table:style-name="ce33" office:value-type="string">
            <text:p>Id_produktu_w_sklepie</text:p>
          </table:table-cell>
          <table:table-cell table:style-name="ce33" office:value-type="string">
            <text:p>Stawka_przekliku (Suma)</text:p>
          </table:table-cell>
          <table:table-cell table:style-name="ce35" table:number-columns-repeated="2"/>
          <table:table-cell table:number-columns-repeated="1019"/>
        </table:table-row>
        <table:table-row table:style-name="ro17">
          <table:table-cell table:style-name="ce33" office:value-type="string">
            <text:p>Otrivin Menthol 1mg/ml Aerozol do nosa 10 ml</text:p>
          </table:table-cell>
          <table:table-cell table:style-name="ce34" office:value-type="float" office:value="14886">
            <text:p>14886</text:p>
          </table:table-cell>
          <table:table-cell table:style-name="ce36" office:value-type="currency" office:currency="PLN" office:value="24.8">
            <text:p>24,80 zł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3" office:value-type="string">
            <text:p>Microlife MT 16C2</text:p>
          </table:table-cell>
          <table:table-cell table:style-name="ce34" office:value-type="float" office:value="9695">
            <text:p>9695</text:p>
          </table:table-cell>
          <table:table-cell table:style-name="ce36" office:value-type="currency" office:currency="PLN" office:value="24.72">
            <text:p>24,72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Inversion Femme Complex 90kaps.</text:p>
          </table:table-cell>
          <table:table-cell table:style-name="ce34" office:value-type="float" office:value="12016">
            <text:p>12016</text:p>
          </table:table-cell>
          <table:table-cell table:style-name="ce36" office:value-type="currency" office:currency="PLN" office:value="14.88">
            <text:p>14,88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BODYMAX PLUS Multiwitamina Odporność Energia 200 tab.</text:p>
          </table:table-cell>
          <table:table-cell table:style-name="ce34" office:value-type="float" office:value="16252">
            <text:p>16252</text:p>
          </table:table-cell>
          <table:table-cell table:style-name="ce36" office:value-type="currency" office:currency="PLN" office:value="14.4">
            <text:p>14,40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Nizoral Krem 20mg/g 30 g</text:p>
          </table:table-cell>
          <table:table-cell table:style-name="ce34" office:value-type="float" office:value="9594">
            <text:p>9594</text:p>
          </table:table-cell>
          <table:table-cell table:style-name="ce36" office:value-type="currency" office:currency="PLN" office:value="12.24">
            <text:p>12,24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Juvit Multi krople doustne 10ml</text:p>
          </table:table-cell>
          <table:table-cell table:style-name="ce34" office:value-type="float" office:value="6099">
            <text:p>6099</text:p>
          </table:table-cell>
          <table:table-cell table:style-name="ce36" office:value-type="currency" office:currency="PLN" office:value="11.06">
            <text:p>11,06 zł</text:p>
          </table:table-cell>
          <table:table-cell table:style-name="ce35" table:number-columns-repeated="2"/>
          <table:table-cell table:number-columns-repeated="1019"/>
        </table:table-row>
        <table:table-row table:style-name="ro20">
          <table:table-cell table:style-name="ce33" office:value-type="string">
            <text:p>Krem Nuxe Prodigieuse Florale Zestaw z kosmetyczką podróżną 2024</text:p>
          </table:table-cell>
          <table:table-cell table:style-name="ce34" office:value-type="float" office:value="28311">
            <text:p>28311</text:p>
          </table:table-cell>
          <table:table-cell table:style-name="ce36" office:value-type="currency" office:currency="PLN" office:value="10.45">
            <text:p>10,45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Estabiom Junior 20kaps.</text:p>
          </table:table-cell>
          <table:table-cell table:style-name="ce34" office:value-type="float" office:value="6953">
            <text:p>6953</text:p>
          </table:table-cell>
          <table:table-cell table:style-name="ce36" office:value-type="currency" office:currency="PLN" office:value="10.4">
            <text:p>10,40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Borowina Lecznicza Pasta 1 Kg</text:p>
          </table:table-cell>
          <table:table-cell table:style-name="ce34" office:value-type="float" office:value="4899">
            <text:p>4899</text:p>
          </table:table-cell>
          <table:table-cell table:style-name="ce36" office:value-type="currency" office:currency="PLN" office:value="9.57">
            <text:p>9,57 zł</text:p>
          </table:table-cell>
          <table:table-cell table:style-name="ce35" table:number-columns-repeated="2"/>
          <table:table-cell table:number-columns-repeated="1019"/>
        </table:table-row>
        <table:table-row table:style-name="ro20">
          <table:table-cell table:style-name="ce33" office:value-type="string">
            <text:p>NIQUITIN przezroczysty, plastry transdermalne, 21 mg / 24 h, 7 szt</text:p>
          </table:table-cell>
          <table:table-cell table:style-name="ce34" office:value-type="float" office:value="9593">
            <text:p>9593</text:p>
          </table:table-cell>
          <table:table-cell table:style-name="ce36" office:value-type="currency" office:currency="PLN" office:value="9.57">
            <text:p>9,57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Avene Sunsimed Ka Bardzo Wysoka Ochrona 80ml</text:p>
          </table:table-cell>
          <table:table-cell table:style-name="ce34" office:value-type="float" office:value="28241">
            <text:p>28241</text:p>
          </table:table-cell>
          <table:table-cell table:style-name="ce36" office:value-type="currency" office:currency="PLN" office:value="9.5">
            <text:p>9,50 zł</text:p>
          </table:table-cell>
          <table:table-cell table:style-name="ce35" table:number-columns-repeated="2"/>
          <table:table-cell table:number-columns-repeated="1019"/>
        </table:table-row>
        <table:table-row table:style-name="ro22">
          <table:table-cell table:style-name="ce33" office:value-type="string">
            <text:p>Caudalie Vinoperfect Zestaw Wiosenny - Serum Rozjaśniające, 30ml + Krem na Dzień, 15ml + Krem na Noc, 15ml</text:p>
          </table:table-cell>
          <table:table-cell table:style-name="ce34" office:value-type="float" office:value="36451">
            <text:p>36451</text:p>
          </table:table-cell>
          <table:table-cell table:style-name="ce36" office:value-type="currency" office:currency="PLN" office:value="9.5">
            <text:p>9,50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Gynoxin Optima 200mg 3kaps.</text:p>
          </table:table-cell>
          <table:table-cell table:style-name="ce34" office:value-type="float" office:value="9579">
            <text:p>9579</text:p>
          </table:table-cell>
          <table:table-cell table:style-name="ce36" office:value-type="currency" office:currency="PLN" office:value="8.8">
            <text:p>8,80 zł</text:p>
          </table:table-cell>
          <table:table-cell table:style-name="ce35" table:number-columns-repeated="2"/>
          <table:table-cell table:number-columns-repeated="1019"/>
        </table:table-row>
        <table:table-row table:style-name="ro20">
          <table:table-cell table:style-name="ce33" office:value-type="string">
            <text:p>Emolium Dermocare Nawilżający Olejek do mycia 400 ml</text:p>
          </table:table-cell>
          <table:table-cell table:style-name="ce34" office:value-type="float" office:value="7660">
            <text:p>7660</text:p>
          </table:table-cell>
          <table:table-cell table:style-name="ce36" office:value-type="currency" office:currency="PLN" office:value="8.55">
            <text:p>8,55 zł</text:p>
          </table:table-cell>
          <table:table-cell table:style-name="ce35" table:number-columns-repeated="2"/>
          <table:table-cell table:number-columns-repeated="1019"/>
        </table:table-row>
        <table:table-row table:style-name="ro23">
          <table:table-cell table:style-name="ce33" office:value-type="string">
            <text:p>NESTLE NAN OPTIPRO Plus 1 HM-O Mleko Początkowe dla niemowląt od urodzenia 400g</text:p>
          </table:table-cell>
          <table:table-cell table:style-name="ce34" office:value-type="float" office:value="17320">
            <text:p>17320</text:p>
          </table:table-cell>
          <table:table-cell table:style-name="ce36" office:value-type="currency" office:currency="PLN" office:value="8">
            <text:p>8,00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Avene Hyaluron Activ B3 Krem Na Noc 50ml + Pod Oczy 15ml</text:p>
          </table:table-cell>
          <table:table-cell table:style-name="ce34" office:value-type="float" office:value="32646">
            <text:p>32646</text:p>
          </table:table-cell>
          <table:table-cell table:style-name="ce36" office:value-type="currency" office:currency="PLN" office:value="7.6">
            <text:p>7,60 zł</text:p>
          </table:table-cell>
          <table:table-cell table:style-name="ce35" table:number-columns-repeated="2"/>
          <table:table-cell table:number-columns-repeated="1019"/>
        </table:table-row>
        <table:table-row table:style-name="ro23">
          <table:table-cell table:style-name="ce33" office:value-type="string">
            <text:p>Vichy Dercos Szampon Przeciwłupieżowy Włosy Suche Uzupełnienie 500ml</text:p>
          </table:table-cell>
          <table:table-cell table:style-name="ce34" office:value-type="float" office:value="35697">
            <text:p>35697</text:p>
          </table:table-cell>
          <table:table-cell table:style-name="ce36" office:value-type="currency" office:currency="PLN" office:value="7.6">
            <text:p>7,60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Fenistil Krople doustne 1mg/1ml 20ml (Import równoległy)</text:p>
          </table:table-cell>
          <table:table-cell table:style-name="ce34" office:value-type="float" office:value="8335">
            <text:p>8335</text:p>
          </table:table-cell>
          <table:table-cell table:style-name="ce36" office:value-type="currency" office:currency="PLN" office:value="7.2">
            <text:p>7,20 zł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3" office:value-type="string">
            <text:p>Aronta 30 tabl</text:p>
          </table:table-cell>
          <table:table-cell table:style-name="ce34" office:value-type="float" office:value="658">
            <text:p>658</text:p>
          </table:table-cell>
          <table:table-cell table:style-name="ce36" office:value-type="currency" office:currency="PLN" office:value="7.11">
            <text:p>7,11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Tabletki NervoCalm Forte 20 szt.</text:p>
          </table:table-cell>
          <table:table-cell table:style-name="ce34" office:value-type="float" office:value="12744">
            <text:p>12744</text:p>
          </table:table-cell>
          <table:table-cell table:style-name="ce36" office:value-type="currency" office:currency="PLN" office:value="7.11">
            <text:p>7,11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Miovelia Nac 15 kaps.</text:p>
          </table:table-cell>
          <table:table-cell table:style-name="ce34" office:value-type="float" office:value="11821">
            <text:p>11821</text:p>
          </table:table-cell>
          <table:table-cell table:style-name="ce36" office:value-type="currency" office:currency="PLN" office:value="6.75">
            <text:p>6,75 zł</text:p>
          </table:table-cell>
          <table:table-cell table:style-name="ce35" table:number-columns-repeated="2"/>
          <table:table-cell table:number-columns-repeated="1019"/>
        </table:table-row>
        <table:table-row table:style-name="ro20">
          <table:table-cell table:style-name="ce33" office:value-type="string">
            <text:p>AFLOFARM Nivelium med krem dermatologiczny 250ml</text:p>
          </table:table-cell>
          <table:table-cell table:style-name="ce34" office:value-type="float" office:value="8641">
            <text:p>8641</text:p>
          </table:table-cell>
          <table:table-cell table:style-name="ce36" office:value-type="currency" office:currency="PLN" office:value="6.65">
            <text:p>6,65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Pantoprazol Teva 20 mg 14 tabl.</text:p>
          </table:table-cell>
          <table:table-cell table:style-name="ce34" office:value-type="float" office:value="9938">
            <text:p>9938</text:p>
          </table:table-cell>
          <table:table-cell table:style-name="ce36" office:value-type="currency" office:currency="PLN" office:value="6.57">
            <text:p>6,57 zł</text:p>
          </table:table-cell>
          <table:table-cell table:style-name="ce35" table:number-columns-repeated="2"/>
          <table:table-cell table:number-columns-repeated="1019"/>
        </table:table-row>
        <table:table-row table:style-name="ro20">
          <table:table-cell table:style-name="ce33" office:value-type="string">
            <text:p>Rennie Antiacidum o smaku miętowym 48 tabletek do ssania</text:p>
          </table:table-cell>
          <table:table-cell table:style-name="ce34" office:value-type="float" office:value="15795">
            <text:p>15795</text:p>
          </table:table-cell>
          <table:table-cell table:style-name="ce36" office:value-type="currency" office:currency="PLN" office:value="6.57">
            <text:p>6,57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Sora Protect - aerozol na włosy zapobiegający wszawicy 50ml</text:p>
          </table:table-cell>
          <table:table-cell table:style-name="ce34" office:value-type="float" office:value="6881">
            <text:p>6881</text:p>
          </table:table-cell>
          <table:table-cell table:style-name="ce36" office:value-type="currency" office:currency="PLN" office:value="6.48">
            <text:p>6,48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Berimal Forte 60kaps.</text:p>
          </table:table-cell>
          <table:table-cell table:style-name="ce34" office:value-type="float" office:value="19109">
            <text:p>19109</text:p>
          </table:table-cell>
          <table:table-cell table:style-name="ce36" office:value-type="currency" office:currency="PLN" office:value="5.81">
            <text:p>5,81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NordFarm Glukozamina 500 Plus 90tabl.</text:p>
          </table:table-cell>
          <table:table-cell table:style-name="ce34" office:value-type="float" office:value="4048">
            <text:p>4048</text:p>
          </table:table-cell>
          <table:table-cell table:style-name="ce36" office:value-type="currency" office:currency="PLN" office:value="5.81">
            <text:p>5,81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Avene Dermabsolu Krem Na Noc 50ml + Pod Oczy 15ml</text:p>
          </table:table-cell>
          <table:table-cell table:style-name="ce34" office:value-type="float" office:value="32643">
            <text:p>32643</text:p>
          </table:table-cell>
          <table:table-cell table:style-name="ce36" office:value-type="currency" office:currency="PLN" office:value="5.7">
            <text:p>5,70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Biofarm Vigalex D3 + K2 Max 60 tabl.</text:p>
          </table:table-cell>
          <table:table-cell table:style-name="ce34" office:value-type="float" office:value="18365">
            <text:p>18365</text:p>
          </table:table-cell>
          <table:table-cell table:style-name="ce36" office:value-type="currency" office:currency="PLN" office:value="5.6">
            <text:p>5,60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Daopro 30 Minitabl. Dojelitowych</text:p>
          </table:table-cell>
          <table:table-cell table:style-name="ce34" office:value-type="float" office:value="19374">
            <text:p>19374</text:p>
          </table:table-cell>
          <table:table-cell table:style-name="ce36" office:value-type="currency" office:currency="PLN" office:value="5.6">
            <text:p>5,60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HYDROSLIMMER 30 tabl.</text:p>
          </table:table-cell>
          <table:table-cell table:style-name="ce34" office:value-type="float" office:value="32282">
            <text:p>32282</text:p>
          </table:table-cell>
          <table:table-cell table:style-name="ce36" office:value-type="currency" office:currency="PLN" office:value="5.6">
            <text:p>5,60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Otrivin Ipra Max 0,5mg + 0,6mg Aerozol do nosa 10ml</text:p>
          </table:table-cell>
          <table:table-cell table:style-name="ce34" office:value-type="float" office:value="6211">
            <text:p>6211</text:p>
          </table:table-cell>
          <table:table-cell table:style-name="ce36" office:value-type="currency" office:currency="PLN" office:value="5.6">
            <text:p>5,60 zł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3" office:value-type="string">
            <text:p>Sufrin 60tabl.</text:p>
          </table:table-cell>
          <table:table-cell table:style-name="ce34" office:value-type="float" office:value="5345">
            <text:p>5345</text:p>
          </table:table-cell>
          <table:table-cell table:style-name="ce36" office:value-type="currency" office:currency="PLN" office:value="5.6">
            <text:p>5,60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Kropia Plus krople do oczu nawilżające 10ml</text:p>
          </table:table-cell>
          <table:table-cell table:style-name="ce34" office:value-type="float" office:value="29313">
            <text:p>29313</text:p>
          </table:table-cell>
          <table:table-cell table:style-name="ce36" office:value-type="currency" office:currency="PLN" office:value="5.53">
            <text:p>5,53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Voltaren Emulgel 11,6mg/g żel 50g</text:p>
          </table:table-cell>
          <table:table-cell table:style-name="ce34" office:value-type="float" office:value="7178">
            <text:p>7178</text:p>
          </table:table-cell>
          <table:table-cell table:style-name="ce36" office:value-type="currency" office:currency="PLN" office:value="5.22">
            <text:p>5,22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Eva/Qu czopki przeciw zaparciom 6 czopków</text:p>
          </table:table-cell>
          <table:table-cell table:style-name="ce34" office:value-type="float" office:value="3918">
            <text:p>3918</text:p>
          </table:table-cell>
          <table:table-cell table:style-name="ce36" office:value-type="currency" office:currency="PLN" office:value="5.11">
            <text:p>5,11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CAUDALIE Samoopalające krople brązujące 15 ml</text:p>
          </table:table-cell>
          <table:table-cell table:style-name="ce34" office:value-type="float" office:value="31976">
            <text:p>31976</text:p>
          </table:table-cell>
          <table:table-cell table:style-name="ce36" office:value-type="currency" office:currency="PLN" office:value="4.86">
            <text:p>4,86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Gynoxin Uno 0,6G 1kaps.</text:p>
          </table:table-cell>
          <table:table-cell table:style-name="ce34" office:value-type="float" office:value="10753">
            <text:p>10753</text:p>
          </table:table-cell>
          <table:table-cell table:style-name="ce36" office:value-type="currency" office:currency="PLN" office:value="4.8">
            <text:p>4,80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UPSARIN C, 20 tabletek musujących</text:p>
          </table:table-cell>
          <table:table-cell table:style-name="ce34" office:value-type="float" office:value="6364">
            <text:p>6364</text:p>
          </table:table-cell>
          <table:table-cell table:style-name="ce36" office:value-type="currency" office:currency="PLN" office:value="4.8">
            <text:p>4,80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Zatoxin Katar I Alergia Spray Do Nosa 30Ml</text:p>
          </table:table-cell>
          <table:table-cell table:style-name="ce34" office:value-type="float" office:value="15846">
            <text:p>15846</text:p>
          </table:table-cell>
          <table:table-cell table:style-name="ce36" office:value-type="currency" office:currency="PLN" office:value="4.8">
            <text:p>4,80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Accu-Chek Nakłuwacz FastClix + 6 lancetów</text:p>
          </table:table-cell>
          <table:table-cell table:style-name="ce34" office:value-type="float" office:value="8385">
            <text:p>8385</text:p>
          </table:table-cell>
          <table:table-cell table:style-name="ce36" office:value-type="currency" office:currency="PLN" office:value="4.76">
            <text:p>4,76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Avene HYDRANCE UV Lekki krem nawilżający SPF 30 40ml</text:p>
          </table:table-cell>
          <table:table-cell table:style-name="ce34" office:value-type="float" office:value="9958">
            <text:p>9958</text:p>
          </table:table-cell>
          <table:table-cell table:style-name="ce36" office:value-type="currency" office:currency="PLN" office:value="4.75">
            <text:p>4,75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DUCRAY KERACNYL Repair Balsam do ust 15ml</text:p>
          </table:table-cell>
          <table:table-cell table:style-name="ce34" office:value-type="float" office:value="32640">
            <text:p>32640</text:p>
          </table:table-cell>
          <table:table-cell table:style-name="ce36" office:value-type="currency" office:currency="PLN" office:value="4.75">
            <text:p>4,75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Emolium DERMOCARE Krem przeciw odparzeniom 75ml</text:p>
          </table:table-cell>
          <table:table-cell table:style-name="ce34" office:value-type="float" office:value="337">
            <text:p>337</text:p>
          </table:table-cell>
          <table:table-cell table:style-name="ce36" office:value-type="currency" office:currency="PLN" office:value="4.75">
            <text:p>4,75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La Roche-Posay Hyalu B5 Aquagel Żel Nawilżający Spf 30 50Ml</text:p>
          </table:table-cell>
          <table:table-cell table:style-name="ce34" office:value-type="float" office:value="18852">
            <text:p>18852</text:p>
          </table:table-cell>
          <table:table-cell table:style-name="ce36" office:value-type="currency" office:currency="PLN" office:value="4.75">
            <text:p>4,75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Gorvita Żel żywokostowy z jałowcem i MSM 200ml</text:p>
          </table:table-cell>
          <table:table-cell table:style-name="ce34" office:value-type="float" office:value="11273">
            <text:p>11273</text:p>
          </table:table-cell>
          <table:table-cell table:style-name="ce36" office:value-type="currency" office:currency="PLN" office:value="4.74">
            <text:p>4,74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Dulcobis czopki na zaparcia 6 szt.</text:p>
          </table:table-cell>
          <table:table-cell table:style-name="ce34" office:value-type="float" office:value="8472">
            <text:p>8472</text:p>
          </table:table-cell>
          <table:table-cell table:style-name="ce36" office:value-type="currency" office:currency="PLN" office:value="4.38">
            <text:p>4,38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Hevipoint Lek przeciw opryszczce warg i twarzy 30 tabletek</text:p>
          </table:table-cell>
          <table:table-cell table:style-name="ce34" office:value-type="float" office:value="4109">
            <text:p>4109</text:p>
          </table:table-cell>
          <table:table-cell table:style-name="ce36" office:value-type="currency" office:currency="PLN" office:value="4.38">
            <text:p>4,38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Voltaren Emulgel 1% żel 0,01 g/g 100 g (Import równoległy)</text:p>
          </table:table-cell>
          <table:table-cell table:style-name="ce34" office:value-type="float" office:value="14669">
            <text:p>14669</text:p>
          </table:table-cell>
          <table:table-cell table:style-name="ce36" office:value-type="currency" office:currency="PLN" office:value="4.35">
            <text:p>4,35 zł</text:p>
          </table:table-cell>
          <table:table-cell table:style-name="ce35" table:number-columns-repeated="2"/>
          <table:table-cell table:number-columns-repeated="1019"/>
        </table:table-row>
        <table:table-row table:style-name="ro20">
          <table:table-cell table:style-name="ce33" office:value-type="string">
            <text:p>ArgenTussin Gardło, smak miętowo-cytrynowy 16 pastylek</text:p>
          </table:table-cell>
          <table:table-cell table:style-name="ce34" office:value-type="float" office:value="13334">
            <text:p>13334</text:p>
          </table:table-cell>
          <table:table-cell table:style-name="ce36" office:value-type="currency" office:currency="PLN" office:value="4">
            <text:p>4,00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EctoAlerg krople do oczu 10ml</text:p>
          </table:table-cell>
          <table:table-cell table:style-name="ce34" office:value-type="float" office:value="8340">
            <text:p>8340</text:p>
          </table:table-cell>
          <table:table-cell table:style-name="ce36" office:value-type="currency" office:currency="PLN" office:value="4">
            <text:p>4,00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Furaginum MAX 100 mg 30 tab.</text:p>
          </table:table-cell>
          <table:table-cell table:style-name="ce34" office:value-type="float" office:value="19673">
            <text:p>19673</text:p>
          </table:table-cell>
          <table:table-cell table:style-name="ce36" office:value-type="currency" office:currency="PLN" office:value="4">
            <text:p>4,00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Błonnik dla dzieci + probiotyki 100 g</text:p>
          </table:table-cell>
          <table:table-cell table:style-name="ce34" office:value-type="float" office:value="11947">
            <text:p>11947</text:p>
          </table:table-cell>
          <table:table-cell table:style-name="ce36" office:value-type="currency" office:currency="PLN" office:value="3.95">
            <text:p>3,95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Seboradin Spray Odsiwiający Do Włosów Forte 200ml</text:p>
          </table:table-cell>
          <table:table-cell table:style-name="ce34" office:value-type="float" office:value="26469">
            <text:p>26469</text:p>
          </table:table-cell>
          <table:table-cell table:style-name="ce36" office:value-type="currency" office:currency="PLN" office:value="3.95">
            <text:p>3,95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Aqua Gel opatrunek hydrożelowy 10x12cm 1 szt.</text:p>
          </table:table-cell>
          <table:table-cell table:style-name="ce34" office:value-type="float" office:value="6772">
            <text:p>6772</text:p>
          </table:table-cell>
          <table:table-cell table:style-name="ce36" office:value-type="currency" office:currency="PLN" office:value="3.72">
            <text:p>3,72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Farmina Jodyna Hospital 800g</text:p>
          </table:table-cell>
          <table:table-cell table:style-name="ce34" office:value-type="float" office:value="8114">
            <text:p>8114</text:p>
          </table:table-cell>
          <table:table-cell table:style-name="ce36" office:value-type="currency" office:currency="PLN" office:value="3.72">
            <text:p>3,72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Tecweld Icemix sztuczny lód w aerozolu 400ml</text:p>
          </table:table-cell>
          <table:table-cell table:style-name="ce34" office:value-type="float" office:value="4136">
            <text:p>4136</text:p>
          </table:table-cell>
          <table:table-cell table:style-name="ce36" office:value-type="currency" office:currency="PLN" office:value="3.72">
            <text:p>3,72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Lamisilatt Krem 10 mg/g 15g</text:p>
          </table:table-cell>
          <table:table-cell table:style-name="ce34" office:value-type="float" office:value="6122">
            <text:p>6122</text:p>
          </table:table-cell>
          <table:table-cell table:style-name="ce36" office:value-type="currency" office:currency="PLN" office:value="3.6">
            <text:p>3,60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Maść Szałwiowa 25 G</text:p>
          </table:table-cell>
          <table:table-cell table:style-name="ce34" office:value-type="float" office:value="9164">
            <text:p>9164</text:p>
          </table:table-cell>
          <table:table-cell table:style-name="ce36" office:value-type="currency" office:currency="PLN" office:value="3.6">
            <text:p>3,60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Accu-Check Active</text:p>
          </table:table-cell>
          <table:table-cell table:style-name="ce34" office:value-type="float" office:value="19537">
            <text:p>19537</text:p>
          </table:table-cell>
          <table:table-cell table:style-name="ce36" office:value-type="currency" office:currency="PLN" office:value="3.4">
            <text:p>3,40 zł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3" office:value-type="string">
            <text:p>Genexo Ixell</text:p>
          </table:table-cell>
          <table:table-cell table:style-name="ce34" office:value-type="float" office:value="23286">
            <text:p>23286</text:p>
          </table:table-cell>
          <table:table-cell table:style-name="ce36" office:value-type="currency" office:currency="PLN" office:value="3.4">
            <text:p>3,40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Vinsvin Mydełko naturalne z nanosrebrem w płynie 500Ml</text:p>
          </table:table-cell>
          <table:table-cell table:style-name="ce34" office:value-type="float" office:value="4626">
            <text:p>4626</text:p>
          </table:table-cell>
          <table:table-cell table:style-name="ce36" office:value-type="currency" office:currency="PLN" office:value="3.4">
            <text:p>3,40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Zioła Mnicha Na odchudzanie 20tbx2g</text:p>
          </table:table-cell>
          <table:table-cell table:style-name="ce34" office:value-type="float" office:value="18545">
            <text:p>18545</text:p>
          </table:table-cell>
          <table:table-cell table:style-name="ce36" office:value-type="currency" office:currency="PLN" office:value="3.4">
            <text:p>3,40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CLARVOX Porzeczka 36 past.</text:p>
          </table:table-cell>
          <table:table-cell table:style-name="ce34" office:value-type="float" office:value="32270">
            <text:p>32270</text:p>
          </table:table-cell>
          <table:table-cell table:style-name="ce36" office:value-type="currency" office:currency="PLN" office:value="3.32">
            <text:p>3,32 zł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3" office:value-type="string">
            <text:p>Cetip 10 tabl.</text:p>
          </table:table-cell>
          <table:table-cell table:style-name="ce34" office:value-type="float" office:value="394">
            <text:p>394</text:p>
          </table:table-cell>
          <table:table-cell table:style-name="ce36" office:value-type="currency" office:currency="PLN" office:value="3.2">
            <text:p>3,20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CLARITINE ALLERGY SYROP 60ML</text:p>
          </table:table-cell>
          <table:table-cell table:style-name="ce34" office:value-type="float" office:value="3574">
            <text:p>3574</text:p>
          </table:table-cell>
          <table:table-cell table:style-name="ce36" office:value-type="currency" office:currency="PLN" office:value="3.2">
            <text:p>3,20 zł</text:p>
          </table:table-cell>
          <table:table-cell table:style-name="ce35" table:number-columns-repeated="2"/>
          <table:table-cell table:number-columns-repeated="1019"/>
        </table:table-row>
        <table:table-row table:style-name="ro20">
          <table:table-cell table:style-name="ce33" office:value-type="string">
            <text:p>Permen Med Forte Tabletki powlekane, na zaburzenia erekcji 4 szt.</text:p>
          </table:table-cell>
          <table:table-cell table:style-name="ce34" office:value-type="float" office:value="19672">
            <text:p>19672</text:p>
          </table:table-cell>
          <table:table-cell table:style-name="ce36" office:value-type="currency" office:currency="PLN" office:value="3.2">
            <text:p>3,20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Primaflor Multi 10kaps.</text:p>
          </table:table-cell>
          <table:table-cell table:style-name="ce34" office:value-type="float" office:value="32298">
            <text:p>32298</text:p>
          </table:table-cell>
          <table:table-cell table:style-name="ce36" office:value-type="currency" office:currency="PLN" office:value="3.2">
            <text:p>3,20 zł</text:p>
          </table:table-cell>
          <table:table-cell table:style-name="ce35" table:number-columns-repeated="2"/>
          <table:table-cell table:number-columns-repeated="1019"/>
        </table:table-row>
        <table:table-row table:style-name="ro24">
          <table:table-cell table:style-name="ce33" office:value-type="string">
            <text:p>BACTIGRAS Opatrunek Gazowy Nasączony Parafiną I Chlorheksydyną 10cm x 10cm 10szt.</text:p>
          </table:table-cell>
          <table:table-cell table:style-name="ce34" office:value-type="float" office:value="9185">
            <text:p>9185</text:p>
          </table:table-cell>
          <table:table-cell table:style-name="ce36" office:value-type="currency" office:currency="PLN" office:value="3.1">
            <text:p>3,10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Tisane balsam do ust 4,7g</text:p>
          </table:table-cell>
          <table:table-cell table:style-name="ce34" office:value-type="float" office:value="11377">
            <text:p>11377</text:p>
          </table:table-cell>
          <table:table-cell table:style-name="ce36" office:value-type="currency" office:currency="PLN" office:value="3.1">
            <text:p>3,10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Krem Naturalis Wiesiołkowy Półtłusty na dzień i noc 50ml</text:p>
          </table:table-cell>
          <table:table-cell table:style-name="ce34" office:value-type="float" office:value="17394">
            <text:p>17394</text:p>
          </table:table-cell>
          <table:table-cell table:style-name="ce36" office:value-type="currency" office:currency="PLN" office:value="3.06">
            <text:p>3,06 zł</text:p>
          </table:table-cell>
          <table:table-cell table:style-name="ce35" table:number-columns-repeated="2"/>
          <table:table-cell table:number-columns-repeated="1019"/>
        </table:table-row>
        <table:table-row table:style-name="ro23">
          <table:table-cell table:style-name="ce33" office:value-type="string">
            <text:p>Intec Medical Zestaw Akcesoriów Do Inhalatora Pro Intec Z Maską Dla Dzieci</text:p>
          </table:table-cell>
          <table:table-cell table:style-name="ce34" office:value-type="float" office:value="4164">
            <text:p>4164</text:p>
          </table:table-cell>
          <table:table-cell table:style-name="ce36" office:value-type="currency" office:currency="PLN" office:value="3.04">
            <text:p>3,04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UROFEM Control 60 tabl.</text:p>
          </table:table-cell>
          <table:table-cell table:style-name="ce34" office:value-type="float" office:value="32306">
            <text:p>32306</text:p>
          </table:table-cell>
          <table:table-cell table:style-name="ce36" office:value-type="currency" office:currency="PLN" office:value="3">
            <text:p>3,00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Test OraQuick na obecność wirusa HIV</text:p>
          </table:table-cell>
          <table:table-cell table:style-name="ce34" office:value-type="float" office:value="19586">
            <text:p>19586</text:p>
          </table:table-cell>
          <table:table-cell table:style-name="ce36" office:value-type="currency" office:currency="PLN" office:value="2.96">
            <text:p>2,96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Alugastrin 40 tabletek</text:p>
          </table:table-cell>
          <table:table-cell table:style-name="ce34" office:value-type="float" office:value="5864">
            <text:p>5864</text:p>
          </table:table-cell>
          <table:table-cell table:style-name="ce36" office:value-type="currency" office:currency="PLN" office:value="2.92">
            <text:p>2,92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Lactulose-MIP syrop 9,75g/15ml 1000ml</text:p>
          </table:table-cell>
          <table:table-cell table:style-name="ce34" office:value-type="float" office:value="7759">
            <text:p>7759</text:p>
          </table:table-cell>
          <table:table-cell table:style-name="ce36" office:value-type="currency" office:currency="PLN" office:value="2.92">
            <text:p>2,92 zł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3" office:value-type="string">
            <text:p>Saridon 20 tabl</text:p>
          </table:table-cell>
          <table:table-cell table:style-name="ce34" office:value-type="float" office:value="10464">
            <text:p>10464</text:p>
          </table:table-cell>
          <table:table-cell table:style-name="ce36" office:value-type="currency" office:currency="PLN" office:value="2.92">
            <text:p>2,92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Clotrimazolum Krem przeciwgrzybiczy 10mg/g 20g</text:p>
          </table:table-cell>
          <table:table-cell table:style-name="ce34" office:value-type="float" office:value="5940">
            <text:p>5940</text:p>
          </table:table-cell>
          <table:table-cell table:style-name="ce36" office:value-type="currency" office:currency="PLN" office:value="2.88">
            <text:p>2,88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Daktarin 20mg/g, krem 30g</text:p>
          </table:table-cell>
          <table:table-cell table:style-name="ce34" office:value-type="float" office:value="9326">
            <text:p>9326</text:p>
          </table:table-cell>
          <table:table-cell table:style-name="ce36" office:value-type="currency" office:currency="PLN" office:value="2.88">
            <text:p>2,88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Allergika Krem na powieki MED 15ml</text:p>
          </table:table-cell>
          <table:table-cell table:style-name="ce34" office:value-type="float" office:value="11734">
            <text:p>11734</text:p>
          </table:table-cell>
          <table:table-cell table:style-name="ce36" office:value-type="currency" office:currency="PLN" office:value="2.85">
            <text:p>2,85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Avene COLD CREAM Krem 40ml</text:p>
          </table:table-cell>
          <table:table-cell table:style-name="ce34" office:value-type="float" office:value="3813">
            <text:p>3813</text:p>
          </table:table-cell>
          <table:table-cell table:style-name="ce36" office:value-type="currency" office:currency="PLN" office:value="2.85">
            <text:p>2,85 zł</text:p>
          </table:table-cell>
          <table:table-cell table:style-name="ce35" table:number-columns-repeated="2"/>
          <table:table-cell table:number-columns-repeated="1019"/>
        </table:table-row>
        <table:table-row table:style-name="ro25">
          <table:table-cell table:style-name="ce33" office:value-type="string">
            <text:p>Dermedic Sunbrella Fotostabilny Krem Ochronny Do Twarzy SPF50+ Skóra tłusta i mieszana 50 g</text:p>
          </table:table-cell>
          <table:table-cell table:style-name="ce34" office:value-type="float" office:value="3703">
            <text:p>3703</text:p>
          </table:table-cell>
          <table:table-cell table:style-name="ce36" office:value-type="currency" office:currency="PLN" office:value="2.85">
            <text:p>2,85 zł</text:p>
          </table:table-cell>
          <table:table-cell table:style-name="ce35" table:number-columns-repeated="2"/>
          <table:table-cell table:number-columns-repeated="1019"/>
        </table:table-row>
        <table:table-row table:style-name="ro24">
          <table:table-cell table:style-name="ce33" office:value-type="string">
            <text:p>La Roche-Posay Toleriane Ultra Dermallergo serum nawilżająco-kojące do skóry wrażliwej i alergicznej 20 ml</text:p>
          </table:table-cell>
          <table:table-cell table:style-name="ce34" office:value-type="float" office:value="10512">
            <text:p>10512</text:p>
          </table:table-cell>
          <table:table-cell table:style-name="ce36" office:value-type="currency" office:currency="PLN" office:value="2.85">
            <text:p>2,85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Pharmatech Olejek dla zakatarzonych 10ml</text:p>
          </table:table-cell>
          <table:table-cell table:style-name="ce34" office:value-type="float" office:value="19392">
            <text:p>19392</text:p>
          </table:table-cell>
          <table:table-cell table:style-name="ce36" office:value-type="currency" office:currency="PLN" office:value="2.79">
            <text:p>2,79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VITAPRIM Senior 60 tabl.</text:p>
          </table:table-cell>
          <table:table-cell table:style-name="ce34" office:value-type="float" office:value="32314">
            <text:p>32314</text:p>
          </table:table-cell>
          <table:table-cell table:style-name="ce36" office:value-type="currency" office:currency="PLN" office:value="2.76">
            <text:p>2,76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Verdin Fix Zioła Z Owocami Leśnymi 20 saszetek</text:p>
          </table:table-cell>
          <table:table-cell table:style-name="ce34" office:value-type="float" office:value="18355">
            <text:p>18355</text:p>
          </table:table-cell>
          <table:table-cell table:style-name="ce36" office:value-type="currency" office:currency="PLN" office:value="2.72">
            <text:p>2,72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Zioła Mnicha Na trawienie 20tbx2g</text:p>
          </table:table-cell>
          <table:table-cell table:style-name="ce34" office:value-type="float" office:value="18546">
            <text:p>18546</text:p>
          </table:table-cell>
          <table:table-cell table:style-name="ce36" office:value-type="currency" office:currency="PLN" office:value="2.72">
            <text:p>2,72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Go-On 25 Mg/2,5 ml Ampułko-Strzykawka 1 Szt.</text:p>
          </table:table-cell>
          <table:table-cell table:style-name="ce34" office:value-type="float" office:value="13773">
            <text:p>13773</text:p>
          </table:table-cell>
          <table:table-cell table:style-name="ce36" office:value-type="currency" office:currency="PLN" office:value="2.61">
            <text:p>2,61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R-Flex Ultra Hydrolize 30sasz.</text:p>
          </table:table-cell>
          <table:table-cell table:style-name="ce34" office:value-type="float" office:value="10366">
            <text:p>10366</text:p>
          </table:table-cell>
          <table:table-cell table:style-name="ce36" office:value-type="currency" office:currency="PLN" office:value="2.49">
            <text:p>2,49 zł</text:p>
          </table:table-cell>
          <table:table-cell table:style-name="ce35" table:number-columns-repeated="2"/>
          <table:table-cell table:number-columns-repeated="1019"/>
        </table:table-row>
        <table:table-row table:style-name="ro20">
          <table:table-cell table:style-name="ce33" office:value-type="string">
            <text:p>Hartmann Atrauman Ag opatrunek z maścią 5cm x 5cm 1szt.</text:p>
          </table:table-cell>
          <table:table-cell table:style-name="ce34" office:value-type="float" office:value="7724">
            <text:p>7724</text:p>
          </table:table-cell>
          <table:table-cell table:style-name="ce36" office:value-type="currency" office:currency="PLN" office:value="2.48">
            <text:p>2,48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CLARVOX Complex Spray do gardła, 30ml</text:p>
          </table:table-cell>
          <table:table-cell table:style-name="ce34" office:value-type="float" office:value="32268">
            <text:p>32268</text:p>
          </table:table-cell>
          <table:table-cell table:style-name="ce36" office:value-type="currency" office:currency="PLN" office:value="2.4">
            <text:p>2,40 zł</text:p>
          </table:table-cell>
          <table:table-cell table:style-name="ce35" table:number-columns-repeated="2"/>
          <table:table-cell table:number-columns-repeated="1019"/>
        </table:table-row>
        <table:table-row table:style-name="ro25">
          <table:table-cell table:style-name="ce33" office:value-type="string">
            <text:p>NESTLE NAN OPTIPRO Plus 1 HM-O Mleko Początkowe dla niemowląt od urodzenia W Płynie 32x70ml</text:p>
          </table:table-cell>
          <table:table-cell table:style-name="ce34" office:value-type="float" office:value="17321">
            <text:p>17321</text:p>
          </table:table-cell>
          <table:table-cell table:style-name="ce36" office:value-type="currency" office:currency="PLN" office:value="2.4">
            <text:p>2,40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Polcrom Krople do oczu 10ml 2x5ml</text:p>
          </table:table-cell>
          <table:table-cell table:style-name="ce34" office:value-type="float" office:value="6243">
            <text:p>6243</text:p>
          </table:table-cell>
          <table:table-cell table:style-name="ce36" office:value-type="currency" office:currency="PLN" office:value="2.4">
            <text:p>2,40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Prurifem Kadefarm 30ml</text:p>
          </table:table-cell>
          <table:table-cell table:style-name="ce34" office:value-type="float" office:value="5129">
            <text:p>5129</text:p>
          </table:table-cell>
          <table:table-cell table:style-name="ce36" office:value-type="currency" office:currency="PLN" office:value="2.4">
            <text:p>2,40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Tanakan 90 tabletek</text:p>
          </table:table-cell>
          <table:table-cell table:style-name="ce34" office:value-type="float" office:value="6611">
            <text:p>6611</text:p>
          </table:table-cell>
          <table:table-cell table:style-name="ce36" office:value-type="currency" office:currency="PLN" office:value="2.4">
            <text:p>2,40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Zyskaj Zdrowie Magnez+B1 B6 B12 30 tabl.</text:p>
          </table:table-cell>
          <table:table-cell table:style-name="ce34" office:value-type="float" office:value="17199">
            <text:p>17199</text:p>
          </table:table-cell>
          <table:table-cell table:style-name="ce36" office:value-type="currency" office:currency="PLN" office:value="2.4">
            <text:p>2,40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Caudalie Vinopure Zestaw Startowy dla Skóry Trądzikowej</text:p>
          </table:table-cell>
          <table:table-cell table:style-name="ce34" office:value-type="float" office:value="32416">
            <text:p>32416</text:p>
          </table:table-cell>
          <table:table-cell table:style-name="ce36" office:value-type="currency" office:currency="PLN" office:value="2.37">
            <text:p>2,37 zł</text:p>
          </table:table-cell>
          <table:table-cell table:style-name="ce35" table:number-columns-repeated="2"/>
          <table:table-cell table:number-columns-repeated="1019"/>
        </table:table-row>
        <table:table-row table:style-name="ro23">
          <table:table-cell table:style-name="ce33" office:value-type="string">
            <text:p>Klorane Chinina Zestaw Przeciw Wypadaniu Włosów – Szampon, 400 ml + Odżywka, 200 ml</text:p>
          </table:table-cell>
          <table:table-cell table:style-name="ce34" office:value-type="float" office:value="32607">
            <text:p>32607</text:p>
          </table:table-cell>
          <table:table-cell table:style-name="ce36" office:value-type="currency" office:currency="PLN" office:value="2.37">
            <text:p>2,37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OPTICall Plus maść na powieki 20 g</text:p>
          </table:table-cell>
          <table:table-cell table:style-name="ce34" office:value-type="float" office:value="14984">
            <text:p>14984</text:p>
          </table:table-cell>
          <table:table-cell table:style-name="ce36" office:value-type="currency" office:currency="PLN" office:value="2.37">
            <text:p>2,37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Proderma Mazidło Gojące Na Suchą Popękaną Skórę 30G</text:p>
          </table:table-cell>
          <table:table-cell table:style-name="ce34" office:value-type="float" office:value="14569">
            <text:p>14569</text:p>
          </table:table-cell>
          <table:table-cell table:style-name="ce36" office:value-type="currency" office:currency="PLN" office:value="2.37">
            <text:p>2,37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Zyskaj Zdrowie Żel kasztanowy z rutyną 350g</text:p>
          </table:table-cell>
          <table:table-cell table:style-name="ce34" office:value-type="float" office:value="17011">
            <text:p>17011</text:p>
          </table:table-cell>
          <table:table-cell table:style-name="ce36" office:value-type="currency" office:currency="PLN" office:value="2.31">
            <text:p>2,31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Diagnosis Zasilacz do ciśnieniomierzy AND</text:p>
          </table:table-cell>
          <table:table-cell table:style-name="ce34" office:value-type="float" office:value="35829">
            <text:p>35829</text:p>
          </table:table-cell>
          <table:table-cell table:style-name="ce36" office:value-type="currency" office:currency="PLN" office:value="2.28">
            <text:p>2,28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CLIMAFEM Plus 30 tabl.</text:p>
          </table:table-cell>
          <table:table-cell table:style-name="ce34" office:value-type="float" office:value="32274">
            <text:p>32274</text:p>
          </table:table-cell>
          <table:table-cell table:style-name="ce36" office:value-type="currency" office:currency="PLN" office:value="2.25">
            <text:p>2,25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Gorvita Maść Rokitnikowa Z Ekstraktem Z Nagietka 140Ml</text:p>
          </table:table-cell>
          <table:table-cell table:style-name="ce34" office:value-type="float" office:value="17250">
            <text:p>17250</text:p>
          </table:table-cell>
          <table:table-cell table:style-name="ce36" office:value-type="currency" office:currency="PLN" office:value="2.25">
            <text:p>2,25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UroLact doustny Probiotyk Urologiczny 400mg, 10 kaps.</text:p>
          </table:table-cell>
          <table:table-cell table:style-name="ce34" office:value-type="float" office:value="19043">
            <text:p>19043</text:p>
          </table:table-cell>
          <table:table-cell table:style-name="ce36" office:value-type="currency" office:currency="PLN" office:value="2.25">
            <text:p>2,25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Tabletki NEOSEN Forte 30 szt.</text:p>
          </table:table-cell>
          <table:table-cell table:style-name="ce34" office:value-type="float" office:value="32291">
            <text:p>32291</text:p>
          </table:table-cell>
          <table:table-cell table:style-name="ce36" office:value-type="currency" office:currency="PLN" office:value="2.22">
            <text:p>2,22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Tabletki Neurotynox D 30 szt.</text:p>
          </table:table-cell>
          <table:table-cell table:style-name="ce34" office:value-type="float" office:value="4684">
            <text:p>4684</text:p>
          </table:table-cell>
          <table:table-cell table:style-name="ce36" office:value-type="currency" office:currency="PLN" office:value="2.22">
            <text:p>2,22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Eloderm Szampon od 1. dnia życia 200ml</text:p>
          </table:table-cell>
          <table:table-cell table:style-name="ce34" office:value-type="float" office:value="248">
            <text:p>248</text:p>
          </table:table-cell>
          <table:table-cell table:style-name="ce36" office:value-type="currency" office:currency="PLN" office:value="2.19">
            <text:p>2,19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Pharmapoint Legalon 140, 20kaps</text:p>
          </table:table-cell>
          <table:table-cell table:style-name="ce34" office:value-type="float" office:value="19282">
            <text:p>19282</text:p>
          </table:table-cell>
          <table:table-cell table:style-name="ce36" office:value-type="currency" office:currency="PLN" office:value="2.19">
            <text:p>2,19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Excilor Leczenie grzybicy paznokci 3,3ml</text:p>
          </table:table-cell>
          <table:table-cell table:style-name="ce34" office:value-type="float" office:value="3920">
            <text:p>3920</text:p>
          </table:table-cell>
          <table:table-cell table:style-name="ce36" office:value-type="currency" office:currency="PLN" office:value="2.16">
            <text:p>2,16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Skinoren Krem 30g</text:p>
          </table:table-cell>
          <table:table-cell table:style-name="ce34" office:value-type="float" office:value="10861">
            <text:p>10861</text:p>
          </table:table-cell>
          <table:table-cell table:style-name="ce36" office:value-type="currency" office:currency="PLN" office:value="2.16">
            <text:p>2,16 zł</text:p>
          </table:table-cell>
          <table:table-cell table:style-name="ce35" table:number-columns-repeated="2"/>
          <table:table-cell table:number-columns-repeated="1019"/>
        </table:table-row>
        <table:table-row table:style-name="ro20">
          <table:table-cell table:style-name="ce33" office:value-type="string">
            <text:p>Krem Avena Ochronny Z Witaminą A Tuba Na Dzień I Noc 25g</text:p>
          </table:table-cell>
          <table:table-cell table:style-name="ce34" office:value-type="float" office:value="4274">
            <text:p>4274</text:p>
          </table:table-cell>
          <table:table-cell table:style-name="ce36" office:value-type="currency" office:currency="PLN" office:value="2.04">
            <text:p>2,04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Nakłuwacz AccuChek Softclix KIT + 25 lancetów</text:p>
          </table:table-cell>
          <table:table-cell table:style-name="ce34" office:value-type="float" office:value="13662">
            <text:p>13662</text:p>
          </table:table-cell>
          <table:table-cell table:style-name="ce36" office:value-type="currency" office:currency="PLN" office:value="2.04">
            <text:p>2,04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Senes liść FIX 1 g 50 sasz.</text:p>
          </table:table-cell>
          <table:table-cell table:style-name="ce34" office:value-type="float" office:value="6404">
            <text:p>6404</text:p>
          </table:table-cell>
          <table:table-cell table:style-name="ce36" office:value-type="currency" office:currency="PLN" office:value="2.04">
            <text:p>2,04 zł</text:p>
          </table:table-cell>
          <table:table-cell table:style-name="ce35" table:number-columns-repeated="2"/>
          <table:table-cell table:number-columns-repeated="1019"/>
        </table:table-row>
        <table:table-row table:style-name="ro23">
          <table:table-cell table:style-name="ce33" office:value-type="string">
            <text:p>Pierre Fabre Elgydium Pasta Do Zębów Z Kompleksem Fluorinol Protect + 75ml</text:p>
          </table:table-cell>
          <table:table-cell table:style-name="ce34" office:value-type="float" office:value="29833">
            <text:p>29833</text:p>
          </table:table-cell>
          <table:table-cell table:style-name="ce36" office:value-type="currency" office:currency="PLN" office:value="2.01">
            <text:p>2,01 zł</text:p>
          </table:table-cell>
          <table:table-cell table:style-name="ce35" table:number-columns-repeated="2"/>
          <table:table-cell table:number-columns-repeated="1019"/>
        </table:table-row>
        <table:table-row table:style-name="ro20">
          <table:table-cell table:style-name="ce33" office:value-type="string">
            <text:p>A-DERMA DERMALIBOUR+ CICA- Krem regenerujący 100ml</text:p>
          </table:table-cell>
          <table:table-cell table:style-name="ce34" office:value-type="float" office:value="10516">
            <text:p>10516</text:p>
          </table:table-cell>
          <table:table-cell table:style-name="ce36" office:value-type="currency" office:currency="PLN" office:value="1.9">
            <text:p>1,90 zł</text:p>
          </table:table-cell>
          <table:table-cell table:style-name="ce35" table:number-columns-repeated="2"/>
          <table:table-cell table:number-columns-repeated="1019"/>
        </table:table-row>
        <table:table-row table:style-name="ro24">
          <table:table-cell table:style-name="ce33" office:value-type="string">
            <text:p>Avène Dermabsolu Redensifying Day Cream Krem  Modelujący Na Dzień Przeciw Zmarszczkom 50Ml</text:p>
          </table:table-cell>
          <table:table-cell table:style-name="ce34" office:value-type="float" office:value="31926">
            <text:p>31926</text:p>
          </table:table-cell>
          <table:table-cell table:style-name="ce36" office:value-type="currency" office:currency="PLN" office:value="1.9">
            <text:p>1,90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Avene HYDRANCE Krem nawilżający bogata konsystencja 40ml</text:p>
          </table:table-cell>
          <table:table-cell table:style-name="ce34" office:value-type="float" office:value="8601">
            <text:p>8601</text:p>
          </table:table-cell>
          <table:table-cell table:style-name="ce36" office:value-type="currency" office:currency="PLN" office:value="1.9">
            <text:p>1,90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Avene Xeracalm A.D Krem uzupełniający lipidy 400ml</text:p>
          </table:table-cell>
          <table:table-cell table:style-name="ce34" office:value-type="float" office:value="19702">
            <text:p>19702</text:p>
          </table:table-cell>
          <table:table-cell table:style-name="ce36" office:value-type="currency" office:currency="PLN" office:value="1.9">
            <text:p>1,90 zł</text:p>
          </table:table-cell>
          <table:table-cell table:style-name="ce35" table:number-columns-repeated="2"/>
          <table:table-cell table:number-columns-repeated="1019"/>
        </table:table-row>
        <table:table-row table:style-name="ro23">
          <table:table-cell table:style-name="ce33" office:value-type="string">
            <text:p>DUCRAY DEXYANE MED Wyrób medyczny krem kojąco-regenerujący 100ml</text:p>
          </table:table-cell>
          <table:table-cell table:style-name="ce34" office:value-type="float" office:value="31945">
            <text:p>31945</text:p>
          </table:table-cell>
          <table:table-cell table:style-name="ce36" office:value-type="currency" office:currency="PLN" office:value="1.9">
            <text:p>1,90 zł</text:p>
          </table:table-cell>
          <table:table-cell table:style-name="ce35" table:number-columns-repeated="2"/>
          <table:table-cell table:number-columns-repeated="1019"/>
        </table:table-row>
        <table:table-row table:style-name="ro20">
          <table:table-cell table:style-name="ce33" office:value-type="string">
            <text:p>Emolium A -Topic Trójaktywna emulsja do ciała do skóry atopowej, 200 ml</text:p>
          </table:table-cell>
          <table:table-cell table:style-name="ce34" office:value-type="float" office:value="14970">
            <text:p>14970</text:p>
          </table:table-cell>
          <table:table-cell table:style-name="ce36" office:value-type="currency" office:currency="PLN" office:value="1.9">
            <text:p>1,90 zł</text:p>
          </table:table-cell>
          <table:table-cell table:style-name="ce35" table:number-columns-repeated="2"/>
          <table:table-cell table:number-columns-repeated="1019"/>
        </table:table-row>
        <table:table-row table:style-name="ro24">
          <table:table-cell table:style-name="ce33" office:value-type="string">
            <text:p>Nuxe Hair Prodigieux Odżywcza Maska 30ml + Nabłyszczający Szampon 50ml + Nabłyszczająca Odżywka 30ml</text:p>
          </table:table-cell>
          <table:table-cell table:style-name="ce34" office:value-type="float" office:value="28305">
            <text:p>28305</text:p>
          </table:table-cell>
          <table:table-cell table:style-name="ce36" office:value-type="currency" office:currency="PLN" office:value="1.9">
            <text:p>1,90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Paraderm Psoric D krem 85 g</text:p>
          </table:table-cell>
          <table:table-cell table:style-name="ce34" office:value-type="float" office:value="9499">
            <text:p>9499</text:p>
          </table:table-cell>
          <table:table-cell table:style-name="ce36" office:value-type="currency" office:currency="PLN" office:value="1.9">
            <text:p>1,90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Łącznie: Paraderm Psoric D krem 85 g</text:p>
          </table:table-cell>
          <table:table-cell table:style-name="ce35"/>
          <table:table-cell table:style-name="ce36" office:value-type="currency" office:currency="PLN" office:value="1.9">
            <text:p>1,90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Akutol Opatrunek plaster w sprayu 60ml</text:p>
          </table:table-cell>
          <table:table-cell table:style-name="ce34" office:value-type="float" office:value="10087">
            <text:p>10087</text:p>
          </table:table-cell>
          <table:table-cell table:style-name="ce36" office:value-type="currency" office:currency="PLN" office:value="1.86">
            <text:p>1,86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ANNA Wazelina kosmetyczna z witaminami A+E 50g</text:p>
          </table:table-cell>
          <table:table-cell table:style-name="ce34" office:value-type="float" office:value="9548">
            <text:p>9548</text:p>
          </table:table-cell>
          <table:table-cell table:style-name="ce36" office:value-type="currency" office:currency="PLN" office:value="1.86">
            <text:p>1,86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Delfarma Skinscabin Płyn 120ml</text:p>
          </table:table-cell>
          <table:table-cell table:style-name="ce34" office:value-type="float" office:value="13970">
            <text:p>13970</text:p>
          </table:table-cell>
          <table:table-cell table:style-name="ce36" office:value-type="currency" office:currency="PLN" office:value="1.86">
            <text:p>1,86 zł</text:p>
          </table:table-cell>
          <table:table-cell table:style-name="ce35" table:number-columns-repeated="2"/>
          <table:table-cell table:number-columns-repeated="1019"/>
        </table:table-row>
        <table:table-row table:style-name="ro20">
          <table:table-cell table:style-name="ce33" office:value-type="string">
            <text:p>HYDROCOLL Thin opatrunek hydrokoloidowy 10cmx10cm - 1 sztuka</text:p>
          </table:table-cell>
          <table:table-cell table:style-name="ce34" office:value-type="float" office:value="14536">
            <text:p>14536</text:p>
          </table:table-cell>
          <table:table-cell table:style-name="ce36" office:value-type="currency" office:currency="PLN" office:value="1.86">
            <text:p>1,86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Kosmed Spray Na Komary Kleszcze I Meszki Powyżej 1. Roku Życia 100ml</text:p>
          </table:table-cell>
          <table:table-cell table:style-name="ce34" office:value-type="float" office:value="8585">
            <text:p>8585</text:p>
          </table:table-cell>
          <table:table-cell table:style-name="ce36" office:value-type="currency" office:currency="PLN" office:value="1.86">
            <text:p>1,86 zł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3" office:value-type="string">
            <text:p>Proskin Lf 30szt.</text:p>
          </table:table-cell>
          <table:table-cell table:style-name="ce34" office:value-type="float" office:value="12932">
            <text:p>12932</text:p>
          </table:table-cell>
          <table:table-cell table:style-name="ce36" office:value-type="currency" office:currency="PLN" office:value="1.86">
            <text:p>1,86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Zarys Worek Do Zbiórki Moczu Odpływ T 2l</text:p>
          </table:table-cell>
          <table:table-cell table:style-name="ce34" office:value-type="float" office:value="5632">
            <text:p>5632</text:p>
          </table:table-cell>
          <table:table-cell table:style-name="ce36" office:value-type="currency" office:currency="PLN" office:value="1.84">
            <text:p>1,84 zł</text:p>
          </table:table-cell>
          <table:table-cell table:style-name="ce35" table:number-columns-repeated="2"/>
          <table:table-cell table:number-columns-repeated="1019"/>
        </table:table-row>
        <table:table-row table:style-name="ro20">
          <table:table-cell table:style-name="ce33" office:value-type="string">
            <text:p>Biolevox HA 2,2% 2 ml żel dostawowy, 1 ampułkostrzykawka</text:p>
          </table:table-cell>
          <table:table-cell table:style-name="ce34" office:value-type="float" office:value="10623">
            <text:p>10623</text:p>
          </table:table-cell>
          <table:table-cell table:style-name="ce36" office:value-type="currency" office:currency="PLN" office:value="1.74">
            <text:p>1,74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Heel-Nux Vomica krople zaburzenia żoładkowo jelitowe 30 ml</text:p>
          </table:table-cell>
          <table:table-cell table:style-name="ce34" office:value-type="float" office:value="12509">
            <text:p>12509</text:p>
          </table:table-cell>
          <table:table-cell table:style-name="ce36" office:value-type="currency" office:currency="PLN" office:value="1.74">
            <text:p>1,74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KARPAL AKUT maść, 50ml</text:p>
          </table:table-cell>
          <table:table-cell table:style-name="ce34" office:value-type="float" office:value="17004">
            <text:p>17004</text:p>
          </table:table-cell>
          <table:table-cell table:style-name="ce36" office:value-type="currency" office:currency="PLN" office:value="1.74">
            <text:p>1,74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VIS Dolomit 0,5 g 100 tabletek</text:p>
          </table:table-cell>
          <table:table-cell table:style-name="ce34" office:value-type="float" office:value="3728">
            <text:p>3728</text:p>
          </table:table-cell>
          <table:table-cell table:style-name="ce36" office:value-type="currency" office:currency="PLN" office:value="1.74">
            <text:p>1,74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Phytomedica Promyalgan 120tabl.</text:p>
          </table:table-cell>
          <table:table-cell table:style-name="ce34" office:value-type="float" office:value="25920">
            <text:p>25920</text:p>
          </table:table-cell>
          <table:table-cell table:style-name="ce36" office:value-type="currency" office:currency="PLN" office:value="1.66">
            <text:p>1,66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Trb Chemedica Artivit 2x15 Fiolek</text:p>
          </table:table-cell>
          <table:table-cell table:style-name="ce34" office:value-type="float" office:value="28278">
            <text:p>28278</text:p>
          </table:table-cell>
          <table:table-cell table:style-name="ce36" office:value-type="currency" office:currency="PLN" office:value="1.66">
            <text:p>1,66 zł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3" office:value-type="string">
            <text:p>Ultraflex 60kaps.</text:p>
          </table:table-cell>
          <table:table-cell table:style-name="ce34" office:value-type="float" office:value="32305">
            <text:p>32305</text:p>
          </table:table-cell>
          <table:table-cell table:style-name="ce36" office:value-type="currency" office:currency="PLN" office:value="1.66">
            <text:p>1,66 zł</text:p>
          </table:table-cell>
          <table:table-cell table:style-name="ce35" table:number-columns-repeated="2"/>
          <table:table-cell table:number-columns-repeated="1019"/>
        </table:table-row>
        <table:table-row table:style-name="ro24">
          <table:table-cell table:style-name="ce33" office:value-type="string">
            <text:p>WALMARK Omega 3-6-9 Kapsułki z kompleksem olejów rybiego, lnianego i z ogórecznika 30 szt.</text:p>
          </table:table-cell>
          <table:table-cell table:style-name="ce34" office:value-type="float" office:value="17493">
            <text:p>17493</text:p>
          </table:table-cell>
          <table:table-cell table:style-name="ce36" office:value-type="currency" office:currency="PLN" office:value="1.66">
            <text:p>1,66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Aspirin 500mg 10 tabletek</text:p>
          </table:table-cell>
          <table:table-cell table:style-name="ce34" office:value-type="float" office:value="16095">
            <text:p>16095</text:p>
          </table:table-cell>
          <table:table-cell table:style-name="ce36" office:value-type="currency" office:currency="PLN" office:value="1.6">
            <text:p>1,60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Bebilon Nenatal Premium Płyn 24X70Ml</text:p>
          </table:table-cell>
          <table:table-cell table:style-name="ce34" office:value-type="float" office:value="12210">
            <text:p>12210</text:p>
          </table:table-cell>
          <table:table-cell table:style-name="ce36" office:value-type="currency" office:currency="PLN" office:value="1.6">
            <text:p>1,60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Natur C Active 500mg 100 tabletek</text:p>
          </table:table-cell>
          <table:table-cell table:style-name="ce34" office:value-type="float" office:value="13834">
            <text:p>13834</text:p>
          </table:table-cell>
          <table:table-cell table:style-name="ce36" office:value-type="currency" office:currency="PLN" office:value="1.6">
            <text:p>1,60 zł</text:p>
          </table:table-cell>
          <table:table-cell table:style-name="ce35" table:number-columns-repeated="2"/>
          <table:table-cell table:number-columns-repeated="1019"/>
        </table:table-row>
        <table:table-row table:style-name="ro25">
          <table:table-cell table:style-name="ce33" office:value-type="string">
            <text:p>NORIS PHARMA Vitaprim D3 Forte 4000 + K2, 60 kaps. -&gt; Wysyłka w 24h już za 3,99zł! [Odbiór w Żabce]</text:p>
          </table:table-cell>
          <table:table-cell table:style-name="ce34" office:value-type="float" office:value="32311">
            <text:p>32311</text:p>
          </table:table-cell>
          <table:table-cell table:style-name="ce36" office:value-type="currency" office:currency="PLN" office:value="1.6">
            <text:p>1,60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Uniben Silver aerozol 30ml</text:p>
          </table:table-cell>
          <table:table-cell table:style-name="ce34" office:value-type="float" office:value="6908">
            <text:p>6908</text:p>
          </table:table-cell>
          <table:table-cell table:style-name="ce36" office:value-type="currency" office:currency="PLN" office:value="1.6">
            <text:p>1,60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Venoruton Gel 40 g</text:p>
          </table:table-cell>
          <table:table-cell table:style-name="ce34" office:value-type="float" office:value="11789">
            <text:p>11789</text:p>
          </table:table-cell>
          <table:table-cell table:style-name="ce36" office:value-type="currency" office:currency="PLN" office:value="1.6">
            <text:p>1,60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Vitrum D3 Forte 2000 J.M. 120 kaps.</text:p>
          </table:table-cell>
          <table:table-cell table:style-name="ce34" office:value-type="float" office:value="5579">
            <text:p>5579</text:p>
          </table:table-cell>
          <table:table-cell table:style-name="ce36" office:value-type="currency" office:currency="PLN" office:value="1.6">
            <text:p>1,60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DUCRAY ANACAPS Reactiv, 3x30kapsułek</text:p>
          </table:table-cell>
          <table:table-cell table:style-name="ce34" office:value-type="float" office:value="18922">
            <text:p>18922</text:p>
          </table:table-cell>
          <table:table-cell table:style-name="ce36" office:value-type="currency" office:currency="PLN" office:value="1.58">
            <text:p>1,58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Reckitt Benckiser Nurofen Dla Dzieci Forte Trus 150ml</text:p>
          </table:table-cell>
          <table:table-cell table:style-name="ce34" office:value-type="float" office:value="10768">
            <text:p>10768</text:p>
          </table:table-cell>
          <table:table-cell table:style-name="ce36" office:value-type="currency" office:currency="PLN" office:value="1.58">
            <text:p>1,58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FUSSBAD Gehwol Sól ziołowa z lawendą do kąpieli stóp 10x20 g</text:p>
          </table:table-cell>
          <table:table-cell table:style-name="ce34" office:value-type="float" office:value="4022">
            <text:p>4022</text:p>
          </table:table-cell>
          <table:table-cell table:style-name="ce36" office:value-type="currency" office:currency="PLN" office:value="1.54">
            <text:p>1,54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Gorvita Maść końska rozgrzewająca 250 ml</text:p>
          </table:table-cell>
          <table:table-cell table:style-name="ce34" office:value-type="float" office:value="17239">
            <text:p>17239</text:p>
          </table:table-cell>
          <table:table-cell table:style-name="ce36" office:value-type="currency" office:currency="PLN" office:value="1.52">
            <text:p>1,52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Tabletki MAGPRIM Skurcz 30 szt.</text:p>
          </table:table-cell>
          <table:table-cell table:style-name="ce34" office:value-type="float" office:value="32288">
            <text:p>32288</text:p>
          </table:table-cell>
          <table:table-cell table:style-name="ce36" office:value-type="currency" office:currency="PLN" office:value="1.48">
            <text:p>1,48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Amara Cynkokrem Go! 50ml</text:p>
          </table:table-cell>
          <table:table-cell table:style-name="ce34" office:value-type="float" office:value="16539">
            <text:p>16539</text:p>
          </table:table-cell>
          <table:table-cell table:style-name="ce36" office:value-type="currency" office:currency="PLN" office:value="1.46">
            <text:p>1,46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Dexak SL 25mg granulat 10 saszetek</text:p>
          </table:table-cell>
          <table:table-cell table:style-name="ce34" office:value-type="float" office:value="15153">
            <text:p>15153</text:p>
          </table:table-cell>
          <table:table-cell table:style-name="ce36" office:value-type="currency" office:currency="PLN" office:value="1.46">
            <text:p>1,46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Dexak SL 25mg granulat 20 saszetek</text:p>
          </table:table-cell>
          <table:table-cell table:style-name="ce34" office:value-type="float" office:value="16603">
            <text:p>16603</text:p>
          </table:table-cell>
          <table:table-cell table:style-name="ce36" office:value-type="currency" office:currency="PLN" office:value="1.46">
            <text:p>1,46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Dulcobis Lek Na Zaparcia 5mg 40tabl.</text:p>
          </table:table-cell>
          <table:table-cell table:style-name="ce34" office:value-type="float" office:value="295">
            <text:p>295</text:p>
          </table:table-cell>
          <table:table-cell table:style-name="ce36" office:value-type="currency" office:currency="PLN" office:value="1.46">
            <text:p>1,46 zł</text:p>
          </table:table-cell>
          <table:table-cell table:style-name="ce35" table:number-columns-repeated="2"/>
          <table:table-cell table:number-columns-repeated="1019"/>
        </table:table-row>
        <table:table-row table:style-name="ro20">
          <table:table-cell table:style-name="ce33" office:value-type="string">
            <text:p>Rennie Antacidum Smak Miętowy 24 Tabl. Do Rozgryzania I Żucia Inpharm</text:p>
          </table:table-cell>
          <table:table-cell table:style-name="ce34" office:value-type="float" office:value="17996">
            <text:p>17996</text:p>
          </table:table-cell>
          <table:table-cell table:style-name="ce36" office:value-type="currency" office:currency="PLN" office:value="1.46">
            <text:p>1,46 zł</text:p>
          </table:table-cell>
          <table:table-cell table:style-name="ce35" table:number-columns-repeated="2"/>
          <table:table-cell table:number-columns-repeated="1019"/>
        </table:table-row>
        <table:table-row table:style-name="ro20">
          <table:table-cell table:style-name="ce33" office:value-type="string">
            <text:p>Rennie Antiacidum o smaku miętowym 24 tabletki do ssania</text:p>
          </table:table-cell>
          <table:table-cell table:style-name="ce34" office:value-type="float" office:value="7288">
            <text:p>7288</text:p>
          </table:table-cell>
          <table:table-cell table:style-name="ce36" office:value-type="currency" office:currency="PLN" office:value="1.46">
            <text:p>1,46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Biovena Health Panthenol Krem 30g</text:p>
          </table:table-cell>
          <table:table-cell table:style-name="ce34" office:value-type="float" office:value="14209">
            <text:p>14209</text:p>
          </table:table-cell>
          <table:table-cell table:style-name="ce36" office:value-type="currency" office:currency="PLN" office:value="1.44">
            <text:p>1,44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Inpharm Betadine Roztwór Na Skórę 0,1g/ml 30ml</text:p>
          </table:table-cell>
          <table:table-cell table:style-name="ce34" office:value-type="float" office:value="16180">
            <text:p>16180</text:p>
          </table:table-cell>
          <table:table-cell table:style-name="ce36" office:value-type="currency" office:currency="PLN" office:value="1.44">
            <text:p>1,44 zł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3" office:value-type="string">
            <text:p>RatuŻel, 50ml</text:p>
          </table:table-cell>
          <table:table-cell table:style-name="ce34" office:value-type="float" office:value="14829">
            <text:p>14829</text:p>
          </table:table-cell>
          <table:table-cell table:style-name="ce36" office:value-type="currency" office:currency="PLN" office:value="1.44">
            <text:p>1,44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Troxerutin żel 0,02 g/1g 30g</text:p>
          </table:table-cell>
          <table:table-cell table:style-name="ce34" office:value-type="float" office:value="18301">
            <text:p>18301</text:p>
          </table:table-cell>
          <table:table-cell table:style-name="ce36" office:value-type="currency" office:currency="PLN" office:value="1.44">
            <text:p>1,44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Abbott Freestyle Libre 2 Sensor 1szt.</text:p>
          </table:table-cell>
          <table:table-cell table:style-name="ce34" office:value-type="float" office:value="32071">
            <text:p>32071</text:p>
          </table:table-cell>
          <table:table-cell table:style-name="ce36" office:value-type="currency" office:currency="PLN" office:value="1.36">
            <text:p>1,36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Flos Ziele Macierzanki 50g</text:p>
          </table:table-cell>
          <table:table-cell table:style-name="ce34" office:value-type="float" office:value="13242">
            <text:p>13242</text:p>
          </table:table-cell>
          <table:table-cell table:style-name="ce36" office:value-type="currency" office:currency="PLN" office:value="1.36">
            <text:p>1,36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Lisc senesu ziolo pojed. Kawon 50g</text:p>
          </table:table-cell>
          <table:table-cell table:style-name="ce34" office:value-type="float" office:value="9568">
            <text:p>9568</text:p>
          </table:table-cell>
          <table:table-cell table:style-name="ce36" office:value-type="currency" office:currency="PLN" office:value="1.36">
            <text:p>1,36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One Touch Delica Plus Lancety 100Szt.</text:p>
          </table:table-cell>
          <table:table-cell table:style-name="ce34" office:value-type="float" office:value="8494">
            <text:p>8494</text:p>
          </table:table-cell>
          <table:table-cell table:style-name="ce36" office:value-type="currency" office:currency="PLN" office:value="1.36">
            <text:p>1,36 zł</text:p>
          </table:table-cell>
          <table:table-cell table:style-name="ce35" table:number-columns-repeated="2"/>
          <table:table-cell table:number-columns-repeated="1019"/>
        </table:table-row>
        <table:table-row table:style-name="ro20">
          <table:table-cell table:style-name="ce33" office:value-type="string">
            <text:p>Roche Diabetes Care Paski Do Glukozy Accu Check Instant 100 szt</text:p>
          </table:table-cell>
          <table:table-cell table:style-name="ce34" office:value-type="float" office:value="3191">
            <text:p>3191</text:p>
          </table:table-cell>
          <table:table-cell table:style-name="ce36" office:value-type="currency" office:currency="PLN" office:value="1.36">
            <text:p>1,36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Zioł.Koszyczek Arniki zioło pojed. 25 g</text:p>
          </table:table-cell>
          <table:table-cell table:style-name="ce34" office:value-type="float" office:value="18460">
            <text:p>18460</text:p>
          </table:table-cell>
          <table:table-cell table:style-name="ce36" office:value-type="currency" office:currency="PLN" office:value="1.36">
            <text:p>1,36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Zioła Mnicha Na cholesterol 20tbx2g</text:p>
          </table:table-cell>
          <table:table-cell table:style-name="ce34" office:value-type="float" office:value="14716">
            <text:p>14716</text:p>
          </table:table-cell>
          <table:table-cell table:style-name="ce36" office:value-type="currency" office:currency="PLN" office:value="1.36">
            <text:p>1,36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Zioła Mnicha Na cukier 20tbx2g</text:p>
          </table:table-cell>
          <table:table-cell table:style-name="ce34" office:value-type="float" office:value="27922">
            <text:p>27922</text:p>
          </table:table-cell>
          <table:table-cell table:style-name="ce36" office:value-type="currency" office:currency="PLN" office:value="1.36">
            <text:p>1,36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Granuflex opatrunek hydrokoloidowy 20x20cm 1szt</text:p>
          </table:table-cell>
          <table:table-cell table:style-name="ce34" office:value-type="float" office:value="11589">
            <text:p>11589</text:p>
          </table:table-cell>
          <table:table-cell table:style-name="ce36" office:value-type="currency" office:currency="PLN" office:value="1.24">
            <text:p>1,24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Opatr.AQUACEL Ag Foam 10x10cm nieprzyl.x1</text:p>
          </table:table-cell>
          <table:table-cell table:style-name="ce34" office:value-type="float" office:value="7238">
            <text:p>7238</text:p>
          </table:table-cell>
          <table:table-cell table:style-name="ce36" office:value-type="currency" office:currency="PLN" office:value="1.24">
            <text:p>1,24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Opatr.Vliwazell wysoce chłonny 10x20 25szt</text:p>
          </table:table-cell>
          <table:table-cell table:style-name="ce34" office:value-type="float" office:value="12823">
            <text:p>12823</text:p>
          </table:table-cell>
          <table:table-cell table:style-name="ce36" office:value-type="currency" office:currency="PLN" office:value="1.24">
            <text:p>1,24 zł</text:p>
          </table:table-cell>
          <table:table-cell table:style-name="ce35" table:number-columns-repeated="2"/>
          <table:table-cell table:number-columns-repeated="1019"/>
        </table:table-row>
        <table:table-row table:style-name="ro20">
          <table:table-cell table:style-name="ce33" office:value-type="string">
            <text:p>Schulke Octenident Mouthwash Płyn Do Higieny Jamy Ustnej 250ml</text:p>
          </table:table-cell>
          <table:table-cell table:style-name="ce34" office:value-type="float" office:value="15747">
            <text:p>15747</text:p>
          </table:table-cell>
          <table:table-cell table:style-name="ce36" office:value-type="currency" office:currency="PLN" office:value="1.24">
            <text:p>1,24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Skinsept Pur 1000ml</text:p>
          </table:table-cell>
          <table:table-cell table:style-name="ce34" office:value-type="float" office:value="15403">
            <text:p>15403</text:p>
          </table:table-cell>
          <table:table-cell table:style-name="ce36" office:value-type="currency" office:currency="PLN" office:value="1.24">
            <text:p>1,24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Smith Nephew Bactigras z chlorhexyd. 15x20cm 10 szt.</text:p>
          </table:table-cell>
          <table:table-cell table:style-name="ce34" office:value-type="float" office:value="13551">
            <text:p>13551</text:p>
          </table:table-cell>
          <table:table-cell table:style-name="ce36" office:value-type="currency" office:currency="PLN" office:value="1.24">
            <text:p>1,24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Stop Hemo Tampony hemostatyczne  5szt.</text:p>
          </table:table-cell>
          <table:table-cell table:style-name="ce34" office:value-type="float" office:value="11602">
            <text:p>11602</text:p>
          </table:table-cell>
          <table:table-cell table:style-name="ce36" office:value-type="currency" office:currency="PLN" office:value="1.24">
            <text:p>1,24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Obesimed Forte 42 kaps</text:p>
          </table:table-cell>
          <table:table-cell table:style-name="ce34" office:value-type="float" office:value="24778">
            <text:p>24778</text:p>
          </table:table-cell>
          <table:table-cell table:style-name="ce36" office:value-type="currency" office:currency="PLN" office:value="1.19">
            <text:p>1,19 zł</text:p>
          </table:table-cell>
          <table:table-cell table:style-name="ce35" table:number-columns-repeated="2"/>
          <table:table-cell table:number-columns-repeated="1019"/>
        </table:table-row>
        <table:table-row table:style-name="ro24">
          <table:table-cell table:style-name="ce33" office:value-type="string">
            <text:p>Caudalie Vinoperfect Radiance Serum Complexion Correcting Serum Rozjaśniające Przebarwienia 30 ml</text:p>
          </table:table-cell>
          <table:table-cell table:style-name="ce34" office:value-type="float" office:value="28345">
            <text:p>28345</text:p>
          </table:table-cell>
          <table:table-cell table:style-name="ce36" office:value-type="currency" office:currency="PLN" office:value="1.03">
            <text:p>1,03 zł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3" office:value-type="string">
            <text:p>Depan 01004011</text:p>
          </table:table-cell>
          <table:table-cell table:style-name="ce34" office:value-type="float" office:value="18210">
            <text:p>18210</text:p>
          </table:table-cell>
          <table:table-cell table:style-name="ce36" office:value-type="currency" office:currency="PLN" office:value="1.03">
            <text:p>1,03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Łącznie: Depan 01004011</text:p>
          </table:table-cell>
          <table:table-cell table:style-name="ce35"/>
          <table:table-cell table:style-name="ce36" office:value-type="currency" office:currency="PLN" office:value="1.03">
            <text:p>1,03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Diagnostic Inhalator PRO Mesh</text:p>
          </table:table-cell>
          <table:table-cell table:style-name="ce34" office:value-type="float" office:value="12540">
            <text:p>12540</text:p>
          </table:table-cell>
          <table:table-cell table:style-name="ce36" office:value-type="currency" office:currency="PLN" office:value="1.03">
            <text:p>1,03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DIAGNOSTIC NC300</text:p>
          </table:table-cell>
          <table:table-cell table:style-name="ce34" office:value-type="float" office:value="22101">
            <text:p>22101</text:p>
          </table:table-cell>
          <table:table-cell table:style-name="ce36" office:value-type="currency" office:currency="PLN" office:value="1.03">
            <text:p>1,03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Microlife Termometr NC 200</text:p>
          </table:table-cell>
          <table:table-cell table:style-name="ce34" office:value-type="float" office:value="9262">
            <text:p>9262</text:p>
          </table:table-cell>
          <table:table-cell table:style-name="ce36" office:value-type="currency" office:currency="PLN" office:value="1.03">
            <text:p>1,03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Niacynobaza 25% Skoncentrowane serum z niacynamidem 30g</text:p>
          </table:table-cell>
          <table:table-cell table:style-name="ce34" office:value-type="float" office:value="32421">
            <text:p>32421</text:p>
          </table:table-cell>
          <table:table-cell table:style-name="ce36" office:value-type="currency" office:currency="PLN" office:value="1.03">
            <text:p>1,03 zł</text:p>
          </table:table-cell>
          <table:table-cell table:style-name="ce35" table:number-columns-repeated="2"/>
          <table:table-cell table:number-columns-repeated="1019"/>
        </table:table-row>
        <table:table-row table:style-name="ro20">
          <table:table-cell table:style-name="ce33" office:value-type="string">
            <text:p>Caudalie Vinoperfect Glikolowy Krem Rozjaśniający na Noc Refill, 50ml</text:p>
          </table:table-cell>
          <table:table-cell table:style-name="ce34" office:value-type="float" office:value="32165">
            <text:p>32165</text:p>
          </table:table-cell>
          <table:table-cell table:style-name="ce36" office:value-type="currency" office:currency="PLN" office:value="1.02">
            <text:p>1,02 zł</text:p>
          </table:table-cell>
          <table:table-cell table:style-name="ce35" table:number-columns-repeated="2"/>
          <table:table-cell table:number-columns-repeated="1019"/>
        </table:table-row>
        <table:table-row table:style-name="ro20">
          <table:table-cell table:style-name="ce33" office:value-type="string">
            <text:p>Caudalie Vinoperfect Krem na Przebarwienia z Niacynamidem Refill, 50ml</text:p>
          </table:table-cell>
          <table:table-cell table:style-name="ce34" office:value-type="float" office:value="32166">
            <text:p>32166</text:p>
          </table:table-cell>
          <table:table-cell table:style-name="ce36" office:value-type="currency" office:currency="PLN" office:value="1.02">
            <text:p>1,02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Krem Allergika z olejkiem z wiesiołka 20% na dzień i noc 100ml</text:p>
          </table:table-cell>
          <table:table-cell table:style-name="ce34" office:value-type="float" office:value="11735">
            <text:p>11735</text:p>
          </table:table-cell>
          <table:table-cell table:style-name="ce36" office:value-type="currency" office:currency="PLN" office:value="1.02">
            <text:p>1,02 zł</text:p>
          </table:table-cell>
          <table:table-cell table:style-name="ce35" table:number-columns-repeated="2"/>
          <table:table-cell table:number-columns-repeated="1019"/>
        </table:table-row>
        <table:table-row table:style-name="ro23">
          <table:table-cell table:style-name="ce33" office:value-type="string">
            <text:p>Krem ANIDA odżywczo-regenerujący olejek arganowy na dzień i noc 100ml</text:p>
          </table:table-cell>
          <table:table-cell table:style-name="ce34" office:value-type="float" office:value="16033">
            <text:p>16033</text:p>
          </table:table-cell>
          <table:table-cell table:style-name="ce36" office:value-type="currency" office:currency="PLN" office:value="1.02">
            <text:p>1,02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A-DERMA DERMALIBOUR+ CICA- Krem regenerujący 50ml</text:p>
          </table:table-cell>
          <table:table-cell table:style-name="ce34" office:value-type="float" office:value="10517">
            <text:p>10517</text:p>
          </table:table-cell>
          <table:table-cell table:style-name="ce36" office:value-type="currency" office:currency="PLN" office:value="0.95">
            <text:p>0,95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Allergika, Krem do twarzy MED, 50 ml</text:p>
          </table:table-cell>
          <table:table-cell table:style-name="ce34" office:value-type="float" office:value="11733">
            <text:p>11733</text:p>
          </table:table-cell>
          <table:table-cell table:style-name="ce36" office:value-type="currency" office:currency="PLN" office:value="0.95">
            <text:p>0,95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Łącznie: Allergika, Krem do twarzy MED, 50 ml</text:p>
          </table:table-cell>
          <table:table-cell table:style-name="ce35"/>
          <table:table-cell table:style-name="ce36" office:value-type="currency" office:currency="PLN" office:value="0.95">
            <text:p>0,95 zł</text:p>
          </table:table-cell>
          <table:table-cell table:style-name="ce35" table:number-columns-repeated="2"/>
          <table:table-cell table:number-columns-repeated="1019"/>
        </table:table-row>
        <table:table-row table:style-name="ro23">
          <table:table-cell table:style-name="ce33" office:value-type="string">
            <text:p>AVENE BARDZO WYSOKA OCHRONA CLEANANCE Koloryzujący SPF50+ 50ml</text:p>
          </table:table-cell>
          <table:table-cell table:style-name="ce34" office:value-type="float" office:value="13971">
            <text:p>13971</text:p>
          </table:table-cell>
          <table:table-cell table:style-name="ce36" office:value-type="currency" office:currency="PLN" office:value="0.95">
            <text:p>0,95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Avene HYALURON ACTIV B3 Krem odbudowujący komórki 50ml</text:p>
          </table:table-cell>
          <table:table-cell table:style-name="ce34" office:value-type="float" office:value="19009">
            <text:p>19009</text:p>
          </table:table-cell>
          <table:table-cell table:style-name="ce36" office:value-type="currency" office:currency="PLN" office:value="0.95">
            <text:p>0,95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Avene XERACALM NUTRITION Balsam nawilżający 200 ml</text:p>
          </table:table-cell>
          <table:table-cell table:style-name="ce34" office:value-type="float" office:value="19417">
            <text:p>19417</text:p>
          </table:table-cell>
          <table:table-cell table:style-name="ce36" office:value-type="currency" office:currency="PLN" office:value="0.95">
            <text:p>0,95 zł</text:p>
          </table:table-cell>
          <table:table-cell table:style-name="ce35" table:number-columns-repeated="2"/>
          <table:table-cell table:number-columns-repeated="1019"/>
        </table:table-row>
        <table:table-row table:style-name="ro23">
          <table:table-cell table:style-name="ce33" office:value-type="string">
            <text:p>CAUDALIE PREMIER CRU RICHE Krem o bogatej konsystencji Anti - Age 50 ml</text:p>
          </table:table-cell>
          <table:table-cell table:style-name="ce34" office:value-type="float" office:value="31983">
            <text:p>31983</text:p>
          </table:table-cell>
          <table:table-cell table:style-name="ce36" office:value-type="currency" office:currency="PLN" office:value="0.95">
            <text:p>0,95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CeraVe Regenerujący krem do rąk 50ml</text:p>
          </table:table-cell>
          <table:table-cell table:style-name="ce34" office:value-type="float" office:value="3515">
            <text:p>3515</text:p>
          </table:table-cell>
          <table:table-cell table:style-name="ce36" office:value-type="currency" office:currency="PLN" office:value="0.95">
            <text:p>0,95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Cetaphil Pro Redness Control krem nawilżający na noc 50ml</text:p>
          </table:table-cell>
          <table:table-cell table:style-name="ce34" office:value-type="float" office:value="10145">
            <text:p>10145</text:p>
          </table:table-cell>
          <table:table-cell table:style-name="ce36" office:value-type="currency" office:currency="PLN" office:value="0.95">
            <text:p>0,95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Drula Extra Forte krem depigmentacyjny 30ml</text:p>
          </table:table-cell>
          <table:table-cell table:style-name="ce34" office:value-type="float" office:value="16650">
            <text:p>16650</text:p>
          </table:table-cell>
          <table:table-cell table:style-name="ce36" office:value-type="currency" office:currency="PLN" office:value="0.95">
            <text:p>0,95 zł</text:p>
          </table:table-cell>
          <table:table-cell table:style-name="ce35" table:number-columns-repeated="2"/>
          <table:table-cell table:number-columns-repeated="1019"/>
        </table:table-row>
        <table:table-row table:style-name="ro20">
          <table:table-cell table:style-name="ce33" office:value-type="string">
            <text:p>DUCRAY DEXYANE MED Wyrób medyczny krem kojąco-regenerujący 30ml</text:p>
          </table:table-cell>
          <table:table-cell table:style-name="ce34" office:value-type="float" office:value="31946">
            <text:p>31946</text:p>
          </table:table-cell>
          <table:table-cell table:style-name="ce36" office:value-type="currency" office:currency="PLN" office:value="0.95">
            <text:p>0,95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Ducray Keracnyl Reapir Krem Odbudowujący 50ml</text:p>
          </table:table-cell>
          <table:table-cell table:style-name="ce34" office:value-type="float" office:value="19520">
            <text:p>19520</text:p>
          </table:table-cell>
          <table:table-cell table:style-name="ce36" office:value-type="currency" office:currency="PLN" office:value="0.95">
            <text:p>0,95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Emolium Dermocare emulsja do kąpieli 400ml</text:p>
          </table:table-cell>
          <table:table-cell table:style-name="ce34" office:value-type="float" office:value="326">
            <text:p>326</text:p>
          </table:table-cell>
          <table:table-cell table:style-name="ce36" office:value-type="currency" office:currency="PLN" office:value="0.95">
            <text:p>0,95 zł</text:p>
          </table:table-cell>
          <table:table-cell table:style-name="ce35" table:number-columns-repeated="2"/>
          <table:table-cell table:number-columns-repeated="1019"/>
        </table:table-row>
        <table:table-row table:style-name="ro23">
          <table:table-cell table:style-name="ce33" office:value-type="string">
            <text:p>Nuxe Nuxuriance Gold Ultraodżywczy Krem Do Twarzy 50ml + Balsam Pod Oczy 15ml</text:p>
          </table:table-cell>
          <table:table-cell table:style-name="ce34" office:value-type="float" office:value="31961">
            <text:p>31961</text:p>
          </table:table-cell>
          <table:table-cell table:style-name="ce36" office:value-type="currency" office:currency="PLN" office:value="0.95">
            <text:p>0,95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Nuxe Zestaw - Huile Prodigieuse</text:p>
          </table:table-cell>
          <table:table-cell table:style-name="ce34" office:value-type="float" office:value="19670">
            <text:p>19670</text:p>
          </table:table-cell>
          <table:table-cell table:style-name="ce36" office:value-type="currency" office:currency="PLN" office:value="0.95">
            <text:p>0,95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Nutramigen 3 LGG Complete proszek 400g</text:p>
          </table:table-cell>
          <table:table-cell table:style-name="ce34" office:value-type="float" office:value="9721">
            <text:p>9721</text:p>
          </table:table-cell>
          <table:table-cell table:style-name="ce36" office:value-type="currency" office:currency="PLN" office:value="0.94">
            <text:p>0,94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CONTROLY SMARKACZ Aspirator kataru dla dzieci, 1 szt.</text:p>
          </table:table-cell>
          <table:table-cell table:style-name="ce34" office:value-type="float" office:value="19588">
            <text:p>19588</text:p>
          </table:table-cell>
          <table:table-cell table:style-name="ce36" office:value-type="currency" office:currency="PLN" office:value="0.93">
            <text:p>0,93 zł</text:p>
          </table:table-cell>
          <table:table-cell table:style-name="ce35" table:number-columns-repeated="2"/>
          <table:table-cell table:number-columns-repeated="1019"/>
        </table:table-row>
        <table:table-row table:style-name="ro20">
          <table:table-cell table:style-name="ce33" office:value-type="string">
            <text:p>Farmapia Maść Propolisowa Wspomagająca Gojenie Ran 7% 30g</text:p>
          </table:table-cell>
          <table:table-cell table:style-name="ce34" office:value-type="float" office:value="9761">
            <text:p>9761</text:p>
          </table:table-cell>
          <table:table-cell table:style-name="ce36" office:value-type="currency" office:currency="PLN" office:value="0.93">
            <text:p>0,93 zł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3" office:value-type="string">
            <text:p>Gelacet 120kaps.</text:p>
          </table:table-cell>
          <table:table-cell table:style-name="ce34" office:value-type="float" office:value="13430">
            <text:p>13430</text:p>
          </table:table-cell>
          <table:table-cell table:style-name="ce36" office:value-type="currency" office:currency="PLN" office:value="0.93">
            <text:p>0,93 zł</text:p>
          </table:table-cell>
          <table:table-cell table:style-name="ce35" table:number-columns-repeated="2"/>
          <table:table-cell table:number-columns-repeated="1019"/>
        </table:table-row>
        <table:table-row table:style-name="ro20">
          <table:table-cell table:style-name="ce33" office:value-type="string">
            <text:p>Healing Herbal Szampon Leczniczy Przeciwłupieżowy 200ml</text:p>
          </table:table-cell>
          <table:table-cell table:style-name="ce34" office:value-type="float" office:value="7758">
            <text:p>7758</text:p>
          </table:table-cell>
          <table:table-cell table:style-name="ce36" office:value-type="currency" office:currency="PLN" office:value="0.93">
            <text:p>0,93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Mosbito Opaska Odstraszająca Komary i Meszki 1szt</text:p>
          </table:table-cell>
          <table:table-cell table:style-name="ce34" office:value-type="float" office:value="4597">
            <text:p>4597</text:p>
          </table:table-cell>
          <table:table-cell table:style-name="ce36" office:value-type="currency" office:currency="PLN" office:value="0.93">
            <text:p>0,93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Omron M2+ Ciśnieniomierz naramienny HEM-7188</text:p>
          </table:table-cell>
          <table:table-cell table:style-name="ce34" office:value-type="float" office:value="33270">
            <text:p>33270</text:p>
          </table:table-cell>
          <table:table-cell table:style-name="ce36" office:value-type="currency" office:currency="PLN" office:value="0.93">
            <text:p>0,93 zł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3" office:value-type="string">
            <text:p>Omron M4 Intelli It</text:p>
          </table:table-cell>
          <table:table-cell table:style-name="ce34" office:value-type="float" office:value="29699">
            <text:p>29699</text:p>
          </table:table-cell>
          <table:table-cell table:style-name="ce36" office:value-type="currency" office:currency="PLN" office:value="0.93">
            <text:p>0,93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Profarm - Olejek Manuka 10 ml.</text:p>
          </table:table-cell>
          <table:table-cell table:style-name="ce34" office:value-type="float" office:value="11086">
            <text:p>11086</text:p>
          </table:table-cell>
          <table:table-cell table:style-name="ce36" office:value-type="currency" office:currency="PLN" office:value="0.93">
            <text:p>0,93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Anty Kleszcz Przyrząd Do Usuwania Kleszczy 1szt.</text:p>
          </table:table-cell>
          <table:table-cell table:style-name="ce34" office:value-type="float" office:value="13664">
            <text:p>13664</text:p>
          </table:table-cell>
          <table:table-cell table:style-name="ce36" office:value-type="currency" office:currency="PLN" office:value="0.92">
            <text:p>0,92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Caudalie Vinopure Fluid matująco nawilżający 60 ml</text:p>
          </table:table-cell>
          <table:table-cell table:style-name="ce34" office:value-type="float" office:value="32413">
            <text:p>32413</text:p>
          </table:table-cell>
          <table:table-cell table:style-name="ce36" office:value-type="currency" office:currency="PLN" office:value="0.92">
            <text:p>0,92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Cewnik Foleya urologiczny silikonowy CH 16/10ml Romed</text:p>
          </table:table-cell>
          <table:table-cell table:style-name="ce34" office:value-type="float" office:value="12347">
            <text:p>12347</text:p>
          </table:table-cell>
          <table:table-cell table:style-name="ce36" office:value-type="currency" office:currency="PLN" office:value="0.92">
            <text:p>0,92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Kej Gruszka z kanką nr 9</text:p>
          </table:table-cell>
          <table:table-cell table:style-name="ce34" office:value-type="float" office:value="16885">
            <text:p>16885</text:p>
          </table:table-cell>
          <table:table-cell table:style-name="ce36" office:value-type="currency" office:currency="PLN" office:value="0.92">
            <text:p>0,92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Stanmark Stopper MDW 11 1 szt.</text:p>
          </table:table-cell>
          <table:table-cell table:style-name="ce34" office:value-type="float" office:value="9877">
            <text:p>9877</text:p>
          </table:table-cell>
          <table:table-cell table:style-name="ce36" office:value-type="currency" office:currency="PLN" office:value="0.92">
            <text:p>0,92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TZMO Pojemnik do dobowej zbiórki moczu tulipan 2,5 l</text:p>
          </table:table-cell>
          <table:table-cell table:style-name="ce34" office:value-type="float" office:value="6579">
            <text:p>6579</text:p>
          </table:table-cell>
          <table:table-cell table:style-name="ce36" office:value-type="currency" office:currency="PLN" office:value="0.92">
            <text:p>0,92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Caudalie Vinosun Protect Spf 30 Krem O Wysokiej Ochronie 50 ml</text:p>
          </table:table-cell>
          <table:table-cell table:style-name="ce34" office:value-type="float" office:value="28365">
            <text:p>28365</text:p>
          </table:table-cell>
          <table:table-cell table:style-name="ce36" office:value-type="currency" office:currency="PLN" office:value="0.89">
            <text:p>0,89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Czarnuszka 500Mg 60 Kaps</text:p>
          </table:table-cell>
          <table:table-cell table:style-name="ce34" office:value-type="float" office:value="11524">
            <text:p>11524</text:p>
          </table:table-cell>
          <table:table-cell table:style-name="ce36" office:value-type="currency" office:currency="PLN" office:value="0.89">
            <text:p>0,89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Ziaja Sopot Sun Krem Przeciw Zmarszczkom Spf30 60 ml</text:p>
          </table:table-cell>
          <table:table-cell table:style-name="ce34" office:value-type="float" office:value="5749">
            <text:p>5749</text:p>
          </table:table-cell>
          <table:table-cell table:style-name="ce36" office:value-type="currency" office:currency="PLN" office:value="0.89">
            <text:p>0,89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Balsam Koński-Żel chłodzący 500ml /Jardin Naturel/</text:p>
          </table:table-cell>
          <table:table-cell table:style-name="ce34" office:value-type="float" office:value="13784">
            <text:p>13784</text:p>
          </table:table-cell>
          <table:table-cell table:style-name="ce36" office:value-type="currency" office:currency="PLN" office:value="0.88">
            <text:p>0,88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KRAUTERHOF żel z żywokostem 250ml</text:p>
          </table:table-cell>
          <table:table-cell table:style-name="ce34" office:value-type="float" office:value="11050">
            <text:p>11050</text:p>
          </table:table-cell>
          <table:table-cell table:style-name="ce36" office:value-type="currency" office:currency="PLN" office:value="0.88">
            <text:p>0,88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Ozonella Oliwka Ozonowana 100 ml</text:p>
          </table:table-cell>
          <table:table-cell table:style-name="ce34" office:value-type="float" office:value="13559">
            <text:p>13559</text:p>
          </table:table-cell>
          <table:table-cell table:style-name="ce36" office:value-type="currency" office:currency="PLN" office:value="0.88">
            <text:p>0,88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Salviafarm Żel z kasztanowcem na przemęczone nogi 200ml</text:p>
          </table:table-cell>
          <table:table-cell table:style-name="ce34" office:value-type="float" office:value="18515">
            <text:p>18515</text:p>
          </table:table-cell>
          <table:table-cell table:style-name="ce36" office:value-type="currency" office:currency="PLN" office:value="0.88">
            <text:p>0,88 zł</text:p>
          </table:table-cell>
          <table:table-cell table:style-name="ce35" table:number-columns-repeated="2"/>
          <table:table-cell table:number-columns-repeated="1019"/>
        </table:table-row>
        <table:table-row table:style-name="ro20">
          <table:table-cell table:style-name="ce33" office:value-type="string">
            <text:p>Łącznie: Salviafarm Żel z kasztanowcem na przemęczone nogi 200ml</text:p>
          </table:table-cell>
          <table:table-cell table:style-name="ce35"/>
          <table:table-cell table:style-name="ce36" office:value-type="currency" office:currency="PLN" office:value="0.88">
            <text:p>0,88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Boiron Argentum Nitricum 15CH 4 g</text:p>
          </table:table-cell>
          <table:table-cell table:style-name="ce34" office:value-type="float" office:value="21233">
            <text:p>21233</text:p>
          </table:table-cell>
          <table:table-cell table:style-name="ce36" office:value-type="currency" office:currency="PLN" office:value="0.87">
            <text:p>0,87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HEEL Nervoheel N 50 tabl.</text:p>
          </table:table-cell>
          <table:table-cell table:style-name="ce34" office:value-type="float" office:value="7939">
            <text:p>7939</text:p>
          </table:table-cell>
          <table:table-cell table:style-name="ce36" office:value-type="currency" office:currency="PLN" office:value="0.87">
            <text:p>0,87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LEHNING Urarthone krople 250 ml</text:p>
          </table:table-cell>
          <table:table-cell table:style-name="ce34" office:value-type="float" office:value="12034">
            <text:p>12034</text:p>
          </table:table-cell>
          <table:table-cell table:style-name="ce36" office:value-type="currency" office:currency="PLN" office:value="0.87">
            <text:p>0,87 zł</text:p>
          </table:table-cell>
          <table:table-cell table:style-name="ce35" table:number-columns-repeated="2"/>
          <table:table-cell table:number-columns-repeated="1019"/>
        </table:table-row>
        <table:table-row table:style-name="ro24">
          <table:table-cell table:style-name="ce33" office:value-type="string">
            <text:p>Butosept Zestaw Do Dezynfekcji Stosowany Przy Grzybicy Stóp (Płyn 100Ml + Zasypka Dezynfekcyjna 50G)</text:p>
          </table:table-cell>
          <table:table-cell table:style-name="ce34" office:value-type="float" office:value="11956">
            <text:p>11956</text:p>
          </table:table-cell>
          <table:table-cell table:style-name="ce36" office:value-type="currency" office:currency="PLN" office:value="0.85">
            <text:p>0,85 zł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3" office:value-type="string">
            <text:p>Gal Tran 100kaps.</text:p>
          </table:table-cell>
          <table:table-cell table:style-name="ce34" office:value-type="float" office:value="5427">
            <text:p>5427</text:p>
          </table:table-cell>
          <table:table-cell table:style-name="ce36" office:value-type="currency" office:currency="PLN" office:value="0.83">
            <text:p>0,83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NOVATIV Grinotussan syrop 120ml</text:p>
          </table:table-cell>
          <table:table-cell table:style-name="ce34" office:value-type="float" office:value="19736">
            <text:p>19736</text:p>
          </table:table-cell>
          <table:table-cell table:style-name="ce36" office:value-type="currency" office:currency="PLN" office:value="0.83">
            <text:p>0,83 zł</text:p>
          </table:table-cell>
          <table:table-cell table:style-name="ce35" table:number-columns-repeated="2"/>
          <table:table-cell table:number-columns-repeated="1019"/>
        </table:table-row>
        <table:table-row table:style-name="ro24">
          <table:table-cell table:style-name="ce33" office:value-type="string">
            <text:p>PANI TERESA® CLASSIC PT 0403 Pończochy medyczne uciskowe 2 klasa kompresji (czubek otwarty, długie, beż, rozm. XL)</text:p>
          </table:table-cell>
          <table:table-cell table:style-name="ce34" office:value-type="float" office:value="15373">
            <text:p>15373</text:p>
          </table:table-cell>
          <table:table-cell table:style-name="ce36" office:value-type="currency" office:currency="PLN" office:value="0.82">
            <text:p>0,82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Vita-miner Prenatal 60 tabl</text:p>
          </table:table-cell>
          <table:table-cell table:style-name="ce34" office:value-type="float" office:value="369">
            <text:p>369</text:p>
          </table:table-cell>
          <table:table-cell table:style-name="ce36" office:value-type="currency" office:currency="PLN" office:value="0.81">
            <text:p>0,81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4 Liver 45kaps. Colfarm</text:p>
          </table:table-cell>
          <table:table-cell table:style-name="ce34" office:value-type="float" office:value="15926">
            <text:p>15926</text:p>
          </table:table-cell>
          <table:table-cell table:style-name="ce36" office:value-type="currency" office:currency="PLN" office:value="0.8">
            <text:p>0,80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Aspirin Cardio 100mg 28 tabl</text:p>
          </table:table-cell>
          <table:table-cell table:style-name="ce34" office:value-type="float" office:value="16094">
            <text:p>16094</text:p>
          </table:table-cell>
          <table:table-cell table:style-name="ce36" office:value-type="currency" office:currency="PLN" office:value="0.8">
            <text:p>0,80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Bebilon HMF Wzmacniacz mleka kobiecego 50x1g</text:p>
          </table:table-cell>
          <table:table-cell table:style-name="ce34" office:value-type="float" office:value="18684">
            <text:p>18684</text:p>
          </table:table-cell>
          <table:table-cell table:style-name="ce36" office:value-type="currency" office:currency="PLN" office:value="0.8">
            <text:p>0,80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Bonatium Karczoch 60 tabletek powlekanych</text:p>
          </table:table-cell>
          <table:table-cell table:style-name="ce34" office:value-type="float" office:value="18914">
            <text:p>18914</text:p>
          </table:table-cell>
          <table:table-cell table:style-name="ce36" office:value-type="currency" office:currency="PLN" office:value="0.8">
            <text:p>0,80 zł</text:p>
          </table:table-cell>
          <table:table-cell table:style-name="ce35" table:number-columns-repeated="2"/>
          <table:table-cell table:number-columns-repeated="1019"/>
        </table:table-row>
        <table:table-row table:style-name="ro20">
          <table:table-cell table:style-name="ce33" office:value-type="string">
            <text:p>Bonimed Gastrobon Na Trawienie Zioła Ojca Grzegorza 60kaps.</text:p>
          </table:table-cell>
          <table:table-cell table:style-name="ce34" office:value-type="float" office:value="16814">
            <text:p>16814</text:p>
          </table:table-cell>
          <table:table-cell table:style-name="ce36" office:value-type="currency" office:currency="PLN" office:value="0.8">
            <text:p>0,80 zł</text:p>
          </table:table-cell>
          <table:table-cell table:style-name="ce35" table:number-columns-repeated="2"/>
          <table:table-cell table:number-columns-repeated="1019"/>
        </table:table-row>
        <table:table-row table:style-name="ro20">
          <table:table-cell table:style-name="ce33" office:value-type="string">
            <text:p>Cholinex Pastylki do ssania w stanach zapalnych gardła i jamy ustnej 16 szt.</text:p>
          </table:table-cell>
          <table:table-cell table:style-name="ce34" office:value-type="float" office:value="10620">
            <text:p>10620</text:p>
          </table:table-cell>
          <table:table-cell table:style-name="ce36" office:value-type="currency" office:currency="PLN" office:value="0.8">
            <text:p>0,80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Euphrasia Świetlik Krople Do Oczu 10ml</text:p>
          </table:table-cell>
          <table:table-cell table:style-name="ce34" office:value-type="float" office:value="13982">
            <text:p>13982</text:p>
          </table:table-cell>
          <table:table-cell table:style-name="ce36" office:value-type="currency" office:currency="PLN" office:value="0.8">
            <text:p>0,80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Feminum Nawilżający Żel Intymny 75g</text:p>
          </table:table-cell>
          <table:table-cell table:style-name="ce34" office:value-type="float" office:value="19446">
            <text:p>19446</text:p>
          </table:table-cell>
          <table:table-cell table:style-name="ce36" office:value-type="currency" office:currency="PLN" office:value="0.8">
            <text:p>0,80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Fluimucil Forte 600mg 10tabl.</text:p>
          </table:table-cell>
          <table:table-cell table:style-name="ce34" office:value-type="float" office:value="11787">
            <text:p>11787</text:p>
          </table:table-cell>
          <table:table-cell table:style-name="ce36" office:value-type="currency" office:currency="PLN" office:value="0.8">
            <text:p>0,80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Fytofontana Gyntima Czopki Dopochwowe Probiotica 10szt.</text:p>
          </table:table-cell>
          <table:table-cell table:style-name="ce34" office:value-type="float" office:value="5827">
            <text:p>5827</text:p>
          </table:table-cell>
          <table:table-cell table:style-name="ce36" office:value-type="currency" office:currency="PLN" office:value="0.8">
            <text:p>0,80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Gorvita Babka Płesznik Mielona 150g</text:p>
          </table:table-cell>
          <table:table-cell table:style-name="ce34" office:value-type="float" office:value="16104">
            <text:p>16104</text:p>
          </table:table-cell>
          <table:table-cell table:style-name="ce36" office:value-type="currency" office:currency="PLN" office:value="0.8">
            <text:p>0,80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Gynauxil 10 Globulek Dopochwowych</text:p>
          </table:table-cell>
          <table:table-cell table:style-name="ce34" office:value-type="float" office:value="30023">
            <text:p>30023</text:p>
          </table:table-cell>
          <table:table-cell table:style-name="ce36" office:value-type="currency" office:currency="PLN" office:value="0.8">
            <text:p>0,80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HASCO VITAMINIUM A+E x 30 tabl. HASCO</text:p>
          </table:table-cell>
          <table:table-cell table:style-name="ce34" office:value-type="float" office:value="6384">
            <text:p>6384</text:p>
          </table:table-cell>
          <table:table-cell table:style-name="ce36" office:value-type="currency" office:currency="PLN" office:value="0.8">
            <text:p>0,80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Hepa Complex 60tabl.</text:p>
          </table:table-cell>
          <table:table-cell table:style-name="ce34" office:value-type="float" office:value="13776">
            <text:p>13776</text:p>
          </table:table-cell>
          <table:table-cell table:style-name="ce36" office:value-type="currency" office:currency="PLN" office:value="0.8">
            <text:p>0,80 zł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3" office:value-type="string">
            <text:p>Heparol 30tabl.</text:p>
          </table:table-cell>
          <table:table-cell table:style-name="ce34" office:value-type="float" office:value="8214">
            <text:p>8214</text:p>
          </table:table-cell>
          <table:table-cell table:style-name="ce36" office:value-type="currency" office:currency="PLN" office:value="0.8">
            <text:p>0,80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Hydronea Citron Baby 10sasz.</text:p>
          </table:table-cell>
          <table:table-cell table:style-name="ce34" office:value-type="float" office:value="13442">
            <text:p>13442</text:p>
          </table:table-cell>
          <table:table-cell table:style-name="ce36" office:value-type="currency" office:currency="PLN" office:value="0.8">
            <text:p>0,80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HYDROSAL 24 tabl. musujące</text:p>
          </table:table-cell>
          <table:table-cell table:style-name="ce34" office:value-type="float" office:value="32281">
            <text:p>32281</text:p>
          </table:table-cell>
          <table:table-cell table:style-name="ce36" office:value-type="currency" office:currency="PLN" office:value="0.8">
            <text:p>0,80 zł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3" office:value-type="string">
            <text:p>Livenorm 30kaps.</text:p>
          </table:table-cell>
          <table:table-cell table:style-name="ce34" office:value-type="float" office:value="9836">
            <text:p>9836</text:p>
          </table:table-cell>
          <table:table-cell table:style-name="ce36" office:value-type="currency" office:currency="PLN" office:value="0.8">
            <text:p>0,80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Mieloguard Glyco 30 kaps.</text:p>
          </table:table-cell>
          <table:table-cell table:style-name="ce34" office:value-type="float" office:value="17311">
            <text:p>17311</text:p>
          </table:table-cell>
          <table:table-cell table:style-name="ce36" office:value-type="currency" office:currency="PLN" office:value="0.8">
            <text:p>0,80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Natur Produkt Vedixin Intense 10ml</text:p>
          </table:table-cell>
          <table:table-cell table:style-name="ce34" office:value-type="float" office:value="28091">
            <text:p>28091</text:p>
          </table:table-cell>
          <table:table-cell table:style-name="ce36" office:value-type="currency" office:currency="PLN" office:value="0.8">
            <text:p>0,80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Natuwit, Olej z czarnuszki egipskiej 250ml</text:p>
          </table:table-cell>
          <table:table-cell table:style-name="ce34" office:value-type="float" office:value="13502">
            <text:p>13502</text:p>
          </table:table-cell>
          <table:table-cell table:style-name="ce36" office:value-type="currency" office:currency="PLN" office:value="0.8">
            <text:p>0,80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Noris Pharma Enteroflor 20kaps.</text:p>
          </table:table-cell>
          <table:table-cell table:style-name="ce34" office:value-type="float" office:value="32275">
            <text:p>32275</text:p>
          </table:table-cell>
          <table:table-cell table:style-name="ce36" office:value-type="currency" office:currency="PLN" office:value="0.8">
            <text:p>0,80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Nova T 380 Cu380Ag Wkładka Antykoncepcyjna 1szt.</text:p>
          </table:table-cell>
          <table:table-cell table:style-name="ce34" office:value-type="float" office:value="10602">
            <text:p>10602</text:p>
          </table:table-cell>
          <table:table-cell table:style-name="ce36" office:value-type="currency" office:currency="PLN" office:value="0.8">
            <text:p>0,80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Optive Fusion Krople Do Oczu 10ml</text:p>
          </table:table-cell>
          <table:table-cell table:style-name="ce34" office:value-type="float" office:value="10260">
            <text:p>10260</text:p>
          </table:table-cell>
          <table:table-cell table:style-name="ce36" office:value-type="currency" office:currency="PLN" office:value="0.8">
            <text:p>0,80 zł</text:p>
          </table:table-cell>
          <table:table-cell table:style-name="ce35" table:number-columns-repeated="2"/>
          <table:table-cell table:number-columns-repeated="1019"/>
        </table:table-row>
        <table:table-row table:style-name="ro20">
          <table:table-cell table:style-name="ce33" office:value-type="string">
            <text:p>Orsalit tabs 24 tabl musujące + Magnez z wit.B6 10 tabl musujących</text:p>
          </table:table-cell>
          <table:table-cell table:style-name="ce34" office:value-type="float" office:value="17594">
            <text:p>17594</text:p>
          </table:table-cell>
          <table:table-cell table:style-name="ce36" office:value-type="currency" office:currency="PLN" office:value="0.8">
            <text:p>0,80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Otinum 0,2g/g Krople Do Uszu 10g</text:p>
          </table:table-cell>
          <table:table-cell table:style-name="ce34" office:value-type="float" office:value="15762">
            <text:p>15762</text:p>
          </table:table-cell>
          <table:table-cell table:style-name="ce36" office:value-type="currency" office:currency="PLN" office:value="0.8">
            <text:p>0,80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Polfarmex Calcifos 500 Mg X 150 Tabl</text:p>
          </table:table-cell>
          <table:table-cell table:style-name="ce34" office:value-type="float" office:value="18941">
            <text:p>18941</text:p>
          </table:table-cell>
          <table:table-cell table:style-name="ce36" office:value-type="currency" office:currency="PLN" office:value="0.8">
            <text:p>0,80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Procto-Glyvenol 30g</text:p>
          </table:table-cell>
          <table:table-cell table:style-name="ce34" office:value-type="float" office:value="578">
            <text:p>578</text:p>
          </table:table-cell>
          <table:table-cell table:style-name="ce36" office:value-type="currency" office:currency="PLN" office:value="0.8">
            <text:p>0,80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Puwer Slim Liver 30tabl.</text:p>
          </table:table-cell>
          <table:table-cell table:style-name="ce34" office:value-type="float" office:value="11857">
            <text:p>11857</text:p>
          </table:table-cell>
          <table:table-cell table:style-name="ce36" office:value-type="currency" office:currency="PLN" office:value="0.8">
            <text:p>0,80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Regulobon Prosz. 200g</text:p>
          </table:table-cell>
          <table:table-cell table:style-name="ce34" office:value-type="float" office:value="8247">
            <text:p>8247</text:p>
          </table:table-cell>
          <table:table-cell table:style-name="ce36" office:value-type="currency" office:currency="PLN" office:value="0.8">
            <text:p>0,80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Softeye Duo Krople Do Oczu 10ml</text:p>
          </table:table-cell>
          <table:table-cell table:style-name="ce34" office:value-type="float" office:value="19605">
            <text:p>19605</text:p>
          </table:table-cell>
          <table:table-cell table:style-name="ce36" office:value-type="currency" office:currency="PLN" office:value="0.8">
            <text:p>0,80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Sylimarol Gastro 30kaps.</text:p>
          </table:table-cell>
          <table:table-cell table:style-name="ce34" office:value-type="float" office:value="11530">
            <text:p>11530</text:p>
          </table:table-cell>
          <table:table-cell table:style-name="ce36" office:value-type="currency" office:currency="PLN" office:value="0.8">
            <text:p>0,80 zł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3" office:value-type="string">
            <text:p>Travislim x 30tabl.</text:p>
          </table:table-cell>
          <table:table-cell table:style-name="ce34" office:value-type="float" office:value="32304">
            <text:p>32304</text:p>
          </table:table-cell>
          <table:table-cell table:style-name="ce36" office:value-type="currency" office:currency="PLN" office:value="0.8">
            <text:p>0,80 zł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3" office:value-type="string">
            <text:p>Triflora 40kaps.</text:p>
          </table:table-cell>
          <table:table-cell table:style-name="ce34" office:value-type="float" office:value="11607">
            <text:p>11607</text:p>
          </table:table-cell>
          <table:table-cell table:style-name="ce36" office:value-type="currency" office:currency="PLN" office:value="0.8">
            <text:p>0,80 zł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3" office:value-type="string">
            <text:p>Vigantol 10ml</text:p>
          </table:table-cell>
          <table:table-cell table:style-name="ce34" office:value-type="float" office:value="11269">
            <text:p>11269</text:p>
          </table:table-cell>
          <table:table-cell table:style-name="ce36" office:value-type="currency" office:currency="PLN" office:value="0.8">
            <text:p>0,80 zł</text:p>
          </table:table-cell>
          <table:table-cell table:style-name="ce35" table:number-columns-repeated="2"/>
          <table:table-cell table:number-columns-repeated="1019"/>
        </table:table-row>
        <table:table-row table:style-name="ro23">
          <table:table-cell table:style-name="ce33" office:value-type="string">
            <text:p>VITTER Calcium z Vit. C FORTE o smaku pomarańczowym, 20 tab. musujących</text:p>
          </table:table-cell>
          <table:table-cell table:style-name="ce34" office:value-type="float" office:value="15027">
            <text:p>15027</text:p>
          </table:table-cell>
          <table:table-cell table:style-name="ce36" office:value-type="currency" office:currency="PLN" office:value="0.8">
            <text:p>0,80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Zambon Fluimucil Forte 600 Mg 10 Tabl.</text:p>
          </table:table-cell>
          <table:table-cell table:style-name="ce34" office:value-type="float" office:value="3997">
            <text:p>3997</text:p>
          </table:table-cell>
          <table:table-cell table:style-name="ce36" office:value-type="currency" office:currency="PLN" office:value="0.8">
            <text:p>0,80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ZYSKAJ ZDROWIE Multioptic 30 tabl</text:p>
          </table:table-cell>
          <table:table-cell table:style-name="ce34" office:value-type="float" office:value="17350">
            <text:p>17350</text:p>
          </table:table-cell>
          <table:table-cell table:style-name="ce36" office:value-type="currency" office:currency="PLN" office:value="0.8">
            <text:p>0,80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4Lacti Baby krople 5 ml</text:p>
          </table:table-cell>
          <table:table-cell table:style-name="ce34" office:value-type="float" office:value="3183">
            <text:p>3183</text:p>
          </table:table-cell>
          <table:table-cell table:style-name="ce36" office:value-type="currency" office:currency="PLN" office:value="0.79">
            <text:p>0,79 zł</text:p>
          </table:table-cell>
          <table:table-cell table:style-name="ce35" table:number-columns-repeated="2"/>
          <table:table-cell table:number-columns-repeated="1019"/>
        </table:table-row>
        <table:table-row table:style-name="ro20">
          <table:table-cell table:style-name="ce33" office:value-type="string">
            <text:p>Bd Becton Dickinson Becton Dickinson Igły Do Pena 100Szt. 0.23X4Mm 32G</text:p>
          </table:table-cell>
          <table:table-cell table:style-name="ce34" office:value-type="float" office:value="16950">
            <text:p>16950</text:p>
          </table:table-cell>
          <table:table-cell table:style-name="ce36" office:value-type="currency" office:currency="PLN" office:value="0.79">
            <text:p>0,79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Bebon Colica! kateter rektalny na kolkę dla niemowląt 5 szt.</text:p>
          </table:table-cell>
          <table:table-cell table:style-name="ce34" office:value-type="float" office:value="16508">
            <text:p>16508</text:p>
          </table:table-cell>
          <table:table-cell table:style-name="ce36" office:value-type="currency" office:currency="PLN" office:value="0.79">
            <text:p>0,79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ECTOGEL Żel do oczu z ektoiną 10ml</text:p>
          </table:table-cell>
          <table:table-cell table:style-name="ce34" office:value-type="float" office:value="14067">
            <text:p>14067</text:p>
          </table:table-cell>
          <table:table-cell table:style-name="ce36" office:value-type="currency" office:currency="PLN" office:value="0.79">
            <text:p>0,79 zł</text:p>
          </table:table-cell>
          <table:table-cell table:style-name="ce35" table:number-columns-repeated="2"/>
          <table:table-cell table:number-columns-repeated="1019"/>
        </table:table-row>
        <table:table-row table:style-name="ro23">
          <table:table-cell table:style-name="ce33" office:value-type="string">
            <text:p>Nurofen Forte dla dzieci 200 mg/5 ml Zawiesina o smaku truskawkowym 150 ml</text:p>
          </table:table-cell>
          <table:table-cell table:style-name="ce34" office:value-type="float" office:value="11065">
            <text:p>11065</text:p>
          </table:table-cell>
          <table:table-cell table:style-name="ce36" office:value-type="currency" office:currency="PLN" office:value="0.79">
            <text:p>0,79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Nutricia Nutrison Protein Intense Butelka 500ml</text:p>
          </table:table-cell>
          <table:table-cell table:style-name="ce34" office:value-type="float" office:value="28426">
            <text:p>28426</text:p>
          </table:table-cell>
          <table:table-cell table:style-name="ce36" office:value-type="currency" office:currency="PLN" office:value="0.79">
            <text:p>0,79 zł</text:p>
          </table:table-cell>
          <table:table-cell table:style-name="ce35" table:number-columns-repeated="2"/>
          <table:table-cell table:number-columns-repeated="1019"/>
        </table:table-row>
        <table:table-row table:style-name="ro20">
          <table:table-cell table:style-name="ce33" office:value-type="string">
            <text:p>Nutridrink preparat odżywczy smak owoce leśne 4x125ml</text:p>
          </table:table-cell>
          <table:table-cell table:style-name="ce34" office:value-type="float" office:value="886">
            <text:p>886</text:p>
          </table:table-cell>
          <table:table-cell table:style-name="ce36" office:value-type="currency" office:currency="PLN" office:value="0.79">
            <text:p>0,79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Romed Igła ROMED 0,5 x 16mm 100 szt.</text:p>
          </table:table-cell>
          <table:table-cell table:style-name="ce34" office:value-type="float" office:value="15208">
            <text:p>15208</text:p>
          </table:table-cell>
          <table:table-cell table:style-name="ce36" office:value-type="currency" office:currency="PLN" office:value="0.79">
            <text:p>0,79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Romed Worek Na Mocz Ze Spustem 2,0 L 1 Szt</text:p>
          </table:table-cell>
          <table:table-cell table:style-name="ce34" office:value-type="float" office:value="14672">
            <text:p>14672</text:p>
          </table:table-cell>
          <table:table-cell table:style-name="ce36" office:value-type="currency" office:currency="PLN" office:value="0.79">
            <text:p>0,79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Strzykawka Cewnikowa Janetta 50Ml</text:p>
          </table:table-cell>
          <table:table-cell table:style-name="ce34" office:value-type="float" office:value="18161">
            <text:p>18161</text:p>
          </table:table-cell>
          <table:table-cell table:style-name="ce36" office:value-type="currency" office:currency="PLN" office:value="0.79">
            <text:p>0,79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Tanakan 40 Mg 30 Tabl.</text:p>
          </table:table-cell>
          <table:table-cell table:style-name="ce34" office:value-type="float" office:value="19454">
            <text:p>19454</text:p>
          </table:table-cell>
          <table:table-cell table:style-name="ce36" office:value-type="currency" office:currency="PLN" office:value="0.79">
            <text:p>0,79 zł</text:p>
          </table:table-cell>
          <table:table-cell table:style-name="ce35" table:number-columns-repeated="2"/>
          <table:table-cell table:number-columns-repeated="1019"/>
        </table:table-row>
        <table:table-row table:style-name="ro25">
          <table:table-cell table:style-name="ce33" office:value-type="string">
            <text:p>AeroChamber Plus Flow-Vu komora inhalacyjna z ustnikiem po 5 roku życia niebieska</text:p>
          </table:table-cell>
          <table:table-cell table:style-name="ce34" office:value-type="float" office:value="15983">
            <text:p>15983</text:p>
          </table:table-cell>
          <table:table-cell table:style-name="ce36" office:value-type="currency" office:currency="PLN" office:value="0.76">
            <text:p>0,76 zł</text:p>
          </table:table-cell>
          <table:table-cell table:style-name="ce35" table:number-columns-repeated="2"/>
          <table:table-cell table:number-columns-repeated="1019"/>
        </table:table-row>
        <table:table-row table:style-name="ro25">
          <table:table-cell table:style-name="ce33" office:value-type="string">
            <text:p>Diagnosis Zestaw Akcesoriów Do Inhalacji Dla Dorosłych Z Regulacją Wielkości Cząsteczek</text:p>
          </table:table-cell>
          <table:table-cell table:style-name="ce34" office:value-type="float" office:value="18525">
            <text:p>18525</text:p>
          </table:table-cell>
          <table:table-cell table:style-name="ce36" office:value-type="currency" office:currency="PLN" office:value="0.76">
            <text:p>0,76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Elissa Maść majerankowa 25g</text:p>
          </table:table-cell>
          <table:table-cell table:style-name="ce34" office:value-type="float" office:value="4515">
            <text:p>4515</text:p>
          </table:table-cell>
          <table:table-cell table:style-name="ce36" office:value-type="currency" office:currency="PLN" office:value="0.76">
            <text:p>0,76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GORVITA Puder rodzinny pielęgnacyjny 50ml</text:p>
          </table:table-cell>
          <table:table-cell table:style-name="ce34" office:value-type="float" office:value="17905">
            <text:p>17905</text:p>
          </table:table-cell>
          <table:table-cell table:style-name="ce36" office:value-type="currency" office:currency="PLN" office:value="0.76">
            <text:p>0,76 zł</text:p>
          </table:table-cell>
          <table:table-cell table:style-name="ce35" table:number-columns-repeated="2"/>
          <table:table-cell table:number-columns-repeated="1019"/>
        </table:table-row>
        <table:table-row table:style-name="ro23">
          <table:table-cell table:style-name="ce33" office:value-type="string">
            <text:p>Kailas Ajurwedyjski Krem Z Himalajskich Ziół Na Problemy Skórne 8 G</text:p>
          </table:table-cell>
          <table:table-cell table:style-name="ce34" office:value-type="float" office:value="12019">
            <text:p>12019</text:p>
          </table:table-cell>
          <table:table-cell table:style-name="ce36" office:value-type="currency" office:currency="PLN" office:value="0.76">
            <text:p>0,76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Komora inhalacyjna AeroChamber Plus Flow</text:p>
          </table:table-cell>
          <table:table-cell table:style-name="ce34" office:value-type="float" office:value="11457">
            <text:p>11457</text:p>
          </table:table-cell>
          <table:table-cell table:style-name="ce36" office:value-type="currency" office:currency="PLN" office:value="0.76">
            <text:p>0,76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MAŚĆ KOŃSKA chłodząca Dr.Natura 350g+150g</text:p>
          </table:table-cell>
          <table:table-cell table:style-name="ce34" office:value-type="float" office:value="14480">
            <text:p>14480</text:p>
          </table:table-cell>
          <table:table-cell table:style-name="ce36" office:value-type="currency" office:currency="PLN" office:value="0.76">
            <text:p>0,76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Pozytywne Konopie Maść Konopna Cbd 30ml</text:p>
          </table:table-cell>
          <table:table-cell table:style-name="ce34" office:value-type="float" office:value="32202">
            <text:p>32202</text:p>
          </table:table-cell>
          <table:table-cell table:style-name="ce36" office:value-type="currency" office:currency="PLN" office:value="0.76">
            <text:p>0,76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Pharmnew Urocal SD 40 tabletek</text:p>
          </table:table-cell>
          <table:table-cell table:style-name="ce34" office:value-type="float" office:value="18328">
            <text:p>18328</text:p>
          </table:table-cell>
          <table:table-cell table:style-name="ce36" office:value-type="currency" office:currency="PLN" office:value="0.75">
            <text:p>0,75 zł</text:p>
          </table:table-cell>
          <table:table-cell table:style-name="ce35" table:number-columns-repeated="2"/>
          <table:table-cell table:number-columns-repeated="1019"/>
        </table:table-row>
        <table:table-row table:style-name="ro20">
          <table:table-cell table:style-name="ce33" office:value-type="string">
            <text:p>Reprintic Krem ochronny do codziennej pielęgnacji tatuaży SPF 15 100 ml</text:p>
          </table:table-cell>
          <table:table-cell table:style-name="ce34" office:value-type="float" office:value="13610">
            <text:p>13610</text:p>
          </table:table-cell>
          <table:table-cell table:style-name="ce36" office:value-type="currency" office:currency="PLN" office:value="0.75">
            <text:p>0,75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UROFEM Żurawina 60 tabl.</text:p>
          </table:table-cell>
          <table:table-cell table:style-name="ce34" office:value-type="float" office:value="32307">
            <text:p>32307</text:p>
          </table:table-cell>
          <table:table-cell table:style-name="ce36" office:value-type="currency" office:currency="PLN" office:value="0.75">
            <text:p>0,75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Diagnosis TEST OWULACYJNY LH VITAM X 5 SzT</text:p>
          </table:table-cell>
          <table:table-cell table:style-name="ce34" office:value-type="float" office:value="5406">
            <text:p>5406</text:p>
          </table:table-cell>
          <table:table-cell table:style-name="ce36" office:value-type="currency" office:currency="PLN" office:value="0.74">
            <text:p>0,74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Kapsułki Herbapol na Uspokojenie 30 szt.</text:p>
          </table:table-cell>
          <table:table-cell table:style-name="ce34" office:value-type="float" office:value="10626">
            <text:p>10626</text:p>
          </table:table-cell>
          <table:table-cell table:style-name="ce36" office:value-type="currency" office:currency="PLN" office:value="0.74">
            <text:p>0,74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Tabletki uspokajające AMS 30 szt.</text:p>
          </table:table-cell>
          <table:table-cell table:style-name="ce34" office:value-type="float" office:value="18200">
            <text:p>18200</text:p>
          </table:table-cell>
          <table:table-cell table:style-name="ce36" office:value-type="currency" office:currency="PLN" office:value="0.74">
            <text:p>0,74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Łącznie: Tabletki uspokajające AMS 30 szt.</text:p>
          </table:table-cell>
          <table:table-cell table:style-name="ce35"/>
          <table:table-cell table:style-name="ce36" office:value-type="currency" office:currency="PLN" office:value="0.74">
            <text:p>0,74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Alka-Seltzer 324 mg tabletki musujące 10 szt.</text:p>
          </table:table-cell>
          <table:table-cell table:style-name="ce34" office:value-type="float" office:value="15060">
            <text:p>15060</text:p>
          </table:table-cell>
          <table:table-cell table:style-name="ce36" office:value-type="currency" office:currency="PLN" office:value="0.73">
            <text:p>0,73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Biobaby Dentinox Żel Na Ząbkowanie Łagodzący</text:p>
          </table:table-cell>
          <table:table-cell table:style-name="ce34" office:value-type="float" office:value="9256">
            <text:p>9256</text:p>
          </table:table-cell>
          <table:table-cell table:style-name="ce36" office:value-type="currency" office:currency="PLN" office:value="0.73">
            <text:p>0,73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Bisacodyl VP 5 mg 30 tabletek dojelitowych</text:p>
          </table:table-cell>
          <table:table-cell table:style-name="ce34" office:value-type="float" office:value="3429">
            <text:p>3429</text:p>
          </table:table-cell>
          <table:table-cell table:style-name="ce36" office:value-type="currency" office:currency="PLN" office:value="0.73">
            <text:p>0,73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Dentbox pudełko na protezy zębowe</text:p>
          </table:table-cell>
          <table:table-cell table:style-name="ce34" office:value-type="float" office:value="13732">
            <text:p>13732</text:p>
          </table:table-cell>
          <table:table-cell table:style-name="ce36" office:value-type="currency" office:currency="PLN" office:value="0.73">
            <text:p>0,73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Dexak 25mg 30 tabletek</text:p>
          </table:table-cell>
          <table:table-cell table:style-name="ce34" office:value-type="float" office:value="16606">
            <text:p>16606</text:p>
          </table:table-cell>
          <table:table-cell table:style-name="ce36" office:value-type="currency" office:currency="PLN" office:value="0.73">
            <text:p>0,73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Diaderma Olejek Marchewkowy Do Utrwalania Opalenizny 30 ml</text:p>
          </table:table-cell>
          <table:table-cell table:style-name="ce34" office:value-type="float" office:value="4751">
            <text:p>4751</text:p>
          </table:table-cell>
          <table:table-cell table:style-name="ce36" office:value-type="currency" office:currency="PLN" office:value="0.73">
            <text:p>0,73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Eloderm Krem od 1. dnia życia 75 ml</text:p>
          </table:table-cell>
          <table:table-cell table:style-name="ce34" office:value-type="float" office:value="247">
            <text:p>247</text:p>
          </table:table-cell>
          <table:table-cell table:style-name="ce36" office:value-type="currency" office:currency="PLN" office:value="0.73">
            <text:p>0,73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Espumisan 40 Mg/Ml Krople Doustne Emulsja 30ml</text:p>
          </table:table-cell>
          <table:table-cell table:style-name="ce34" office:value-type="float" office:value="19267">
            <text:p>19267</text:p>
          </table:table-cell>
          <table:table-cell table:style-name="ce36" office:value-type="currency" office:currency="PLN" office:value="0.73">
            <text:p>0,73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Goprazol Max 0,02g 14 kaps.</text:p>
          </table:table-cell>
          <table:table-cell table:style-name="ce34" office:value-type="float" office:value="12494">
            <text:p>12494</text:p>
          </table:table-cell>
          <table:table-cell table:style-name="ce36" office:value-type="currency" office:currency="PLN" office:value="0.73">
            <text:p>0,73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Infarma Trading Atoxil Enterosorbent 10sasz.</text:p>
          </table:table-cell>
          <table:table-cell table:style-name="ce34" office:value-type="float" office:value="32154">
            <text:p>32154</text:p>
          </table:table-cell>
          <table:table-cell table:style-name="ce36" office:value-type="currency" office:currency="PLN" office:value="0.73">
            <text:p>0,73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Kebene Plus 20 tabl</text:p>
          </table:table-cell>
          <table:table-cell table:style-name="ce34" office:value-type="float" office:value="17015">
            <text:p>17015</text:p>
          </table:table-cell>
          <table:table-cell table:style-name="ce36" office:value-type="currency" office:currency="PLN" office:value="0.73">
            <text:p>0,73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MYLAN Legalon 140 20 kaps</text:p>
          </table:table-cell>
          <table:table-cell table:style-name="ce34" office:value-type="float" office:value="17151">
            <text:p>17151</text:p>
          </table:table-cell>
          <table:table-cell table:style-name="ce36" office:value-type="currency" office:currency="PLN" office:value="0.73">
            <text:p>0,73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PhytoPharm Dentosept PEN ulga w bólu żel 3,3ml</text:p>
          </table:table-cell>
          <table:table-cell table:style-name="ce34" office:value-type="float" office:value="10415">
            <text:p>10415</text:p>
          </table:table-cell>
          <table:table-cell table:style-name="ce36" office:value-type="currency" office:currency="PLN" office:value="0.73">
            <text:p>0,73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Tiorfan 10 kapsułek</text:p>
          </table:table-cell>
          <table:table-cell table:style-name="ce34" office:value-type="float" office:value="5416">
            <text:p>5416</text:p>
          </table:table-cell>
          <table:table-cell table:style-name="ce36" office:value-type="currency" office:currency="PLN" office:value="0.73">
            <text:p>0,73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Urgo Opryszczka 3ml</text:p>
          </table:table-cell>
          <table:table-cell table:style-name="ce34" office:value-type="float" office:value="8304">
            <text:p>8304</text:p>
          </table:table-cell>
          <table:table-cell table:style-name="ce36" office:value-type="currency" office:currency="PLN" office:value="0.73">
            <text:p>0,73 zł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3" office:value-type="string">
            <text:p>Contractubex 50g</text:p>
          </table:table-cell>
          <table:table-cell table:style-name="ce34" office:value-type="float" office:value="5948">
            <text:p>5948</text:p>
          </table:table-cell>
          <table:table-cell table:style-name="ce36" office:value-type="currency" office:currency="PLN" office:value="0.72">
            <text:p>0,72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Granudacyn Roztwór do płukania ran 1000 ml</text:p>
          </table:table-cell>
          <table:table-cell table:style-name="ce34" office:value-type="float" office:value="16873">
            <text:p>16873</text:p>
          </table:table-cell>
          <table:table-cell table:style-name="ce36" office:value-type="currency" office:currency="PLN" office:value="0.72">
            <text:p>0,72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Hirudoid Żel na krwiaki i obrzęki oraz zapalenie żył 40 g</text:p>
          </table:table-cell>
          <table:table-cell table:style-name="ce34" office:value-type="float" office:value="19762">
            <text:p>19762</text:p>
          </table:table-cell>
          <table:table-cell table:style-name="ce36" office:value-type="currency" office:currency="PLN" office:value="0.72">
            <text:p>0,72 zł</text:p>
          </table:table-cell>
          <table:table-cell table:style-name="ce35" table:number-columns-repeated="2"/>
          <table:table-cell table:number-columns-repeated="1019"/>
        </table:table-row>
        <table:table-row table:style-name="ro20">
          <table:table-cell table:style-name="ce33" office:value-type="string">
            <text:p>Ketoxin Forte Wzmacniający Szampon Przeciwłupieżowy 6 ml</text:p>
          </table:table-cell>
          <table:table-cell table:style-name="ce34" office:value-type="float" office:value="4234">
            <text:p>4234</text:p>
          </table:table-cell>
          <table:table-cell table:style-name="ce36" office:value-type="currency" office:currency="PLN" office:value="0.72">
            <text:p>0,72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Krem ochronny z witaminą A 20g</text:p>
          </table:table-cell>
          <table:table-cell table:style-name="ce34" office:value-type="float" office:value="4273">
            <text:p>4273</text:p>
          </table:table-cell>
          <table:table-cell table:style-name="ce36" office:value-type="currency" office:currency="PLN" office:value="0.72">
            <text:p>0,72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Maść ichtiolowa 30g</text:p>
          </table:table-cell>
          <table:table-cell table:style-name="ce34" office:value-type="float" office:value="17225">
            <text:p>17225</text:p>
          </table:table-cell>
          <table:table-cell table:style-name="ce36" office:value-type="currency" office:currency="PLN" office:value="0.72">
            <text:p>0,72 zł</text:p>
          </table:table-cell>
          <table:table-cell table:style-name="ce35" table:number-columns-repeated="2"/>
          <table:table-cell table:number-columns-repeated="1019"/>
        </table:table-row>
        <table:table-row table:style-name="ro25">
          <table:table-cell table:style-name="ce33" office:value-type="string">
            <text:p>Paramedica Paraderm Forte Szampon Z Dziegciem Ichtiolem I Cyclopiroxem 150g</text:p>
          </table:table-cell>
          <table:table-cell table:style-name="ce34" office:value-type="float" office:value="15339">
            <text:p>15339</text:p>
          </table:table-cell>
          <table:table-cell table:style-name="ce36" office:value-type="currency" office:currency="PLN" office:value="0.72">
            <text:p>0,72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Rabka Spa Minerale Spray Mgiełka Solankowa 200 ml</text:p>
          </table:table-cell>
          <table:table-cell table:style-name="ce34" office:value-type="float" office:value="17911">
            <text:p>17911</text:p>
          </table:table-cell>
          <table:table-cell table:style-name="ce36" office:value-type="currency" office:currency="PLN" office:value="0.72">
            <text:p>0,72 zł</text:p>
          </table:table-cell>
          <table:table-cell table:style-name="ce35" table:number-columns-repeated="2"/>
          <table:table-cell table:number-columns-repeated="1019"/>
        </table:table-row>
        <table:table-row table:style-name="ro20">
          <table:table-cell table:style-name="ce33" office:value-type="string">
            <text:p>Zoxin-med Szampon leczniczy przeciwłupieżowy 60ml</text:p>
          </table:table-cell>
          <table:table-cell table:style-name="ce34" office:value-type="float" office:value="27925">
            <text:p>27925</text:p>
          </table:table-cell>
          <table:table-cell table:style-name="ce36" office:value-type="currency" office:currency="PLN" office:value="0.72">
            <text:p>0,72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Flos: Brzoza liść (betulae folium) - 50g</text:p>
          </table:table-cell>
          <table:table-cell table:style-name="ce34" office:value-type="float" office:value="12132">
            <text:p>12132</text:p>
          </table:table-cell>
          <table:table-cell table:style-name="ce36" office:value-type="currency" office:currency="PLN" office:value="0.68">
            <text:p>0,68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Flos: Jemioła ziele (visci herba) - 50g</text:p>
          </table:table-cell>
          <table:table-cell table:style-name="ce34" office:value-type="float" office:value="18486">
            <text:p>18486</text:p>
          </table:table-cell>
          <table:table-cell table:style-name="ce36" office:value-type="currency" office:currency="PLN" office:value="0.68">
            <text:p>0,68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Gensupen 2 wstrzykiwacz do insuliny  turkusowy 1szt.</text:p>
          </table:table-cell>
          <table:table-cell table:style-name="ce34" office:value-type="float" office:value="16836">
            <text:p>16836</text:p>
          </table:table-cell>
          <table:table-cell table:style-name="ce36" office:value-type="currency" office:currency="PLN" office:value="0.68">
            <text:p>0,68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Paski One Touch Select test 50szt.</text:p>
          </table:table-cell>
          <table:table-cell table:style-name="ce34" office:value-type="float" office:value="7681">
            <text:p>7681</text:p>
          </table:table-cell>
          <table:table-cell table:style-name="ce36" office:value-type="currency" office:currency="PLN" office:value="0.68">
            <text:p>0,68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Wellion Symphar Test Paskowy 50 szt.</text:p>
          </table:table-cell>
          <table:table-cell table:style-name="ce34" office:value-type="float" office:value="9226">
            <text:p>9226</text:p>
          </table:table-cell>
          <table:table-cell table:style-name="ce36" office:value-type="currency" office:currency="PLN" office:value="0.68">
            <text:p>0,68 zł</text:p>
          </table:table-cell>
          <table:table-cell table:style-name="ce35" table:number-columns-repeated="2"/>
          <table:table-cell table:number-columns-repeated="1019"/>
        </table:table-row>
        <table:table-row table:style-name="ro20">
          <table:table-cell table:style-name="ce33" office:value-type="string">
            <text:p>Pani Teresa Opaska Elastyczna Nadgarstek Długa M</text:p>
          </table:table-cell>
          <table:table-cell table:style-name="ce34" office:value-type="float" office:value="4799">
            <text:p>4799</text:p>
          </table:table-cell>
          <table:table-cell table:style-name="ce36" office:value-type="currency" office:currency="PLN" office:value="0.67">
            <text:p>0,67 zł</text:p>
          </table:table-cell>
          <table:table-cell table:style-name="ce35" table:number-columns-repeated="2"/>
          <table:table-cell table:number-columns-repeated="1019"/>
        </table:table-row>
        <table:table-row table:style-name="ro20">
          <table:table-cell table:style-name="ce33" office:value-type="string">
            <text:p>PANI TERESA®  PT 0306 Opaska elastyczna stawu nadgarstkowego - krótka</text:p>
          </table:table-cell>
          <table:table-cell table:style-name="ce34" office:value-type="float" office:value="9007">
            <text:p>9007</text:p>
          </table:table-cell>
          <table:table-cell table:style-name="ce36" office:value-type="currency" office:currency="PLN" office:value="0.67">
            <text:p>0,67 zł</text:p>
          </table:table-cell>
          <table:table-cell table:style-name="ce35" table:number-columns-repeated="2"/>
          <table:table-cell table:number-columns-repeated="1019"/>
        </table:table-row>
        <table:table-row table:style-name="ro20">
          <table:table-cell table:style-name="ce33" office:value-type="string">
            <text:p>ALLEVYN NON ADHESIVE Opatrunek hydropolowy 20x20cm</text:p>
          </table:table-cell>
          <table:table-cell table:style-name="ce34" office:value-type="float" office:value="17538">
            <text:p>17538</text:p>
          </table:table-cell>
          <table:table-cell table:style-name="ce36" office:value-type="currency" office:currency="PLN" office:value="0.62">
            <text:p>0,62 zł</text:p>
          </table:table-cell>
          <table:table-cell table:style-name="ce35" table:number-columns-repeated="2"/>
          <table:table-cell table:number-columns-repeated="1019"/>
        </table:table-row>
        <table:table-row table:style-name="ro20">
          <table:table-cell table:style-name="ce33" office:value-type="string">
            <text:p>ALLEVYN NON-ADHESIVE opatrunek 10x10cm - 1 sztuka</text:p>
          </table:table-cell>
          <table:table-cell table:style-name="ce34" office:value-type="float" office:value="7852">
            <text:p>7852</text:p>
          </table:table-cell>
          <table:table-cell table:style-name="ce36" office:value-type="currency" office:currency="PLN" office:value="0.62">
            <text:p>0,62 zł</text:p>
          </table:table-cell>
          <table:table-cell table:style-name="ce35" table:number-columns-repeated="2"/>
          <table:table-cell table:number-columns-repeated="1019"/>
        </table:table-row>
        <table:table-row table:style-name="ro20">
          <table:table-cell table:style-name="ce33" office:value-type="string">
            <text:p>BACTIGRAS Opatrunek parafinowy z chlorhexydyną  5cm * 5cm</text:p>
          </table:table-cell>
          <table:table-cell table:style-name="ce34" office:value-type="float" office:value="7649">
            <text:p>7649</text:p>
          </table:table-cell>
          <table:table-cell table:style-name="ce36" office:value-type="currency" office:currency="PLN" office:value="0.62">
            <text:p>0,62 zł</text:p>
          </table:table-cell>
          <table:table-cell table:style-name="ce35" table:number-columns-repeated="2"/>
          <table:table-cell table:number-columns-repeated="1019"/>
        </table:table-row>
        <table:table-row table:style-name="ro25">
          <table:table-cell table:style-name="ce33" office:value-type="string">
            <text:p>Convatec Granuflex Obramowany Bordered Opatrunek Hydrokoloidowy 6X6Cm 1Szt</text:p>
          </table:table-cell>
          <table:table-cell table:style-name="ce34" office:value-type="float" office:value="16874">
            <text:p>16874</text:p>
          </table:table-cell>
          <table:table-cell table:style-name="ce36" office:value-type="currency" office:currency="PLN" office:value="0.62">
            <text:p>0,62 zł</text:p>
          </table:table-cell>
          <table:table-cell table:style-name="ce35" table:number-columns-repeated="2"/>
          <table:table-cell table:number-columns-repeated="1019"/>
        </table:table-row>
        <table:table-row table:style-name="ro24">
          <table:table-cell table:style-name="ce33" office:value-type="string">
            <text:p>CONVATEC LTD. CONVATEC LTD. GRANUFLEX EXTRA THIN Opatrunek hydrokoloidowy 10cm x 10cm 1 szt.</text:p>
          </table:table-cell>
          <table:table-cell table:style-name="ce34" office:value-type="float" office:value="8496">
            <text:p>8496</text:p>
          </table:table-cell>
          <table:table-cell table:style-name="ce36" office:value-type="currency" office:currency="PLN" office:value="0.62">
            <text:p>0,62 zł</text:p>
          </table:table-cell>
          <table:table-cell table:style-name="ce35" table:number-columns-repeated="2"/>
          <table:table-cell table:number-columns-repeated="1019"/>
        </table:table-row>
        <table:table-row table:style-name="ro23">
          <table:table-cell table:style-name="ce33" office:value-type="string">
            <text:p>HYDROCOLL opatrunek hydrokoloidowy jałowy 10cmx10cm - 1 sztuka</text:p>
          </table:table-cell>
          <table:table-cell table:style-name="ce34" office:value-type="float" office:value="8563">
            <text:p>8563</text:p>
          </table:table-cell>
          <table:table-cell table:style-name="ce36" office:value-type="currency" office:currency="PLN" office:value="0.62">
            <text:p>0,62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Kikgel Microdacyn Hydrogel Żel Do Dezynfekcji Ran 60G</text:p>
          </table:table-cell>
          <table:table-cell table:style-name="ce34" office:value-type="float" office:value="17309">
            <text:p>17309</text:p>
          </table:table-cell>
          <table:table-cell table:style-name="ce36" office:value-type="currency" office:currency="PLN" office:value="0.62">
            <text:p>0,62 zł</text:p>
          </table:table-cell>
          <table:table-cell table:style-name="ce35" table:number-columns-repeated="2"/>
          <table:table-cell table:number-columns-repeated="1019"/>
        </table:table-row>
        <table:table-row table:style-name="ro20">
          <table:table-cell table:style-name="ce33" office:value-type="string">
            <text:p>Komfortowe Majteczki Jednorazowe Dla Kobiet Rozmiar 38 X 7 Sztuk</text:p>
          </table:table-cell>
          <table:table-cell table:style-name="ce34" office:value-type="float" office:value="13815">
            <text:p>13815</text:p>
          </table:table-cell>
          <table:table-cell table:style-name="ce36" office:value-type="currency" office:currency="PLN" office:value="0.62">
            <text:p>0,62 zł</text:p>
          </table:table-cell>
          <table:table-cell table:style-name="ce35" table:number-columns-repeated="2"/>
          <table:table-cell table:number-columns-repeated="1019"/>
        </table:table-row>
        <table:table-row table:style-name="ro20">
          <table:table-cell table:style-name="ce33" office:value-type="string">
            <text:p>LABORATORIA POLFA ŁÓDŹ SP. Z O.O. OPATRUNEK URGOCLEAN AG 10 X 10CM</text:p>
          </table:table-cell>
          <table:table-cell table:style-name="ce34" office:value-type="float" office:value="10151">
            <text:p>10151</text:p>
          </table:table-cell>
          <table:table-cell table:style-name="ce36" office:value-type="currency" office:currency="PLN" office:value="0.62">
            <text:p>0,62 zł</text:p>
          </table:table-cell>
          <table:table-cell table:style-name="ce35" table:number-columns-repeated="2"/>
          <table:table-cell table:number-columns-repeated="1019"/>
        </table:table-row>
        <table:table-row table:style-name="ro20">
          <table:table-cell table:style-name="ce33" office:value-type="string">
            <text:p>Leukoplast Cuticell Paraffin Plaster Impregnowany Parafiną 5szt</text:p>
          </table:table-cell>
          <table:table-cell table:style-name="ce34" office:value-type="float" office:value="11751">
            <text:p>11751</text:p>
          </table:table-cell>
          <table:table-cell table:style-name="ce36" office:value-type="currency" office:currency="PLN" office:value="0.62">
            <text:p>0,62 zł</text:p>
          </table:table-cell>
          <table:table-cell table:style-name="ce35" table:number-columns-repeated="2"/>
          <table:table-cell table:number-columns-repeated="1019"/>
        </table:table-row>
        <table:table-row table:style-name="ro19">
          <table:table-cell table:style-name="ce33" office:value-type="string">
            <text:p>Maga-Herba Benzyna apteczna, Maga-Herba, 100 ml</text:p>
          </table:table-cell>
          <table:table-cell table:style-name="ce34" office:value-type="float" office:value="10494">
            <text:p>10494</text:p>
          </table:table-cell>
          <table:table-cell table:style-name="ce36" office:value-type="currency" office:currency="PLN" office:value="0.62">
            <text:p>0,62 zł</text:p>
          </table:table-cell>
          <table:table-cell table:style-name="ce35" table:number-columns-repeated="2"/>
          <table:table-cell table:number-columns-repeated="1019"/>
        </table:table-row>
        <table:table-row table:style-name="ro23">
          <table:table-cell table:style-name="ce33" office:value-type="string">
            <text:p>Oktaseptal – aerozol z oktenidyną do dezynfekcji i odkażania ran, 250 ml</text:p>
          </table:table-cell>
          <table:table-cell table:style-name="ce34" office:value-type="float" office:value="11025">
            <text:p>11025</text:p>
          </table:table-cell>
          <table:table-cell table:style-name="ce36" office:value-type="currency" office:currency="PLN" office:value="0.62">
            <text:p>0,62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Opatr.BACTIGRAS z chlorhex. 15x20 1 szt.</text:p>
          </table:table-cell>
          <table:table-cell table:style-name="ce34" office:value-type="float" office:value="15330">
            <text:p>15330</text:p>
          </table:table-cell>
          <table:table-cell table:style-name="ce36" office:value-type="currency" office:currency="PLN" office:value="0.62">
            <text:p>0,62 zł</text:p>
          </table:table-cell>
          <table:table-cell table:style-name="ce35" table:number-columns-repeated="2"/>
          <table:table-cell table:number-columns-repeated="1019"/>
        </table:table-row>
        <table:table-row table:style-name="ro23">
          <table:table-cell table:style-name="ce33" office:value-type="string">
            <text:p>SIROWA POLAND SP. Z O.O. PIC OPTISOFT COMFORT PLASTER NA OKO 10 SZTUK</text:p>
          </table:table-cell>
          <table:table-cell table:style-name="ce34" office:value-type="float" office:value="11848">
            <text:p>11848</text:p>
          </table:table-cell>
          <table:table-cell table:style-name="ce36" office:value-type="currency" office:currency="PLN" office:value="0.62">
            <text:p>0,62 zł</text:p>
          </table:table-cell>
          <table:table-cell table:style-name="ce35" table:number-columns-repeated="2"/>
          <table:table-cell table:number-columns-repeated="1019"/>
        </table:table-row>
        <table:table-row table:style-name="ro21">
          <table:table-cell table:style-name="ce33" office:value-type="string">
            <text:p>Skinsept Pur Płyn do odkażania skóry 350ml</text:p>
          </table:table-cell>
          <table:table-cell table:style-name="ce34" office:value-type="float" office:value="5291">
            <text:p>5291</text:p>
          </table:table-cell>
          <table:table-cell table:style-name="ce36" office:value-type="currency" office:currency="PLN" office:value="0.62">
            <text:p>0,62 zł</text:p>
          </table:table-cell>
          <table:table-cell table:style-name="ce35" table:number-columns-repeated="2"/>
          <table:table-cell table:number-columns-repeated="1019"/>
        </table:table-row>
        <table:table-row table:style-name="ro18">
          <table:table-cell table:style-name="ce33" office:value-type="string">
            <text:p>Rexorubia, granulat, 350g</text:p>
          </table:table-cell>
          <table:table-cell table:style-name="ce34" office:value-type="float" office:value="4349">
            <text:p>4349</text:p>
          </table:table-cell>
          <table:table-cell table:style-name="ce35" table:number-columns-repeated="3"/>
          <table:table-cell table:number-columns-repeated="1019"/>
        </table:table-row>
        <table:table-row table:style-name="ro19">
          <table:table-cell table:style-name="ce33" office:value-type="string">
            <text:p>Multi-Sanostol, płyn dla dzieci powyżej 1 roku życia, 600g</text:p>
          </table:table-cell>
          <table:table-cell table:style-name="ce34" office:value-type="float" office:value="4775846">
            <text:p>4775846</text:p>
          </table:table-cell>
          <table:table-cell table:style-name="ce35" table:number-columns-repeated="3"/>
          <table:table-cell table:number-columns-repeated="1019"/>
        </table:table-row>
        <table:table-row table:style-name="ro21">
          <table:table-cell table:style-name="ce33" office:value-type="string">
            <text:p>Fertistim dla kobiet, 60 saszetek </text:p>
          </table:table-cell>
          <table:table-cell table:style-name="ce34" office:value-type="float" office:value="14983">
            <text:p>14983</text:p>
          </table:table-cell>
          <table:table-cell table:style-name="ce35" table:number-columns-repeated="3"/>
          <table:table-cell table:number-columns-repeated="1019"/>
        </table:table-row>
        <table:table-row table:style-name="ro8">
          <table:table-cell table:style-name="ce33" office:value-type="string">
            <text:p>A-DERMA DERMALIBOUR+ CICA- Krem regenerujący 100ml</text:p>
          </table:table-cell>
          <table:table-cell table:style-name="ce34" office:value-type="float" office:value="10516">
            <text:p>10516</text:p>
          </table:table-cell>
          <table:table-cell table:style-name="ce36" office:value-type="currency" office:currency="PLN" office:value="1.9">
            <text:p>1,90 zł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3" office:value-type="string">
            <text:p>A-DERMA DERMALIBOUR+ CICA- Krem regenerujący 100ml</text:p>
          </table:table-cell>
          <table:table-cell table:style-name="ce35"/>
          <table:table-cell table:style-name="ce36" office:value-type="currency" office:currency="PLN" office:value="1.9">
            <text:p>1,90 zł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3" office:value-type="string">
            <text:p>A-DERMA DERMALIBOUR+ CICA- Krem regenerujący 50ml</text:p>
          </table:table-cell>
          <table:table-cell table:style-name="ce34" office:value-type="float" office:value="10517">
            <text:p>10517</text:p>
          </table:table-cell>
          <table:table-cell table:style-name="ce36" office:value-type="currency" office:currency="PLN" office:value="0.95">
            <text:p>0,95 zł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3" office:value-type="string">
            <text:p>A-DERMA DERMALIBOUR+ CICA- Krem regenerujący 50ml</text:p>
          </table:table-cell>
          <table:table-cell table:style-name="ce35"/>
          <table:table-cell table:style-name="ce36" office:value-type="currency" office:currency="PLN" office:value="0.95">
            <text:p>0,95 zł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3" office:value-type="string">
            <text:p>A-Derma Zestaw Exomega Control Zestaw: Balsam Emolient 200Ml + Olejek Emolient 100Ml</text:p>
          </table:table-cell>
          <table:table-cell table:style-name="ce34" office:value-type="float" office:value="31901">
            <text:p>31901</text:p>
          </table:table-cell>
          <table:table-cell table:style-name="ce36" office:value-type="currency" office:currency="PLN" office:value="0.79">
            <text:p>0,79 zł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3" office:value-type="string">
            <text:p>A-Derma Zestaw Exomega Control Zestaw: Balsam Emolient 200Ml + Olejek Emolient 100Ml</text:p>
          </table:table-cell>
          <table:table-cell table:style-name="ce35"/>
          <table:table-cell table:style-name="ce36" office:value-type="currency" office:currency="PLN" office:value="0.79">
            <text:p>0,79 zł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3" office:value-type="string">
            <text:p>AVENE BARDZO WYSOKA OCHRONA CLEANANCE Koloryzujący SPF50+ 50ml</text:p>
          </table:table-cell>
          <table:table-cell table:style-name="ce34" office:value-type="float" office:value="13971">
            <text:p>13971</text:p>
          </table:table-cell>
          <table:table-cell table:style-name="ce36" office:value-type="currency" office:currency="PLN" office:value="0.95">
            <text:p>0,95 zł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3" office:value-type="string">
            <text:p>AVENE BARDZO WYSOKA OCHRONA CLEANANCE Koloryzujący SPF50+ 50ml Suma</text:p>
          </table:table-cell>
          <table:table-cell table:style-name="ce35"/>
          <table:table-cell table:style-name="ce36" office:value-type="currency" office:currency="PLN" office:value="0.95">
            <text:p>0,95 zł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3" office:value-type="string">
            <text:p>Avene COLD CREAM Krem 40ml</text:p>
          </table:table-cell>
          <table:table-cell table:style-name="ce34" office:value-type="float" office:value="3813">
            <text:p>3813</text:p>
          </table:table-cell>
          <table:table-cell table:style-name="ce36" office:value-type="currency" office:currency="PLN" office:value="2.85">
            <text:p>2,85 zł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3" office:value-type="string">
            <text:p>Avene COLD CREAM Krem 40ml Suma</text:p>
          </table:table-cell>
          <table:table-cell table:style-name="ce35"/>
          <table:table-cell table:style-name="ce36" office:value-type="currency" office:currency="PLN" office:value="2.85">
            <text:p>2,85 zł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3" office:value-type="string">
            <text:p>Avene Dermabsolu Krem Na Noc 50ml + Pod Oczy 15ml</text:p>
          </table:table-cell>
          <table:table-cell table:style-name="ce34" office:value-type="float" office:value="32643">
            <text:p>32643</text:p>
          </table:table-cell>
          <table:table-cell table:style-name="ce36" office:value-type="currency" office:currency="PLN" office:value="5.7">
            <text:p>5,70 zł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3" office:value-type="string">
            <text:p>Avene Dermabsolu Krem Na Noc 50ml + Pod Oczy 15ml Suma</text:p>
          </table:table-cell>
          <table:table-cell table:style-name="ce35"/>
          <table:table-cell table:style-name="ce36" office:value-type="currency" office:currency="PLN" office:value="5.7">
            <text:p>5,70 zł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3" office:value-type="string">
            <text:p>Avene Hyaluron Activ B3 Krem Na Noc 50ml + Pod Oczy 15ml</text:p>
          </table:table-cell>
          <table:table-cell table:style-name="ce34" office:value-type="float" office:value="32646">
            <text:p>32646</text:p>
          </table:table-cell>
          <table:table-cell table:style-name="ce36" office:value-type="currency" office:currency="PLN" office:value="7.6">
            <text:p>7,60 zł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3" office:value-type="string">
            <text:p>Avene Hyaluron Activ B3 Krem Na Noc 50ml + Pod Oczy 15ml Suma</text:p>
          </table:table-cell>
          <table:table-cell table:style-name="ce35"/>
          <table:table-cell table:style-name="ce36" office:value-type="currency" office:currency="PLN" office:value="7.6">
            <text:p>7,60 zł</text:p>
          </table:table-cell>
          <table:table-cell table:style-name="ce35" table:number-columns-repeated="2"/>
          <table:table-cell table:number-columns-repeated="1019"/>
        </table:table-row>
        <table:table-row table:style-name="ro9">
          <table:table-cell table:style-name="ce33" office:value-type="string">
            <text:p>Avene HYALURON ACTIV B3 Krem odbudowujący komórki 50ml</text:p>
          </table:table-cell>
          <table:table-cell table:style-name="ce34" office:value-type="float" office:value="19009">
            <text:p>19009</text:p>
          </table:table-cell>
          <table:table-cell table:style-name="ce36" office:value-type="currency" office:currency="PLN" office:value="0.95">
            <text:p>0,95 zł</text:p>
          </table:table-cell>
          <table:table-cell table:style-name="ce35" table:number-columns-repeated="2"/>
          <table:table-cell table:number-columns-repeated="1019"/>
        </table:table-row>
        <table:table-row table:style-name="ro9">
          <table:table-cell table:style-name="ce33" office:value-type="string">
            <text:p>Avene HYALURON ACTIV B3 Krem odbudowujący komórki 50ml Suma</text:p>
          </table:table-cell>
          <table:table-cell table:style-name="ce35"/>
          <table:table-cell table:style-name="ce36" office:value-type="currency" office:currency="PLN" office:value="0.95">
            <text:p>0,95 zł</text:p>
          </table:table-cell>
          <table:table-cell table:style-name="ce35" table:number-columns-repeated="2"/>
          <table:table-cell table:number-columns-repeated="1019"/>
        </table:table-row>
        <table:table-row table:style-name="ro9">
          <table:table-cell table:style-name="ce33" office:value-type="string">
            <text:p>Avene HYDRANCE Krem nawilżający bogata konsystencja 40ml</text:p>
          </table:table-cell>
          <table:table-cell table:style-name="ce34" office:value-type="float" office:value="8601">
            <text:p>8601</text:p>
          </table:table-cell>
          <table:table-cell table:style-name="ce36" office:value-type="currency" office:currency="PLN" office:value="1.9">
            <text:p>1,90 zł</text:p>
          </table:table-cell>
          <table:table-cell table:style-name="ce35" table:number-columns-repeated="2"/>
          <table:table-cell table:number-columns-repeated="1019"/>
        </table:table-row>
        <table:table-row table:style-name="ro9">
          <table:table-cell table:style-name="ce33" office:value-type="string">
            <text:p>Avene HYDRANCE Krem nawilżający bogata konsystencja 40ml Suma</text:p>
          </table:table-cell>
          <table:table-cell table:style-name="ce35"/>
          <table:table-cell table:style-name="ce36" office:value-type="currency" office:currency="PLN" office:value="1.9">
            <text:p>1,90 zł</text:p>
          </table:table-cell>
          <table:table-cell table:style-name="ce35" table:number-columns-repeated="2"/>
          <table:table-cell table:number-columns-repeated="1019"/>
        </table:table-row>
        <table:table-row table:style-name="ro9">
          <table:table-cell table:style-name="ce33" office:value-type="string">
            <text:p>Avene HYDRANCE UV Lekki krem nawilżający SPF 30 40ml</text:p>
          </table:table-cell>
          <table:table-cell table:style-name="ce34" office:value-type="float" office:value="9958">
            <text:p>9958</text:p>
          </table:table-cell>
          <table:table-cell table:style-name="ce36" office:value-type="currency" office:currency="PLN" office:value="4.75">
            <text:p>4,75 zł</text:p>
          </table:table-cell>
          <table:table-cell table:style-name="ce35" table:number-columns-repeated="2"/>
          <table:table-cell table:number-columns-repeated="1019"/>
        </table:table-row>
        <table:table-row table:style-name="ro9">
          <table:table-cell table:style-name="ce33" office:value-type="string">
            <text:p>Avene HYDRANCE UV Lekki krem nawilżający SPF 30 40ml Suma</text:p>
          </table:table-cell>
          <table:table-cell table:style-name="ce35"/>
          <table:table-cell table:style-name="ce36" office:value-type="currency" office:currency="PLN" office:value="4.75">
            <text:p>4,75 zł</text:p>
          </table:table-cell>
          <table:table-cell table:style-name="ce35" table:number-columns-repeated="2"/>
          <table:table-cell table:number-columns-repeated="1019"/>
        </table:table-row>
        <table:table-row table:style-name="ro9">
          <table:table-cell table:style-name="ce33" office:value-type="string">
            <text:p>Avene Sunsimed Ka Bardzo Wysoka Ochrona 80ml</text:p>
          </table:table-cell>
          <table:table-cell table:style-name="ce34" office:value-type="float" office:value="28241">
            <text:p>28241</text:p>
          </table:table-cell>
          <table:table-cell table:style-name="ce36" office:value-type="currency" office:currency="PLN" office:value="9.5">
            <text:p>9,50 zł</text:p>
          </table:table-cell>
          <table:table-cell table:style-name="ce35" table:number-columns-repeated="2"/>
          <table:table-cell table:number-columns-repeated="1019"/>
        </table:table-row>
        <table:table-row table:style-name="ro9">
          <table:table-cell table:style-name="ce33" office:value-type="string">
            <text:p>Avene Sunsimed Ka Bardzo Wysoka Ochrona 80ml Suma</text:p>
          </table:table-cell>
          <table:table-cell table:style-name="ce35"/>
          <table:table-cell table:style-name="ce36" office:value-type="currency" office:currency="PLN" office:value="9.5">
            <text:p>9,50 zł</text:p>
          </table:table-cell>
          <table:table-cell table:style-name="ce35" table:number-columns-repeated="2"/>
          <table:table-cell table:number-columns-repeated="1019"/>
        </table:table-row>
        <table:table-row table:style-name="ro9">
          <table:table-cell table:style-name="ce33" office:value-type="string">
            <text:p>Avene Xeracalm A.D Krem uzupełniający lipidy 400ml</text:p>
          </table:table-cell>
          <table:table-cell table:style-name="ce34" office:value-type="float" office:value="19702">
            <text:p>19702</text:p>
          </table:table-cell>
          <table:table-cell table:style-name="ce36" office:value-type="currency" office:currency="PLN" office:value="1.9">
            <text:p>1,90 zł</text:p>
          </table:table-cell>
          <table:table-cell table:style-name="ce35" table:number-columns-repeated="2"/>
          <table:table-cell table:number-columns-repeated="1019"/>
        </table:table-row>
        <table:table-row table:style-name="ro9">
          <table:table-cell table:style-name="ce33" office:value-type="string">
            <text:p>Avene Xeracalm A.D Krem uzupełniający lipidy 400ml Suma</text:p>
          </table:table-cell>
          <table:table-cell table:style-name="ce35"/>
          <table:table-cell table:style-name="ce36" office:value-type="currency" office:currency="PLN" office:value="1.9">
            <text:p>1,90 zł</text:p>
          </table:table-cell>
          <table:table-cell table:style-name="ce35" table:number-columns-repeated="2"/>
          <table:table-cell table:number-columns-repeated="1019"/>
        </table:table-row>
        <table:table-row table:style-name="ro9">
          <table:table-cell table:style-name="ce33" office:value-type="string">
            <text:p>Avene XERACALM NUTRITION Balsam nawilżający 200 ml</text:p>
          </table:table-cell>
          <table:table-cell table:style-name="ce34" office:value-type="float" office:value="19417">
            <text:p>19417</text:p>
          </table:table-cell>
          <table:table-cell table:style-name="ce36" office:value-type="currency" office:currency="PLN" office:value="0.95">
            <text:p>0,95 zł</text:p>
          </table:table-cell>
          <table:table-cell table:style-name="ce35" table:number-columns-repeated="2"/>
          <table:table-cell table:number-columns-repeated="1019"/>
        </table:table-row>
        <table:table-row table:style-name="ro9">
          <table:table-cell table:style-name="ce33" office:value-type="string">
            <text:p>Avene XERACALM NUTRITION Balsam nawilżający 200 ml Suma</text:p>
          </table:table-cell>
          <table:table-cell table:style-name="ce35"/>
          <table:table-cell table:style-name="ce36" office:value-type="currency" office:currency="PLN" office:value="0.95">
            <text:p>0,95 zł</text:p>
          </table:table-cell>
          <table:table-cell table:style-name="ce35" table:number-columns-repeated="2"/>
          <table:table-cell table:number-columns-repeated="1019"/>
        </table:table-row>
        <table:table-row table:style-name="ro9">
          <table:table-cell table:style-name="ce33" office:value-type="string">
            <text:p>Klorane Chinina Zestaw Przeciw Wypadaniu Włosów – Szampon, 400 ml + Odżywka, 200 ml</text:p>
          </table:table-cell>
          <table:table-cell table:style-name="ce34" office:value-type="float" office:value="32607">
            <text:p>32607</text:p>
          </table:table-cell>
          <table:table-cell table:style-name="ce36" office:value-type="currency" office:currency="PLN" office:value="2.37">
            <text:p>2,37 zł</text:p>
          </table:table-cell>
          <table:table-cell table:style-name="ce35" table:number-columns-repeated="2"/>
          <table:table-cell table:number-columns-repeated="1019"/>
        </table:table-row>
        <table:table-row table:style-name="ro9">
          <table:table-cell table:style-name="ce33" office:value-type="string">
            <text:p>DUCRAY ANACAPS Reactiv, 3x30kapsułek</text:p>
          </table:table-cell>
          <table:table-cell table:style-name="ce34" office:value-type="float" office:value="18922">
            <text:p>18922</text:p>
          </table:table-cell>
          <table:table-cell table:style-name="ce36" office:value-type="currency" office:currency="PLN" office:value="1.58">
            <text:p>1,58 zł</text:p>
          </table:table-cell>
          <table:table-cell table:style-name="ce35" table:number-columns-repeated="2"/>
          <table:table-cell table:number-columns-repeated="1019"/>
        </table:table-row>
        <table:table-row table:style-name="ro9">
          <table:table-cell table:style-name="ce33" office:value-type="string">
            <text:p>DUCRAY ANACAPS Reactiv, 3x30kapsułek Suma</text:p>
          </table:table-cell>
          <table:table-cell table:style-name="ce35"/>
          <table:table-cell table:style-name="ce36" office:value-type="currency" office:currency="PLN" office:value="1.58">
            <text:p>1,58 zł</text:p>
          </table:table-cell>
          <table:table-cell table:style-name="ce35" table:number-columns-repeated="2"/>
          <table:table-cell table:number-columns-repeated="1019"/>
        </table:table-row>
        <table:table-row table:style-name="ro9">
          <table:table-cell table:style-name="ce33" office:value-type="string">
            <text:p>DUCRAY DEXYANE MED Wyrób medyczny krem kojąco-regenerujący 100ml</text:p>
          </table:table-cell>
          <table:table-cell table:style-name="ce34" office:value-type="float" office:value="31945">
            <text:p>31945</text:p>
          </table:table-cell>
          <table:table-cell table:style-name="ce36" office:value-type="currency" office:currency="PLN" office:value="1.9">
            <text:p>1,90 zł</text:p>
          </table:table-cell>
          <table:table-cell table:style-name="ce35" table:number-columns-repeated="2"/>
          <table:table-cell table:number-columns-repeated="1019"/>
        </table:table-row>
        <table:table-row table:style-name="ro9">
          <table:table-cell table:style-name="ce33" office:value-type="string">
            <text:p>DUCRAY DEXYANE MED Wyrób medyczny krem kojąco-regenerujący 100ml Suma</text:p>
          </table:table-cell>
          <table:table-cell table:style-name="ce35"/>
          <table:table-cell table:style-name="ce36" office:value-type="currency" office:currency="PLN" office:value="1.9">
            <text:p>1,90 zł</text:p>
          </table:table-cell>
          <table:table-cell table:style-name="ce35" table:number-columns-repeated="2"/>
          <table:table-cell table:number-columns-repeated="1019"/>
        </table:table-row>
        <table:table-row table:style-name="ro9">
          <table:table-cell table:style-name="ce33" office:value-type="string">
            <text:p>DUCRAY DEXYANE MED Wyrób medyczny krem kojąco-regenerujący 30ml</text:p>
          </table:table-cell>
          <table:table-cell table:style-name="ce34" office:value-type="float" office:value="31946">
            <text:p>31946</text:p>
          </table:table-cell>
          <table:table-cell table:style-name="ce36" office:value-type="currency" office:currency="PLN" office:value="0.95">
            <text:p>0,95 zł</text:p>
          </table:table-cell>
          <table:table-cell table:style-name="ce35" table:number-columns-repeated="2"/>
          <table:table-cell table:number-columns-repeated="1019"/>
        </table:table-row>
        <table:table-row table:style-name="ro9">
          <table:table-cell table:style-name="ce33" office:value-type="string">
            <text:p>DUCRAY DEXYANE MED Wyrób medyczny krem kojąco-regenerujący 30ml Suma</text:p>
          </table:table-cell>
          <table:table-cell table:style-name="ce35"/>
          <table:table-cell table:style-name="ce36" office:value-type="currency" office:currency="PLN" office:value="0.95">
            <text:p>0,95 zł</text:p>
          </table:table-cell>
          <table:table-cell table:style-name="ce35" table:number-columns-repeated="2"/>
          <table:table-cell table:number-columns-repeated="1019"/>
        </table:table-row>
        <table:table-row table:style-name="ro9">
          <table:table-cell table:style-name="ce33" office:value-type="string">
            <text:p>Ducray Keracnyl Reapir Krem Odbudowujący 50ml</text:p>
          </table:table-cell>
          <table:table-cell table:style-name="ce34" office:value-type="float" office:value="19520">
            <text:p>19520</text:p>
          </table:table-cell>
          <table:table-cell table:style-name="ce36" office:value-type="currency" office:currency="PLN" office:value="0.95">
            <text:p>0,95 zł</text:p>
          </table:table-cell>
          <table:table-cell table:style-name="ce35" table:number-columns-repeated="2"/>
          <table:table-cell table:number-columns-repeated="1019"/>
        </table:table-row>
        <table:table-row table:style-name="ro9">
          <table:table-cell table:style-name="ce33" office:value-type="string">
            <text:p>Ducray Keracnyl Reapir Krem Odbudowujący 50ml Suma</text:p>
          </table:table-cell>
          <table:table-cell table:style-name="ce35"/>
          <table:table-cell table:style-name="ce36" office:value-type="currency" office:currency="PLN" office:value="0.95">
            <text:p>0,95 zł</text:p>
          </table:table-cell>
          <table:table-cell table:style-name="ce35" table:number-columns-repeated="2"/>
          <table:table-cell table:number-columns-repeated="1019"/>
        </table:table-row>
        <table:table-row table:style-name="ro9">
          <table:table-cell table:style-name="ce33" office:value-type="string">
            <text:p>DUCRAY KERACNYL Repair Balsam do ust 15ml</text:p>
          </table:table-cell>
          <table:table-cell table:style-name="ce34" office:value-type="float" office:value="32640">
            <text:p>32640</text:p>
          </table:table-cell>
          <table:table-cell table:style-name="ce36" office:value-type="currency" office:currency="PLN" office:value="4.75">
            <text:p>4,75 zł</text:p>
          </table:table-cell>
          <table:table-cell table:style-name="ce35" table:number-columns-repeated="2"/>
          <table:table-cell table:number-columns-repeated="1019"/>
        </table:table-row>
        <table:table-row table:style-name="ro9">
          <table:table-cell table:style-name="ce33" office:value-type="string">
            <text:p>DUCRAY KERACNYL Repair Balsam do ust 15ml Suma</text:p>
          </table:table-cell>
          <table:table-cell table:style-name="ce35"/>
          <table:table-cell table:style-name="ce36" office:value-type="currency" office:currency="PLN" office:value="4.75">
            <text:p>4,75 zł</text:p>
          </table:table-cell>
          <table:table-cell table:style-name="ce35" table:number-columns-repeated="2"/>
          <table:table-cell table:number-columns-repeated="1019"/>
        </table:table-row>
        <table:table-row table:style-name="ro9">
          <table:table-cell table:style-name="ce33" office:value-type="string">
            <text:p>Boiron Argentum Nitricum 15CH 4 g</text:p>
          </table:table-cell>
          <table:table-cell table:style-name="ce34" office:value-type="float" office:value="21233">
            <text:p>21233</text:p>
          </table:table-cell>
          <table:table-cell table:style-name="ce36" office:value-type="currency" office:currency="PLN" office:value="0.87">
            <text:p>0,87 zł</text:p>
          </table:table-cell>
          <table:table-cell table:style-name="ce35" table:number-columns-repeated="2"/>
          <table:table-cell table:number-columns-repeated="1019"/>
        </table:table-row>
        <table:table-row table:style-name="ro9">
          <table:table-cell table:style-name="ce33" office:value-type="string">
            <text:p>Krem Nuxe Prodigieuse Florale Zestaw z kosmetyczką podróżną 2024</text:p>
          </table:table-cell>
          <table:table-cell table:style-name="ce34" office:value-type="float" office:value="28311">
            <text:p>28311</text:p>
          </table:table-cell>
          <table:table-cell table:style-name="ce36" office:value-type="currency" office:currency="PLN" office:value="10.45">
            <text:p>10,45 zł</text:p>
          </table:table-cell>
          <table:table-cell table:style-name="ce35" table:number-columns-repeated="2"/>
          <table:table-cell table:number-columns-repeated="1019"/>
        </table:table-row>
        <table:table-row table:style-name="ro9">
          <table:table-cell table:style-name="ce33" office:value-type="string">
            <text:p>Krem Nuxe Prodigieuse Florale Zestaw z kosmetyczką podróżną 2024 Suma</text:p>
          </table:table-cell>
          <table:table-cell table:style-name="ce35"/>
          <table:table-cell table:style-name="ce36" office:value-type="currency" office:currency="PLN" office:value="10.45">
            <text:p>10,45 zł</text:p>
          </table:table-cell>
          <table:table-cell table:style-name="ce35" table:number-columns-repeated="2"/>
          <table:table-cell table:number-columns-repeated="1019"/>
        </table:table-row>
        <table:table-row table:style-name="ro9">
          <table:table-cell table:style-name="ce33" office:value-type="string">
            <text:p>Nuxe Hair Prodigieux Odżywcza Maska 30ml + Nabłyszczający Szampon 50ml + Nabłyszczająca Odżywka 30ml</text:p>
          </table:table-cell>
          <table:table-cell table:style-name="ce34" office:value-type="float" office:value="28305">
            <text:p>28305</text:p>
          </table:table-cell>
          <table:table-cell table:style-name="ce36" office:value-type="currency" office:currency="PLN" office:value="1.9">
            <text:p>1,90 zł</text:p>
          </table:table-cell>
          <table:table-cell table:style-name="ce35" table:number-columns-repeated="2"/>
          <table:table-cell table:number-columns-repeated="1019"/>
        </table:table-row>
        <table:table-row table:style-name="ro9">
          <table:table-cell table:style-name="ce33" office:value-type="string">
            <text:p>Nuxe Hair Prodigieux Odżywcza Maska 30ml + Nabłyszczający Szampon 50ml + Nabłyszczająca Odżywka 30ml Suma</text:p>
          </table:table-cell>
          <table:table-cell table:style-name="ce35"/>
          <table:table-cell table:style-name="ce36" office:value-type="currency" office:currency="PLN" office:value="1.9">
            <text:p>1,90 zł</text:p>
          </table:table-cell>
          <table:table-cell table:style-name="ce35" table:number-columns-repeated="2"/>
          <table:table-cell table:number-columns-repeated="1019"/>
        </table:table-row>
        <table:table-row table:style-name="ro9">
          <table:table-cell table:style-name="ce33" office:value-type="string">
            <text:p>Nuxe Nuxuriance Gold Ultraodżywczy Krem Do Twarzy 50ml + Balsam Pod Oczy 15ml</text:p>
          </table:table-cell>
          <table:table-cell table:style-name="ce34" office:value-type="float" office:value="31961">
            <text:p>31961</text:p>
          </table:table-cell>
          <table:table-cell table:style-name="ce36" office:value-type="currency" office:currency="PLN" office:value="0.95">
            <text:p>0,95 zł</text:p>
          </table:table-cell>
          <table:table-cell table:style-name="ce35" table:number-columns-repeated="2"/>
          <table:table-cell table:number-columns-repeated="1019"/>
        </table:table-row>
        <table:table-row table:style-name="ro9">
          <table:table-cell table:style-name="ce33" office:value-type="string">
            <text:p>Nuxe Nuxuriance Gold Ultraodżywczy Krem Do Twarzy 50ml + Balsam Pod Oczy 15ml Suma</text:p>
          </table:table-cell>
          <table:table-cell table:style-name="ce35"/>
          <table:table-cell table:style-name="ce36" office:value-type="currency" office:currency="PLN" office:value="0.95">
            <text:p>0,95 zł</text:p>
          </table:table-cell>
          <table:table-cell table:style-name="ce35" table:number-columns-repeated="2"/>
          <table:table-cell table:number-columns-repeated="1019"/>
        </table:table-row>
        <table:table-row table:style-name="ro9">
          <table:table-cell table:style-name="ce33" office:value-type="string">
            <text:p>Nuxe Zestaw - Huile Prodigieuse</text:p>
          </table:table-cell>
          <table:table-cell table:style-name="ce34" office:value-type="float" office:value="19670">
            <text:p>19670</text:p>
          </table:table-cell>
          <table:table-cell table:style-name="ce36" office:value-type="currency" office:currency="PLN" office:value="0.95">
            <text:p>0,95 zł</text:p>
          </table:table-cell>
          <table:table-cell table:style-name="ce35" table:number-columns-repeated="2"/>
          <table:table-cell table:number-columns-repeated="1019"/>
        </table:table-row>
        <table:table-row table:style-name="ro9">
          <table:table-cell table:style-name="ce33" office:value-type="string">
            <text:p>Nuxe Zestaw - Huile Prodigieuse Suma</text:p>
          </table:table-cell>
          <table:table-cell table:style-name="ce35"/>
          <table:table-cell table:style-name="ce36" office:value-type="currency" office:currency="PLN" office:value="0.95">
            <text:p>0,95 zł</text:p>
          </table:table-cell>
          <table:table-cell table:style-name="ce35" table:number-columns-repeated="2"/>
          <table:table-cell table:number-columns-repeated="1019"/>
        </table:table-row>
        <table:table-row table:style-name="ro9" table:number-rows-repeated="1048181">
          <table:table-cell table:number-columns-repeated="1024"/>
        </table:table-row>
        <table:table-row table:style-name="ro10">
          <table:table-cell table:number-columns-repeated="1024"/>
        </table:table-row>
      </table:table>
      <table:data-pilot-tables>
        <table:data-pilot-table table:name="Raport_przejsc_2026_03_15_2026_03_17 — tabela przestawna" table:application-data="" table:target-range-address="Raport_przejsc_2026_03_15_2026_.A2:Raport_przejsc_2026_03_15_2026_.C768" table:buttons="Raport_przejsc_2026_03_15_2026_.A2 Raport_przejsc_2026_03_15_2026_.B2" table:show-filter-button="false">
          <table:source-cell-range table:cell-range-address="'ceneo całosć  - Raport_przejsc_'.A1:'ceneo całosć  - Raport_przejsc_'.K1123"/>
          <table:data-pilot-field table:source-field-name="Kategoria" table:orientation="hidden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Biuro i firma" table:display="true" table:show-details="true"/>
                <table:data-pilot-member table:name="Delikatesy" table:display="true" table:show-details="true"/>
                <table:data-pilot-member table:name="Dla dziecka" table:display="true" table:show-details="true"/>
                <table:data-pilot-member table:name="Dom i wnętrze" table:display="true" table:show-details="true"/>
                <table:data-pilot-member table:name="Kategoria_glowna" table:display="true" table:show-details="true"/>
                <table:data-pilot-member table:name="Moda" table:display="true" table:show-details="true"/>
                <table:data-pilot-member table:name="Ogród" table:display="true" table:show-details="true"/>
                <table:data-pilot-member table:name="Uroda" table:display="true" table:show-details="true"/>
                <table:data-pilot-member table:name="Wszystkie" table:display="true" table:show-details="true"/>
                <table:data-pilot-member table:name="Zdrowie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 " table:orientation="hidden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  <table:data-pilot-member table:name="Akcesoria do butów" table:display="true" table:show-details="true"/>
                <table:data-pilot-member table:name="Akcesoria do ciśnieniomierzy" table:display="true" table:show-details="true"/>
                <table:data-pilot-member table:name="Akcesoria do inhalatorów" table:display="true" table:show-details="true"/>
                <table:data-pilot-member table:name="Akcesoria medycyny naturalnej" table:display="true" table:show-details="true"/>
                <table:data-pilot-member table:name="Alergia" table:display="true" table:show-details="true"/>
                <table:data-pilot-member table:name="Aspiratory i gruszki do nosa" table:display="true" table:show-details="true"/>
                <table:data-pilot-member table:name="Balsamy do ust" table:display="true" table:show-details="true"/>
                <table:data-pilot-member table:name="Bielizna lecznicza" table:display="true" table:show-details="true"/>
                <table:data-pilot-member table:name="Ciśnieniomierze" table:display="true" table:show-details="true"/>
                <table:data-pilot-member table:name="Dermokosmetyki do ciała" table:display="true" table:show-details="true"/>
                <table:data-pilot-member table:name="Dermokosmetyki do twarzy" table:display="true" table:show-details="true"/>
                <table:data-pilot-member table:name="Dermokosmetyki do włosów" table:display="true" table:show-details="true"/>
                <table:data-pilot-member table:name="Dla mam i kobiet w ciąży" table:display="true" table:show-details="true"/>
                <table:data-pilot-member table:name="Dzieci i niemowlęta" table:display="true" table:show-details="true"/>
                <table:data-pilot-member table:name="Glukometry i akcesoria dla diabetyków" table:display="true" table:show-details="true"/>
                <table:data-pilot-member table:name="Homeopatia" table:display="true" table:show-details="true"/>
                <table:data-pilot-member table:name="Inhalatory" table:display="true" table:show-details="true"/>
                <table:data-pilot-member table:name="Jama ustna" table:display="true" table:show-details="true"/>
                <table:data-pilot-member table:name="Kategoria_najnizsza" table:display="true" table:show-details="true"/>
                <table:data-pilot-member table:name="Kosmetyki dla dzieci i niemowląt" table:display="true" table:show-details="true"/>
                <table:data-pilot-member table:name="Kosmetyki do opalania" table:display="true" table:show-details="true"/>
                <table:data-pilot-member table:name="Kosmetyki po opalaniu" table:display="true" table:show-details="true"/>
                <table:data-pilot-member table:name="Kremy do ciała" table:display="true" table:show-details="true"/>
                <table:data-pilot-member table:name="Kremy do stóp" table:display="true" table:show-details="true"/>
                <table:data-pilot-member table:name="Kremy do twarzy" table:display="true" table:show-details="true"/>
                <table:data-pilot-member table:name="Kremy i maści medycyny naturalnej" table:display="true" table:show-details="true"/>
                <table:data-pilot-member table:name="Majtki poporodowe" table:display="true" table:show-details="true"/>
                <table:data-pilot-member table:name="Mięśnie, stawy i kości" table:display="true" table:show-details="true"/>
                <table:data-pilot-member table:name="Minerały i witaminy" table:display="true" table:show-details="true"/>
                <table:data-pilot-member table:name="Mleka następne" table:display="true" table:show-details="true"/>
                <table:data-pilot-member table:name="Mleka początkowe" table:display="true" table:show-details="true"/>
                <table:data-pilot-member table:name="Mydła" table:display="true" table:show-details="true"/>
                <table:data-pilot-member table:name="Nutrikosmetyki" table:display="true" table:show-details="true"/>
                <table:data-pilot-member table:name="Nutrikosmetyki i leki dermatologiczne" table:display="true" table:show-details="true"/>
                <table:data-pilot-member table:name="Odchudzanie i ujędrnianie" table:display="true" table:show-details="true"/>
                <table:data-pilot-member table:name="Odstraszanie owadów" table:display="true" table:show-details="true"/>
                <table:data-pilot-member table:name="Olejki zapachowe" table:display="true" table:show-details="true"/>
                <table:data-pilot-member table:name="Oliwy i oleje" table:display="true" table:show-details="true"/>
                <table:data-pilot-member table:name="Opaski elastyczne" table:display="true" table:show-details="true"/>
                <table:data-pilot-member table:name="Opatrunki" table:display="true" table:show-details="true"/>
                <table:data-pilot-member table:name="Pasty do zębów" table:display="true" table:show-details="true"/>
                <table:data-pilot-member table:name="Pielęgnacja protez" table:display="true" table:show-details="true"/>
                <table:data-pilot-member table:name="Plastry, przylepce i taśmy opatrunkowe" table:display="true" table:show-details="true"/>
                <table:data-pilot-member table:name="Podkłady do twarzy" table:display="true" table:show-details="true"/>
                <table:data-pilot-member table:name="Pozostałe artykuły medyczne i rehabilitacyjne" table:display="true" table:show-details="true"/>
                <table:data-pilot-member table:name="Pozostałe kosmetyki do pielęgnacji ciała" table:display="true" table:show-details="true"/>
                <table:data-pilot-member table:name="Pozostałe kosmetyki do pielęgnacji twarzy" table:display="true" table:show-details="true"/>
                <table:data-pilot-member table:name="Pozostałe kosmetyki do pielęgnacji ust" table:display="true" table:show-details="true"/>
                <table:data-pilot-member table:name="Pozostałe kosmetyki do włosów" table:display="true" table:show-details="true"/>
                <table:data-pilot-member table:name="Pozostałe suplementy" table:display="true" table:show-details="true"/>
                <table:data-pilot-member table:name="Pozostałe wyposażenie apteczek" table:display="true" table:show-details="true"/>
                <table:data-pilot-member table:name="Preparaty medycyny naturalnej" table:display="true" table:show-details="true"/>
                <table:data-pilot-member table:name="Produkty konopne" table:display="true" table:show-details="true"/>
                <table:data-pilot-member table:name="Przeciwbólowe" table:display="true" table:show-details="true"/>
                <table:data-pilot-member table:name="Przeziębienie i grypa" table:display="true" table:show-details="true"/>
                <table:data-pilot-member table:name="Płyny do płukania ust" table:display="true" table:show-details="true"/>
                <table:data-pilot-member table:name="Płyny i żele do dezynfekcji ran" table:display="true" table:show-details="true"/>
                <table:data-pilot-member table:name="Rzuć palenie" table:display="true" table:show-details="true"/>
                <table:data-pilot-member table:name="Samoopalacze" table:display="true" table:show-details="true"/>
                <table:data-pilot-member table:name="Serce i układ krążenia" table:display="true" table:show-details="true"/>
                <table:data-pilot-member table:name="Serum do twarzy" table:display="true" table:show-details="true"/>
                <table:data-pilot-member table:name="Sole do stóp" table:display="true" table:show-details="true"/>
                <table:data-pilot-member table:name="Stawy, mięśnie i kości" table:display="true" table:show-details="true"/>
                <table:data-pilot-member table:name="Suplementy dla dzieci" table:display="true" table:show-details="true"/>
                <table:data-pilot-member table:name="Suplementy dla seniorów" table:display="true" table:show-details="true"/>
                <table:data-pilot-member table:name="Suplementy na odchudzanie" table:display="true" table:show-details="true"/>
                <table:data-pilot-member table:name="Suplementy na wzrok i słuch" table:display="true" table:show-details="true"/>
                <table:data-pilot-member table:name="Szampony do włosów" table:display="true" table:show-details="true"/>
                <table:data-pilot-member table:name="Środki na przeziębienie" table:display="true" table:show-details="true"/>
                <table:data-pilot-member table:name="Termometry" table:display="true" table:show-details="true"/>
                <table:data-pilot-member table:name="Testy diagnostyczne" table:display="true" table:show-details="true"/>
                <table:data-pilot-member table:name="Układ krążenia i serce" table:display="true" table:show-details="true"/>
                <table:data-pilot-member table:name="Układ moczowy i płciowy" table:display="true" table:show-details="true"/>
                <table:data-pilot-member table:name="Układ nerwowy" table:display="true" table:show-details="true"/>
                <table:data-pilot-member table:name="Układ nerwowy i pamięć" table:display="true" table:show-details="true"/>
                <table:data-pilot-member table:name="Układ pokarmowy" table:display="true" table:show-details="true"/>
                <table:data-pilot-member table:name="Układ pokarmowy i trawienie" table:display="true" table:show-details="true"/>
                <table:data-pilot-member table:name="Układ płciowy i moczowy" table:display="true" table:show-details="true"/>
                <table:data-pilot-member table:name="Witaminy i minerały" table:display="true" table:show-details="true"/>
                <table:data-pilot-member table:name="Wody mineralne" table:display="true" table:show-details="true"/>
                <table:data-pilot-member table:name="Wyposażenie medyczne" table:display="true" table:show-details="true"/>
                <table:data-pilot-member table:name="Wzrok i słuch" table:display="true" table:show-details="true"/>
                <table:data-pilot-member table:name="Zestawy dermokosmetyków" table:display="true" table:show-details="true"/>
                <table:data-pilot-member table:name="Zestawy dla kobiet" table:display="true" table:show-details="true"/>
                <table:data-pilot-member table:name="Zioła" table:display="true" table:show-details="true"/>
                <table:data-pilot-member table:name="Żywienie medyczne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 1" table:orientation="hidden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  <table:data-pilot-member table:name="2026-03-15 00:09:11" table:display="true" table:show-details="true"/>
                <table:data-pilot-member table:name="2026-03-15 00:13:27" table:display="true" table:show-details="true"/>
                <table:data-pilot-member table:name="2026-03-15 00:44:00" table:display="true" table:show-details="true"/>
                <table:data-pilot-member table:name="2026-03-15 00:49:31" table:display="true" table:show-details="true"/>
                <table:data-pilot-member table:name="2026-03-15 00:51:43" table:display="true" table:show-details="true"/>
                <table:data-pilot-member table:name="2026-03-15 00:54:46" table:display="true" table:show-details="true"/>
                <table:data-pilot-member table:name="2026-03-15 00:54:59" table:display="true" table:show-details="true"/>
                <table:data-pilot-member table:name="2026-03-15 01:25:58" table:display="true" table:show-details="true"/>
                <table:data-pilot-member table:name="2026-03-15 01:26:12" table:display="true" table:show-details="true"/>
                <table:data-pilot-member table:name="2026-03-15 02:00:58" table:display="true" table:show-details="true"/>
                <table:data-pilot-member table:name="2026-03-15 02:29:58" table:display="true" table:show-details="true"/>
                <table:data-pilot-member table:name="2026-03-15 02:31:47" table:display="true" table:show-details="true"/>
                <table:data-pilot-member table:name="2026-03-15 02:51:04" table:display="true" table:show-details="true"/>
                <table:data-pilot-member table:name="2026-03-15 03:03:29" table:display="true" table:show-details="true"/>
                <table:data-pilot-member table:name="2026-03-15 03:33:42" table:display="true" table:show-details="true"/>
                <table:data-pilot-member table:name="2026-03-15 03:34:37" table:display="true" table:show-details="true"/>
                <table:data-pilot-member table:name="2026-03-15 03:44:58" table:display="true" table:show-details="true"/>
                <table:data-pilot-member table:name="2026-03-15 03:45:43" table:display="true" table:show-details="true"/>
                <table:data-pilot-member table:name="2026-03-15 03:56:18" table:display="true" table:show-details="true"/>
                <table:data-pilot-member table:name="2026-03-15 04:03:58" table:display="true" table:show-details="true"/>
                <table:data-pilot-member table:name="2026-03-15 05:42:13" table:display="true" table:show-details="true"/>
                <table:data-pilot-member table:name="2026-03-15 05:58:17" table:display="true" table:show-details="true"/>
                <table:data-pilot-member table:name="2026-03-15 06:12:43" table:display="true" table:show-details="true"/>
                <table:data-pilot-member table:name="2026-03-15 06:23:07" table:display="true" table:show-details="true"/>
                <table:data-pilot-member table:name="2026-03-15 06:26:58" table:display="true" table:show-details="true"/>
                <table:data-pilot-member table:name="2026-03-15 06:29:29" table:display="true" table:show-details="true"/>
                <table:data-pilot-member table:name="2026-03-15 06:32:01" table:display="true" table:show-details="true"/>
                <table:data-pilot-member table:name="2026-03-15 06:33:17" table:display="true" table:show-details="true"/>
                <table:data-pilot-member table:name="2026-03-15 06:39:55" table:display="true" table:show-details="true"/>
                <table:data-pilot-member table:name="2026-03-15 06:48:16" table:display="true" table:show-details="true"/>
                <table:data-pilot-member table:name="2026-03-15 06:49:39" table:display="true" table:show-details="true"/>
                <table:data-pilot-member table:name="2026-03-15 06:51:30" table:display="true" table:show-details="true"/>
                <table:data-pilot-member table:name="2026-03-15 06:52:16" table:display="true" table:show-details="true"/>
                <table:data-pilot-member table:name="2026-03-15 06:52:40" table:display="true" table:show-details="true"/>
                <table:data-pilot-member table:name="2026-03-15 06:53:56" table:display="true" table:show-details="true"/>
                <table:data-pilot-member table:name="2026-03-15 06:55:05" table:display="true" table:show-details="true"/>
                <table:data-pilot-member table:name="2026-03-15 06:55:50" table:display="true" table:show-details="true"/>
                <table:data-pilot-member table:name="2026-03-15 07:00:11" table:display="true" table:show-details="true"/>
                <table:data-pilot-member table:name="2026-03-15 07:01:08" table:display="true" table:show-details="true"/>
                <table:data-pilot-member table:name="2026-03-15 07:03:27" table:display="true" table:show-details="true"/>
                <table:data-pilot-member table:name="2026-03-15 07:06:05" table:display="true" table:show-details="true"/>
                <table:data-pilot-member table:name="2026-03-15 07:14:25" table:display="true" table:show-details="true"/>
                <table:data-pilot-member table:name="2026-03-15 07:14:36" table:display="true" table:show-details="true"/>
                <table:data-pilot-member table:name="2026-03-15 07:16:36" table:display="true" table:show-details="true"/>
                <table:data-pilot-member table:name="2026-03-15 07:17:33" table:display="true" table:show-details="true"/>
                <table:data-pilot-member table:name="2026-03-15 07:17:59" table:display="true" table:show-details="true"/>
                <table:data-pilot-member table:name="2026-03-15 07:18:43" table:display="true" table:show-details="true"/>
                <table:data-pilot-member table:name="2026-03-15 07:19:58" table:display="true" table:show-details="true"/>
                <table:data-pilot-member table:name="2026-03-15 07:20:20" table:display="true" table:show-details="true"/>
                <table:data-pilot-member table:name="2026-03-15 07:20:48" table:display="true" table:show-details="true"/>
                <table:data-pilot-member table:name="2026-03-15 07:26:09" table:display="true" table:show-details="true"/>
                <table:data-pilot-member table:name="2026-03-15 07:27:06" table:display="true" table:show-details="true"/>
                <table:data-pilot-member table:name="2026-03-15 07:29:52" table:display="true" table:show-details="true"/>
                <table:data-pilot-member table:name="2026-03-15 07:30:21" table:display="true" table:show-details="true"/>
                <table:data-pilot-member table:name="2026-03-15 07:37:46" table:display="true" table:show-details="true"/>
                <table:data-pilot-member table:name="2026-03-15 07:40:19" table:display="true" table:show-details="true"/>
                <table:data-pilot-member table:name="2026-03-15 07:41:34" table:display="true" table:show-details="true"/>
                <table:data-pilot-member table:name="2026-03-15 07:42:46" table:display="true" table:show-details="true"/>
                <table:data-pilot-member table:name="2026-03-15 07:45:45" table:display="true" table:show-details="true"/>
                <table:data-pilot-member table:name="2026-03-15 07:46:03" table:display="true" table:show-details="true"/>
                <table:data-pilot-member table:name="2026-03-15 07:48:00" table:display="true" table:show-details="true"/>
                <table:data-pilot-member table:name="2026-03-15 07:49:02" table:display="true" table:show-details="true"/>
                <table:data-pilot-member table:name="2026-03-15 07:50:31" table:display="true" table:show-details="true"/>
                <table:data-pilot-member table:name="2026-03-15 07:50:37" table:display="true" table:show-details="true"/>
                <table:data-pilot-member table:name="2026-03-15 07:50:43" table:display="true" table:show-details="true"/>
                <table:data-pilot-member table:name="2026-03-15 07:54:42" table:display="true" table:show-details="true"/>
                <table:data-pilot-member table:name="2026-03-15 08:05:29" table:display="true" table:show-details="true"/>
                <table:data-pilot-member table:name="2026-03-15 08:09:11" table:display="true" table:show-details="true"/>
                <table:data-pilot-member table:name="2026-03-15 08:09:47" table:display="true" table:show-details="true"/>
                <table:data-pilot-member table:name="2026-03-15 08:09:59" table:display="true" table:show-details="true"/>
                <table:data-pilot-member table:name="2026-03-15 08:10:03" table:display="true" table:show-details="true"/>
                <table:data-pilot-member table:name="2026-03-15 08:10:18" table:display="true" table:show-details="true"/>
                <table:data-pilot-member table:name="2026-03-15 08:13:47" table:display="true" table:show-details="true"/>
                <table:data-pilot-member table:name="2026-03-15 08:14:18" table:display="true" table:show-details="true"/>
                <table:data-pilot-member table:name="2026-03-15 08:16:24" table:display="true" table:show-details="true"/>
                <table:data-pilot-member table:name="2026-03-15 08:16:46" table:display="true" table:show-details="true"/>
                <table:data-pilot-member table:name="2026-03-15 08:18:28" table:display="true" table:show-details="true"/>
                <table:data-pilot-member table:name="2026-03-15 08:20:21" table:display="true" table:show-details="true"/>
                <table:data-pilot-member table:name="2026-03-15 08:29:43" table:display="true" table:show-details="true"/>
                <table:data-pilot-member table:name="2026-03-15 08:29:50" table:display="true" table:show-details="true"/>
                <table:data-pilot-member table:name="2026-03-15 08:36:20" table:display="true" table:show-details="true"/>
                <table:data-pilot-member table:name="2026-03-15 08:36:57" table:display="true" table:show-details="true"/>
                <table:data-pilot-member table:name="2026-03-15 08:38:56" table:display="true" table:show-details="true"/>
                <table:data-pilot-member table:name="2026-03-15 08:40:11" table:display="true" table:show-details="true"/>
                <table:data-pilot-member table:name="2026-03-15 08:45:13" table:display="true" table:show-details="true"/>
                <table:data-pilot-member table:name="2026-03-15 08:48:38" table:display="true" table:show-details="true"/>
                <table:data-pilot-member table:name="2026-03-15 08:54:37" table:display="true" table:show-details="true"/>
                <table:data-pilot-member table:name="2026-03-15 08:55:01" table:display="true" table:show-details="true"/>
                <table:data-pilot-member table:name="2026-03-15 08:55:54" table:display="true" table:show-details="true"/>
                <table:data-pilot-member table:name="2026-03-15 09:09:36" table:display="true" table:show-details="true"/>
                <table:data-pilot-member table:name="2026-03-15 09:10:49" table:display="true" table:show-details="true"/>
                <table:data-pilot-member table:name="2026-03-15 09:11:27" table:display="true" table:show-details="true"/>
                <table:data-pilot-member table:name="2026-03-15 09:12:20" table:display="true" table:show-details="true"/>
                <table:data-pilot-member table:name="2026-03-15 09:14:26" table:display="true" table:show-details="true"/>
                <table:data-pilot-member table:name="2026-03-15 09:14:36" table:display="true" table:show-details="true"/>
                <table:data-pilot-member table:name="2026-03-15 09:19:41" table:display="true" table:show-details="true"/>
                <table:data-pilot-member table:name="2026-03-15 09:25:06" table:display="true" table:show-details="true"/>
                <table:data-pilot-member table:name="2026-03-15 09:28:29" table:display="true" table:show-details="true"/>
                <table:data-pilot-member table:name="2026-03-15 09:28:45" table:display="true" table:show-details="true"/>
                <table:data-pilot-member table:name="2026-03-15 09:31:14" table:display="true" table:show-details="true"/>
                <table:data-pilot-member table:name="2026-03-15 09:31:56" table:display="true" table:show-details="true"/>
                <table:data-pilot-member table:name="2026-03-15 09:32:43" table:display="true" table:show-details="true"/>
                <table:data-pilot-member table:name="2026-03-15 09:33:19" table:display="true" table:show-details="true"/>
                <table:data-pilot-member table:name="2026-03-15 09:34:23" table:display="true" table:show-details="true"/>
                <table:data-pilot-member table:name="2026-03-15 09:36:59" table:display="true" table:show-details="true"/>
                <table:data-pilot-member table:name="2026-03-15 09:38:40" table:display="true" table:show-details="true"/>
                <table:data-pilot-member table:name="2026-03-15 09:40:16" table:display="true" table:show-details="true"/>
                <table:data-pilot-member table:name="2026-03-15 09:41:41" table:display="true" table:show-details="true"/>
                <table:data-pilot-member table:name="2026-03-15 09:42:20" table:display="true" table:show-details="true"/>
                <table:data-pilot-member table:name="2026-03-15 09:42:59" table:display="true" table:show-details="true"/>
                <table:data-pilot-member table:name="2026-03-15 09:43:28" table:display="true" table:show-details="true"/>
                <table:data-pilot-member table:name="2026-03-15 09:45:42" table:display="true" table:show-details="true"/>
                <table:data-pilot-member table:name="2026-03-15 09:51:22" table:display="true" table:show-details="true"/>
                <table:data-pilot-member table:name="2026-03-15 09:54:46" table:display="true" table:show-details="true"/>
                <table:data-pilot-member table:name="2026-03-15 09:54:55" table:display="true" table:show-details="true"/>
                <table:data-pilot-member table:name="2026-03-15 09:56:24" table:display="true" table:show-details="true"/>
                <table:data-pilot-member table:name="2026-03-15 09:56:37" table:display="true" table:show-details="true"/>
                <table:data-pilot-member table:name="2026-03-15 10:00:07" table:display="true" table:show-details="true"/>
                <table:data-pilot-member table:name="2026-03-15 10:00:23" table:display="true" table:show-details="true"/>
                <table:data-pilot-member table:name="2026-03-15 10:01:15" table:display="true" table:show-details="true"/>
                <table:data-pilot-member table:name="2026-03-15 10:02:10" table:display="true" table:show-details="true"/>
                <table:data-pilot-member table:name="2026-03-15 10:04:13" table:display="true" table:show-details="true"/>
                <table:data-pilot-member table:name="2026-03-15 10:05:08" table:display="true" table:show-details="true"/>
                <table:data-pilot-member table:name="2026-03-15 10:05:14" table:display="true" table:show-details="true"/>
                <table:data-pilot-member table:name="2026-03-15 10:05:24" table:display="true" table:show-details="true"/>
                <table:data-pilot-member table:name="2026-03-15 10:07:25" table:display="true" table:show-details="true"/>
                <table:data-pilot-member table:name="2026-03-15 10:07:38" table:display="true" table:show-details="true"/>
                <table:data-pilot-member table:name="2026-03-15 10:08:08" table:display="true" table:show-details="true"/>
                <table:data-pilot-member table:name="2026-03-15 10:08:44" table:display="true" table:show-details="true"/>
                <table:data-pilot-member table:name="2026-03-15 10:08:53" table:display="true" table:show-details="true"/>
                <table:data-pilot-member table:name="2026-03-15 10:10:45" table:display="true" table:show-details="true"/>
                <table:data-pilot-member table:name="2026-03-15 10:11:55" table:display="true" table:show-details="true"/>
                <table:data-pilot-member table:name="2026-03-15 10:17:10" table:display="true" table:show-details="true"/>
                <table:data-pilot-member table:name="2026-03-15 10:17:11" table:display="true" table:show-details="true"/>
                <table:data-pilot-member table:name="2026-03-15 10:17:31" table:display="true" table:show-details="true"/>
                <table:data-pilot-member table:name="2026-03-15 10:20:29" table:display="true" table:show-details="true"/>
                <table:data-pilot-member table:name="2026-03-15 10:20:57" table:display="true" table:show-details="true"/>
                <table:data-pilot-member table:name="2026-03-15 10:23:57" table:display="true" table:show-details="true"/>
                <table:data-pilot-member table:name="2026-03-15 10:26:05" table:display="true" table:show-details="true"/>
                <table:data-pilot-member table:name="2026-03-15 10:26:30" table:display="true" table:show-details="true"/>
                <table:data-pilot-member table:name="2026-03-15 10:35:15" table:display="true" table:show-details="true"/>
                <table:data-pilot-member table:name="2026-03-15 10:36:39" table:display="true" table:show-details="true"/>
                <table:data-pilot-member table:name="2026-03-15 10:44:49" table:display="true" table:show-details="true"/>
                <table:data-pilot-member table:name="2026-03-15 10:46:30" table:display="true" table:show-details="true"/>
                <table:data-pilot-member table:name="2026-03-15 10:46:52" table:display="true" table:show-details="true"/>
                <table:data-pilot-member table:name="2026-03-15 10:47:04" table:display="true" table:show-details="true"/>
                <table:data-pilot-member table:name="2026-03-15 10:48:03" table:display="true" table:show-details="true"/>
                <table:data-pilot-member table:name="2026-03-15 10:48:33" table:display="true" table:show-details="true"/>
                <table:data-pilot-member table:name="2026-03-15 10:50:56" table:display="true" table:show-details="true"/>
                <table:data-pilot-member table:name="2026-03-15 10:52:37" table:display="true" table:show-details="true"/>
                <table:data-pilot-member table:name="2026-03-15 10:52:43" table:display="true" table:show-details="true"/>
                <table:data-pilot-member table:name="2026-03-15 10:53:40" table:display="true" table:show-details="true"/>
                <table:data-pilot-member table:name="2026-03-15 10:55:54" table:display="true" table:show-details="true"/>
                <table:data-pilot-member table:name="2026-03-15 10:56:02" table:display="true" table:show-details="true"/>
                <table:data-pilot-member table:name="2026-03-15 10:56:32" table:display="true" table:show-details="true"/>
                <table:data-pilot-member table:name="2026-03-15 11:02:20" table:display="true" table:show-details="true"/>
                <table:data-pilot-member table:name="2026-03-15 11:07:04" table:display="true" table:show-details="true"/>
                <table:data-pilot-member table:name="2026-03-15 11:12:14" table:display="true" table:show-details="true"/>
                <table:data-pilot-member table:name="2026-03-15 11:13:59" table:display="true" table:show-details="true"/>
                <table:data-pilot-member table:name="2026-03-15 11:15:58" table:display="true" table:show-details="true"/>
                <table:data-pilot-member table:name="2026-03-15 11:18:32" table:display="true" table:show-details="true"/>
                <table:data-pilot-member table:name="2026-03-15 11:19:25" table:display="true" table:show-details="true"/>
                <table:data-pilot-member table:name="2026-03-15 11:19:43" table:display="true" table:show-details="true"/>
                <table:data-pilot-member table:name="2026-03-15 11:22:41" table:display="true" table:show-details="true"/>
                <table:data-pilot-member table:name="2026-03-15 11:23:48" table:display="true" table:show-details="true"/>
                <table:data-pilot-member table:name="2026-03-15 11:23:57" table:display="true" table:show-details="true"/>
                <table:data-pilot-member table:name="2026-03-15 11:24:27" table:display="true" table:show-details="true"/>
                <table:data-pilot-member table:name="2026-03-15 11:26:35" table:display="true" table:show-details="true"/>
                <table:data-pilot-member table:name="2026-03-15 11:26:54" table:display="true" table:show-details="true"/>
                <table:data-pilot-member table:name="2026-03-15 11:28:28" table:display="true" table:show-details="true"/>
                <table:data-pilot-member table:name="2026-03-15 11:33:20" table:display="true" table:show-details="true"/>
                <table:data-pilot-member table:name="2026-03-15 11:35:49" table:display="true" table:show-details="true"/>
                <table:data-pilot-member table:name="2026-03-15 11:36:13" table:display="true" table:show-details="true"/>
                <table:data-pilot-member table:name="2026-03-15 11:36:54" table:display="true" table:show-details="true"/>
                <table:data-pilot-member table:name="2026-03-15 11:39:52" table:display="true" table:show-details="true"/>
                <table:data-pilot-member table:name="2026-03-15 11:40:46" table:display="true" table:show-details="true"/>
                <table:data-pilot-member table:name="2026-03-15 11:41:09" table:display="true" table:show-details="true"/>
                <table:data-pilot-member table:name="2026-03-15 11:41:41" table:display="true" table:show-details="true"/>
                <table:data-pilot-member table:name="2026-03-15 11:47:26" table:display="true" table:show-details="true"/>
                <table:data-pilot-member table:name="2026-03-15 11:48:41" table:display="true" table:show-details="true"/>
                <table:data-pilot-member table:name="2026-03-15 11:48:55" table:display="true" table:show-details="true"/>
                <table:data-pilot-member table:name="2026-03-15 11:49:11" table:display="true" table:show-details="true"/>
                <table:data-pilot-member table:name="2026-03-15 11:50:34" table:display="true" table:show-details="true"/>
                <table:data-pilot-member table:name="2026-03-15 11:51:37" table:display="true" table:show-details="true"/>
                <table:data-pilot-member table:name="2026-03-15 11:55:18" table:display="true" table:show-details="true"/>
                <table:data-pilot-member table:name="2026-03-15 11:58:54" table:display="true" table:show-details="true"/>
                <table:data-pilot-member table:name="2026-03-15 12:05:02" table:display="true" table:show-details="true"/>
                <table:data-pilot-member table:name="2026-03-15 12:05:59" table:display="true" table:show-details="true"/>
                <table:data-pilot-member table:name="2026-03-15 12:06:38" table:display="true" table:show-details="true"/>
                <table:data-pilot-member table:name="2026-03-15 12:07:02" table:display="true" table:show-details="true"/>
                <table:data-pilot-member table:name="2026-03-15 12:07:39" table:display="true" table:show-details="true"/>
                <table:data-pilot-member table:name="2026-03-15 12:11:33" table:display="true" table:show-details="true"/>
                <table:data-pilot-member table:name="2026-03-15 12:15:07" table:display="true" table:show-details="true"/>
                <table:data-pilot-member table:name="2026-03-15 12:16:33" table:display="true" table:show-details="true"/>
                <table:data-pilot-member table:name="2026-03-15 12:17:20" table:display="true" table:show-details="true"/>
                <table:data-pilot-member table:name="2026-03-15 12:17:32" table:display="true" table:show-details="true"/>
                <table:data-pilot-member table:name="2026-03-15 12:22:50" table:display="true" table:show-details="true"/>
                <table:data-pilot-member table:name="2026-03-15 12:24:29" table:display="true" table:show-details="true"/>
                <table:data-pilot-member table:name="2026-03-15 12:24:34" table:display="true" table:show-details="true"/>
                <table:data-pilot-member table:name="2026-03-15 12:24:48" table:display="true" table:show-details="true"/>
                <table:data-pilot-member table:name="2026-03-15 12:25:10" table:display="true" table:show-details="true"/>
                <table:data-pilot-member table:name="2026-03-15 12:28:49" table:display="true" table:show-details="true"/>
                <table:data-pilot-member table:name="2026-03-15 12:32:23" table:display="true" table:show-details="true"/>
                <table:data-pilot-member table:name="2026-03-15 12:32:41" table:display="true" table:show-details="true"/>
                <table:data-pilot-member table:name="2026-03-15 12:34:37" table:display="true" table:show-details="true"/>
                <table:data-pilot-member table:name="2026-03-15 12:36:16" table:display="true" table:show-details="true"/>
                <table:data-pilot-member table:name="2026-03-15 12:36:59" table:display="true" table:show-details="true"/>
                <table:data-pilot-member table:name="2026-03-15 12:37:19" table:display="true" table:show-details="true"/>
                <table:data-pilot-member table:name="2026-03-15 12:43:33" table:display="true" table:show-details="true"/>
                <table:data-pilot-member table:name="2026-03-15 12:46:25" table:display="true" table:show-details="true"/>
                <table:data-pilot-member table:name="2026-03-15 12:46:29" table:display="true" table:show-details="true"/>
                <table:data-pilot-member table:name="2026-03-15 12:48:45" table:display="true" table:show-details="true"/>
                <table:data-pilot-member table:name="2026-03-15 12:50:12" table:display="true" table:show-details="true"/>
                <table:data-pilot-member table:name="2026-03-15 12:51:30" table:display="true" table:show-details="true"/>
                <table:data-pilot-member table:name="2026-03-15 12:53:52" table:display="true" table:show-details="true"/>
                <table:data-pilot-member table:name="2026-03-15 12:54:28" table:display="true" table:show-details="true"/>
                <table:data-pilot-member table:name="2026-03-15 13:05:12" table:display="true" table:show-details="true"/>
                <table:data-pilot-member table:name="2026-03-15 13:09:16" table:display="true" table:show-details="true"/>
                <table:data-pilot-member table:name="2026-03-15 13:12:24" table:display="true" table:show-details="true"/>
                <table:data-pilot-member table:name="2026-03-15 13:16:30" table:display="true" table:show-details="true"/>
                <table:data-pilot-member table:name="2026-03-15 13:18:34" table:display="true" table:show-details="true"/>
                <table:data-pilot-member table:name="2026-03-15 13:19:25" table:display="true" table:show-details="true"/>
                <table:data-pilot-member table:name="2026-03-15 13:20:04" table:display="true" table:show-details="true"/>
                <table:data-pilot-member table:name="2026-03-15 13:23:52" table:display="true" table:show-details="true"/>
                <table:data-pilot-member table:name="2026-03-15 13:24:58" table:display="true" table:show-details="true"/>
                <table:data-pilot-member table:name="2026-03-15 13:26:00" table:display="true" table:show-details="true"/>
                <table:data-pilot-member table:name="2026-03-15 13:28:18" table:display="true" table:show-details="true"/>
                <table:data-pilot-member table:name="2026-03-15 13:34:06" table:display="true" table:show-details="true"/>
                <table:data-pilot-member table:name="2026-03-15 13:35:13" table:display="true" table:show-details="true"/>
                <table:data-pilot-member table:name="2026-03-15 13:36:13" table:display="true" table:show-details="true"/>
                <table:data-pilot-member table:name="2026-03-15 13:37:57" table:display="true" table:show-details="true"/>
                <table:data-pilot-member table:name="2026-03-15 13:38:41" table:display="true" table:show-details="true"/>
                <table:data-pilot-member table:name="2026-03-15 13:42:06" table:display="true" table:show-details="true"/>
                <table:data-pilot-member table:name="2026-03-15 13:42:38" table:display="true" table:show-details="true"/>
                <table:data-pilot-member table:name="2026-03-15 13:47:40" table:display="true" table:show-details="true"/>
                <table:data-pilot-member table:name="2026-03-15 13:47:53" table:display="true" table:show-details="true"/>
                <table:data-pilot-member table:name="2026-03-15 13:48:27" table:display="true" table:show-details="true"/>
                <table:data-pilot-member table:name="2026-03-15 13:49:59" table:display="true" table:show-details="true"/>
                <table:data-pilot-member table:name="2026-03-15 13:50:22" table:display="true" table:show-details="true"/>
                <table:data-pilot-member table:name="2026-03-15 13:55:21" table:display="true" table:show-details="true"/>
                <table:data-pilot-member table:name="2026-03-15 13:56:04" table:display="true" table:show-details="true"/>
                <table:data-pilot-member table:name="2026-03-15 13:57:53" table:display="true" table:show-details="true"/>
                <table:data-pilot-member table:name="2026-03-15 14:05:05" table:display="true" table:show-details="true"/>
                <table:data-pilot-member table:name="2026-03-15 14:07:16" table:display="true" table:show-details="true"/>
                <table:data-pilot-member table:name="2026-03-15 14:08:50" table:display="true" table:show-details="true"/>
                <table:data-pilot-member table:name="2026-03-15 14:10:12" table:display="true" table:show-details="true"/>
                <table:data-pilot-member table:name="2026-03-15 14:10:18" table:display="true" table:show-details="true"/>
                <table:data-pilot-member table:name="2026-03-15 14:11:31" table:display="true" table:show-details="true"/>
                <table:data-pilot-member table:name="2026-03-15 14:11:56" table:display="true" table:show-details="true"/>
                <table:data-pilot-member table:name="2026-03-15 14:12:28" table:display="true" table:show-details="true"/>
                <table:data-pilot-member table:name="2026-03-15 14:14:37" table:display="true" table:show-details="true"/>
                <table:data-pilot-member table:name="2026-03-15 14:17:15" table:display="true" table:show-details="true"/>
                <table:data-pilot-member table:name="2026-03-15 14:18:26" table:display="true" table:show-details="true"/>
                <table:data-pilot-member table:name="2026-03-15 14:18:35" table:display="true" table:show-details="true"/>
                <table:data-pilot-member table:name="2026-03-15 14:19:04" table:display="true" table:show-details="true"/>
                <table:data-pilot-member table:name="2026-03-15 14:21:41" table:display="true" table:show-details="true"/>
                <table:data-pilot-member table:name="2026-03-15 14:21:53" table:display="true" table:show-details="true"/>
                <table:data-pilot-member table:name="2026-03-15 14:25:33" table:display="true" table:show-details="true"/>
                <table:data-pilot-member table:name="2026-03-15 14:25:40" table:display="true" table:show-details="true"/>
                <table:data-pilot-member table:name="2026-03-15 14:31:04" table:display="true" table:show-details="true"/>
                <table:data-pilot-member table:name="2026-03-15 14:31:32" table:display="true" table:show-details="true"/>
                <table:data-pilot-member table:name="2026-03-15 14:35:01" table:display="true" table:show-details="true"/>
                <table:data-pilot-member table:name="2026-03-15 14:36:12" table:display="true" table:show-details="true"/>
                <table:data-pilot-member table:name="2026-03-15 14:36:21" table:display="true" table:show-details="true"/>
                <table:data-pilot-member table:name="2026-03-15 14:39:31" table:display="true" table:show-details="true"/>
                <table:data-pilot-member table:name="2026-03-15 14:40:47" table:display="true" table:show-details="true"/>
                <table:data-pilot-member table:name="2026-03-15 14:41:33" table:display="true" table:show-details="true"/>
                <table:data-pilot-member table:name="2026-03-15 14:42:14" table:display="true" table:show-details="true"/>
                <table:data-pilot-member table:name="2026-03-15 14:42:43" table:display="true" table:show-details="true"/>
                <table:data-pilot-member table:name="2026-03-15 14:44:01" table:display="true" table:show-details="true"/>
                <table:data-pilot-member table:name="2026-03-15 14:46:36" table:display="true" table:show-details="true"/>
                <table:data-pilot-member table:name="2026-03-15 14:50:11" table:display="true" table:show-details="true"/>
                <table:data-pilot-member table:name="2026-03-15 14:50:51" table:display="true" table:show-details="true"/>
                <table:data-pilot-member table:name="2026-03-15 14:53:20" table:display="true" table:show-details="true"/>
                <table:data-pilot-member table:name="2026-03-15 14:53:52" table:display="true" table:show-details="true"/>
                <table:data-pilot-member table:name="2026-03-15 14:55:41" table:display="true" table:show-details="true"/>
                <table:data-pilot-member table:name="2026-03-15 14:56:58" table:display="true" table:show-details="true"/>
                <table:data-pilot-member table:name="2026-03-15 14:57:44" table:display="true" table:show-details="true"/>
                <table:data-pilot-member table:name="2026-03-15 15:00:34" table:display="true" table:show-details="true"/>
                <table:data-pilot-member table:name="2026-03-15 15:02:06" table:display="true" table:show-details="true"/>
                <table:data-pilot-member table:name="2026-03-15 15:02:25" table:display="true" table:show-details="true"/>
                <table:data-pilot-member table:name="2026-03-15 15:03:06" table:display="true" table:show-details="true"/>
                <table:data-pilot-member table:name="2026-03-15 15:04:12" table:display="true" table:show-details="true"/>
                <table:data-pilot-member table:name="2026-03-15 15:04:59" table:display="true" table:show-details="true"/>
                <table:data-pilot-member table:name="2026-03-15 15:05:23" table:display="true" table:show-details="true"/>
                <table:data-pilot-member table:name="2026-03-15 15:05:40" table:display="true" table:show-details="true"/>
                <table:data-pilot-member table:name="2026-03-15 15:10:39" table:display="true" table:show-details="true"/>
                <table:data-pilot-member table:name="2026-03-15 15:14:09" table:display="true" table:show-details="true"/>
                <table:data-pilot-member table:name="2026-03-15 15:16:22" table:display="true" table:show-details="true"/>
                <table:data-pilot-member table:name="2026-03-15 15:17:20" table:display="true" table:show-details="true"/>
                <table:data-pilot-member table:name="2026-03-15 15:20:28" table:display="true" table:show-details="true"/>
                <table:data-pilot-member table:name="2026-03-15 15:21:35" table:display="true" table:show-details="true"/>
                <table:data-pilot-member table:name="2026-03-15 15:24:10" table:display="true" table:show-details="true"/>
                <table:data-pilot-member table:name="2026-03-15 15:28:01" table:display="true" table:show-details="true"/>
                <table:data-pilot-member table:name="2026-03-15 15:28:19" table:display="true" table:show-details="true"/>
                <table:data-pilot-member table:name="2026-03-15 15:28:40" table:display="true" table:show-details="true"/>
                <table:data-pilot-member table:name="2026-03-15 15:29:34" table:display="true" table:show-details="true"/>
                <table:data-pilot-member table:name="2026-03-15 15:30:44" table:display="true" table:show-details="true"/>
                <table:data-pilot-member table:name="2026-03-15 15:32:03" table:display="true" table:show-details="true"/>
                <table:data-pilot-member table:name="2026-03-15 15:32:34" table:display="true" table:show-details="true"/>
                <table:data-pilot-member table:name="2026-03-15 15:33:19" table:display="true" table:show-details="true"/>
                <table:data-pilot-member table:name="2026-03-15 15:35:06" table:display="true" table:show-details="true"/>
                <table:data-pilot-member table:name="2026-03-15 15:36:28" table:display="true" table:show-details="true"/>
                <table:data-pilot-member table:name="2026-03-15 15:38:33" table:display="true" table:show-details="true"/>
                <table:data-pilot-member table:name="2026-03-15 15:40:49" table:display="true" table:show-details="true"/>
                <table:data-pilot-member table:name="2026-03-15 15:42:24" table:display="true" table:show-details="true"/>
                <table:data-pilot-member table:name="2026-03-15 15:44:39" table:display="true" table:show-details="true"/>
                <table:data-pilot-member table:name="2026-03-15 15:45:03" table:display="true" table:show-details="true"/>
                <table:data-pilot-member table:name="2026-03-15 15:47:20" table:display="true" table:show-details="true"/>
                <table:data-pilot-member table:name="2026-03-15 15:49:18" table:display="true" table:show-details="true"/>
                <table:data-pilot-member table:name="2026-03-15 15:49:40" table:display="true" table:show-details="true"/>
                <table:data-pilot-member table:name="2026-03-15 15:52:13" table:display="true" table:show-details="true"/>
                <table:data-pilot-member table:name="2026-03-15 15:56:40" table:display="true" table:show-details="true"/>
                <table:data-pilot-member table:name="2026-03-15 15:58:21" table:display="true" table:show-details="true"/>
                <table:data-pilot-member table:name="2026-03-15 16:02:33" table:display="true" table:show-details="true"/>
                <table:data-pilot-member table:name="2026-03-15 16:05:18" table:display="true" table:show-details="true"/>
                <table:data-pilot-member table:name="2026-03-15 16:05:29" table:display="true" table:show-details="true"/>
                <table:data-pilot-member table:name="2026-03-15 16:06:00" table:display="true" table:show-details="true"/>
                <table:data-pilot-member table:name="2026-03-15 16:06:33" table:display="true" table:show-details="true"/>
                <table:data-pilot-member table:name="2026-03-15 16:06:44" table:display="true" table:show-details="true"/>
                <table:data-pilot-member table:name="2026-03-15 16:06:55" table:display="true" table:show-details="true"/>
                <table:data-pilot-member table:name="2026-03-15 16:07:22" table:display="true" table:show-details="true"/>
                <table:data-pilot-member table:name="2026-03-15 16:08:30" table:display="true" table:show-details="true"/>
                <table:data-pilot-member table:name="2026-03-15 16:10:16" table:display="true" table:show-details="true"/>
                <table:data-pilot-member table:name="2026-03-15 16:11:58" table:display="true" table:show-details="true"/>
                <table:data-pilot-member table:name="2026-03-15 16:18:35" table:display="true" table:show-details="true"/>
                <table:data-pilot-member table:name="2026-03-15 16:20:22" table:display="true" table:show-details="true"/>
                <table:data-pilot-member table:name="2026-03-15 16:21:23" table:display="true" table:show-details="true"/>
                <table:data-pilot-member table:name="2026-03-15 16:25:18" table:display="true" table:show-details="true"/>
                <table:data-pilot-member table:name="2026-03-15 16:34:33" table:display="true" table:show-details="true"/>
                <table:data-pilot-member table:name="2026-03-15 16:34:49" table:display="true" table:show-details="true"/>
                <table:data-pilot-member table:name="2026-03-15 16:36:08" table:display="true" table:show-details="true"/>
                <table:data-pilot-member table:name="2026-03-15 16:37:20" table:display="true" table:show-details="true"/>
                <table:data-pilot-member table:name="2026-03-15 16:38:38" table:display="true" table:show-details="true"/>
                <table:data-pilot-member table:name="2026-03-15 16:42:24" table:display="true" table:show-details="true"/>
                <table:data-pilot-member table:name="2026-03-15 16:47:44" table:display="true" table:show-details="true"/>
                <table:data-pilot-member table:name="2026-03-15 16:49:14" table:display="true" table:show-details="true"/>
                <table:data-pilot-member table:name="2026-03-15 16:51:09" table:display="true" table:show-details="true"/>
                <table:data-pilot-member table:name="2026-03-15 16:51:50" table:display="true" table:show-details="true"/>
                <table:data-pilot-member table:name="2026-03-15 16:53:43" table:display="true" table:show-details="true"/>
                <table:data-pilot-member table:name="2026-03-15 16:59:03" table:display="true" table:show-details="true"/>
                <table:data-pilot-member table:name="2026-03-15 16:59:54" table:display="true" table:show-details="true"/>
                <table:data-pilot-member table:name="2026-03-15 17:03:42" table:display="true" table:show-details="true"/>
                <table:data-pilot-member table:name="2026-03-15 17:03:46" table:display="true" table:show-details="true"/>
                <table:data-pilot-member table:name="2026-03-15 17:07:19" table:display="true" table:show-details="true"/>
                <table:data-pilot-member table:name="2026-03-15 17:07:22" table:display="true" table:show-details="true"/>
                <table:data-pilot-member table:name="2026-03-15 17:07:43" table:display="true" table:show-details="true"/>
                <table:data-pilot-member table:name="2026-03-15 17:07:59" table:display="true" table:show-details="true"/>
                <table:data-pilot-member table:name="2026-03-15 17:10:16" table:display="true" table:show-details="true"/>
                <table:data-pilot-member table:name="2026-03-15 17:11:34" table:display="true" table:show-details="true"/>
                <table:data-pilot-member table:name="2026-03-15 17:15:59" table:display="true" table:show-details="true"/>
                <table:data-pilot-member table:name="2026-03-15 17:17:12" table:display="true" table:show-details="true"/>
                <table:data-pilot-member table:name="2026-03-15 17:20:38" table:display="true" table:show-details="true"/>
                <table:data-pilot-member table:name="2026-03-15 17:20:59" table:display="true" table:show-details="true"/>
                <table:data-pilot-member table:name="2026-03-15 17:22:52" table:display="true" table:show-details="true"/>
                <table:data-pilot-member table:name="2026-03-15 17:23:35" table:display="true" table:show-details="true"/>
                <table:data-pilot-member table:name="2026-03-15 17:23:49" table:display="true" table:show-details="true"/>
                <table:data-pilot-member table:name="2026-03-15 17:24:12" table:display="true" table:show-details="true"/>
                <table:data-pilot-member table:name="2026-03-15 17:31:51" table:display="true" table:show-details="true"/>
                <table:data-pilot-member table:name="2026-03-15 17:31:55" table:display="true" table:show-details="true"/>
                <table:data-pilot-member table:name="2026-03-15 17:32:11" table:display="true" table:show-details="true"/>
                <table:data-pilot-member table:name="2026-03-15 17:33:47" table:display="true" table:show-details="true"/>
                <table:data-pilot-member table:name="2026-03-15 17:33:48" table:display="true" table:show-details="true"/>
                <table:data-pilot-member table:name="2026-03-15 17:34:19" table:display="true" table:show-details="true"/>
                <table:data-pilot-member table:name="2026-03-15 17:37:40" table:display="true" table:show-details="true"/>
                <table:data-pilot-member table:name="2026-03-15 17:37:51" table:display="true" table:show-details="true"/>
                <table:data-pilot-member table:name="2026-03-15 17:38:16" table:display="true" table:show-details="true"/>
                <table:data-pilot-member table:name="2026-03-15 17:39:23" table:display="true" table:show-details="true"/>
                <table:data-pilot-member table:name="2026-03-15 17:41:58" table:display="true" table:show-details="true"/>
                <table:data-pilot-member table:name="2026-03-15 17:43:32" table:display="true" table:show-details="true"/>
                <table:data-pilot-member table:name="2026-03-15 17:44:24" table:display="true" table:show-details="true"/>
                <table:data-pilot-member table:name="2026-03-15 17:46:53" table:display="true" table:show-details="true"/>
                <table:data-pilot-member table:name="2026-03-15 17:46:56" table:display="true" table:show-details="true"/>
                <table:data-pilot-member table:name="2026-03-15 17:49:32" table:display="true" table:show-details="true"/>
                <table:data-pilot-member table:name="2026-03-15 17:50:38" table:display="true" table:show-details="true"/>
                <table:data-pilot-member table:name="2026-03-15 17:51:54" table:display="true" table:show-details="true"/>
                <table:data-pilot-member table:name="2026-03-15 17:54:15" table:display="true" table:show-details="true"/>
                <table:data-pilot-member table:name="2026-03-15 17:56:38" table:display="true" table:show-details="true"/>
                <table:data-pilot-member table:name="2026-03-15 17:59:20" table:display="true" table:show-details="true"/>
                <table:data-pilot-member table:name="2026-03-15 18:01:01" table:display="true" table:show-details="true"/>
                <table:data-pilot-member table:name="2026-03-15 18:03:09" table:display="true" table:show-details="true"/>
                <table:data-pilot-member table:name="2026-03-15 18:03:39" table:display="true" table:show-details="true"/>
                <table:data-pilot-member table:name="2026-03-15 18:04:14" table:display="true" table:show-details="true"/>
                <table:data-pilot-member table:name="2026-03-15 18:05:47" table:display="true" table:show-details="true"/>
                <table:data-pilot-member table:name="2026-03-15 18:10:46" table:display="true" table:show-details="true"/>
                <table:data-pilot-member table:name="2026-03-15 18:10:58" table:display="true" table:show-details="true"/>
                <table:data-pilot-member table:name="2026-03-15 18:12:59" table:display="true" table:show-details="true"/>
                <table:data-pilot-member table:name="2026-03-15 18:13:12" table:display="true" table:show-details="true"/>
                <table:data-pilot-member table:name="2026-03-15 18:19:28" table:display="true" table:show-details="true"/>
                <table:data-pilot-member table:name="2026-03-15 18:22:41" table:display="true" table:show-details="true"/>
                <table:data-pilot-member table:name="2026-03-15 18:23:28" table:display="true" table:show-details="true"/>
                <table:data-pilot-member table:name="2026-03-15 18:23:51" table:display="true" table:show-details="true"/>
                <table:data-pilot-member table:name="2026-03-15 18:25:06" table:display="true" table:show-details="true"/>
                <table:data-pilot-member table:name="2026-03-15 18:30:48" table:display="true" table:show-details="true"/>
                <table:data-pilot-member table:name="2026-03-15 18:33:07" table:display="true" table:show-details="true"/>
                <table:data-pilot-member table:name="2026-03-15 18:35:52" table:display="true" table:show-details="true"/>
                <table:data-pilot-member table:name="2026-03-15 18:39:49" table:display="true" table:show-details="true"/>
                <table:data-pilot-member table:name="2026-03-15 18:49:29" table:display="true" table:show-details="true"/>
                <table:data-pilot-member table:name="2026-03-15 18:49:30" table:display="true" table:show-details="true"/>
                <table:data-pilot-member table:name="2026-03-15 19:02:43" table:display="true" table:show-details="true"/>
                <table:data-pilot-member table:name="2026-03-15 19:03:24" table:display="true" table:show-details="true"/>
                <table:data-pilot-member table:name="2026-03-15 19:07:19" table:display="true" table:show-details="true"/>
                <table:data-pilot-member table:name="2026-03-15 19:08:19" table:display="true" table:show-details="true"/>
                <table:data-pilot-member table:name="2026-03-15 19:12:09" table:display="true" table:show-details="true"/>
                <table:data-pilot-member table:name="2026-03-15 19:14:15" table:display="true" table:show-details="true"/>
                <table:data-pilot-member table:name="2026-03-15 19:14:35" table:display="true" table:show-details="true"/>
                <table:data-pilot-member table:name="2026-03-15 19:16:25" table:display="true" table:show-details="true"/>
                <table:data-pilot-member table:name="2026-03-15 19:21:47" table:display="true" table:show-details="true"/>
                <table:data-pilot-member table:name="2026-03-15 19:22:30" table:display="true" table:show-details="true"/>
                <table:data-pilot-member table:name="2026-03-15 19:23:09" table:display="true" table:show-details="true"/>
                <table:data-pilot-member table:name="2026-03-15 19:24:33" table:display="true" table:show-details="true"/>
                <table:data-pilot-member table:name="2026-03-15 19:25:18" table:display="true" table:show-details="true"/>
                <table:data-pilot-member table:name="2026-03-15 19:25:36" table:display="true" table:show-details="true"/>
                <table:data-pilot-member table:name="2026-03-15 19:25:58" table:display="true" table:show-details="true"/>
                <table:data-pilot-member table:name="2026-03-15 19:26:01" table:display="true" table:show-details="true"/>
                <table:data-pilot-member table:name="2026-03-15 19:30:32" table:display="true" table:show-details="true"/>
                <table:data-pilot-member table:name="2026-03-15 19:31:04" table:display="true" table:show-details="true"/>
                <table:data-pilot-member table:name="2026-03-15 19:32:23" table:display="true" table:show-details="true"/>
                <table:data-pilot-member table:name="2026-03-15 19:32:27" table:display="true" table:show-details="true"/>
                <table:data-pilot-member table:name="2026-03-15 19:32:54" table:display="true" table:show-details="true"/>
                <table:data-pilot-member table:name="2026-03-15 19:34:02" table:display="true" table:show-details="true"/>
                <table:data-pilot-member table:name="2026-03-15 19:34:12" table:display="true" table:show-details="true"/>
                <table:data-pilot-member table:name="2026-03-15 19:35:29" table:display="true" table:show-details="true"/>
                <table:data-pilot-member table:name="2026-03-15 19:36:49" table:display="true" table:show-details="true"/>
                <table:data-pilot-member table:name="2026-03-15 19:38:00" table:display="true" table:show-details="true"/>
                <table:data-pilot-member table:name="2026-03-15 19:40:04" table:display="true" table:show-details="true"/>
                <table:data-pilot-member table:name="2026-03-15 19:40:07" table:display="true" table:show-details="true"/>
                <table:data-pilot-member table:name="2026-03-15 19:41:05" table:display="true" table:show-details="true"/>
                <table:data-pilot-member table:name="2026-03-15 19:42:41" table:display="true" table:show-details="true"/>
                <table:data-pilot-member table:name="2026-03-15 19:42:45" table:display="true" table:show-details="true"/>
                <table:data-pilot-member table:name="2026-03-15 19:43:15" table:display="true" table:show-details="true"/>
                <table:data-pilot-member table:name="2026-03-15 19:44:01" table:display="true" table:show-details="true"/>
                <table:data-pilot-member table:name="2026-03-15 19:44:02" table:display="true" table:show-details="true"/>
                <table:data-pilot-member table:name="2026-03-15 19:44:08" table:display="true" table:show-details="true"/>
                <table:data-pilot-member table:name="2026-03-15 19:46:17" table:display="true" table:show-details="true"/>
                <table:data-pilot-member table:name="2026-03-15 19:46:30" table:display="true" table:show-details="true"/>
                <table:data-pilot-member table:name="2026-03-15 19:46:34" table:display="true" table:show-details="true"/>
                <table:data-pilot-member table:name="2026-03-15 19:47:49" table:display="true" table:show-details="true"/>
                <table:data-pilot-member table:name="2026-03-15 19:49:44" table:display="true" table:show-details="true"/>
                <table:data-pilot-member table:name="2026-03-15 19:50:02" table:display="true" table:show-details="true"/>
                <table:data-pilot-member table:name="2026-03-15 19:50:54" table:display="true" table:show-details="true"/>
                <table:data-pilot-member table:name="2026-03-15 19:53:13" table:display="true" table:show-details="true"/>
                <table:data-pilot-member table:name="2026-03-15 19:54:14" table:display="true" table:show-details="true"/>
                <table:data-pilot-member table:name="2026-03-15 19:54:20" table:display="true" table:show-details="true"/>
                <table:data-pilot-member table:name="2026-03-15 19:55:49" table:display="true" table:show-details="true"/>
                <table:data-pilot-member table:name="2026-03-15 19:56:26" table:display="true" table:show-details="true"/>
                <table:data-pilot-member table:name="2026-03-15 19:57:43" table:display="true" table:show-details="true"/>
                <table:data-pilot-member table:name="2026-03-15 19:59:48" table:display="true" table:show-details="true"/>
                <table:data-pilot-member table:name="2026-03-15 20:00:15" table:display="true" table:show-details="true"/>
                <table:data-pilot-member table:name="2026-03-15 20:00:16" table:display="true" table:show-details="true"/>
                <table:data-pilot-member table:name="2026-03-15 20:01:50" table:display="true" table:show-details="true"/>
                <table:data-pilot-member table:name="2026-03-15 20:01:53" table:display="true" table:show-details="true"/>
                <table:data-pilot-member table:name="2026-03-15 20:03:53" table:display="true" table:show-details="true"/>
                <table:data-pilot-member table:name="2026-03-15 20:04:03" table:display="true" table:show-details="true"/>
                <table:data-pilot-member table:name="2026-03-15 20:05:18" table:display="true" table:show-details="true"/>
                <table:data-pilot-member table:name="2026-03-15 20:05:34" table:display="true" table:show-details="true"/>
                <table:data-pilot-member table:name="2026-03-15 20:07:26" table:display="true" table:show-details="true"/>
                <table:data-pilot-member table:name="2026-03-15 20:11:51" table:display="true" table:show-details="true"/>
                <table:data-pilot-member table:name="2026-03-15 20:12:13" table:display="true" table:show-details="true"/>
                <table:data-pilot-member table:name="2026-03-15 20:12:34" table:display="true" table:show-details="true"/>
                <table:data-pilot-member table:name="2026-03-15 20:13:19" table:display="true" table:show-details="true"/>
                <table:data-pilot-member table:name="2026-03-15 20:16:28" table:display="true" table:show-details="true"/>
                <table:data-pilot-member table:name="2026-03-15 20:16:53" table:display="true" table:show-details="true"/>
                <table:data-pilot-member table:name="2026-03-15 20:17:45" table:display="true" table:show-details="true"/>
                <table:data-pilot-member table:name="2026-03-15 20:17:59" table:display="true" table:show-details="true"/>
                <table:data-pilot-member table:name="2026-03-15 20:20:18" table:display="true" table:show-details="true"/>
                <table:data-pilot-member table:name="2026-03-15 20:20:40" table:display="true" table:show-details="true"/>
                <table:data-pilot-member table:name="2026-03-15 20:21:53" table:display="true" table:show-details="true"/>
                <table:data-pilot-member table:name="2026-03-15 20:21:57" table:display="true" table:show-details="true"/>
                <table:data-pilot-member table:name="2026-03-15 20:22:11" table:display="true" table:show-details="true"/>
                <table:data-pilot-member table:name="2026-03-15 20:32:54" table:display="true" table:show-details="true"/>
                <table:data-pilot-member table:name="2026-03-15 20:33:07" table:display="true" table:show-details="true"/>
                <table:data-pilot-member table:name="2026-03-15 20:34:05" table:display="true" table:show-details="true"/>
                <table:data-pilot-member table:name="2026-03-15 20:37:53" table:display="true" table:show-details="true"/>
                <table:data-pilot-member table:name="2026-03-15 20:38:17" table:display="true" table:show-details="true"/>
                <table:data-pilot-member table:name="2026-03-15 20:40:08" table:display="true" table:show-details="true"/>
                <table:data-pilot-member table:name="2026-03-15 20:40:23" table:display="true" table:show-details="true"/>
                <table:data-pilot-member table:name="2026-03-15 20:42:45" table:display="true" table:show-details="true"/>
                <table:data-pilot-member table:name="2026-03-15 20:43:36" table:display="true" table:show-details="true"/>
                <table:data-pilot-member table:name="2026-03-15 20:44:41" table:display="true" table:show-details="true"/>
                <table:data-pilot-member table:name="2026-03-15 20:46:12" table:display="true" table:show-details="true"/>
                <table:data-pilot-member table:name="2026-03-15 20:46:31" table:display="true" table:show-details="true"/>
                <table:data-pilot-member table:name="2026-03-15 20:47:07" table:display="true" table:show-details="true"/>
                <table:data-pilot-member table:name="2026-03-15 20:47:20" table:display="true" table:show-details="true"/>
                <table:data-pilot-member table:name="2026-03-15 20:48:19" table:display="true" table:show-details="true"/>
                <table:data-pilot-member table:name="2026-03-15 20:50:36" table:display="true" table:show-details="true"/>
                <table:data-pilot-member table:name="2026-03-15 20:51:28" table:display="true" table:show-details="true"/>
                <table:data-pilot-member table:name="2026-03-15 20:52:22" table:display="true" table:show-details="true"/>
                <table:data-pilot-member table:name="2026-03-15 20:52:30" table:display="true" table:show-details="true"/>
                <table:data-pilot-member table:name="2026-03-15 20:54:10" table:display="true" table:show-details="true"/>
                <table:data-pilot-member table:name="2026-03-15 20:54:43" table:display="true" table:show-details="true"/>
                <table:data-pilot-member table:name="2026-03-15 20:57:31" table:display="true" table:show-details="true"/>
                <table:data-pilot-member table:name="2026-03-15 20:59:46" table:display="true" table:show-details="true"/>
                <table:data-pilot-member table:name="2026-03-15 21:00:54" table:display="true" table:show-details="true"/>
                <table:data-pilot-member table:name="2026-03-15 21:02:20" table:display="true" table:show-details="true"/>
                <table:data-pilot-member table:name="2026-03-15 21:04:17" table:display="true" table:show-details="true"/>
                <table:data-pilot-member table:name="2026-03-15 21:04:34" table:display="true" table:show-details="true"/>
                <table:data-pilot-member table:name="2026-03-15 21:05:23" table:display="true" table:show-details="true"/>
                <table:data-pilot-member table:name="2026-03-15 21:06:13" table:display="true" table:show-details="true"/>
                <table:data-pilot-member table:name="2026-03-15 21:07:50" table:display="true" table:show-details="true"/>
                <table:data-pilot-member table:name="2026-03-15 21:09:03" table:display="true" table:show-details="true"/>
                <table:data-pilot-member table:name="2026-03-15 21:12:05" table:display="true" table:show-details="true"/>
                <table:data-pilot-member table:name="2026-03-15 21:12:33" table:display="true" table:show-details="true"/>
                <table:data-pilot-member table:name="2026-03-15 21:13:33" table:display="true" table:show-details="true"/>
                <table:data-pilot-member table:name="2026-03-15 21:13:46" table:display="true" table:show-details="true"/>
                <table:data-pilot-member table:name="2026-03-15 21:14:18" table:display="true" table:show-details="true"/>
                <table:data-pilot-member table:name="2026-03-15 21:14:26" table:display="true" table:show-details="true"/>
                <table:data-pilot-member table:name="2026-03-15 21:14:52" table:display="true" table:show-details="true"/>
                <table:data-pilot-member table:name="2026-03-15 21:15:28" table:display="true" table:show-details="true"/>
                <table:data-pilot-member table:name="2026-03-15 21:16:33" table:display="true" table:show-details="true"/>
                <table:data-pilot-member table:name="2026-03-15 21:16:34" table:display="true" table:show-details="true"/>
                <table:data-pilot-member table:name="2026-03-15 21:17:09" table:display="true" table:show-details="true"/>
                <table:data-pilot-member table:name="2026-03-15 21:17:12" table:display="true" table:show-details="true"/>
                <table:data-pilot-member table:name="2026-03-15 21:17:40" table:display="true" table:show-details="true"/>
                <table:data-pilot-member table:name="2026-03-15 21:17:41" table:display="true" table:show-details="true"/>
                <table:data-pilot-member table:name="2026-03-15 21:17:43" table:display="true" table:show-details="true"/>
                <table:data-pilot-member table:name="2026-03-15 21:18:12" table:display="true" table:show-details="true"/>
                <table:data-pilot-member table:name="2026-03-15 21:18:19" table:display="true" table:show-details="true"/>
                <table:data-pilot-member table:name="2026-03-15 21:20:54" table:display="true" table:show-details="true"/>
                <table:data-pilot-member table:name="2026-03-15 21:21:44" table:display="true" table:show-details="true"/>
                <table:data-pilot-member table:name="2026-03-15 21:23:14" table:display="true" table:show-details="true"/>
                <table:data-pilot-member table:name="2026-03-15 21:23:34" table:display="true" table:show-details="true"/>
                <table:data-pilot-member table:name="2026-03-15 21:23:44" table:display="true" table:show-details="true"/>
                <table:data-pilot-member table:name="2026-03-15 21:24:12" table:display="true" table:show-details="true"/>
                <table:data-pilot-member table:name="2026-03-15 21:24:44" table:display="true" table:show-details="true"/>
                <table:data-pilot-member table:name="2026-03-15 21:25:40" table:display="true" table:show-details="true"/>
                <table:data-pilot-member table:name="2026-03-15 21:26:42" table:display="true" table:show-details="true"/>
                <table:data-pilot-member table:name="2026-03-15 21:26:47" table:display="true" table:show-details="true"/>
                <table:data-pilot-member table:name="2026-03-15 21:26:51" table:display="true" table:show-details="true"/>
                <table:data-pilot-member table:name="2026-03-15 21:27:49" table:display="true" table:show-details="true"/>
                <table:data-pilot-member table:name="2026-03-15 21:27:51" table:display="true" table:show-details="true"/>
                <table:data-pilot-member table:name="2026-03-15 21:28:18" table:display="true" table:show-details="true"/>
                <table:data-pilot-member table:name="2026-03-15 21:28:29" table:display="true" table:show-details="true"/>
                <table:data-pilot-member table:name="2026-03-15 21:29:10" table:display="true" table:show-details="true"/>
                <table:data-pilot-member table:name="2026-03-15 21:29:20" table:display="true" table:show-details="true"/>
                <table:data-pilot-member table:name="2026-03-15 21:29:53" table:display="true" table:show-details="true"/>
                <table:data-pilot-member table:name="2026-03-15 21:30:49" table:display="true" table:show-details="true"/>
                <table:data-pilot-member table:name="2026-03-15 21:34:18" table:display="true" table:show-details="true"/>
                <table:data-pilot-member table:name="2026-03-15 21:35:11" table:display="true" table:show-details="true"/>
                <table:data-pilot-member table:name="2026-03-15 21:35:46" table:display="true" table:show-details="true"/>
                <table:data-pilot-member table:name="2026-03-15 21:35:57" table:display="true" table:show-details="true"/>
                <table:data-pilot-member table:name="2026-03-15 21:37:23" table:display="true" table:show-details="true"/>
                <table:data-pilot-member table:name="2026-03-15 21:37:28" table:display="true" table:show-details="true"/>
                <table:data-pilot-member table:name="2026-03-15 21:38:29" table:display="true" table:show-details="true"/>
                <table:data-pilot-member table:name="2026-03-15 21:39:15" table:display="true" table:show-details="true"/>
                <table:data-pilot-member table:name="2026-03-15 21:40:34" table:display="true" table:show-details="true"/>
                <table:data-pilot-member table:name="2026-03-15 21:41:14" table:display="true" table:show-details="true"/>
                <table:data-pilot-member table:name="2026-03-15 21:41:52" table:display="true" table:show-details="true"/>
                <table:data-pilot-member table:name="2026-03-15 21:42:07" table:display="true" table:show-details="true"/>
                <table:data-pilot-member table:name="2026-03-15 21:42:59" table:display="true" table:show-details="true"/>
                <table:data-pilot-member table:name="2026-03-15 21:43:25" table:display="true" table:show-details="true"/>
                <table:data-pilot-member table:name="2026-03-15 21:44:09" table:display="true" table:show-details="true"/>
                <table:data-pilot-member table:name="2026-03-15 21:44:30" table:display="true" table:show-details="true"/>
                <table:data-pilot-member table:name="2026-03-15 21:44:58" table:display="true" table:show-details="true"/>
                <table:data-pilot-member table:name="2026-03-15 21:45:31" table:display="true" table:show-details="true"/>
                <table:data-pilot-member table:name="2026-03-15 21:46:02" table:display="true" table:show-details="true"/>
                <table:data-pilot-member table:name="2026-03-15 21:46:37" table:display="true" table:show-details="true"/>
                <table:data-pilot-member table:name="2026-03-15 21:47:00" table:display="true" table:show-details="true"/>
                <table:data-pilot-member table:name="2026-03-15 21:47:19" table:display="true" table:show-details="true"/>
                <table:data-pilot-member table:name="2026-03-15 21:47:58" table:display="true" table:show-details="true"/>
                <table:data-pilot-member table:name="2026-03-15 21:48:05" table:display="true" table:show-details="true"/>
                <table:data-pilot-member table:name="2026-03-15 21:50:05" table:display="true" table:show-details="true"/>
                <table:data-pilot-member table:name="2026-03-15 21:50:06" table:display="true" table:show-details="true"/>
                <table:data-pilot-member table:name="2026-03-15 21:51:17" table:display="true" table:show-details="true"/>
                <table:data-pilot-member table:name="2026-03-15 21:53:18" table:display="true" table:show-details="true"/>
                <table:data-pilot-member table:name="2026-03-15 21:54:02" table:display="true" table:show-details="true"/>
                <table:data-pilot-member table:name="2026-03-15 21:54:53" table:display="true" table:show-details="true"/>
                <table:data-pilot-member table:name="2026-03-15 21:55:21" table:display="true" table:show-details="true"/>
                <table:data-pilot-member table:name="2026-03-15 21:55:28" table:display="true" table:show-details="true"/>
                <table:data-pilot-member table:name="2026-03-15 21:56:03" table:display="true" table:show-details="true"/>
                <table:data-pilot-member table:name="2026-03-15 21:56:28" table:display="true" table:show-details="true"/>
                <table:data-pilot-member table:name="2026-03-15 21:59:50" table:display="true" table:show-details="true"/>
                <table:data-pilot-member table:name="2026-03-15 22:01:07" table:display="true" table:show-details="true"/>
                <table:data-pilot-member table:name="2026-03-15 22:04:44" table:display="true" table:show-details="true"/>
                <table:data-pilot-member table:name="2026-03-15 22:06:52" table:display="true" table:show-details="true"/>
                <table:data-pilot-member table:name="2026-03-15 22:07:01" table:display="true" table:show-details="true"/>
                <table:data-pilot-member table:name="2026-03-15 22:08:59" table:display="true" table:show-details="true"/>
                <table:data-pilot-member table:name="2026-03-15 22:17:21" table:display="true" table:show-details="true"/>
                <table:data-pilot-member table:name="2026-03-15 22:17:31" table:display="true" table:show-details="true"/>
                <table:data-pilot-member table:name="2026-03-15 22:17:59" table:display="true" table:show-details="true"/>
                <table:data-pilot-member table:name="2026-03-15 22:19:45" table:display="true" table:show-details="true"/>
                <table:data-pilot-member table:name="2026-03-15 22:22:48" table:display="true" table:show-details="true"/>
                <table:data-pilot-member table:name="2026-03-15 22:23:09" table:display="true" table:show-details="true"/>
                <table:data-pilot-member table:name="2026-03-15 22:23:16" table:display="true" table:show-details="true"/>
                <table:data-pilot-member table:name="2026-03-15 22:23:32" table:display="true" table:show-details="true"/>
                <table:data-pilot-member table:name="2026-03-15 22:24:26" table:display="true" table:show-details="true"/>
                <table:data-pilot-member table:name="2026-03-15 22:25:12" table:display="true" table:show-details="true"/>
                <table:data-pilot-member table:name="2026-03-15 22:27:33" table:display="true" table:show-details="true"/>
                <table:data-pilot-member table:name="2026-03-15 22:28:33" table:display="true" table:show-details="true"/>
                <table:data-pilot-member table:name="2026-03-15 22:29:18" table:display="true" table:show-details="true"/>
                <table:data-pilot-member table:name="2026-03-15 22:29:34" table:display="true" table:show-details="true"/>
                <table:data-pilot-member table:name="2026-03-15 22:35:41" table:display="true" table:show-details="true"/>
                <table:data-pilot-member table:name="2026-03-15 22:39:57" table:display="true" table:show-details="true"/>
                <table:data-pilot-member table:name="2026-03-15 22:41:28" table:display="true" table:show-details="true"/>
                <table:data-pilot-member table:name="2026-03-15 22:44:02" table:display="true" table:show-details="true"/>
                <table:data-pilot-member table:name="2026-03-15 22:44:09" table:display="true" table:show-details="true"/>
                <table:data-pilot-member table:name="2026-03-15 22:45:43" table:display="true" table:show-details="true"/>
                <table:data-pilot-member table:name="2026-03-15 22:46:29" table:display="true" table:show-details="true"/>
                <table:data-pilot-member table:name="2026-03-15 22:46:56" table:display="true" table:show-details="true"/>
                <table:data-pilot-member table:name="2026-03-15 22:53:03" table:display="true" table:show-details="true"/>
                <table:data-pilot-member table:name="2026-03-15 22:56:00" table:display="true" table:show-details="true"/>
                <table:data-pilot-member table:name="2026-03-15 23:01:48" table:display="true" table:show-details="true"/>
                <table:data-pilot-member table:name="2026-03-15 23:02:22" table:display="true" table:show-details="true"/>
                <table:data-pilot-member table:name="2026-03-15 23:03:22" table:display="true" table:show-details="true"/>
                <table:data-pilot-member table:name="2026-03-15 23:07:58" table:display="true" table:show-details="true"/>
                <table:data-pilot-member table:name="2026-03-15 23:10:37" table:display="true" table:show-details="true"/>
                <table:data-pilot-member table:name="2026-03-15 23:12:42" table:display="true" table:show-details="true"/>
                <table:data-pilot-member table:name="2026-03-15 23:17:51" table:display="true" table:show-details="true"/>
                <table:data-pilot-member table:name="2026-03-15 23:19:11" table:display="true" table:show-details="true"/>
                <table:data-pilot-member table:name="2026-03-15 23:21:26" table:display="true" table:show-details="true"/>
                <table:data-pilot-member table:name="2026-03-15 23:23:09" table:display="true" table:show-details="true"/>
                <table:data-pilot-member table:name="2026-03-15 23:23:16" table:display="true" table:show-details="true"/>
                <table:data-pilot-member table:name="2026-03-15 23:28:21" table:display="true" table:show-details="true"/>
                <table:data-pilot-member table:name="2026-03-15 23:30:14" table:display="true" table:show-details="true"/>
                <table:data-pilot-member table:name="2026-03-15 23:31:17" table:display="true" table:show-details="true"/>
                <table:data-pilot-member table:name="2026-03-15 23:33:10" table:display="true" table:show-details="true"/>
                <table:data-pilot-member table:name="2026-03-15 23:34:59" table:display="true" table:show-details="true"/>
                <table:data-pilot-member table:name="2026-03-15 23:36:17" table:display="true" table:show-details="true"/>
                <table:data-pilot-member table:name="2026-03-15 23:37:00" table:display="true" table:show-details="true"/>
                <table:data-pilot-member table:name="2026-03-15 23:37:28" table:display="true" table:show-details="true"/>
                <table:data-pilot-member table:name="2026-03-15 23:42:50" table:display="true" table:show-details="true"/>
                <table:data-pilot-member table:name="2026-03-15 23:43:15" table:display="true" table:show-details="true"/>
                <table:data-pilot-member table:name="2026-03-15 23:43:41" table:display="true" table:show-details="true"/>
                <table:data-pilot-member table:name="2026-03-15 23:44:14" table:display="true" table:show-details="true"/>
                <table:data-pilot-member table:name="2026-03-15 23:51:34" table:display="true" table:show-details="true"/>
                <table:data-pilot-member table:name="2026-03-15 23:52:53" table:display="true" table:show-details="true"/>
                <table:data-pilot-member table:name="2026-03-16 00:18:52" table:display="true" table:show-details="true"/>
                <table:data-pilot-member table:name="2026-03-16 00:20:07" table:display="true" table:show-details="true"/>
                <table:data-pilot-member table:name="2026-03-16 00:22:28" table:display="true" table:show-details="true"/>
                <table:data-pilot-member table:name="2026-03-16 00:40:23" table:display="true" table:show-details="true"/>
                <table:data-pilot-member table:name="2026-03-16 00:46:28" table:display="true" table:show-details="true"/>
                <table:data-pilot-member table:name="2026-03-16 00:46:34" table:display="true" table:show-details="true"/>
                <table:data-pilot-member table:name="2026-03-16 00:48:59" table:display="true" table:show-details="true"/>
                <table:data-pilot-member table:name="2026-03-16 00:53:27" table:display="true" table:show-details="true"/>
                <table:data-pilot-member table:name="2026-03-16 01:12:05" table:display="true" table:show-details="true"/>
                <table:data-pilot-member table:name="2026-03-16 02:07:32" table:display="true" table:show-details="true"/>
                <table:data-pilot-member table:name="2026-03-16 02:08:32" table:display="true" table:show-details="true"/>
                <table:data-pilot-member table:name="2026-03-16 02:09:44" table:display="true" table:show-details="true"/>
                <table:data-pilot-member table:name="2026-03-16 02:28:00" table:display="true" table:show-details="true"/>
                <table:data-pilot-member table:name="2026-03-16 02:32:56" table:display="true" table:show-details="true"/>
                <table:data-pilot-member table:name="2026-03-16 03:07:00" table:display="true" table:show-details="true"/>
                <table:data-pilot-member table:name="2026-03-16 03:07:28" table:display="true" table:show-details="true"/>
                <table:data-pilot-member table:name="2026-03-16 03:08:24" table:display="true" table:show-details="true"/>
                <table:data-pilot-member table:name="2026-03-16 03:13:36" table:display="true" table:show-details="true"/>
                <table:data-pilot-member table:name="2026-03-16 03:53:13" table:display="true" table:show-details="true"/>
                <table:data-pilot-member table:name="2026-03-16 04:44:30" table:display="true" table:show-details="true"/>
                <table:data-pilot-member table:name="2026-03-16 04:45:14" table:display="true" table:show-details="true"/>
                <table:data-pilot-member table:name="2026-03-16 04:50:39" table:display="true" table:show-details="true"/>
                <table:data-pilot-member table:name="2026-03-16 05:10:19" table:display="true" table:show-details="true"/>
                <table:data-pilot-member table:name="2026-03-16 05:12:15" table:display="true" table:show-details="true"/>
                <table:data-pilot-member table:name="2026-03-16 05:13:00" table:display="true" table:show-details="true"/>
                <table:data-pilot-member table:name="2026-03-16 05:13:41" table:display="true" table:show-details="true"/>
                <table:data-pilot-member table:name="2026-03-16 05:16:17" table:display="true" table:show-details="true"/>
                <table:data-pilot-member table:name="2026-03-16 05:16:31" table:display="true" table:show-details="true"/>
                <table:data-pilot-member table:name="2026-03-16 05:18:05" table:display="true" table:show-details="true"/>
                <table:data-pilot-member table:name="2026-03-16 05:22:31" table:display="true" table:show-details="true"/>
                <table:data-pilot-member table:name="2026-03-16 05:32:46" table:display="true" table:show-details="true"/>
                <table:data-pilot-member table:name="2026-03-16 05:41:48" table:display="true" table:show-details="true"/>
                <table:data-pilot-member table:name="2026-03-16 05:48:02" table:display="true" table:show-details="true"/>
                <table:data-pilot-member table:name="2026-03-16 05:49:58" table:display="true" table:show-details="true"/>
                <table:data-pilot-member table:name="2026-03-16 05:52:14" table:display="true" table:show-details="true"/>
                <table:data-pilot-member table:name="2026-03-16 05:55:12" table:display="true" table:show-details="true"/>
                <table:data-pilot-member table:name="2026-03-16 05:57:35" table:display="true" table:show-details="true"/>
                <table:data-pilot-member table:name="2026-03-16 05:58:11" table:display="true" table:show-details="true"/>
                <table:data-pilot-member table:name="2026-03-16 06:03:51" table:display="true" table:show-details="true"/>
                <table:data-pilot-member table:name="2026-03-16 06:08:08" table:display="true" table:show-details="true"/>
                <table:data-pilot-member table:name="2026-03-16 06:09:32" table:display="true" table:show-details="true"/>
                <table:data-pilot-member table:name="2026-03-16 06:09:45" table:display="true" table:show-details="true"/>
                <table:data-pilot-member table:name="2026-03-16 06:20:09" table:display="true" table:show-details="true"/>
                <table:data-pilot-member table:name="2026-03-16 06:23:38" table:display="true" table:show-details="true"/>
                <table:data-pilot-member table:name="2026-03-16 06:25:48" table:display="true" table:show-details="true"/>
                <table:data-pilot-member table:name="2026-03-16 06:42:08" table:display="true" table:show-details="true"/>
                <table:data-pilot-member table:name="2026-03-16 06:48:03" table:display="true" table:show-details="true"/>
                <table:data-pilot-member table:name="2026-03-16 06:49:01" table:display="true" table:show-details="true"/>
                <table:data-pilot-member table:name="2026-03-16 06:50:11" table:display="true" table:show-details="true"/>
                <table:data-pilot-member table:name="2026-03-16 06:51:14" table:display="true" table:show-details="true"/>
                <table:data-pilot-member table:name="2026-03-16 06:51:38" table:display="true" table:show-details="true"/>
                <table:data-pilot-member table:name="2026-03-16 06:54:15" table:display="true" table:show-details="true"/>
                <table:data-pilot-member table:name="2026-03-16 06:59:56" table:display="true" table:show-details="true"/>
                <table:data-pilot-member table:name="2026-03-16 07:00:01" table:display="true" table:show-details="true"/>
                <table:data-pilot-member table:name="2026-03-16 07:00:09" table:display="true" table:show-details="true"/>
                <table:data-pilot-member table:name="2026-03-16 07:01:27" table:display="true" table:show-details="true"/>
                <table:data-pilot-member table:name="2026-03-16 07:02:25" table:display="true" table:show-details="true"/>
                <table:data-pilot-member table:name="2026-03-16 07:03:37" table:display="true" table:show-details="true"/>
                <table:data-pilot-member table:name="2026-03-16 07:10:07" table:display="true" table:show-details="true"/>
                <table:data-pilot-member table:name="2026-03-16 07:13:00" table:display="true" table:show-details="true"/>
                <table:data-pilot-member table:name="2026-03-16 07:13:56" table:display="true" table:show-details="true"/>
                <table:data-pilot-member table:name="2026-03-16 07:14:20" table:display="true" table:show-details="true"/>
                <table:data-pilot-member table:name="2026-03-16 07:15:41" table:display="true" table:show-details="true"/>
                <table:data-pilot-member table:name="2026-03-16 07:19:26" table:display="true" table:show-details="true"/>
                <table:data-pilot-member table:name="2026-03-16 07:20:07" table:display="true" table:show-details="true"/>
                <table:data-pilot-member table:name="2026-03-16 07:20:58" table:display="true" table:show-details="true"/>
                <table:data-pilot-member table:name="2026-03-16 07:23:22" table:display="true" table:show-details="true"/>
                <table:data-pilot-member table:name="2026-03-16 07:23:46" table:display="true" table:show-details="true"/>
                <table:data-pilot-member table:name="2026-03-16 07:26:02" table:display="true" table:show-details="true"/>
                <table:data-pilot-member table:name="2026-03-16 07:26:52" table:display="true" table:show-details="true"/>
                <table:data-pilot-member table:name="2026-03-16 07:27:15" table:display="true" table:show-details="true"/>
                <table:data-pilot-member table:name="2026-03-16 07:34:24" table:display="true" table:show-details="true"/>
                <table:data-pilot-member table:name="2026-03-16 07:36:02" table:display="true" table:show-details="true"/>
                <table:data-pilot-member table:name="2026-03-16 07:43:15" table:display="true" table:show-details="true"/>
                <table:data-pilot-member table:name="2026-03-16 07:43:19" table:display="true" table:show-details="true"/>
                <table:data-pilot-member table:name="2026-03-16 07:44:32" table:display="true" table:show-details="true"/>
                <table:data-pilot-member table:name="2026-03-16 07:45:46" table:display="true" table:show-details="true"/>
                <table:data-pilot-member table:name="2026-03-16 07:50:52" table:display="true" table:show-details="true"/>
                <table:data-pilot-member table:name="2026-03-16 07:51:58" table:display="true" table:show-details="true"/>
                <table:data-pilot-member table:name="2026-03-16 07:56:54" table:display="true" table:show-details="true"/>
                <table:data-pilot-member table:name="2026-03-16 07:58:24" table:display="true" table:show-details="true"/>
                <table:data-pilot-member table:name="2026-03-16 07:59:56" table:display="true" table:show-details="true"/>
                <table:data-pilot-member table:name="2026-03-16 08:05:46" table:display="true" table:show-details="true"/>
                <table:data-pilot-member table:name="2026-03-16 08:13:56" table:display="true" table:show-details="true"/>
                <table:data-pilot-member table:name="2026-03-16 08:15:37" table:display="true" table:show-details="true"/>
                <table:data-pilot-member table:name="2026-03-16 08:15:58" table:display="true" table:show-details="true"/>
                <table:data-pilot-member table:name="2026-03-16 08:17:44" table:display="true" table:show-details="true"/>
                <table:data-pilot-member table:name="2026-03-16 08:19:07" table:display="true" table:show-details="true"/>
                <table:data-pilot-member table:name="2026-03-16 08:26:06" table:display="true" table:show-details="true"/>
                <table:data-pilot-member table:name="2026-03-16 08:31:36" table:display="true" table:show-details="true"/>
                <table:data-pilot-member table:name="2026-03-16 08:34:30" table:display="true" table:show-details="true"/>
                <table:data-pilot-member table:name="2026-03-16 08:35:35" table:display="true" table:show-details="true"/>
                <table:data-pilot-member table:name="2026-03-16 08:36:47" table:display="true" table:show-details="true"/>
                <table:data-pilot-member table:name="2026-03-16 08:40:14" table:display="true" table:show-details="true"/>
                <table:data-pilot-member table:name="2026-03-16 08:41:03" table:display="true" table:show-details="true"/>
                <table:data-pilot-member table:name="2026-03-16 08:41:23" table:display="true" table:show-details="true"/>
                <table:data-pilot-member table:name="2026-03-16 08:42:46" table:display="true" table:show-details="true"/>
                <table:data-pilot-member table:name="2026-03-16 08:43:22" table:display="true" table:show-details="true"/>
                <table:data-pilot-member table:name="2026-03-16 08:43:32" table:display="true" table:show-details="true"/>
                <table:data-pilot-member table:name="2026-03-16 08:45:32" table:display="true" table:show-details="true"/>
                <table:data-pilot-member table:name="2026-03-16 08:48:01" table:display="true" table:show-details="true"/>
                <table:data-pilot-member table:name="2026-03-16 08:49:49" table:display="true" table:show-details="true"/>
                <table:data-pilot-member table:name="2026-03-16 08:51:38" table:display="true" table:show-details="true"/>
                <table:data-pilot-member table:name="2026-03-16 09:06:21" table:display="true" table:show-details="true"/>
                <table:data-pilot-member table:name="2026-03-16 09:07:14" table:display="true" table:show-details="true"/>
                <table:data-pilot-member table:name="2026-03-16 09:07:18" table:display="true" table:show-details="true"/>
                <table:data-pilot-member table:name="2026-03-16 09:08:22" table:display="true" table:show-details="true"/>
                <table:data-pilot-member table:name="2026-03-16 09:10:57" table:display="true" table:show-details="true"/>
                <table:data-pilot-member table:name="2026-03-16 09:13:55" table:display="true" table:show-details="true"/>
                <table:data-pilot-member table:name="2026-03-16 09:16:46" table:display="true" table:show-details="true"/>
                <table:data-pilot-member table:name="2026-03-16 09:19:34" table:display="true" table:show-details="true"/>
                <table:data-pilot-member table:name="2026-03-16 09:20:42" table:display="true" table:show-details="true"/>
                <table:data-pilot-member table:name="2026-03-16 09:23:04" table:display="true" table:show-details="true"/>
                <table:data-pilot-member table:name="2026-03-16 09:24:37" table:display="true" table:show-details="true"/>
                <table:data-pilot-member table:name="2026-03-16 09:24:39" table:display="true" table:show-details="true"/>
                <table:data-pilot-member table:name="2026-03-16 09:24:43" table:display="true" table:show-details="true"/>
                <table:data-pilot-member table:name="2026-03-16 09:26:13" table:display="true" table:show-details="true"/>
                <table:data-pilot-member table:name="2026-03-16 09:26:22" table:display="true" table:show-details="true"/>
                <table:data-pilot-member table:name="2026-03-16 09:26:44" table:display="true" table:show-details="true"/>
                <table:data-pilot-member table:name="2026-03-16 09:26:54" table:display="true" table:show-details="true"/>
                <table:data-pilot-member table:name="2026-03-16 09:28:41" table:display="true" table:show-details="true"/>
                <table:data-pilot-member table:name="2026-03-16 09:32:13" table:display="true" table:show-details="true"/>
                <table:data-pilot-member table:name="2026-03-16 09:33:38" table:display="true" table:show-details="true"/>
                <table:data-pilot-member table:name="2026-03-16 09:34:36" table:display="true" table:show-details="true"/>
                <table:data-pilot-member table:name="2026-03-16 09:37:21" table:display="true" table:show-details="true"/>
                <table:data-pilot-member table:name="2026-03-16 09:39:53" table:display="true" table:show-details="true"/>
                <table:data-pilot-member table:name="2026-03-16 09:41:26" table:display="true" table:show-details="true"/>
                <table:data-pilot-member table:name="2026-03-16 09:42:20" table:display="true" table:show-details="true"/>
                <table:data-pilot-member table:name="2026-03-16 09:42:36" table:display="true" table:show-details="true"/>
                <table:data-pilot-member table:name="2026-03-16 09:43:25" table:display="true" table:show-details="true"/>
                <table:data-pilot-member table:name="2026-03-16 09:46:37" table:display="true" table:show-details="true"/>
                <table:data-pilot-member table:name="2026-03-16 09:48:25" table:display="true" table:show-details="true"/>
                <table:data-pilot-member table:name="2026-03-16 09:49:46" table:display="true" table:show-details="true"/>
                <table:data-pilot-member table:name="2026-03-16 09:50:32" table:display="true" table:show-details="true"/>
                <table:data-pilot-member table:name="2026-03-16 09:50:50" table:display="true" table:show-details="true"/>
                <table:data-pilot-member table:name="2026-03-16 09:54:21" table:display="true" table:show-details="true"/>
                <table:data-pilot-member table:name="2026-03-16 09:55:26" table:display="true" table:show-details="true"/>
                <table:data-pilot-member table:name="2026-03-16 09:56:25" table:display="true" table:show-details="true"/>
                <table:data-pilot-member table:name="2026-03-16 10:02:26" table:display="true" table:show-details="true"/>
                <table:data-pilot-member table:name="2026-03-16 10:03:02" table:display="true" table:show-details="true"/>
                <table:data-pilot-member table:name="2026-03-16 10:04:03" table:display="true" table:show-details="true"/>
                <table:data-pilot-member table:name="2026-03-16 10:06:55" table:display="true" table:show-details="true"/>
                <table:data-pilot-member table:name="2026-03-16 10:06:56" table:display="true" table:show-details="true"/>
                <table:data-pilot-member table:name="2026-03-16 10:11:35" table:display="true" table:show-details="true"/>
                <table:data-pilot-member table:name="2026-03-16 10:12:55" table:display="true" table:show-details="true"/>
                <table:data-pilot-member table:name="2026-03-16 10:13:40" table:display="true" table:show-details="true"/>
                <table:data-pilot-member table:name="2026-03-16 10:17:27" table:display="true" table:show-details="true"/>
                <table:data-pilot-member table:name="2026-03-16 10:17:50" table:display="true" table:show-details="true"/>
                <table:data-pilot-member table:name="2026-03-16 10:19:06" table:display="true" table:show-details="true"/>
                <table:data-pilot-member table:name="2026-03-16 10:20:11" table:display="true" table:show-details="true"/>
                <table:data-pilot-member table:name="2026-03-16 10:20:17" table:display="true" table:show-details="true"/>
                <table:data-pilot-member table:name="2026-03-16 10:20:39" table:display="true" table:show-details="true"/>
                <table:data-pilot-member table:name="2026-03-16 10:22:11" table:display="true" table:show-details="true"/>
                <table:data-pilot-member table:name="2026-03-16 10:23:11" table:display="true" table:show-details="true"/>
                <table:data-pilot-member table:name="2026-03-16 10:25:43" table:display="true" table:show-details="true"/>
                <table:data-pilot-member table:name="2026-03-16 10:26:06" table:display="true" table:show-details="true"/>
                <table:data-pilot-member table:name="2026-03-16 10:26:20" table:display="true" table:show-details="true"/>
                <table:data-pilot-member table:name="2026-03-16 10:26:50" table:display="true" table:show-details="true"/>
                <table:data-pilot-member table:name="2026-03-16 10:27:51" table:display="true" table:show-details="true"/>
                <table:data-pilot-member table:name="2026-03-16 10:29:27" table:display="true" table:show-details="true"/>
                <table:data-pilot-member table:name="2026-03-16 10:30:29" table:display="true" table:show-details="true"/>
                <table:data-pilot-member table:name="2026-03-16 10:31:33" table:display="true" table:show-details="true"/>
                <table:data-pilot-member table:name="2026-03-16 10:33:10" table:display="true" table:show-details="true"/>
                <table:data-pilot-member table:name="2026-03-16 10:33:52" table:display="true" table:show-details="true"/>
                <table:data-pilot-member table:name="2026-03-16 10:33:56" table:display="true" table:show-details="true"/>
                <table:data-pilot-member table:name="2026-03-16 10:34:47" table:display="true" table:show-details="true"/>
                <table:data-pilot-member table:name="2026-03-16 10:38:57" table:display="true" table:show-details="true"/>
                <table:data-pilot-member table:name="2026-03-16 10:39:52" table:display="true" table:show-details="true"/>
                <table:data-pilot-member table:name="2026-03-16 10:42:24" table:display="true" table:show-details="true"/>
                <table:data-pilot-member table:name="2026-03-16 10:43:07" table:display="true" table:show-details="true"/>
                <table:data-pilot-member table:name="2026-03-16 10:43:13" table:display="true" table:show-details="true"/>
                <table:data-pilot-member table:name="2026-03-16 10:43:34" table:display="true" table:show-details="true"/>
                <table:data-pilot-member table:name="2026-03-16 10:43:36" table:display="true" table:show-details="true"/>
                <table:data-pilot-member table:name="2026-03-16 10:45:52" table:display="true" table:show-details="true"/>
                <table:data-pilot-member table:name="2026-03-16 10:45:53" table:display="true" table:show-details="true"/>
                <table:data-pilot-member table:name="2026-03-16 10:47:12" table:display="true" table:show-details="true"/>
                <table:data-pilot-member table:name="2026-03-16 10:48:31" table:display="true" table:show-details="true"/>
                <table:data-pilot-member table:name="2026-03-16 10:51:17" table:display="true" table:show-details="true"/>
                <table:data-pilot-member table:name="2026-03-16 10:52:31" table:display="true" table:show-details="true"/>
                <table:data-pilot-member table:name="2026-03-16 10:52:51" table:display="true" table:show-details="true"/>
                <table:data-pilot-member table:name="2026-03-16 10:56:32" table:display="true" table:show-details="true"/>
                <table:data-pilot-member table:name="2026-03-16 10:58:34" table:display="true" table:show-details="true"/>
                <table:data-pilot-member table:name="2026-03-16 10:59:24" table:display="true" table:show-details="true"/>
                <table:data-pilot-member table:name="2026-03-16 10:59:36" table:display="true" table:show-details="true"/>
                <table:data-pilot-member table:name="2026-03-16 11:04:09" table:display="true" table:show-details="true"/>
                <table:data-pilot-member table:name="2026-03-16 11:06:40" table:display="true" table:show-details="true"/>
                <table:data-pilot-member table:name="2026-03-16 11:11:25" table:display="true" table:show-details="true"/>
                <table:data-pilot-member table:name="2026-03-16 11:12:32" table:display="true" table:show-details="true"/>
                <table:data-pilot-member table:name="2026-03-16 11:15:57" table:display="true" table:show-details="true"/>
                <table:data-pilot-member table:name="2026-03-16 11:18:17" table:display="true" table:show-details="true"/>
                <table:data-pilot-member table:name="2026-03-16 11:19:23" table:display="true" table:show-details="true"/>
                <table:data-pilot-member table:name="2026-03-16 11:19:56" table:display="true" table:show-details="true"/>
                <table:data-pilot-member table:name="2026-03-16 11:21:06" table:display="true" table:show-details="true"/>
                <table:data-pilot-member table:name="2026-03-16 11:21:22" table:display="true" table:show-details="true"/>
                <table:data-pilot-member table:name="2026-03-16 11:21:28" table:display="true" table:show-details="true"/>
                <table:data-pilot-member table:name="2026-03-16 11:22:18" table:display="true" table:show-details="true"/>
                <table:data-pilot-member table:name="2026-03-16 11:22:22" table:display="true" table:show-details="true"/>
                <table:data-pilot-member table:name="2026-03-16 11:23:34" table:display="true" table:show-details="true"/>
                <table:data-pilot-member table:name="2026-03-16 11:24:48" table:display="true" table:show-details="true"/>
                <table:data-pilot-member table:name="2026-03-16 11:26:11" table:display="true" table:show-details="true"/>
                <table:data-pilot-member table:name="2026-03-16 11:27:58" table:display="true" table:show-details="true"/>
                <table:data-pilot-member table:name="2026-03-16 11:29:45" table:display="true" table:show-details="true"/>
                <table:data-pilot-member table:name="2026-03-16 11:30:04" table:display="true" table:show-details="true"/>
                <table:data-pilot-member table:name="2026-03-16 11:30:06" table:display="true" table:show-details="true"/>
                <table:data-pilot-member table:name="2026-03-16 11:32:48" table:display="true" table:show-details="true"/>
                <table:data-pilot-member table:name="2026-03-16 11:34:18" table:display="true" table:show-details="true"/>
                <table:data-pilot-member table:name="2026-03-16 11:34:43" table:display="true" table:show-details="true"/>
                <table:data-pilot-member table:name="2026-03-16 11:35:38" table:display="true" table:show-details="true"/>
                <table:data-pilot-member table:name="2026-03-16 11:36:17" table:display="true" table:show-details="true"/>
                <table:data-pilot-member table:name="2026-03-16 11:39:04" table:display="true" table:show-details="true"/>
                <table:data-pilot-member table:name="2026-03-16 11:39:13" table:display="true" table:show-details="true"/>
                <table:data-pilot-member table:name="2026-03-16 11:40:20" table:display="true" table:show-details="true"/>
                <table:data-pilot-member table:name="2026-03-16 11:40:23" table:display="true" table:show-details="true"/>
                <table:data-pilot-member table:name="2026-03-16 11:40:30" table:display="true" table:show-details="true"/>
                <table:data-pilot-member table:name="2026-03-16 11:41:02" table:display="true" table:show-details="true"/>
                <table:data-pilot-member table:name="2026-03-16 11:41:09" table:display="true" table:show-details="true"/>
                <table:data-pilot-member table:name="2026-03-16 11:42:22" table:display="true" table:show-details="true"/>
                <table:data-pilot-member table:name="2026-03-16 11:42:51" table:display="true" table:show-details="true"/>
                <table:data-pilot-member table:name="2026-03-16 11:48:50" table:display="true" table:show-details="true"/>
                <table:data-pilot-member table:name="2026-03-16 11:49:16" table:display="true" table:show-details="true"/>
                <table:data-pilot-member table:name="2026-03-16 11:49:55" table:display="true" table:show-details="true"/>
                <table:data-pilot-member table:name="2026-03-16 11:51:48" table:display="true" table:show-details="true"/>
                <table:data-pilot-member table:name="2026-03-16 11:51:53" table:display="true" table:show-details="true"/>
                <table:data-pilot-member table:name="2026-03-16 11:52:29" table:display="true" table:show-details="true"/>
                <table:data-pilot-member table:name="2026-03-16 11:52:47" table:display="true" table:show-details="true"/>
                <table:data-pilot-member table:name="2026-03-16 11:53:19" table:display="true" table:show-details="true"/>
                <table:data-pilot-member table:name="2026-03-16 11:53:21" table:display="true" table:show-details="true"/>
                <table:data-pilot-member table:name="2026-03-16 11:57:16" table:display="true" table:show-details="true"/>
                <table:data-pilot-member table:name="2026-03-16 11:58:33" table:display="true" table:show-details="true"/>
                <table:data-pilot-member table:name="2026-03-16 12:02:31" table:display="true" table:show-details="true"/>
                <table:data-pilot-member table:name="2026-03-16 12:03:04" table:display="true" table:show-details="true"/>
                <table:data-pilot-member table:name="2026-03-16 12:06:07" table:display="true" table:show-details="true"/>
                <table:data-pilot-member table:name="2026-03-16 12:08:38" table:display="true" table:show-details="true"/>
                <table:data-pilot-member table:name="2026-03-16 12:09:43" table:display="true" table:show-details="true"/>
                <table:data-pilot-member table:name="2026-03-16 12:12:48" table:display="true" table:show-details="true"/>
                <table:data-pilot-member table:name="2026-03-16 12:14:59" table:display="true" table:show-details="true"/>
                <table:data-pilot-member table:name="2026-03-16 12:18:37" table:display="true" table:show-details="true"/>
                <table:data-pilot-member table:name="2026-03-16 12:18:56" table:display="true" table:show-details="true"/>
                <table:data-pilot-member table:name="2026-03-16 12:20:11" table:display="true" table:show-details="true"/>
                <table:data-pilot-member table:name="2026-03-16 12:20:55" table:display="true" table:show-details="true"/>
                <table:data-pilot-member table:name="2026-03-16 12:21:03" table:display="true" table:show-details="true"/>
                <table:data-pilot-member table:name="2026-03-16 12:25:21" table:display="true" table:show-details="true"/>
                <table:data-pilot-member table:name="2026-03-16 12:27:19" table:display="true" table:show-details="true"/>
                <table:data-pilot-member table:name="2026-03-16 12:27:21" table:display="true" table:show-details="true"/>
                <table:data-pilot-member table:name="2026-03-16 12:27:54" table:display="true" table:show-details="true"/>
                <table:data-pilot-member table:name="2026-03-16 12:28:00" table:display="true" table:show-details="true"/>
                <table:data-pilot-member table:name="2026-03-16 12:31:45" table:display="true" table:show-details="true"/>
                <table:data-pilot-member table:name="2026-03-16 12:33:41" table:display="true" table:show-details="true"/>
                <table:data-pilot-member table:name="2026-03-16 12:34:29" table:display="true" table:show-details="true"/>
                <table:data-pilot-member table:name="2026-03-16 12:34:53" table:display="true" table:show-details="true"/>
                <table:data-pilot-member table:name="2026-03-16 12:35:21" table:display="true" table:show-details="true"/>
                <table:data-pilot-member table:name="2026-03-16 12:36:11" table:display="true" table:show-details="true"/>
                <table:data-pilot-member table:name="2026-03-16 12:36:38" table:display="true" table:show-details="true"/>
                <table:data-pilot-member table:name="2026-03-16 12:37:28" table:display="true" table:show-details="true"/>
                <table:data-pilot-member table:name="2026-03-16 12:37:49" table:display="true" table:show-details="true"/>
                <table:data-pilot-member table:name="2026-03-16 12:40:49" table:display="true" table:show-details="true"/>
                <table:data-pilot-member table:name="2026-03-16 12:41:42" table:display="true" table:show-details="true"/>
                <table:data-pilot-member table:name="2026-03-16 12:43:52" table:display="true" table:show-details="true"/>
                <table:data-pilot-member table:name="2026-03-16 12:44:09" table:display="true" table:show-details="true"/>
                <table:data-pilot-member table:name="2026-03-16 12:44:10" table:display="true" table:show-details="true"/>
                <table:data-pilot-member table:name="2026-03-16 12:45:19" table:display="true" table:show-details="true"/>
                <table:data-pilot-member table:name="2026-03-16 12:46:56" table:display="true" table:show-details="true"/>
                <table:data-pilot-member table:name="2026-03-16 12:47:00" table:display="true" table:show-details="true"/>
                <table:data-pilot-member table:name="2026-03-16 12:47:37" table:display="true" table:show-details="true"/>
                <table:data-pilot-member table:name="2026-03-16 12:49:02" table:display="true" table:show-details="true"/>
                <table:data-pilot-member table:name="2026-03-16 12:50:27" table:display="true" table:show-details="true"/>
                <table:data-pilot-member table:name="2026-03-16 12:55:42" table:display="true" table:show-details="true"/>
                <table:data-pilot-member table:name="2026-03-16 12:57:11" table:display="true" table:show-details="true"/>
                <table:data-pilot-member table:name="2026-03-16 12:59:28" table:display="true" table:show-details="true"/>
                <table:data-pilot-member table:name="2026-03-16 13:01:08" table:display="true" table:show-details="true"/>
                <table:data-pilot-member table:name="2026-03-16 13:01:46" table:display="true" table:show-details="true"/>
                <table:data-pilot-member table:name="2026-03-16 13:03:58" table:display="true" table:show-details="true"/>
                <table:data-pilot-member table:name="2026-03-16 13:04:23" table:display="true" table:show-details="true"/>
                <table:data-pilot-member table:name="2026-03-16 13:04:35" table:display="true" table:show-details="true"/>
                <table:data-pilot-member table:name="2026-03-16 13:04:38" table:display="true" table:show-details="true"/>
                <table:data-pilot-member table:name="2026-03-16 13:06:09" table:display="true" table:show-details="true"/>
                <table:data-pilot-member table:name="2026-03-16 13:08:07" table:display="true" table:show-details="true"/>
                <table:data-pilot-member table:name="2026-03-16 13:08:46" table:display="true" table:show-details="true"/>
                <table:data-pilot-member table:name="2026-03-16 13:10:25" table:display="true" table:show-details="true"/>
                <table:data-pilot-member table:name="2026-03-16 13:10:41" table:display="true" table:show-details="true"/>
                <table:data-pilot-member table:name="2026-03-16 13:11:08" table:display="true" table:show-details="true"/>
                <table:data-pilot-member table:name="2026-03-16 13:11:21" table:display="true" table:show-details="true"/>
                <table:data-pilot-member table:name="2026-03-16 13:11:23" table:display="true" table:show-details="true"/>
                <table:data-pilot-member table:name="2026-03-16 13:14:45" table:display="true" table:show-details="true"/>
                <table:data-pilot-member table:name="2026-03-16 13:16:40" table:display="true" table:show-details="true"/>
                <table:data-pilot-member table:name="2026-03-16 13:17:35" table:display="true" table:show-details="true"/>
                <table:data-pilot-member table:name="2026-03-16 13:17:51" table:display="true" table:show-details="true"/>
                <table:data-pilot-member table:name="2026-03-16 13:19:22" table:display="true" table:show-details="true"/>
                <table:data-pilot-member table:name="2026-03-16 13:25:24" table:display="true" table:show-details="true"/>
                <table:data-pilot-member table:name="2026-03-16 13:26:42" table:display="true" table:show-details="true"/>
                <table:data-pilot-member table:name="2026-03-16 13:27:07" table:display="true" table:show-details="true"/>
                <table:data-pilot-member table:name="2026-03-16 13:27:33" table:display="true" table:show-details="true"/>
                <table:data-pilot-member table:name="2026-03-16 13:29:20" table:display="true" table:show-details="true"/>
                <table:data-pilot-member table:name="2026-03-16 13:32:08" table:display="true" table:show-details="true"/>
                <table:data-pilot-member table:name="2026-03-16 13:33:46" table:display="true" table:show-details="true"/>
                <table:data-pilot-member table:name="2026-03-16 13:34:12" table:display="true" table:show-details="true"/>
                <table:data-pilot-member table:name="2026-03-16 13:35:07" table:display="true" table:show-details="true"/>
                <table:data-pilot-member table:name="2026-03-16 13:36:52" table:display="true" table:show-details="true"/>
                <table:data-pilot-member table:name="2026-03-16 13:39:07" table:display="true" table:show-details="true"/>
                <table:data-pilot-member table:name="2026-03-16 13:39:30" table:display="true" table:show-details="true"/>
                <table:data-pilot-member table:name="2026-03-16 13:42:05" table:display="true" table:show-details="true"/>
                <table:data-pilot-member table:name="2026-03-16 13:42:43" table:display="true" table:show-details="true"/>
                <table:data-pilot-member table:name="2026-03-16 13:44:52" table:display="true" table:show-details="true"/>
                <table:data-pilot-member table:name="2026-03-16 13:45:37" table:display="true" table:show-details="true"/>
                <table:data-pilot-member table:name="2026-03-16 13:45:57" table:display="true" table:show-details="true"/>
                <table:data-pilot-member table:name="2026-03-16 13:47:30" table:display="true" table:show-details="true"/>
                <table:data-pilot-member table:name="2026-03-16 13:48:30" table:display="true" table:show-details="true"/>
                <table:data-pilot-member table:name="2026-03-16 13:49:32" table:display="true" table:show-details="true"/>
                <table:data-pilot-member table:name="2026-03-16 13:50:15" table:display="true" table:show-details="true"/>
                <table:data-pilot-member table:name="2026-03-16 13:52:44" table:display="true" table:show-details="true"/>
                <table:data-pilot-member table:name="2026-03-16 13:53:25" table:display="true" table:show-details="true"/>
                <table:data-pilot-member table:name="2026-03-16 13:55:06" table:display="true" table:show-details="true"/>
                <table:data-pilot-member table:name="2026-03-16 13:55:48" table:display="true" table:show-details="true"/>
                <table:data-pilot-member table:name="2026-03-16 13:56:23" table:display="true" table:show-details="true"/>
                <table:data-pilot-member table:name="2026-03-16 13:57:30" table:display="true" table:show-details="true"/>
                <table:data-pilot-member table:name="2026-03-16 13:58:04" table:display="true" table:show-details="true"/>
                <table:data-pilot-member table:name="2026-03-16 13:58:08" table:display="true" table:show-details="true"/>
                <table:data-pilot-member table:name="2026-03-16 13:58:51" table:display="true" table:show-details="true"/>
                <table:data-pilot-member table:name="2026-03-16 13:59:17" table:display="true" table:show-details="true"/>
                <table:data-pilot-member table:name="2026-03-16 14:03:30" table:display="true" table:show-details="true"/>
                <table:data-pilot-member table:name="2026-03-16 14:07:05" table:display="true" table:show-details="true"/>
                <table:data-pilot-member table:name="2026-03-16 14:15:35" table:display="true" table:show-details="true"/>
                <table:data-pilot-member table:name="2026-03-16 14:15:58" table:display="true" table:show-details="true"/>
                <table:data-pilot-member table:name="2026-03-16 14:18:00" table:display="true" table:show-details="true"/>
                <table:data-pilot-member table:name="2026-03-16 14:18:59" table:display="true" table:show-details="true"/>
                <table:data-pilot-member table:name="2026-03-16 14:21:15" table:display="true" table:show-details="true"/>
                <table:data-pilot-member table:name="2026-03-16 14:22:30" table:display="true" table:show-details="true"/>
                <table:data-pilot-member table:name="2026-03-16 14:23:11" table:display="true" table:show-details="true"/>
                <table:data-pilot-member table:name="2026-03-16 14:24:38" table:display="true" table:show-details="true"/>
                <table:data-pilot-member table:name="2026-03-16 14:27:15" table:display="true" table:show-details="true"/>
                <table:data-pilot-member table:name="2026-03-16 14:28:00" table:display="true" table:show-details="true"/>
                <table:data-pilot-member table:name="2026-03-16 14:29:13" table:display="true" table:show-details="true"/>
                <table:data-pilot-member table:name="2026-03-16 14:29:49" table:display="true" table:show-details="true"/>
                <table:data-pilot-member table:name="2026-03-16 14:34:59" table:display="true" table:show-details="true"/>
                <table:data-pilot-member table:name="2026-03-16 14:35:15" table:display="true" table:show-details="true"/>
                <table:data-pilot-member table:name="2026-03-16 14:36:09" table:display="true" table:show-details="true"/>
                <table:data-pilot-member table:name="2026-03-16 14:36:38" table:display="true" table:show-details="true"/>
                <table:data-pilot-member table:name="2026-03-16 14:39:07" table:display="true" table:show-details="true"/>
                <table:data-pilot-member table:name="2026-03-16 14:41:15" table:display="true" table:show-details="true"/>
                <table:data-pilot-member table:name="2026-03-16 14:43:14" table:display="true" table:show-details="true"/>
                <table:data-pilot-member table:name="2026-03-16 14:43:22" table:display="true" table:show-details="true"/>
                <table:data-pilot-member table:name="2026-03-16 14:44:24" table:display="true" table:show-details="true"/>
                <table:data-pilot-member table:name="2026-03-16 14:46:42" table:display="true" table:show-details="true"/>
                <table:data-pilot-member table:name="2026-03-16 14:48:05" table:display="true" table:show-details="true"/>
                <table:data-pilot-member table:name="2026-03-16 14:56:45" table:display="true" table:show-details="true"/>
                <table:data-pilot-member table:name="2026-03-16 14:58:44" table:display="true" table:show-details="true"/>
                <table:data-pilot-member table:name="2026-03-16 14:58:45" table:display="true" table:show-details="true"/>
                <table:data-pilot-member table:name="2026-03-16 15:01:10" table:display="true" table:show-details="true"/>
                <table:data-pilot-member table:name="2026-03-16 15:01:20" table:display="true" table:show-details="true"/>
                <table:data-pilot-member table:name="2026-03-16 15:02:04" table:display="true" table:show-details="true"/>
                <table:data-pilot-member table:name="2026-03-16 15:02:07" table:display="true" table:show-details="true"/>
                <table:data-pilot-member table:name="2026-03-16 15:02:52" table:display="true" table:show-details="true"/>
                <table:data-pilot-member table:name="2026-03-16 15:03:19" table:display="true" table:show-details="true"/>
                <table:data-pilot-member table:name="2026-03-16 15:08:26" table:display="true" table:show-details="true"/>
                <table:data-pilot-member table:name="2026-03-16 15:09:12" table:display="true" table:show-details="true"/>
                <table:data-pilot-member table:name="2026-03-16 15:11:39" table:display="true" table:show-details="true"/>
                <table:data-pilot-member table:name="2026-03-16 15:12:57" table:display="true" table:show-details="true"/>
                <table:data-pilot-member table:name="2026-03-16 15:13:58" table:display="true" table:show-details="true"/>
                <table:data-pilot-member table:name="2026-03-16 15:14:28" table:display="true" table:show-details="true"/>
                <table:data-pilot-member table:name="2026-03-16 15:14:35" table:display="true" table:show-details="true"/>
                <table:data-pilot-member table:name="2026-03-16 15:16:16" table:display="true" table:show-details="true"/>
                <table:data-pilot-member table:name="2026-03-16 15:18:37" table:display="true" table:show-details="true"/>
                <table:data-pilot-member table:name="2026-03-16 15:21:13" table:display="true" table:show-details="true"/>
                <table:data-pilot-member table:name="2026-03-16 15:21:23" table:display="true" table:show-details="true"/>
                <table:data-pilot-member table:name="2026-03-16 15:21:25" table:display="true" table:show-details="true"/>
                <table:data-pilot-member table:name="2026-03-16 15:21:35" table:display="true" table:show-details="true"/>
                <table:data-pilot-member table:name="2026-03-16 15:23:22" table:display="true" table:show-details="true"/>
                <table:data-pilot-member table:name="2026-03-16 15:29:26" table:display="true" table:show-details="true"/>
                <table:data-pilot-member table:name="2026-03-16 15:30:29" table:display="true" table:show-details="true"/>
                <table:data-pilot-member table:name="2026-03-16 15:31:42" table:display="true" table:show-details="true"/>
                <table:data-pilot-member table:name="2026-03-16 15:32:08" table:display="true" table:show-details="true"/>
                <table:data-pilot-member table:name="2026-03-16 15:35:41" table:display="true" table:show-details="true"/>
                <table:data-pilot-member table:name="2026-03-16 15:40:05" table:display="true" table:show-details="true"/>
                <table:data-pilot-member table:name="2026-03-16 15:41:56" table:display="true" table:show-details="true"/>
                <table:data-pilot-member table:name="2026-03-16 15:42:38" table:display="true" table:show-details="true"/>
                <table:data-pilot-member table:name="2026-03-16 15:44:01" table:display="true" table:show-details="true"/>
                <table:data-pilot-member table:name="2026-03-16 15:51:04" table:display="true" table:show-details="true"/>
                <table:data-pilot-member table:name="2026-03-16 15:52:22" table:display="true" table:show-details="true"/>
                <table:data-pilot-member table:name="2026-03-16 15:55:08" table:display="true" table:show-details="true"/>
                <table:data-pilot-member table:name="2026-03-16 16:03:59" table:display="true" table:show-details="true"/>
                <table:data-pilot-member table:name="2026-03-16 16:04:38" table:display="true" table:show-details="true"/>
                <table:data-pilot-member table:name="2026-03-16 16:14:45" table:display="true" table:show-details="true"/>
                <table:data-pilot-member table:name="2026-03-16 16:14:47" table:display="true" table:show-details="true"/>
                <table:data-pilot-member table:name="2026-03-16 16:17:54" table:display="true" table:show-details="true"/>
                <table:data-pilot-member table:name="2026-03-16 16:22:15" table:display="true" table:show-details="true"/>
                <table:data-pilot-member table:name="2026-03-16 16:23:30" table:display="true" table:show-details="true"/>
                <table:data-pilot-member table:name="2026-03-16 16:29:36" table:display="true" table:show-details="true"/>
                <table:data-pilot-member table:name="2026-03-16 16:30:41" table:display="true" table:show-details="true"/>
                <table:data-pilot-member table:name="2026-03-16 16:31:41" table:display="true" table:show-details="true"/>
                <table:data-pilot-member table:name="2026-03-16 16:32:36" table:display="true" table:show-details="true"/>
                <table:data-pilot-member table:name="2026-03-16 16:33:59" table:display="true" table:show-details="true"/>
                <table:data-pilot-member table:name="2026-03-16 16:38:04" table:display="true" table:show-details="true"/>
                <table:data-pilot-member table:name="2026-03-16 16:40:19" table:display="true" table:show-details="true"/>
                <table:data-pilot-member table:name="2026-03-16 16:40:23" table:display="true" table:show-details="true"/>
                <table:data-pilot-member table:name="2026-03-16 16:41:27" table:display="true" table:show-details="true"/>
                <table:data-pilot-member table:name="2026-03-16 16:45:56" table:display="true" table:show-details="true"/>
                <table:data-pilot-member table:name="2026-03-16 16:47:10" table:display="true" table:show-details="true"/>
                <table:data-pilot-member table:name="2026-03-16 16:47:56" table:display="true" table:show-details="true"/>
                <table:data-pilot-member table:name="2026-03-16 16:48:06" table:display="true" table:show-details="true"/>
                <table:data-pilot-member table:name="2026-03-16 16:52:45" table:display="true" table:show-details="true"/>
                <table:data-pilot-member table:name="2026-03-16 16:53:45" table:display="true" table:show-details="true"/>
                <table:data-pilot-member table:name="2026-03-16 16:54:53" table:display="true" table:show-details="true"/>
                <table:data-pilot-member table:name="2026-03-16 17:00:11" table:display="true" table:show-details="true"/>
                <table:data-pilot-member table:name="2026-03-16 17:00:33" table:display="true" table:show-details="true"/>
                <table:data-pilot-member table:name="2026-03-16 17:00:59" table:display="true" table:show-details="true"/>
                <table:data-pilot-member table:name="2026-03-16 17:02:35" table:display="true" table:show-details="true"/>
                <table:data-pilot-member table:name="2026-03-16 17:09:27" table:display="true" table:show-details="true"/>
                <table:data-pilot-member table:name="2026-03-16 17:12:28" table:display="true" table:show-details="true"/>
                <table:data-pilot-member table:name="2026-03-16 17:14:55" table:display="true" table:show-details="true"/>
                <table:data-pilot-member table:name="2026-03-16 17:16:54" table:display="true" table:show-details="true"/>
                <table:data-pilot-member table:name="2026-03-16 17:18:38" table:display="true" table:show-details="true"/>
                <table:data-pilot-member table:name="2026-03-16 17:19:16" table:display="true" table:show-details="true"/>
                <table:data-pilot-member table:name="2026-03-16 17:20:24" table:display="true" table:show-details="true"/>
                <table:data-pilot-member table:name="2026-03-16 17:21:09" table:display="true" table:show-details="true"/>
                <table:data-pilot-member table:name="2026-03-16 17:22:09" table:display="true" table:show-details="true"/>
                <table:data-pilot-member table:name="2026-03-16 17:25:19" table:display="true" table:show-details="true"/>
                <table:data-pilot-member table:name="2026-03-16 17:28:35" table:display="true" table:show-details="true"/>
                <table:data-pilot-member table:name="2026-03-16 17:31:36" table:display="true" table:show-details="true"/>
                <table:data-pilot-member table:name="2026-03-16 17:36:11" table:display="true" table:show-details="true"/>
                <table:data-pilot-member table:name="2026-03-16 17:36:51" table:display="true" table:show-details="true"/>
                <table:data-pilot-member table:name="2026-03-16 17:37:45" table:display="true" table:show-details="true"/>
                <table:data-pilot-member table:name="2026-03-16 17:44:02" table:display="true" table:show-details="true"/>
                <table:data-pilot-member table:name="2026-03-16 17:44:03" table:display="true" table:show-details="true"/>
                <table:data-pilot-member table:name="2026-03-16 17:46:20" table:display="true" table:show-details="true"/>
                <table:data-pilot-member table:name="2026-03-16 17:50:49" table:display="true" table:show-details="true"/>
                <table:data-pilot-member table:name="2026-03-16 17:50:51" table:display="true" table:show-details="true"/>
                <table:data-pilot-member table:name="2026-03-16 17:51:25" table:display="true" table:show-details="true"/>
                <table:data-pilot-member table:name="2026-03-16 17:54:27" table:display="true" table:show-details="true"/>
                <table:data-pilot-member table:name="2026-03-16 17:57:07" table:display="true" table:show-details="true"/>
                <table:data-pilot-member table:name="2026-03-16 18:00:21" table:display="true" table:show-details="true"/>
                <table:data-pilot-member table:name="2026-03-16 18:00:32" table:display="true" table:show-details="true"/>
                <table:data-pilot-member table:name="2026-03-16 18:05:09" table:display="true" table:show-details="true"/>
                <table:data-pilot-member table:name="2026-03-16 18:09:12" table:display="true" table:show-details="true"/>
                <table:data-pilot-member table:name="2026-03-16 18:10:13" table:display="true" table:show-details="true"/>
                <table:data-pilot-member table:name="2026-03-16 18:11:12" table:display="true" table:show-details="true"/>
                <table:data-pilot-member table:name="2026-03-16 18:12:48" table:display="true" table:show-details="true"/>
                <table:data-pilot-member table:name="2026-03-16 18:12:49" table:display="true" table:show-details="true"/>
                <table:data-pilot-member table:name="2026-03-16 18:13:06" table:display="true" table:show-details="true"/>
                <table:data-pilot-member table:name="2026-03-16 18:13:32" table:display="true" table:show-details="true"/>
                <table:data-pilot-member table:name="2026-03-16 18:14:31" table:display="true" table:show-details="true"/>
                <table:data-pilot-member table:name="2026-03-16 18:15:13" table:display="true" table:show-details="true"/>
                <table:data-pilot-member table:name="2026-03-16 18:15:33" table:display="true" table:show-details="true"/>
                <table:data-pilot-member table:name="2026-03-16 18:16:28" table:display="true" table:show-details="true"/>
                <table:data-pilot-member table:name="2026-03-16 18:22:59" table:display="true" table:show-details="true"/>
                <table:data-pilot-member table:name="2026-03-16 18:23:04" table:display="true" table:show-details="true"/>
                <table:data-pilot-member table:name="2026-03-16 18:23:43" table:display="true" table:show-details="true"/>
                <table:data-pilot-member table:name="2026-03-16 18:24:41" table:display="true" table:show-details="true"/>
                <table:data-pilot-member table:name="2026-03-16 18:24:51" table:display="true" table:show-details="true"/>
                <table:data-pilot-member table:name="2026-03-16 18:25:23" table:display="true" table:show-details="true"/>
                <table:data-pilot-member table:name="2026-03-16 18:27:17" table:display="true" table:show-details="true"/>
                <table:data-pilot-member table:name="2026-03-16 18:28:01" table:display="true" table:show-details="true"/>
                <table:data-pilot-member table:name="2026-03-16 18:28:32" table:display="true" table:show-details="true"/>
                <table:data-pilot-member table:name="2026-03-16 18:30:54" table:display="true" table:show-details="true"/>
                <table:data-pilot-member table:name="2026-03-16 18:32:53" table:display="true" table:show-details="true"/>
                <table:data-pilot-member table:name="2026-03-16 18:34:38" table:display="true" table:show-details="true"/>
                <table:data-pilot-member table:name="2026-03-16 18:36:08" table:display="true" table:show-details="true"/>
                <table:data-pilot-member table:name="2026-03-16 18:37:38" table:display="true" table:show-details="true"/>
                <table:data-pilot-member table:name="2026-03-16 18:38:46" table:display="true" table:show-details="true"/>
                <table:data-pilot-member table:name="2026-03-16 18:40:55" table:display="true" table:show-details="true"/>
                <table:data-pilot-member table:name="2026-03-16 18:44:34" table:display="true" table:show-details="true"/>
                <table:data-pilot-member table:name="2026-03-16 18:44:42" table:display="true" table:show-details="true"/>
                <table:data-pilot-member table:name="2026-03-16 18:45:30" table:display="true" table:show-details="true"/>
                <table:data-pilot-member table:name="2026-03-16 18:47:14" table:display="true" table:show-details="true"/>
                <table:data-pilot-member table:name="2026-03-16 18:50:31" table:display="true" table:show-details="true"/>
                <table:data-pilot-member table:name="2026-03-16 18:53:43" table:display="true" table:show-details="true"/>
                <table:data-pilot-member table:name="2026-03-16 18:54:01" table:display="true" table:show-details="true"/>
                <table:data-pilot-member table:name="2026-03-16 18:55:17" table:display="true" table:show-details="true"/>
                <table:data-pilot-member table:name="2026-03-16 18:55:55" table:display="true" table:show-details="true"/>
                <table:data-pilot-member table:name="2026-03-16 18:56:07" table:display="true" table:show-details="true"/>
                <table:data-pilot-member table:name="2026-03-16 18:56:31" table:display="true" table:show-details="true"/>
                <table:data-pilot-member table:name="2026-03-16 18:56:39" table:display="true" table:show-details="true"/>
                <table:data-pilot-member table:name="2026-03-16 18:57:23" table:display="true" table:show-details="true"/>
                <table:data-pilot-member table:name="2026-03-16 18:58:07" table:display="true" table:show-details="true"/>
                <table:data-pilot-member table:name="2026-03-16 18:59:03" table:display="true" table:show-details="true"/>
                <table:data-pilot-member table:name="2026-03-16 19:00:59" table:display="true" table:show-details="true"/>
                <table:data-pilot-member table:name="2026-03-16 19:03:15" table:display="true" table:show-details="true"/>
                <table:data-pilot-member table:name="2026-03-16 19:10:27" table:display="true" table:show-details="true"/>
                <table:data-pilot-member table:name="2026-03-16 19:12:12" table:display="true" table:show-details="true"/>
                <table:data-pilot-member table:name="2026-03-16 19:13:26" table:display="true" table:show-details="true"/>
                <table:data-pilot-member table:name="2026-03-16 19:14:57" table:display="true" table:show-details="true"/>
                <table:data-pilot-member table:name="2026-03-16 19:17:11" table:display="true" table:show-details="true"/>
                <table:data-pilot-member table:name="2026-03-16 19:20:16" table:display="true" table:show-details="true"/>
                <table:data-pilot-member table:name="2026-03-16 19:40:10" table:display="true" table:show-details="true"/>
                <table:data-pilot-member table:name="2026-03-16 19:42:51" table:display="true" table:show-details="true"/>
                <table:data-pilot-member table:name="2026-03-16 20:03:12" table:display="true" table:show-details="true"/>
                <table:data-pilot-member table:name="2026-03-16 22:33:07" table:display="true" table:show-details="true"/>
                <table:data-pilot-member table:name="2026-03-16 23:03:48" table:display="true" table:show-details="true"/>
                <table:data-pilot-member table:name="2026-03-16 23:04:36" table:display="true" table:show-details="true"/>
                <table:data-pilot-member table:name="2026-03-17 02:27:39" table:display="true" table:show-details="true"/>
                <table:data-pilot-member table:name="2026-03-17 11:08:54" table:display="true" table:show-details="true"/>
                <table:data-pilot-member table:name="2026-03-17 12:35:53" table:display="true" table:show-details="true"/>
                <table:data-pilot-member table:name="Data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 2" table:orientation="hidden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  <table:data-pilot-member table:name="Stawka_podbicia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 3" table:orientation="hidden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  <table:data-pilot-member table:name="Koszt_przekliku_razem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 4" table:orientation="hidden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  <table:data-pilot-member table:name="Zajmowana_pozycja" table:display="true" table:show-details="true"/>
                <table:data-pilot-member table:name="2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 5" table:orientation="hidden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  <table:data-pilot-member table:name="10X.XXX.XXX.11" table:display="true" table:show-details="true"/>
                <table:data-pilot-member table:name="10X.XXX.XXX.15" table:display="true" table:show-details="true"/>
                <table:data-pilot-member table:name="10X.XXX.XXX.2" table:display="true" table:show-details="true"/>
                <table:data-pilot-member table:name="10X.XXX.XXX.20" table:display="true" table:show-details="true"/>
                <table:data-pilot-member table:name="10X.XXX.XXX.29" table:display="true" table:show-details="true"/>
                <table:data-pilot-member table:name="10X.XXX.XXX.33" table:display="true" table:show-details="true"/>
                <table:data-pilot-member table:name="10X.XXX.XXX.34" table:display="true" table:show-details="true"/>
                <table:data-pilot-member table:name="10X.XXX.XXX.36" table:display="true" table:show-details="true"/>
                <table:data-pilot-member table:name="10X.XXX.XXX.37" table:display="true" table:show-details="true"/>
                <table:data-pilot-member table:name="10X.XXX.XXX.47" table:display="true" table:show-details="true"/>
                <table:data-pilot-member table:name="10X.XXX.XXX.6" table:display="true" table:show-details="true"/>
                <table:data-pilot-member table:name="10X.XXX.XXX.62" table:display="true" table:show-details="true"/>
                <table:data-pilot-member table:name="10X.XXX.XXX.65" table:display="true" table:show-details="true"/>
                <table:data-pilot-member table:name="10X.XXX.XXX.71" table:display="true" table:show-details="true"/>
                <table:data-pilot-member table:name="10X.XXX.XXX.74" table:display="true" table:show-details="true"/>
                <table:data-pilot-member table:name="10X.XXX.XXX.91" table:display="true" table:show-details="true"/>
                <table:data-pilot-member table:name="10X.XXX.XXX.97" table:display="true" table:show-details="true"/>
                <table:data-pilot-member table:name="10X.XXX.XXX.99" table:display="true" table:show-details="true"/>
                <table:data-pilot-member table:name="10X.XXX.XXX.X02" table:display="true" table:show-details="true"/>
                <table:data-pilot-member table:name="10X.XXX.XXX.X05" table:display="true" table:show-details="true"/>
                <table:data-pilot-member table:name="10X.XXX.XXX.X06" table:display="true" table:show-details="true"/>
                <table:data-pilot-member table:name="10X.XXX.XXX.X07" table:display="true" table:show-details="true"/>
                <table:data-pilot-member table:name="10X.XXX.XXX.X11" table:display="true" table:show-details="true"/>
                <table:data-pilot-member table:name="10X.XXX.XXX.X13" table:display="true" table:show-details="true"/>
                <table:data-pilot-member table:name="10X.XXX.XXX.X24" table:display="true" table:show-details="true"/>
                <table:data-pilot-member table:name="10X.XXX.XXX.X33" table:display="true" table:show-details="true"/>
                <table:data-pilot-member table:name="10X.XXX.XXX.X37" table:display="true" table:show-details="true"/>
                <table:data-pilot-member table:name="10X.XXX.XXX.X44" table:display="true" table:show-details="true"/>
                <table:data-pilot-member table:name="10X.XXX.XXX.X47" table:display="true" table:show-details="true"/>
                <table:data-pilot-member table:name="10X.XXX.XXX.X48" table:display="true" table:show-details="true"/>
                <table:data-pilot-member table:name="10X.XXX.XXX.X57" table:display="true" table:show-details="true"/>
                <table:data-pilot-member table:name="10X.XXX.XXX.X74" table:display="true" table:show-details="true"/>
                <table:data-pilot-member table:name="10X.XXX.XXX.X95" table:display="true" table:show-details="true"/>
                <table:data-pilot-member table:name="10X.XXX.XXX.X97" table:display="true" table:show-details="true"/>
                <table:data-pilot-member table:name="11X.XXX.XXX.X33" table:display="true" table:show-details="true"/>
                <table:data-pilot-member table:name="12X.XXX.XXX.47" table:display="true" table:show-details="true"/>
                <table:data-pilot-member table:name="14X.XXX.XXX.20" table:display="true" table:show-details="true"/>
                <table:data-pilot-member table:name="14X.XXX.XXX.5" table:display="true" table:show-details="true"/>
                <table:data-pilot-member table:name="14X.XXX.XXX.52" table:display="true" table:show-details="true"/>
                <table:data-pilot-member table:name="14X.XXX.XXX.66" table:display="true" table:show-details="true"/>
                <table:data-pilot-member table:name="14X.XXX.XXX.81" table:display="true" table:show-details="true"/>
                <table:data-pilot-member table:name="14X.XXX.XXX.X42" table:display="true" table:show-details="true"/>
                <table:data-pilot-member table:name="15X.XXX.XXX.11" table:display="true" table:show-details="true"/>
                <table:data-pilot-member table:name="15X.XXX.XXX.13" table:display="true" table:show-details="true"/>
                <table:data-pilot-member table:name="15X.XXX.XXX.58" table:display="true" table:show-details="true"/>
                <table:data-pilot-member table:name="15X.XXX.XXX.83" table:display="true" table:show-details="true"/>
                <table:data-pilot-member table:name="15X.XXX.XXX.X33" table:display="true" table:show-details="true"/>
                <table:data-pilot-member table:name="15X.XXX.XXX.X40" table:display="true" table:show-details="true"/>
                <table:data-pilot-member table:name="15X.XXX.XXX.X68" table:display="true" table:show-details="true"/>
                <table:data-pilot-member table:name="16X.XXX.XXX.65" table:display="true" table:show-details="true"/>
                <table:data-pilot-member table:name="16X.XXX.XXX.74" table:display="true" table:show-details="true"/>
                <table:data-pilot-member table:name="16X.XXX.XXX.X93" table:display="true" table:show-details="true"/>
                <table:data-pilot-member table:name="17X.XXX.XXX.25" table:display="true" table:show-details="true"/>
                <table:data-pilot-member table:name="17X.XXX.XXX.26" table:display="true" table:show-details="true"/>
                <table:data-pilot-member table:name="17X.XXX.XXX.30" table:display="true" table:show-details="true"/>
                <table:data-pilot-member table:name="17X.XXX.XXX.31" table:display="true" table:show-details="true"/>
                <table:data-pilot-member table:name="17X.XXX.XXX.38" table:display="true" table:show-details="true"/>
                <table:data-pilot-member table:name="17X.XXX.XXX.39" table:display="true" table:show-details="true"/>
                <table:data-pilot-member table:name="17X.XXX.XXX.57" table:display="true" table:show-details="true"/>
                <table:data-pilot-member table:name="17X.XXX.XXX.59" table:display="true" table:show-details="true"/>
                <table:data-pilot-member table:name="17X.XXX.XXX.63" table:display="true" table:show-details="true"/>
                <table:data-pilot-member table:name="17X.XXX.XXX.64" table:display="true" table:show-details="true"/>
                <table:data-pilot-member table:name="17X.XXX.XXX.67" table:display="true" table:show-details="true"/>
                <table:data-pilot-member table:name="17X.XXX.XXX.7" table:display="true" table:show-details="true"/>
                <table:data-pilot-member table:name="17X.XXX.XXX.8" table:display="true" table:show-details="true"/>
                <table:data-pilot-member table:name="17X.XXX.XXX.83" table:display="true" table:show-details="true"/>
                <table:data-pilot-member table:name="17X.XXX.XXX.87" table:display="true" table:show-details="true"/>
                <table:data-pilot-member table:name="17X.XXX.XXX.X03" table:display="true" table:show-details="true"/>
                <table:data-pilot-member table:name="17X.XXX.XXX.X04" table:display="true" table:show-details="true"/>
                <table:data-pilot-member table:name="17X.XXX.XXX.X13" table:display="true" table:show-details="true"/>
                <table:data-pilot-member table:name="17X.XXX.XXX.X15" table:display="true" table:show-details="true"/>
                <table:data-pilot-member table:name="17X.XXX.XXX.X17" table:display="true" table:show-details="true"/>
                <table:data-pilot-member table:name="17X.XXX.XXX.X19" table:display="true" table:show-details="true"/>
                <table:data-pilot-member table:name="17X.XXX.XXX.X21" table:display="true" table:show-details="true"/>
                <table:data-pilot-member table:name="17X.XXX.XXX.X29" table:display="true" table:show-details="true"/>
                <table:data-pilot-member table:name="17X.XXX.XXX.X30" table:display="true" table:show-details="true"/>
                <table:data-pilot-member table:name="17X.XXX.XXX.X32" table:display="true" table:show-details="true"/>
                <table:data-pilot-member table:name="17X.XXX.XXX.X36" table:display="true" table:show-details="true"/>
                <table:data-pilot-member table:name="17X.XXX.XXX.X41" table:display="true" table:show-details="true"/>
                <table:data-pilot-member table:name="17X.XXX.XXX.X42" table:display="true" table:show-details="true"/>
                <table:data-pilot-member table:name="17X.XXX.XXX.X46" table:display="true" table:show-details="true"/>
                <table:data-pilot-member table:name="17X.XXX.XXX.X53" table:display="true" table:show-details="true"/>
                <table:data-pilot-member table:name="17X.XXX.XXX.X72" table:display="true" table:show-details="true"/>
                <table:data-pilot-member table:name="17X.XXX.XXX.X78" table:display="true" table:show-details="true"/>
                <table:data-pilot-member table:name="17X.XXX.XXX.X87" table:display="true" table:show-details="true"/>
                <table:data-pilot-member table:name="18X.XXX.XXX.11" table:display="true" table:show-details="true"/>
                <table:data-pilot-member table:name="18X.XXX.XXX.13" table:display="true" table:show-details="true"/>
                <table:data-pilot-member table:name="18X.XXX.XXX.14" table:display="true" table:show-details="true"/>
                <table:data-pilot-member table:name="18X.XXX.XXX.16" table:display="true" table:show-details="true"/>
                <table:data-pilot-member table:name="18X.XXX.XXX.18" table:display="true" table:show-details="true"/>
                <table:data-pilot-member table:name="18X.XXX.XXX.19" table:display="true" table:show-details="true"/>
                <table:data-pilot-member table:name="18X.XXX.XXX.21" table:display="true" table:show-details="true"/>
                <table:data-pilot-member table:name="18X.XXX.XXX.23" table:display="true" table:show-details="true"/>
                <table:data-pilot-member table:name="18X.XXX.XXX.29" table:display="true" table:show-details="true"/>
                <table:data-pilot-member table:name="18X.XXX.XXX.30" table:display="true" table:show-details="true"/>
                <table:data-pilot-member table:name="18X.XXX.XXX.35" table:display="true" table:show-details="true"/>
                <table:data-pilot-member table:name="18X.XXX.XXX.36" table:display="true" table:show-details="true"/>
                <table:data-pilot-member table:name="18X.XXX.XXX.38" table:display="true" table:show-details="true"/>
                <table:data-pilot-member table:name="18X.XXX.XXX.43" table:display="true" table:show-details="true"/>
                <table:data-pilot-member table:name="18X.XXX.XXX.47" table:display="true" table:show-details="true"/>
                <table:data-pilot-member table:name="18X.XXX.XXX.48" table:display="true" table:show-details="true"/>
                <table:data-pilot-member table:name="18X.XXX.XXX.5" table:display="true" table:show-details="true"/>
                <table:data-pilot-member table:name="18X.XXX.XXX.50" table:display="true" table:show-details="true"/>
                <table:data-pilot-member table:name="18X.XXX.XXX.52" table:display="true" table:show-details="true"/>
                <table:data-pilot-member table:name="18X.XXX.XXX.58" table:display="true" table:show-details="true"/>
                <table:data-pilot-member table:name="18X.XXX.XXX.64" table:display="true" table:show-details="true"/>
                <table:data-pilot-member table:name="18X.XXX.XXX.72" table:display="true" table:show-details="true"/>
                <table:data-pilot-member table:name="18X.XXX.XXX.74" table:display="true" table:show-details="true"/>
                <table:data-pilot-member table:name="18X.XXX.XXX.75" table:display="true" table:show-details="true"/>
                <table:data-pilot-member table:name="18X.XXX.XXX.76" table:display="true" table:show-details="true"/>
                <table:data-pilot-member table:name="18X.XXX.XXX.79" table:display="true" table:show-details="true"/>
                <table:data-pilot-member table:name="18X.XXX.XXX.80" table:display="true" table:show-details="true"/>
                <table:data-pilot-member table:name="18X.XXX.XXX.82" table:display="true" table:show-details="true"/>
                <table:data-pilot-member table:name="18X.XXX.XXX.83" table:display="true" table:show-details="true"/>
                <table:data-pilot-member table:name="18X.XXX.XXX.89" table:display="true" table:show-details="true"/>
                <table:data-pilot-member table:name="18X.XXX.XXX.93" table:display="true" table:show-details="true"/>
                <table:data-pilot-member table:name="18X.XXX.XXX.97" table:display="true" table:show-details="true"/>
                <table:data-pilot-member table:name="18X.XXX.XXX.X00" table:display="true" table:show-details="true"/>
                <table:data-pilot-member table:name="18X.XXX.XXX.X02" table:display="true" table:show-details="true"/>
                <table:data-pilot-member table:name="18X.XXX.XXX.X03" table:display="true" table:show-details="true"/>
                <table:data-pilot-member table:name="18X.XXX.XXX.X08" table:display="true" table:show-details="true"/>
                <table:data-pilot-member table:name="18X.XXX.XXX.X12" table:display="true" table:show-details="true"/>
                <table:data-pilot-member table:name="18X.XXX.XXX.X13" table:display="true" table:show-details="true"/>
                <table:data-pilot-member table:name="18X.XXX.XXX.X16" table:display="true" table:show-details="true"/>
                <table:data-pilot-member table:name="18X.XXX.XXX.X18" table:display="true" table:show-details="true"/>
                <table:data-pilot-member table:name="18X.XXX.XXX.X19" table:display="true" table:show-details="true"/>
                <table:data-pilot-member table:name="18X.XXX.XXX.X22" table:display="true" table:show-details="true"/>
                <table:data-pilot-member table:name="18X.XXX.XXX.X23" table:display="true" table:show-details="true"/>
                <table:data-pilot-member table:name="18X.XXX.XXX.X25" table:display="true" table:show-details="true"/>
                <table:data-pilot-member table:name="18X.XXX.XXX.X34" table:display="true" table:show-details="true"/>
                <table:data-pilot-member table:name="18X.XXX.XXX.X37" table:display="true" table:show-details="true"/>
                <table:data-pilot-member table:name="18X.XXX.XXX.X39" table:display="true" table:show-details="true"/>
                <table:data-pilot-member table:name="18X.XXX.XXX.X40" table:display="true" table:show-details="true"/>
                <table:data-pilot-member table:name="18X.XXX.XXX.X41" table:display="true" table:show-details="true"/>
                <table:data-pilot-member table:name="18X.XXX.XXX.X44" table:display="true" table:show-details="true"/>
                <table:data-pilot-member table:name="18X.XXX.XXX.X46" table:display="true" table:show-details="true"/>
                <table:data-pilot-member table:name="18X.XXX.XXX.X51" table:display="true" table:show-details="true"/>
                <table:data-pilot-member table:name="18X.XXX.XXX.X53" table:display="true" table:show-details="true"/>
                <table:data-pilot-member table:name="18X.XXX.XXX.X55" table:display="true" table:show-details="true"/>
                <table:data-pilot-member table:name="18X.XXX.XXX.X60" table:display="true" table:show-details="true"/>
                <table:data-pilot-member table:name="18X.XXX.XXX.X61" table:display="true" table:show-details="true"/>
                <table:data-pilot-member table:name="18X.XXX.XXX.X65" table:display="true" table:show-details="true"/>
                <table:data-pilot-member table:name="18X.XXX.XXX.X66" table:display="true" table:show-details="true"/>
                <table:data-pilot-member table:name="18X.XXX.XXX.X68" table:display="true" table:show-details="true"/>
                <table:data-pilot-member table:name="18X.XXX.XXX.X70" table:display="true" table:show-details="true"/>
                <table:data-pilot-member table:name="18X.XXX.XXX.X71" table:display="true" table:show-details="true"/>
                <table:data-pilot-member table:name="18X.XXX.XXX.X72" table:display="true" table:show-details="true"/>
                <table:data-pilot-member table:name="18X.XXX.XXX.X76" table:display="true" table:show-details="true"/>
                <table:data-pilot-member table:name="18X.XXX.XXX.X82" table:display="true" table:show-details="true"/>
                <table:data-pilot-member table:name="18X.XXX.XXX.X83" table:display="true" table:show-details="true"/>
                <table:data-pilot-member table:name="18X.XXX.XXX.X87" table:display="true" table:show-details="true"/>
                <table:data-pilot-member table:name="18X.XXX.XXX.X98" table:display="true" table:show-details="true"/>
                <table:data-pilot-member table:name="18X.XXX.XXX.X99" table:display="true" table:show-details="true"/>
                <table:data-pilot-member table:name="19X.XXX.XXX.15" table:display="true" table:show-details="true"/>
                <table:data-pilot-member table:name="19X.XXX.XXX.3" table:display="true" table:show-details="true"/>
                <table:data-pilot-member table:name="19X.XXX.XXX.32" table:display="true" table:show-details="true"/>
                <table:data-pilot-member table:name="19X.XXX.XXX.43" table:display="true" table:show-details="true"/>
                <table:data-pilot-member table:name="19X.XXX.XXX.6" table:display="true" table:show-details="true"/>
                <table:data-pilot-member table:name="19X.XXX.XXX.64" table:display="true" table:show-details="true"/>
                <table:data-pilot-member table:name="19X.XXX.XXX.68" table:display="true" table:show-details="true"/>
                <table:data-pilot-member table:name="19X.XXX.XXX.86" table:display="true" table:show-details="true"/>
                <table:data-pilot-member table:name="19X.XXX.XXX.9" table:display="true" table:show-details="true"/>
                <table:data-pilot-member table:name="19X.XXX.XXX.97" table:display="true" table:show-details="true"/>
                <table:data-pilot-member table:name="19X.XXX.XXX.X08" table:display="true" table:show-details="true"/>
                <table:data-pilot-member table:name="19X.XXX.XXX.X10" table:display="true" table:show-details="true"/>
                <table:data-pilot-member table:name="19X.XXX.XXX.X14" table:display="true" table:show-details="true"/>
                <table:data-pilot-member table:name="19X.XXX.XXX.X16" table:display="true" table:show-details="true"/>
                <table:data-pilot-member table:name="19X.XXX.XXX.X19" table:display="true" table:show-details="true"/>
                <table:data-pilot-member table:name="19X.XXX.XXX.X20" table:display="true" table:show-details="true"/>
                <table:data-pilot-member table:name="19X.XXX.XXX.X23" table:display="true" table:show-details="true"/>
                <table:data-pilot-member table:name="19X.XXX.XXX.X29" table:display="true" table:show-details="true"/>
                <table:data-pilot-member table:name="19X.XXX.XXX.X45" table:display="true" table:show-details="true"/>
                <table:data-pilot-member table:name="19X.XXX.XXX.X52" table:display="true" table:show-details="true"/>
                <table:data-pilot-member table:name="19X.XXX.XXX.X53" table:display="true" table:show-details="true"/>
                <table:data-pilot-member table:name="19X.XXX.XXX.X54" table:display="true" table:show-details="true"/>
                <table:data-pilot-member table:name="19X.XXX.XXX.X68" table:display="true" table:show-details="true"/>
                <table:data-pilot-member table:name="19X.XXX.XXX.X74" table:display="true" table:show-details="true"/>
                <table:data-pilot-member table:name="19X.XXX.XXX.X75" table:display="true" table:show-details="true"/>
                <table:data-pilot-member table:name="19X.XXX.XXX.X80" table:display="true" table:show-details="true"/>
                <table:data-pilot-member table:name="19X.XXX.XXX.X84" table:display="true" table:show-details="true"/>
                <table:data-pilot-member table:name="19X.XXX.XXX.X91" table:display="true" table:show-details="true"/>
                <table:data-pilot-member table:name="2.XXX.XXX.X43" table:display="true" table:show-details="true"/>
                <table:data-pilot-member table:name="21X.XXX.XXX.0" table:display="true" table:show-details="true"/>
                <table:data-pilot-member table:name="21X.XXX.XXX.12" table:display="true" table:show-details="true"/>
                <table:data-pilot-member table:name="21X.XXX.XXX.27" table:display="true" table:show-details="true"/>
                <table:data-pilot-member table:name="21X.XXX.XXX.30" table:display="true" table:show-details="true"/>
                <table:data-pilot-member table:name="21X.XXX.XXX.32" table:display="true" table:show-details="true"/>
                <table:data-pilot-member table:name="21X.XXX.XXX.35" table:display="true" table:show-details="true"/>
                <table:data-pilot-member table:name="21X.XXX.XXX.38" table:display="true" table:show-details="true"/>
                <table:data-pilot-member table:name="21X.XXX.XXX.55" table:display="true" table:show-details="true"/>
                <table:data-pilot-member table:name="21X.XXX.XXX.56" table:display="true" table:show-details="true"/>
                <table:data-pilot-member table:name="21X.XXX.XXX.59" table:display="true" table:show-details="true"/>
                <table:data-pilot-member table:name="21X.XXX.XXX.64" table:display="true" table:show-details="true"/>
                <table:data-pilot-member table:name="21X.XXX.XXX.7" table:display="true" table:show-details="true"/>
                <table:data-pilot-member table:name="21X.XXX.XXX.71" table:display="true" table:show-details="true"/>
                <table:data-pilot-member table:name="21X.XXX.XXX.75" table:display="true" table:show-details="true"/>
                <table:data-pilot-member table:name="21X.XXX.XXX.92" table:display="true" table:show-details="true"/>
                <table:data-pilot-member table:name="21X.XXX.XXX.X06" table:display="true" table:show-details="true"/>
                <table:data-pilot-member table:name="21X.XXX.XXX.X20" table:display="true" table:show-details="true"/>
                <table:data-pilot-member table:name="21X.XXX.XXX.X21" table:display="true" table:show-details="true"/>
                <table:data-pilot-member table:name="21X.XXX.XXX.X25" table:display="true" table:show-details="true"/>
                <table:data-pilot-member table:name="21X.XXX.XXX.X28" table:display="true" table:show-details="true"/>
                <table:data-pilot-member table:name="21X.XXX.XXX.X31" table:display="true" table:show-details="true"/>
                <table:data-pilot-member table:name="21X.XXX.XXX.X32" table:display="true" table:show-details="true"/>
                <table:data-pilot-member table:name="21X.XXX.XXX.X39" table:display="true" table:show-details="true"/>
                <table:data-pilot-member table:name="21X.XXX.XXX.X43" table:display="true" table:show-details="true"/>
                <table:data-pilot-member table:name="21X.XXX.XXX.X44" table:display="true" table:show-details="true"/>
                <table:data-pilot-member table:name="21X.XXX.XXX.X51" table:display="true" table:show-details="true"/>
                <table:data-pilot-member table:name="21X.XXX.XXX.X54" table:display="true" table:show-details="true"/>
                <table:data-pilot-member table:name="21X.XXX.XXX.X63" table:display="true" table:show-details="true"/>
                <table:data-pilot-member table:name="21X.XXX.XXX.X67" table:display="true" table:show-details="true"/>
                <table:data-pilot-member table:name="21X.XXX.XXX.X81" table:display="true" table:show-details="true"/>
                <table:data-pilot-member table:name="21X.XXX.XXX.X91" table:display="true" table:show-details="true"/>
                <table:data-pilot-member table:name="21X.XXX.XXX.X97" table:display="true" table:show-details="true"/>
                <table:data-pilot-member table:name="31.XXX.XXX.1" table:display="true" table:show-details="true"/>
                <table:data-pilot-member table:name="31.XXX.XXX.14" table:display="true" table:show-details="true"/>
                <table:data-pilot-member table:name="31.XXX.XXX.18" table:display="true" table:show-details="true"/>
                <table:data-pilot-member table:name="31.XXX.XXX.2" table:display="true" table:show-details="true"/>
                <table:data-pilot-member table:name="31.XXX.XXX.22" table:display="true" table:show-details="true"/>
                <table:data-pilot-member table:name="31.XXX.XXX.23" table:display="true" table:show-details="true"/>
                <table:data-pilot-member table:name="31.XXX.XXX.24" table:display="true" table:show-details="true"/>
                <table:data-pilot-member table:name="31.XXX.XXX.25" table:display="true" table:show-details="true"/>
                <table:data-pilot-member table:name="31.XXX.XXX.26" table:display="true" table:show-details="true"/>
                <table:data-pilot-member table:name="31.XXX.XXX.28" table:display="true" table:show-details="true"/>
                <table:data-pilot-member table:name="31.XXX.XXX.36" table:display="true" table:show-details="true"/>
                <table:data-pilot-member table:name="31.XXX.XXX.37" table:display="true" table:show-details="true"/>
                <table:data-pilot-member table:name="31.XXX.XXX.42" table:display="true" table:show-details="true"/>
                <table:data-pilot-member table:name="31.XXX.XXX.44" table:display="true" table:show-details="true"/>
                <table:data-pilot-member table:name="31.XXX.XXX.45" table:display="true" table:show-details="true"/>
                <table:data-pilot-member table:name="31.XXX.XXX.46" table:display="true" table:show-details="true"/>
                <table:data-pilot-member table:name="31.XXX.XXX.49" table:display="true" table:show-details="true"/>
                <table:data-pilot-member table:name="31.XXX.XXX.5" table:display="true" table:show-details="true"/>
                <table:data-pilot-member table:name="31.XXX.XXX.52" table:display="true" table:show-details="true"/>
                <table:data-pilot-member table:name="31.XXX.XXX.53" table:display="true" table:show-details="true"/>
                <table:data-pilot-member table:name="31.XXX.XXX.56" table:display="true" table:show-details="true"/>
                <table:data-pilot-member table:name="31.XXX.XXX.58" table:display="true" table:show-details="true"/>
                <table:data-pilot-member table:name="31.XXX.XXX.66" table:display="true" table:show-details="true"/>
                <table:data-pilot-member table:name="31.XXX.XXX.68" table:display="true" table:show-details="true"/>
                <table:data-pilot-member table:name="31.XXX.XXX.76" table:display="true" table:show-details="true"/>
                <table:data-pilot-member table:name="31.XXX.XXX.8" table:display="true" table:show-details="true"/>
                <table:data-pilot-member table:name="31.XXX.XXX.9" table:display="true" table:show-details="true"/>
                <table:data-pilot-member table:name="31.XXX.XXX.91" table:display="true" table:show-details="true"/>
                <table:data-pilot-member table:name="31.XXX.XXX.92" table:display="true" table:show-details="true"/>
                <table:data-pilot-member table:name="31.XXX.XXX.X01" table:display="true" table:show-details="true"/>
                <table:data-pilot-member table:name="31.XXX.XXX.X02" table:display="true" table:show-details="true"/>
                <table:data-pilot-member table:name="31.XXX.XXX.X04" table:display="true" table:show-details="true"/>
                <table:data-pilot-member table:name="31.XXX.XXX.X05" table:display="true" table:show-details="true"/>
                <table:data-pilot-member table:name="31.XXX.XXX.X07" table:display="true" table:show-details="true"/>
                <table:data-pilot-member table:name="31.XXX.XXX.X08" table:display="true" table:show-details="true"/>
                <table:data-pilot-member table:name="31.XXX.XXX.X11" table:display="true" table:show-details="true"/>
                <table:data-pilot-member table:name="31.XXX.XXX.X14" table:display="true" table:show-details="true"/>
                <table:data-pilot-member table:name="31.XXX.XXX.X15" table:display="true" table:show-details="true"/>
                <table:data-pilot-member table:name="31.XXX.XXX.X16" table:display="true" table:show-details="true"/>
                <table:data-pilot-member table:name="31.XXX.XXX.X18" table:display="true" table:show-details="true"/>
                <table:data-pilot-member table:name="31.XXX.XXX.X21" table:display="true" table:show-details="true"/>
                <table:data-pilot-member table:name="31.XXX.XXX.X23" table:display="true" table:show-details="true"/>
                <table:data-pilot-member table:name="31.XXX.XXX.X26" table:display="true" table:show-details="true"/>
                <table:data-pilot-member table:name="31.XXX.XXX.X30" table:display="true" table:show-details="true"/>
                <table:data-pilot-member table:name="31.XXX.XXX.X32" table:display="true" table:show-details="true"/>
                <table:data-pilot-member table:name="31.XXX.XXX.X33" table:display="true" table:show-details="true"/>
                <table:data-pilot-member table:name="31.XXX.XXX.X34" table:display="true" table:show-details="true"/>
                <table:data-pilot-member table:name="31.XXX.XXX.X36" table:display="true" table:show-details="true"/>
                <table:data-pilot-member table:name="31.XXX.XXX.X38" table:display="true" table:show-details="true"/>
                <table:data-pilot-member table:name="31.XXX.XXX.X39" table:display="true" table:show-details="true"/>
                <table:data-pilot-member table:name="31.XXX.XXX.X43" table:display="true" table:show-details="true"/>
                <table:data-pilot-member table:name="31.XXX.XXX.X44" table:display="true" table:show-details="true"/>
                <table:data-pilot-member table:name="31.XXX.XXX.X46" table:display="true" table:show-details="true"/>
                <table:data-pilot-member table:name="31.XXX.XXX.X47" table:display="true" table:show-details="true"/>
                <table:data-pilot-member table:name="31.XXX.XXX.X48" table:display="true" table:show-details="true"/>
                <table:data-pilot-member table:name="31.XXX.XXX.X49" table:display="true" table:show-details="true"/>
                <table:data-pilot-member table:name="31.XXX.XXX.X50" table:display="true" table:show-details="true"/>
                <table:data-pilot-member table:name="31.XXX.XXX.X53" table:display="true" table:show-details="true"/>
                <table:data-pilot-member table:name="31.XXX.XXX.X54" table:display="true" table:show-details="true"/>
                <table:data-pilot-member table:name="31.XXX.XXX.X58" table:display="true" table:show-details="true"/>
                <table:data-pilot-member table:name="31.XXX.XXX.X59" table:display="true" table:show-details="true"/>
                <table:data-pilot-member table:name="31.XXX.XXX.X62" table:display="true" table:show-details="true"/>
                <table:data-pilot-member table:name="31.XXX.XXX.X63" table:display="true" table:show-details="true"/>
                <table:data-pilot-member table:name="31.XXX.XXX.X65" table:display="true" table:show-details="true"/>
                <table:data-pilot-member table:name="31.XXX.XXX.X69" table:display="true" table:show-details="true"/>
                <table:data-pilot-member table:name="31.XXX.XXX.X72" table:display="true" table:show-details="true"/>
                <table:data-pilot-member table:name="31.XXX.XXX.X78" table:display="true" table:show-details="true"/>
                <table:data-pilot-member table:name="31.XXX.XXX.X79" table:display="true" table:show-details="true"/>
                <table:data-pilot-member table:name="31.XXX.XXX.X80" table:display="true" table:show-details="true"/>
                <table:data-pilot-member table:name="31.XXX.XXX.X84" table:display="true" table:show-details="true"/>
                <table:data-pilot-member table:name="31.XXX.XXX.X90" table:display="true" table:show-details="true"/>
                <table:data-pilot-member table:name="31.XXX.XXX.X92" table:display="true" table:show-details="true"/>
                <table:data-pilot-member table:name="31.XXX.XXX.X96" table:display="true" table:show-details="true"/>
                <table:data-pilot-member table:name="31.XXX.XXX.X98" table:display="true" table:show-details="true"/>
                <table:data-pilot-member table:name="31.XXX.XXX.X99" table:display="true" table:show-details="true"/>
                <table:data-pilot-member table:name="37.XXX.XXX.0" table:display="true" table:show-details="true"/>
                <table:data-pilot-member table:name="37.XXX.XXX.1" table:display="true" table:show-details="true"/>
                <table:data-pilot-member table:name="37.XXX.XXX.10" table:display="true" table:show-details="true"/>
                <table:data-pilot-member table:name="37.XXX.XXX.12" table:display="true" table:show-details="true"/>
                <table:data-pilot-member table:name="37.XXX.XXX.15" table:display="true" table:show-details="true"/>
                <table:data-pilot-member table:name="37.XXX.XXX.16" table:display="true" table:show-details="true"/>
                <table:data-pilot-member table:name="37.XXX.XXX.19" table:display="true" table:show-details="true"/>
                <table:data-pilot-member table:name="37.XXX.XXX.2" table:display="true" table:show-details="true"/>
                <table:data-pilot-member table:name="37.XXX.XXX.21" table:display="true" table:show-details="true"/>
                <table:data-pilot-member table:name="37.XXX.XXX.22" table:display="true" table:show-details="true"/>
                <table:data-pilot-member table:name="37.XXX.XXX.23" table:display="true" table:show-details="true"/>
                <table:data-pilot-member table:name="37.XXX.XXX.26" table:display="true" table:show-details="true"/>
                <table:data-pilot-member table:name="37.XXX.XXX.27" table:display="true" table:show-details="true"/>
                <table:data-pilot-member table:name="37.XXX.XXX.29" table:display="true" table:show-details="true"/>
                <table:data-pilot-member table:name="37.XXX.XXX.3" table:display="true" table:show-details="true"/>
                <table:data-pilot-member table:name="37.XXX.XXX.33" table:display="true" table:show-details="true"/>
                <table:data-pilot-member table:name="37.XXX.XXX.34" table:display="true" table:show-details="true"/>
                <table:data-pilot-member table:name="37.XXX.XXX.36" table:display="true" table:show-details="true"/>
                <table:data-pilot-member table:name="37.XXX.XXX.37" table:display="true" table:show-details="true"/>
                <table:data-pilot-member table:name="37.XXX.XXX.4" table:display="true" table:show-details="true"/>
                <table:data-pilot-member table:name="37.XXX.XXX.43" table:display="true" table:show-details="true"/>
                <table:data-pilot-member table:name="37.XXX.XXX.45" table:display="true" table:show-details="true"/>
                <table:data-pilot-member table:name="37.XXX.XXX.47" table:display="true" table:show-details="true"/>
                <table:data-pilot-member table:name="37.XXX.XXX.48" table:display="true" table:show-details="true"/>
                <table:data-pilot-member table:name="37.XXX.XXX.50" table:display="true" table:show-details="true"/>
                <table:data-pilot-member table:name="37.XXX.XXX.53" table:display="true" table:show-details="true"/>
                <table:data-pilot-member table:name="37.XXX.XXX.55" table:display="true" table:show-details="true"/>
                <table:data-pilot-member table:name="37.XXX.XXX.56" table:display="true" table:show-details="true"/>
                <table:data-pilot-member table:name="37.XXX.XXX.61" table:display="true" table:show-details="true"/>
                <table:data-pilot-member table:name="37.XXX.XXX.64" table:display="true" table:show-details="true"/>
                <table:data-pilot-member table:name="37.XXX.XXX.65" table:display="true" table:show-details="true"/>
                <table:data-pilot-member table:name="37.XXX.XXX.66" table:display="true" table:show-details="true"/>
                <table:data-pilot-member table:name="37.XXX.XXX.68" table:display="true" table:show-details="true"/>
                <table:data-pilot-member table:name="37.XXX.XXX.70" table:display="true" table:show-details="true"/>
                <table:data-pilot-member table:name="37.XXX.XXX.72" table:display="true" table:show-details="true"/>
                <table:data-pilot-member table:name="37.XXX.XXX.74" table:display="true" table:show-details="true"/>
                <table:data-pilot-member table:name="37.XXX.XXX.75" table:display="true" table:show-details="true"/>
                <table:data-pilot-member table:name="37.XXX.XXX.76" table:display="true" table:show-details="true"/>
                <table:data-pilot-member table:name="37.XXX.XXX.77" table:display="true" table:show-details="true"/>
                <table:data-pilot-member table:name="37.XXX.XXX.79" table:display="true" table:show-details="true"/>
                <table:data-pilot-member table:name="37.XXX.XXX.80" table:display="true" table:show-details="true"/>
                <table:data-pilot-member table:name="37.XXX.XXX.83" table:display="true" table:show-details="true"/>
                <table:data-pilot-member table:name="37.XXX.XXX.84" table:display="true" table:show-details="true"/>
                <table:data-pilot-member table:name="37.XXX.XXX.88" table:display="true" table:show-details="true"/>
                <table:data-pilot-member table:name="37.XXX.XXX.89" table:display="true" table:show-details="true"/>
                <table:data-pilot-member table:name="37.XXX.XXX.9" table:display="true" table:show-details="true"/>
                <table:data-pilot-member table:name="37.XXX.XXX.X00" table:display="true" table:show-details="true"/>
                <table:data-pilot-member table:name="37.XXX.XXX.X07" table:display="true" table:show-details="true"/>
                <table:data-pilot-member table:name="37.XXX.XXX.X08" table:display="true" table:show-details="true"/>
                <table:data-pilot-member table:name="37.XXX.XXX.X09" table:display="true" table:show-details="true"/>
                <table:data-pilot-member table:name="37.XXX.XXX.X11" table:display="true" table:show-details="true"/>
                <table:data-pilot-member table:name="37.XXX.XXX.X12" table:display="true" table:show-details="true"/>
                <table:data-pilot-member table:name="37.XXX.XXX.X13" table:display="true" table:show-details="true"/>
                <table:data-pilot-member table:name="37.XXX.XXX.X14" table:display="true" table:show-details="true"/>
                <table:data-pilot-member table:name="37.XXX.XXX.X15" table:display="true" table:show-details="true"/>
                <table:data-pilot-member table:name="37.XXX.XXX.X16" table:display="true" table:show-details="true"/>
                <table:data-pilot-member table:name="37.XXX.XXX.X17" table:display="true" table:show-details="true"/>
                <table:data-pilot-member table:name="37.XXX.XXX.X18" table:display="true" table:show-details="true"/>
                <table:data-pilot-member table:name="37.XXX.XXX.X19" table:display="true" table:show-details="true"/>
                <table:data-pilot-member table:name="37.XXX.XXX.X20" table:display="true" table:show-details="true"/>
                <table:data-pilot-member table:name="37.XXX.XXX.X21" table:display="true" table:show-details="true"/>
                <table:data-pilot-member table:name="37.XXX.XXX.X22" table:display="true" table:show-details="true"/>
                <table:data-pilot-member table:name="37.XXX.XXX.X23" table:display="true" table:show-details="true"/>
                <table:data-pilot-member table:name="37.XXX.XXX.X25" table:display="true" table:show-details="true"/>
                <table:data-pilot-member table:name="37.XXX.XXX.X26" table:display="true" table:show-details="true"/>
                <table:data-pilot-member table:name="37.XXX.XXX.X28" table:display="true" table:show-details="true"/>
                <table:data-pilot-member table:name="37.XXX.XXX.X29" table:display="true" table:show-details="true"/>
                <table:data-pilot-member table:name="37.XXX.XXX.X30" table:display="true" table:show-details="true"/>
                <table:data-pilot-member table:name="37.XXX.XXX.X32" table:display="true" table:show-details="true"/>
                <table:data-pilot-member table:name="37.XXX.XXX.X33" table:display="true" table:show-details="true"/>
                <table:data-pilot-member table:name="37.XXX.XXX.X35" table:display="true" table:show-details="true"/>
                <table:data-pilot-member table:name="37.XXX.XXX.X36" table:display="true" table:show-details="true"/>
                <table:data-pilot-member table:name="37.XXX.XXX.X37" table:display="true" table:show-details="true"/>
                <table:data-pilot-member table:name="37.XXX.XXX.X39" table:display="true" table:show-details="true"/>
                <table:data-pilot-member table:name="37.XXX.XXX.X41" table:display="true" table:show-details="true"/>
                <table:data-pilot-member table:name="37.XXX.XXX.X43" table:display="true" table:show-details="true"/>
                <table:data-pilot-member table:name="37.XXX.XXX.X46" table:display="true" table:show-details="true"/>
                <table:data-pilot-member table:name="37.XXX.XXX.X47" table:display="true" table:show-details="true"/>
                <table:data-pilot-member table:name="37.XXX.XXX.X48" table:display="true" table:show-details="true"/>
                <table:data-pilot-member table:name="37.XXX.XXX.X50" table:display="true" table:show-details="true"/>
                <table:data-pilot-member table:name="37.XXX.XXX.X51" table:display="true" table:show-details="true"/>
                <table:data-pilot-member table:name="37.XXX.XXX.X52" table:display="true" table:show-details="true"/>
                <table:data-pilot-member table:name="37.XXX.XXX.X53" table:display="true" table:show-details="true"/>
                <table:data-pilot-member table:name="37.XXX.XXX.X54" table:display="true" table:show-details="true"/>
                <table:data-pilot-member table:name="37.XXX.XXX.X55" table:display="true" table:show-details="true"/>
                <table:data-pilot-member table:name="37.XXX.XXX.X60" table:display="true" table:show-details="true"/>
                <table:data-pilot-member table:name="37.XXX.XXX.X61" table:display="true" table:show-details="true"/>
                <table:data-pilot-member table:name="37.XXX.XXX.X66" table:display="true" table:show-details="true"/>
                <table:data-pilot-member table:name="37.XXX.XXX.X69" table:display="true" table:show-details="true"/>
                <table:data-pilot-member table:name="37.XXX.XXX.X70" table:display="true" table:show-details="true"/>
                <table:data-pilot-member table:name="37.XXX.XXX.X71" table:display="true" table:show-details="true"/>
                <table:data-pilot-member table:name="37.XXX.XXX.X79" table:display="true" table:show-details="true"/>
                <table:data-pilot-member table:name="37.XXX.XXX.X80" table:display="true" table:show-details="true"/>
                <table:data-pilot-member table:name="37.XXX.XXX.X82" table:display="true" table:show-details="true"/>
                <table:data-pilot-member table:name="37.XXX.XXX.X84" table:display="true" table:show-details="true"/>
                <table:data-pilot-member table:name="37.XXX.XXX.X86" table:display="true" table:show-details="true"/>
                <table:data-pilot-member table:name="37.XXX.XXX.X97" table:display="true" table:show-details="true"/>
                <table:data-pilot-member table:name="37.XXX.XXX.X99" table:display="true" table:show-details="true"/>
                <table:data-pilot-member table:name="45.XXX.XXX.50" table:display="true" table:show-details="true"/>
                <table:data-pilot-member table:name="45.XXX.XXX.82" table:display="true" table:show-details="true"/>
                <table:data-pilot-member table:name="45.XXX.XXX.X14" table:display="true" table:show-details="true"/>
                <table:data-pilot-member table:name="45.XXX.XXX.X16" table:display="true" table:show-details="true"/>
                <table:data-pilot-member table:name="45.XXX.XXX.X18" table:display="true" table:show-details="true"/>
                <table:data-pilot-member table:name="45.XXX.XXX.X20" table:display="true" table:show-details="true"/>
                <table:data-pilot-member table:name="45.XXX.XXX.X34" table:display="true" table:show-details="true"/>
                <table:data-pilot-member table:name="46.XXX.XXX.13" table:display="true" table:show-details="true"/>
                <table:data-pilot-member table:name="46.XXX.XXX.15" table:display="true" table:show-details="true"/>
                <table:data-pilot-member table:name="46.XXX.XXX.18" table:display="true" table:show-details="true"/>
                <table:data-pilot-member table:name="46.XXX.XXX.23" table:display="true" table:show-details="true"/>
                <table:data-pilot-member table:name="46.XXX.XXX.27" table:display="true" table:show-details="true"/>
                <table:data-pilot-member table:name="46.XXX.XXX.28" table:display="true" table:show-details="true"/>
                <table:data-pilot-member table:name="46.XXX.XXX.3" table:display="true" table:show-details="true"/>
                <table:data-pilot-member table:name="46.XXX.XXX.31" table:display="true" table:show-details="true"/>
                <table:data-pilot-member table:name="46.XXX.XXX.33" table:display="true" table:show-details="true"/>
                <table:data-pilot-member table:name="46.XXX.XXX.40" table:display="true" table:show-details="true"/>
                <table:data-pilot-member table:name="46.XXX.XXX.5" table:display="true" table:show-details="true"/>
                <table:data-pilot-member table:name="46.XXX.XXX.61" table:display="true" table:show-details="true"/>
                <table:data-pilot-member table:name="46.XXX.XXX.64" table:display="true" table:show-details="true"/>
                <table:data-pilot-member table:name="46.XXX.XXX.66" table:display="true" table:show-details="true"/>
                <table:data-pilot-member table:name="46.XXX.XXX.73" table:display="true" table:show-details="true"/>
                <table:data-pilot-member table:name="46.XXX.XXX.79" table:display="true" table:show-details="true"/>
                <table:data-pilot-member table:name="46.XXX.XXX.8" table:display="true" table:show-details="true"/>
                <table:data-pilot-member table:name="46.XXX.XXX.81" table:display="true" table:show-details="true"/>
                <table:data-pilot-member table:name="46.XXX.XXX.X00" table:display="true" table:show-details="true"/>
                <table:data-pilot-member table:name="46.XXX.XXX.X02" table:display="true" table:show-details="true"/>
                <table:data-pilot-member table:name="46.XXX.XXX.X09" table:display="true" table:show-details="true"/>
                <table:data-pilot-member table:name="46.XXX.XXX.X14" table:display="true" table:show-details="true"/>
                <table:data-pilot-member table:name="46.XXX.XXX.X15" table:display="true" table:show-details="true"/>
                <table:data-pilot-member table:name="46.XXX.XXX.X16" table:display="true" table:show-details="true"/>
                <table:data-pilot-member table:name="46.XXX.XXX.X21" table:display="true" table:show-details="true"/>
                <table:data-pilot-member table:name="46.XXX.XXX.X22" table:display="true" table:show-details="true"/>
                <table:data-pilot-member table:name="46.XXX.XXX.X26" table:display="true" table:show-details="true"/>
                <table:data-pilot-member table:name="46.XXX.XXX.X30" table:display="true" table:show-details="true"/>
                <table:data-pilot-member table:name="46.XXX.XXX.X31" table:display="true" table:show-details="true"/>
                <table:data-pilot-member table:name="46.XXX.XXX.X33" table:display="true" table:show-details="true"/>
                <table:data-pilot-member table:name="46.XXX.XXX.X36" table:display="true" table:show-details="true"/>
                <table:data-pilot-member table:name="46.XXX.XXX.X39" table:display="true" table:show-details="true"/>
                <table:data-pilot-member table:name="46.XXX.XXX.X45" table:display="true" table:show-details="true"/>
                <table:data-pilot-member table:name="46.XXX.XXX.X49" table:display="true" table:show-details="true"/>
                <table:data-pilot-member table:name="46.XXX.XXX.X53" table:display="true" table:show-details="true"/>
                <table:data-pilot-member table:name="46.XXX.XXX.X54" table:display="true" table:show-details="true"/>
                <table:data-pilot-member table:name="46.XXX.XXX.X55" table:display="true" table:show-details="true"/>
                <table:data-pilot-member table:name="46.XXX.XXX.X57" table:display="true" table:show-details="true"/>
                <table:data-pilot-member table:name="46.XXX.XXX.X65" table:display="true" table:show-details="true"/>
                <table:data-pilot-member table:name="46.XXX.XXX.X68" table:display="true" table:show-details="true"/>
                <table:data-pilot-member table:name="46.XXX.XXX.X78" table:display="true" table:show-details="true"/>
                <table:data-pilot-member table:name="46.XXX.XXX.X79" table:display="true" table:show-details="true"/>
                <table:data-pilot-member table:name="46.XXX.XXX.X88" table:display="true" table:show-details="true"/>
                <table:data-pilot-member table:name="46.XXX.XXX.X89" table:display="true" table:show-details="true"/>
                <table:data-pilot-member table:name="5.XXX.XXX.10" table:display="true" table:show-details="true"/>
                <table:data-pilot-member table:name="5.XXX.XXX.12" table:display="true" table:show-details="true"/>
                <table:data-pilot-member table:name="5.XXX.XXX.16" table:display="true" table:show-details="true"/>
                <table:data-pilot-member table:name="5.XXX.XXX.17" table:display="true" table:show-details="true"/>
                <table:data-pilot-member table:name="5.XXX.XXX.2" table:display="true" table:show-details="true"/>
                <table:data-pilot-member table:name="5.XXX.XXX.25" table:display="true" table:show-details="true"/>
                <table:data-pilot-member table:name="5.XXX.XXX.26" table:display="true" table:show-details="true"/>
                <table:data-pilot-member table:name="5.XXX.XXX.30" table:display="true" table:show-details="true"/>
                <table:data-pilot-member table:name="5.XXX.XXX.31" table:display="true" table:show-details="true"/>
                <table:data-pilot-member table:name="5.XXX.XXX.34" table:display="true" table:show-details="true"/>
                <table:data-pilot-member table:name="5.XXX.XXX.35" table:display="true" table:show-details="true"/>
                <table:data-pilot-member table:name="5.XXX.XXX.36" table:display="true" table:show-details="true"/>
                <table:data-pilot-member table:name="5.XXX.XXX.39" table:display="true" table:show-details="true"/>
                <table:data-pilot-member table:name="5.XXX.XXX.45" table:display="true" table:show-details="true"/>
                <table:data-pilot-member table:name="5.XXX.XXX.5" table:display="true" table:show-details="true"/>
                <table:data-pilot-member table:name="5.XXX.XXX.51" table:display="true" table:show-details="true"/>
                <table:data-pilot-member table:name="5.XXX.XXX.60" table:display="true" table:show-details="true"/>
                <table:data-pilot-member table:name="5.XXX.XXX.61" table:display="true" table:show-details="true"/>
                <table:data-pilot-member table:name="5.XXX.XXX.64" table:display="true" table:show-details="true"/>
                <table:data-pilot-member table:name="5.XXX.XXX.68" table:display="true" table:show-details="true"/>
                <table:data-pilot-member table:name="5.XXX.XXX.77" table:display="true" table:show-details="true"/>
                <table:data-pilot-member table:name="5.XXX.XXX.82" table:display="true" table:show-details="true"/>
                <table:data-pilot-member table:name="5.XXX.XXX.87" table:display="true" table:show-details="true"/>
                <table:data-pilot-member table:name="5.XXX.XXX.89" table:display="true" table:show-details="true"/>
                <table:data-pilot-member table:name="5.XXX.XXX.97" table:display="true" table:show-details="true"/>
                <table:data-pilot-member table:name="5.XXX.XXX.98" table:display="true" table:show-details="true"/>
                <table:data-pilot-member table:name="5.XXX.XXX.X16" table:display="true" table:show-details="true"/>
                <table:data-pilot-member table:name="5.XXX.XXX.X18" table:display="true" table:show-details="true"/>
                <table:data-pilot-member table:name="5.XXX.XXX.X25" table:display="true" table:show-details="true"/>
                <table:data-pilot-member table:name="5.XXX.XXX.X33" table:display="true" table:show-details="true"/>
                <table:data-pilot-member table:name="5.XXX.XXX.X41" table:display="true" table:show-details="true"/>
                <table:data-pilot-member table:name="5.XXX.XXX.X54" table:display="true" table:show-details="true"/>
                <table:data-pilot-member table:name="5.XXX.XXX.X58" table:display="true" table:show-details="true"/>
                <table:data-pilot-member table:name="5.XXX.XXX.X64" table:display="true" table:show-details="true"/>
                <table:data-pilot-member table:name="5.XXX.XXX.X76" table:display="true" table:show-details="true"/>
                <table:data-pilot-member table:name="5.XXX.XXX.X93" table:display="true" table:show-details="true"/>
                <table:data-pilot-member table:name="62.XXX.XXX.39" table:display="true" table:show-details="true"/>
                <table:data-pilot-member table:name="62.XXX.XXX.41" table:display="true" table:show-details="true"/>
                <table:data-pilot-member table:name="62.XXX.XXX.X47" table:display="true" table:show-details="true"/>
                <table:data-pilot-member table:name="62.XXX.XXX.X51" table:display="true" table:show-details="true"/>
                <table:data-pilot-member table:name="66.XXX.XXX.65" table:display="true" table:show-details="true"/>
                <table:data-pilot-member table:name="66.XXX.XXX.67" table:display="true" table:show-details="true"/>
                <table:data-pilot-member table:name="66.XXX.XXX.68" table:display="true" table:show-details="true"/>
                <table:data-pilot-member table:name="77.XXX.XXX.13" table:display="true" table:show-details="true"/>
                <table:data-pilot-member table:name="77.XXX.XXX.18" table:display="true" table:show-details="true"/>
                <table:data-pilot-member table:name="77.XXX.XXX.19" table:display="true" table:show-details="true"/>
                <table:data-pilot-member table:name="77.XXX.XXX.20" table:display="true" table:show-details="true"/>
                <table:data-pilot-member table:name="77.XXX.XXX.22" table:display="true" table:show-details="true"/>
                <table:data-pilot-member table:name="77.XXX.XXX.27" table:display="true" table:show-details="true"/>
                <table:data-pilot-member table:name="77.XXX.XXX.32" table:display="true" table:show-details="true"/>
                <table:data-pilot-member table:name="77.XXX.XXX.33" table:display="true" table:show-details="true"/>
                <table:data-pilot-member table:name="77.XXX.XXX.39" table:display="true" table:show-details="true"/>
                <table:data-pilot-member table:name="77.XXX.XXX.42" table:display="true" table:show-details="true"/>
                <table:data-pilot-member table:name="77.XXX.XXX.50" table:display="true" table:show-details="true"/>
                <table:data-pilot-member table:name="77.XXX.XXX.51" table:display="true" table:show-details="true"/>
                <table:data-pilot-member table:name="77.XXX.XXX.59" table:display="true" table:show-details="true"/>
                <table:data-pilot-member table:name="77.XXX.XXX.77" table:display="true" table:show-details="true"/>
                <table:data-pilot-member table:name="77.XXX.XXX.8" table:display="true" table:show-details="true"/>
                <table:data-pilot-member table:name="77.XXX.XXX.81" table:display="true" table:show-details="true"/>
                <table:data-pilot-member table:name="77.XXX.XXX.9" table:display="true" table:show-details="true"/>
                <table:data-pilot-member table:name="77.XXX.XXX.X02" table:display="true" table:show-details="true"/>
                <table:data-pilot-member table:name="77.XXX.XXX.X04" table:display="true" table:show-details="true"/>
                <table:data-pilot-member table:name="77.XXX.XXX.X12" table:display="true" table:show-details="true"/>
                <table:data-pilot-member table:name="77.XXX.XXX.X30" table:display="true" table:show-details="true"/>
                <table:data-pilot-member table:name="77.XXX.XXX.X36" table:display="true" table:show-details="true"/>
                <table:data-pilot-member table:name="77.XXX.XXX.X39" table:display="true" table:show-details="true"/>
                <table:data-pilot-member table:name="77.XXX.XXX.X44" table:display="true" table:show-details="true"/>
                <table:data-pilot-member table:name="77.XXX.XXX.X54" table:display="true" table:show-details="true"/>
                <table:data-pilot-member table:name="77.XXX.XXX.X87" table:display="true" table:show-details="true"/>
                <table:data-pilot-member table:name="77.XXX.XXX.X90" table:display="true" table:show-details="true"/>
                <table:data-pilot-member table:name="77.XXX.XXX.X94" table:display="true" table:show-details="true"/>
                <table:data-pilot-member table:name="78.XXX.XXX.1" table:display="true" table:show-details="true"/>
                <table:data-pilot-member table:name="78.XXX.XXX.27" table:display="true" table:show-details="true"/>
                <table:data-pilot-member table:name="78.XXX.XXX.60" table:display="true" table:show-details="true"/>
                <table:data-pilot-member table:name="78.XXX.XXX.73" table:display="true" table:show-details="true"/>
                <table:data-pilot-member table:name="78.XXX.XXX.89" table:display="true" table:show-details="true"/>
                <table:data-pilot-member table:name="78.XXX.XXX.X03" table:display="true" table:show-details="true"/>
                <table:data-pilot-member table:name="78.XXX.XXX.X31" table:display="true" table:show-details="true"/>
                <table:data-pilot-member table:name="78.XXX.XXX.X35" table:display="true" table:show-details="true"/>
                <table:data-pilot-member table:name="78.XXX.XXX.X41" table:display="true" table:show-details="true"/>
                <table:data-pilot-member table:name="78.XXX.XXX.X45" table:display="true" table:show-details="true"/>
                <table:data-pilot-member table:name="78.XXX.XXX.X48" table:display="true" table:show-details="true"/>
                <table:data-pilot-member table:name="78.XXX.XXX.X53" table:display="true" table:show-details="true"/>
                <table:data-pilot-member table:name="78.XXX.XXX.X62" table:display="true" table:show-details="true"/>
                <table:data-pilot-member table:name="79.XXX.XXX.13" table:display="true" table:show-details="true"/>
                <table:data-pilot-member table:name="79.XXX.XXX.18" table:display="true" table:show-details="true"/>
                <table:data-pilot-member table:name="79.XXX.XXX.23" table:display="true" table:show-details="true"/>
                <table:data-pilot-member table:name="79.XXX.XXX.39" table:display="true" table:show-details="true"/>
                <table:data-pilot-member table:name="79.XXX.XXX.46" table:display="true" table:show-details="true"/>
                <table:data-pilot-member table:name="79.XXX.XXX.60" table:display="true" table:show-details="true"/>
                <table:data-pilot-member table:name="79.XXX.XXX.61" table:display="true" table:show-details="true"/>
                <table:data-pilot-member table:name="79.XXX.XXX.63" table:display="true" table:show-details="true"/>
                <table:data-pilot-member table:name="79.XXX.XXX.77" table:display="true" table:show-details="true"/>
                <table:data-pilot-member table:name="79.XXX.XXX.82" table:display="true" table:show-details="true"/>
                <table:data-pilot-member table:name="79.XXX.XXX.89" table:display="true" table:show-details="true"/>
                <table:data-pilot-member table:name="79.XXX.XXX.91" table:display="true" table:show-details="true"/>
                <table:data-pilot-member table:name="79.XXX.XXX.95" table:display="true" table:show-details="true"/>
                <table:data-pilot-member table:name="79.XXX.XXX.X05" table:display="true" table:show-details="true"/>
                <table:data-pilot-member table:name="79.XXX.XXX.X06" table:display="true" table:show-details="true"/>
                <table:data-pilot-member table:name="79.XXX.XXX.X14" table:display="true" table:show-details="true"/>
                <table:data-pilot-member table:name="79.XXX.XXX.X21" table:display="true" table:show-details="true"/>
                <table:data-pilot-member table:name="79.XXX.XXX.X29" table:display="true" table:show-details="true"/>
                <table:data-pilot-member table:name="79.XXX.XXX.X32" table:display="true" table:show-details="true"/>
                <table:data-pilot-member table:name="79.XXX.XXX.X35" table:display="true" table:show-details="true"/>
                <table:data-pilot-member table:name="79.XXX.XXX.X39" table:display="true" table:show-details="true"/>
                <table:data-pilot-member table:name="79.XXX.XXX.X46" table:display="true" table:show-details="true"/>
                <table:data-pilot-member table:name="79.XXX.XXX.X47" table:display="true" table:show-details="true"/>
                <table:data-pilot-member table:name="79.XXX.XXX.X56" table:display="true" table:show-details="true"/>
                <table:data-pilot-member table:name="79.XXX.XXX.X88" table:display="true" table:show-details="true"/>
                <table:data-pilot-member table:name="79.XXX.XXX.X89" table:display="true" table:show-details="true"/>
                <table:data-pilot-member table:name="80.XXX.XXX.10" table:display="true" table:show-details="true"/>
                <table:data-pilot-member table:name="80.XXX.XXX.43" table:display="true" table:show-details="true"/>
                <table:data-pilot-member table:name="80.XXX.XXX.46" table:display="true" table:show-details="true"/>
                <table:data-pilot-member table:name="80.XXX.XXX.68" table:display="true" table:show-details="true"/>
                <table:data-pilot-member table:name="80.XXX.XXX.X41" table:display="true" table:show-details="true"/>
                <table:data-pilot-member table:name="80.XXX.XXX.X49" table:display="true" table:show-details="true"/>
                <table:data-pilot-member table:name="81.XXX.XXX.13" table:display="true" table:show-details="true"/>
                <table:data-pilot-member table:name="81.XXX.XXX.9" table:display="true" table:show-details="true"/>
                <table:data-pilot-member table:name="81.XXX.XXX.X17" table:display="true" table:show-details="true"/>
                <table:data-pilot-member table:name="82.XXX.XXX.24" table:display="true" table:show-details="true"/>
                <table:data-pilot-member table:name="82.XXX.XXX.54" table:display="true" table:show-details="true"/>
                <table:data-pilot-member table:name="82.XXX.XXX.X31" table:display="true" table:show-details="true"/>
                <table:data-pilot-member table:name="82.XXX.XXX.X97" table:display="true" table:show-details="true"/>
                <table:data-pilot-member table:name="82.XXX.XXX.X98" table:display="true" table:show-details="true"/>
                <table:data-pilot-member table:name="83.XXX.XXX.1" table:display="true" table:show-details="true"/>
                <table:data-pilot-member table:name="83.XXX.XXX.11" table:display="true" table:show-details="true"/>
                <table:data-pilot-member table:name="83.XXX.XXX.14" table:display="true" table:show-details="true"/>
                <table:data-pilot-member table:name="83.XXX.XXX.15" table:display="true" table:show-details="true"/>
                <table:data-pilot-member table:name="83.XXX.XXX.16" table:display="true" table:show-details="true"/>
                <table:data-pilot-member table:name="83.XXX.XXX.20" table:display="true" table:show-details="true"/>
                <table:data-pilot-member table:name="83.XXX.XXX.21" table:display="true" table:show-details="true"/>
                <table:data-pilot-member table:name="83.XXX.XXX.23" table:display="true" table:show-details="true"/>
                <table:data-pilot-member table:name="83.XXX.XXX.25" table:display="true" table:show-details="true"/>
                <table:data-pilot-member table:name="83.XXX.XXX.26" table:display="true" table:show-details="true"/>
                <table:data-pilot-member table:name="83.XXX.XXX.31" table:display="true" table:show-details="true"/>
                <table:data-pilot-member table:name="83.XXX.XXX.34" table:display="true" table:show-details="true"/>
                <table:data-pilot-member table:name="83.XXX.XXX.36" table:display="true" table:show-details="true"/>
                <table:data-pilot-member table:name="83.XXX.XXX.37" table:display="true" table:show-details="true"/>
                <table:data-pilot-member table:name="83.XXX.XXX.39" table:display="true" table:show-details="true"/>
                <table:data-pilot-member table:name="83.XXX.XXX.4" table:display="true" table:show-details="true"/>
                <table:data-pilot-member table:name="83.XXX.XXX.42" table:display="true" table:show-details="true"/>
                <table:data-pilot-member table:name="83.XXX.XXX.56" table:display="true" table:show-details="true"/>
                <table:data-pilot-member table:name="83.XXX.XXX.57" table:display="true" table:show-details="true"/>
                <table:data-pilot-member table:name="83.XXX.XXX.58" table:display="true" table:show-details="true"/>
                <table:data-pilot-member table:name="83.XXX.XXX.70" table:display="true" table:show-details="true"/>
                <table:data-pilot-member table:name="83.XXX.XXX.71" table:display="true" table:show-details="true"/>
                <table:data-pilot-member table:name="83.XXX.XXX.72" table:display="true" table:show-details="true"/>
                <table:data-pilot-member table:name="83.XXX.XXX.76" table:display="true" table:show-details="true"/>
                <table:data-pilot-member table:name="83.XXX.XXX.79" table:display="true" table:show-details="true"/>
                <table:data-pilot-member table:name="83.XXX.XXX.81" table:display="true" table:show-details="true"/>
                <table:data-pilot-member table:name="83.XXX.XXX.84" table:display="true" table:show-details="true"/>
                <table:data-pilot-member table:name="83.XXX.XXX.88" table:display="true" table:show-details="true"/>
                <table:data-pilot-member table:name="83.XXX.XXX.89" table:display="true" table:show-details="true"/>
                <table:data-pilot-member table:name="83.XXX.XXX.90" table:display="true" table:show-details="true"/>
                <table:data-pilot-member table:name="83.XXX.XXX.93" table:display="true" table:show-details="true"/>
                <table:data-pilot-member table:name="83.XXX.XXX.94" table:display="true" table:show-details="true"/>
                <table:data-pilot-member table:name="83.XXX.XXX.97" table:display="true" table:show-details="true"/>
                <table:data-pilot-member table:name="83.XXX.XXX.X01" table:display="true" table:show-details="true"/>
                <table:data-pilot-member table:name="83.XXX.XXX.X03" table:display="true" table:show-details="true"/>
                <table:data-pilot-member table:name="83.XXX.XXX.X05" table:display="true" table:show-details="true"/>
                <table:data-pilot-member table:name="83.XXX.XXX.X11" table:display="true" table:show-details="true"/>
                <table:data-pilot-member table:name="83.XXX.XXX.X14" table:display="true" table:show-details="true"/>
                <table:data-pilot-member table:name="83.XXX.XXX.X15" table:display="true" table:show-details="true"/>
                <table:data-pilot-member table:name="83.XXX.XXX.X16" table:display="true" table:show-details="true"/>
                <table:data-pilot-member table:name="83.XXX.XXX.X17" table:display="true" table:show-details="true"/>
                <table:data-pilot-member table:name="83.XXX.XXX.X20" table:display="true" table:show-details="true"/>
                <table:data-pilot-member table:name="83.XXX.XXX.X22" table:display="true" table:show-details="true"/>
                <table:data-pilot-member table:name="83.XXX.XXX.X23" table:display="true" table:show-details="true"/>
                <table:data-pilot-member table:name="83.XXX.XXX.X24" table:display="true" table:show-details="true"/>
                <table:data-pilot-member table:name="83.XXX.XXX.X25" table:display="true" table:show-details="true"/>
                <table:data-pilot-member table:name="83.XXX.XXX.X27" table:display="true" table:show-details="true"/>
                <table:data-pilot-member table:name="83.XXX.XXX.X30" table:display="true" table:show-details="true"/>
                <table:data-pilot-member table:name="83.XXX.XXX.X32" table:display="true" table:show-details="true"/>
                <table:data-pilot-member table:name="83.XXX.XXX.X33" table:display="true" table:show-details="true"/>
                <table:data-pilot-member table:name="83.XXX.XXX.X35" table:display="true" table:show-details="true"/>
                <table:data-pilot-member table:name="83.XXX.XXX.X36" table:display="true" table:show-details="true"/>
                <table:data-pilot-member table:name="83.XXX.XXX.X40" table:display="true" table:show-details="true"/>
                <table:data-pilot-member table:name="83.XXX.XXX.X43" table:display="true" table:show-details="true"/>
                <table:data-pilot-member table:name="83.XXX.XXX.X50" table:display="true" table:show-details="true"/>
                <table:data-pilot-member table:name="83.XXX.XXX.X51" table:display="true" table:show-details="true"/>
                <table:data-pilot-member table:name="83.XXX.XXX.X52" table:display="true" table:show-details="true"/>
                <table:data-pilot-member table:name="83.XXX.XXX.X55" table:display="true" table:show-details="true"/>
                <table:data-pilot-member table:name="83.XXX.XXX.X57" table:display="true" table:show-details="true"/>
                <table:data-pilot-member table:name="83.XXX.XXX.X69" table:display="true" table:show-details="true"/>
                <table:data-pilot-member table:name="83.XXX.XXX.X71" table:display="true" table:show-details="true"/>
                <table:data-pilot-member table:name="83.XXX.XXX.X78" table:display="true" table:show-details="true"/>
                <table:data-pilot-member table:name="83.XXX.XXX.X82" table:display="true" table:show-details="true"/>
                <table:data-pilot-member table:name="83.XXX.XXX.X87" table:display="true" table:show-details="true"/>
                <table:data-pilot-member table:name="83.XXX.XXX.X90" table:display="true" table:show-details="true"/>
                <table:data-pilot-member table:name="83.XXX.XXX.X97" table:display="true" table:show-details="true"/>
                <table:data-pilot-member table:name="83.XXX.XXX.X98" table:display="true" table:show-details="true"/>
                <table:data-pilot-member table:name="84.XXX.XXX.37" table:display="true" table:show-details="true"/>
                <table:data-pilot-member table:name="84.XXX.XXX.41" table:display="true" table:show-details="true"/>
                <table:data-pilot-member table:name="84.XXX.XXX.69" table:display="true" table:show-details="true"/>
                <table:data-pilot-member table:name="84.XXX.XXX.72" table:display="true" table:show-details="true"/>
                <table:data-pilot-member table:name="84.XXX.XXX.X01" table:display="true" table:show-details="true"/>
                <table:data-pilot-member table:name="84.XXX.XXX.X16" table:display="true" table:show-details="true"/>
                <table:data-pilot-member table:name="84.XXX.XXX.X23" table:display="true" table:show-details="true"/>
                <table:data-pilot-member table:name="84.XXX.XXX.X26" table:display="true" table:show-details="true"/>
                <table:data-pilot-member table:name="84.XXX.XXX.X30" table:display="true" table:show-details="true"/>
                <table:data-pilot-member table:name="84.XXX.XXX.X37" table:display="true" table:show-details="true"/>
                <table:data-pilot-member table:name="84.XXX.XXX.X40" table:display="true" table:show-details="true"/>
                <table:data-pilot-member table:name="84.XXX.XXX.X46" table:display="true" table:show-details="true"/>
                <table:data-pilot-member table:name="84.XXX.XXX.X48" table:display="true" table:show-details="true"/>
                <table:data-pilot-member table:name="84.XXX.XXX.X49" table:display="true" table:show-details="true"/>
                <table:data-pilot-member table:name="84.XXX.XXX.X57" table:display="true" table:show-details="true"/>
                <table:data-pilot-member table:name="84.XXX.XXX.X73" table:display="true" table:show-details="true"/>
                <table:data-pilot-member table:name="84.XXX.XXX.X83" table:display="true" table:show-details="true"/>
                <table:data-pilot-member table:name="84.XXX.XXX.X98" table:display="true" table:show-details="true"/>
                <table:data-pilot-member table:name="85.XXX.XXX.78" table:display="true" table:show-details="true"/>
                <table:data-pilot-member table:name="85.XXX.XXX.X02" table:display="true" table:show-details="true"/>
                <table:data-pilot-member table:name="85.XXX.XXX.X15" table:display="true" table:show-details="true"/>
                <table:data-pilot-member table:name="85.XXX.XXX.X29" table:display="true" table:show-details="true"/>
                <table:data-pilot-member table:name="85.XXX.XXX.X34" table:display="true" table:show-details="true"/>
                <table:data-pilot-member table:name="85.XXX.XXX.X41" table:display="true" table:show-details="true"/>
                <table:data-pilot-member table:name="85.XXX.XXX.X55" table:display="true" table:show-details="true"/>
                <table:data-pilot-member table:name="85.XXX.XXX.X63" table:display="true" table:show-details="true"/>
                <table:data-pilot-member table:name="85.XXX.XXX.X68" table:display="true" table:show-details="true"/>
                <table:data-pilot-member table:name="85.XXX.XXX.X70" table:display="true" table:show-details="true"/>
                <table:data-pilot-member table:name="86.XXX.XXX.X31" table:display="true" table:show-details="true"/>
                <table:data-pilot-member table:name="87.XXX.XXX.34" table:display="true" table:show-details="true"/>
                <table:data-pilot-member table:name="87.XXX.XXX.43" table:display="true" table:show-details="true"/>
                <table:data-pilot-member table:name="87.XXX.XXX.X06" table:display="true" table:show-details="true"/>
                <table:data-pilot-member table:name="87.XXX.XXX.X20" table:display="true" table:show-details="true"/>
                <table:data-pilot-member table:name="87.XXX.XXX.X46" table:display="true" table:show-details="true"/>
                <table:data-pilot-member table:name="87.XXX.XXX.X76" table:display="true" table:show-details="true"/>
                <table:data-pilot-member table:name="88.XXX.XXX.10" table:display="true" table:show-details="true"/>
                <table:data-pilot-member table:name="88.XXX.XXX.25" table:display="true" table:show-details="true"/>
                <table:data-pilot-member table:name="88.XXX.XXX.3" table:display="true" table:show-details="true"/>
                <table:data-pilot-member table:name="88.XXX.XXX.7" table:display="true" table:show-details="true"/>
                <table:data-pilot-member table:name="88.XXX.XXX.85" table:display="true" table:show-details="true"/>
                <table:data-pilot-member table:name="88.XXX.XXX.X41" table:display="true" table:show-details="true"/>
                <table:data-pilot-member table:name="88.XXX.XXX.X53" table:display="true" table:show-details="true"/>
                <table:data-pilot-member table:name="88.XXX.XXX.X72" table:display="true" table:show-details="true"/>
                <table:data-pilot-member table:name="89.XXX.XXX.12" table:display="true" table:show-details="true"/>
                <table:data-pilot-member table:name="89.XXX.XXX.18" table:display="true" table:show-details="true"/>
                <table:data-pilot-member table:name="89.XXX.XXX.2" table:display="true" table:show-details="true"/>
                <table:data-pilot-member table:name="89.XXX.XXX.43" table:display="true" table:show-details="true"/>
                <table:data-pilot-member table:name="89.XXX.XXX.49" table:display="true" table:show-details="true"/>
                <table:data-pilot-member table:name="89.XXX.XXX.5" table:display="true" table:show-details="true"/>
                <table:data-pilot-member table:name="89.XXX.XXX.69" table:display="true" table:show-details="true"/>
                <table:data-pilot-member table:name="89.XXX.XXX.71" table:display="true" table:show-details="true"/>
                <table:data-pilot-member table:name="89.XXX.XXX.75" table:display="true" table:show-details="true"/>
                <table:data-pilot-member table:name="89.XXX.XXX.83" table:display="true" table:show-details="true"/>
                <table:data-pilot-member table:name="89.XXX.XXX.X00" table:display="true" table:show-details="true"/>
                <table:data-pilot-member table:name="89.XXX.XXX.X01" table:display="true" table:show-details="true"/>
                <table:data-pilot-member table:name="89.XXX.XXX.X03" table:display="true" table:show-details="true"/>
                <table:data-pilot-member table:name="89.XXX.XXX.X05" table:display="true" table:show-details="true"/>
                <table:data-pilot-member table:name="89.XXX.XXX.X06" table:display="true" table:show-details="true"/>
                <table:data-pilot-member table:name="89.XXX.XXX.X10" table:display="true" table:show-details="true"/>
                <table:data-pilot-member table:name="89.XXX.XXX.X11" table:display="true" table:show-details="true"/>
                <table:data-pilot-member table:name="89.XXX.XXX.X15" table:display="true" table:show-details="true"/>
                <table:data-pilot-member table:name="89.XXX.XXX.X19" table:display="true" table:show-details="true"/>
                <table:data-pilot-member table:name="89.XXX.XXX.X20" table:display="true" table:show-details="true"/>
                <table:data-pilot-member table:name="89.XXX.XXX.X22" table:display="true" table:show-details="true"/>
                <table:data-pilot-member table:name="89.XXX.XXX.X23" table:display="true" table:show-details="true"/>
                <table:data-pilot-member table:name="89.XXX.XXX.X32" table:display="true" table:show-details="true"/>
                <table:data-pilot-member table:name="89.XXX.XXX.X39" table:display="true" table:show-details="true"/>
                <table:data-pilot-member table:name="89.XXX.XXX.X49" table:display="true" table:show-details="true"/>
                <table:data-pilot-member table:name="89.XXX.XXX.X50" table:display="true" table:show-details="true"/>
                <table:data-pilot-member table:name="89.XXX.XXX.X51" table:display="true" table:show-details="true"/>
                <table:data-pilot-member table:name="89.XXX.XXX.X52" table:display="true" table:show-details="true"/>
                <table:data-pilot-member table:name="89.XXX.XXX.X55" table:display="true" table:show-details="true"/>
                <table:data-pilot-member table:name="89.XXX.XXX.X56" table:display="true" table:show-details="true"/>
                <table:data-pilot-member table:name="89.XXX.XXX.X60" table:display="true" table:show-details="true"/>
                <table:data-pilot-member table:name="89.XXX.XXX.X61" table:display="true" table:show-details="true"/>
                <table:data-pilot-member table:name="89.XXX.XXX.X62" table:display="true" table:show-details="true"/>
                <table:data-pilot-member table:name="89.XXX.XXX.X72" table:display="true" table:show-details="true"/>
                <table:data-pilot-member table:name="89.XXX.XXX.X80" table:display="true" table:show-details="true"/>
                <table:data-pilot-member table:name="89.XXX.XXX.X85" table:display="true" table:show-details="true"/>
                <table:data-pilot-member table:name="89.XXX.XXX.X87" table:display="true" table:show-details="true"/>
                <table:data-pilot-member table:name="89.XXX.XXX.X98" table:display="true" table:show-details="true"/>
                <table:data-pilot-member table:name="90.XXX.XXX.X53" table:display="true" table:show-details="true"/>
                <table:data-pilot-member table:name="91.XXX.XXX.11" table:display="true" table:show-details="true"/>
                <table:data-pilot-member table:name="91.XXX.XXX.12" table:display="true" table:show-details="true"/>
                <table:data-pilot-member table:name="91.XXX.XXX.18" table:display="true" table:show-details="true"/>
                <table:data-pilot-member table:name="91.XXX.XXX.32" table:display="true" table:show-details="true"/>
                <table:data-pilot-member table:name="91.XXX.XXX.35" table:display="true" table:show-details="true"/>
                <table:data-pilot-member table:name="91.XXX.XXX.37" table:display="true" table:show-details="true"/>
                <table:data-pilot-member table:name="91.XXX.XXX.38" table:display="true" table:show-details="true"/>
                <table:data-pilot-member table:name="91.XXX.XXX.42" table:display="true" table:show-details="true"/>
                <table:data-pilot-member table:name="91.XXX.XXX.46" table:display="true" table:show-details="true"/>
                <table:data-pilot-member table:name="91.XXX.XXX.48" table:display="true" table:show-details="true"/>
                <table:data-pilot-member table:name="91.XXX.XXX.52" table:display="true" table:show-details="true"/>
                <table:data-pilot-member table:name="91.XXX.XXX.61" table:display="true" table:show-details="true"/>
                <table:data-pilot-member table:name="91.XXX.XXX.65" table:display="true" table:show-details="true"/>
                <table:data-pilot-member table:name="91.XXX.XXX.66" table:display="true" table:show-details="true"/>
                <table:data-pilot-member table:name="91.XXX.XXX.68" table:display="true" table:show-details="true"/>
                <table:data-pilot-member table:name="91.XXX.XXX.73" table:display="true" table:show-details="true"/>
                <table:data-pilot-member table:name="91.XXX.XXX.75" table:display="true" table:show-details="true"/>
                <table:data-pilot-member table:name="91.XXX.XXX.76" table:display="true" table:show-details="true"/>
                <table:data-pilot-member table:name="91.XXX.XXX.78" table:display="true" table:show-details="true"/>
                <table:data-pilot-member table:name="91.XXX.XXX.8" table:display="true" table:show-details="true"/>
                <table:data-pilot-member table:name="91.XXX.XXX.98" table:display="true" table:show-details="true"/>
                <table:data-pilot-member table:name="91.XXX.XXX.X00" table:display="true" table:show-details="true"/>
                <table:data-pilot-member table:name="91.XXX.XXX.X05" table:display="true" table:show-details="true"/>
                <table:data-pilot-member table:name="91.XXX.XXX.X14" table:display="true" table:show-details="true"/>
                <table:data-pilot-member table:name="91.XXX.XXX.X17" table:display="true" table:show-details="true"/>
                <table:data-pilot-member table:name="91.XXX.XXX.X25" table:display="true" table:show-details="true"/>
                <table:data-pilot-member table:name="91.XXX.XXX.X28" table:display="true" table:show-details="true"/>
                <table:data-pilot-member table:name="91.XXX.XXX.X30" table:display="true" table:show-details="true"/>
                <table:data-pilot-member table:name="91.XXX.XXX.X31" table:display="true" table:show-details="true"/>
                <table:data-pilot-member table:name="91.XXX.XXX.X32" table:display="true" table:show-details="true"/>
                <table:data-pilot-member table:name="91.XXX.XXX.X33" table:display="true" table:show-details="true"/>
                <table:data-pilot-member table:name="91.XXX.XXX.X34" table:display="true" table:show-details="true"/>
                <table:data-pilot-member table:name="91.XXX.XXX.X38" table:display="true" table:show-details="true"/>
                <table:data-pilot-member table:name="91.XXX.XXX.X39" table:display="true" table:show-details="true"/>
                <table:data-pilot-member table:name="91.XXX.XXX.X41" table:display="true" table:show-details="true"/>
                <table:data-pilot-member table:name="91.XXX.XXX.X42" table:display="true" table:show-details="true"/>
                <table:data-pilot-member table:name="91.XXX.XXX.X44" table:display="true" table:show-details="true"/>
                <table:data-pilot-member table:name="91.XXX.XXX.X50" table:display="true" table:show-details="true"/>
                <table:data-pilot-member table:name="91.XXX.XXX.X52" table:display="true" table:show-details="true"/>
                <table:data-pilot-member table:name="91.XXX.XXX.X58" table:display="true" table:show-details="true"/>
                <table:data-pilot-member table:name="91.XXX.XXX.X61" table:display="true" table:show-details="true"/>
                <table:data-pilot-member table:name="91.XXX.XXX.X65" table:display="true" table:show-details="true"/>
                <table:data-pilot-member table:name="91.XXX.XXX.X67" table:display="true" table:show-details="true"/>
                <table:data-pilot-member table:name="91.XXX.XXX.X73" table:display="true" table:show-details="true"/>
                <table:data-pilot-member table:name="91.XXX.XXX.X79" table:display="true" table:show-details="true"/>
                <table:data-pilot-member table:name="91.XXX.XXX.X85" table:display="true" table:show-details="true"/>
                <table:data-pilot-member table:name="91.XXX.XXX.X92" table:display="true" table:show-details="true"/>
                <table:data-pilot-member table:name="91.XXX.XXX.X94" table:display="true" table:show-details="true"/>
                <table:data-pilot-member table:name="91.XXX.XXX.X95" table:display="true" table:show-details="true"/>
                <table:data-pilot-member table:name="92.XXX.XXX.17" table:display="true" table:show-details="true"/>
                <table:data-pilot-member table:name="92.XXX.XXX.83" table:display="true" table:show-details="true"/>
                <table:data-pilot-member table:name="92.XXX.XXX.X10" table:display="true" table:show-details="true"/>
                <table:data-pilot-member table:name="92.XXX.XXX.X46" table:display="true" table:show-details="true"/>
                <table:data-pilot-member table:name="93.XXX.XXX.2" table:display="true" table:show-details="true"/>
                <table:data-pilot-member table:name="93.XXX.XXX.32" table:display="true" table:show-details="true"/>
                <table:data-pilot-member table:name="93.XXX.XXX.4" table:display="true" table:show-details="true"/>
                <table:data-pilot-member table:name="93.XXX.XXX.50" table:display="true" table:show-details="true"/>
                <table:data-pilot-member table:name="93.XXX.XXX.53" table:display="true" table:show-details="true"/>
                <table:data-pilot-member table:name="93.XXX.XXX.56" table:display="true" table:show-details="true"/>
                <table:data-pilot-member table:name="93.XXX.XXX.6" table:display="true" table:show-details="true"/>
                <table:data-pilot-member table:name="93.XXX.XXX.74" table:display="true" table:show-details="true"/>
                <table:data-pilot-member table:name="93.XXX.XXX.96" table:display="true" table:show-details="true"/>
                <table:data-pilot-member table:name="93.XXX.XXX.X12" table:display="true" table:show-details="true"/>
                <table:data-pilot-member table:name="93.XXX.XXX.X25" table:display="true" table:show-details="true"/>
                <table:data-pilot-member table:name="93.XXX.XXX.X26" table:display="true" table:show-details="true"/>
                <table:data-pilot-member table:name="93.XXX.XXX.X27" table:display="true" table:show-details="true"/>
                <table:data-pilot-member table:name="93.XXX.XXX.X29" table:display="true" table:show-details="true"/>
                <table:data-pilot-member table:name="93.XXX.XXX.X42" table:display="true" table:show-details="true"/>
                <table:data-pilot-member table:name="93.XXX.XXX.X52" table:display="true" table:show-details="true"/>
                <table:data-pilot-member table:name="93.XXX.XXX.X54" table:display="true" table:show-details="true"/>
                <table:data-pilot-member table:name="93.XXX.XXX.X77" table:display="true" table:show-details="true"/>
                <table:data-pilot-member table:name="93.XXX.XXX.X88" table:display="true" table:show-details="true"/>
                <table:data-pilot-member table:name="94.XXX.XXX.13" table:display="true" table:show-details="true"/>
                <table:data-pilot-member table:name="94.XXX.XXX.39" table:display="true" table:show-details="true"/>
                <table:data-pilot-member table:name="94.XXX.XXX.4" table:display="true" table:show-details="true"/>
                <table:data-pilot-member table:name="94.XXX.XXX.63" table:display="true" table:show-details="true"/>
                <table:data-pilot-member table:name="94.XXX.XXX.7" table:display="true" table:show-details="true"/>
                <table:data-pilot-member table:name="94.XXX.XXX.8" table:display="true" table:show-details="true"/>
                <table:data-pilot-member table:name="94.XXX.XXX.91" table:display="true" table:show-details="true"/>
                <table:data-pilot-member table:name="94.XXX.XXX.96" table:display="true" table:show-details="true"/>
                <table:data-pilot-member table:name="94.XXX.XXX.X06" table:display="true" table:show-details="true"/>
                <table:data-pilot-member table:name="94.XXX.XXX.X26" table:display="true" table:show-details="true"/>
                <table:data-pilot-member table:name="94.XXX.XXX.X33" table:display="true" table:show-details="true"/>
                <table:data-pilot-member table:name="94.XXX.XXX.X44" table:display="true" table:show-details="true"/>
                <table:data-pilot-member table:name="94.XXX.XXX.X45" table:display="true" table:show-details="true"/>
                <table:data-pilot-member table:name="94.XXX.XXX.X87" table:display="true" table:show-details="true"/>
                <table:data-pilot-member table:name="95.XXX.XXX.17" table:display="true" table:show-details="true"/>
                <table:data-pilot-member table:name="95.XXX.XXX.30" table:display="true" table:show-details="true"/>
                <table:data-pilot-member table:name="95.XXX.XXX.43" table:display="true" table:show-details="true"/>
                <table:data-pilot-member table:name="95.XXX.XXX.63" table:display="true" table:show-details="true"/>
                <table:data-pilot-member table:name="95.XXX.XXX.64" table:display="true" table:show-details="true"/>
                <table:data-pilot-member table:name="95.XXX.XXX.81" table:display="true" table:show-details="true"/>
                <table:data-pilot-member table:name="95.XXX.XXX.X03" table:display="true" table:show-details="true"/>
                <table:data-pilot-member table:name="95.XXX.XXX.X10" table:display="true" table:show-details="true"/>
                <table:data-pilot-member table:name="95.XXX.XXX.X15" table:display="true" table:show-details="true"/>
                <table:data-pilot-member table:name="95.XXX.XXX.X24" table:display="true" table:show-details="true"/>
                <table:data-pilot-member table:name="95.XXX.XXX.X41" table:display="true" table:show-details="true"/>
                <table:data-pilot-member table:name="95.XXX.XXX.X73" table:display="true" table:show-details="true"/>
                <table:data-pilot-member table:name="95.XXX.XXX.X94" table:display="true" table:show-details="true"/>
                <table:data-pilot-member table:name="IP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 6" table:orientation="hidden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  <table:data-pilot-member table:name="Kampania_BidBo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Produkt" table:orientation="row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  <table:data-pilot-member table:name="4 Liver 45kaps. Colfarm" table:display="true" table:show-details="true"/>
                <table:data-pilot-member table:name="4Lacti Baby krople 5 ml" table:display="true" table:show-details="true"/>
                <table:data-pilot-member table:name="A-DERMA DERMALIBOUR+ CICA- Krem regenerujący 100ml" table:display="true" table:show-details="true"/>
                <table:data-pilot-member table:name="A-DERMA DERMALIBOUR+ CICA- Krem regenerujący 50ml" table:display="true" table:show-details="true"/>
                <table:data-pilot-member table:name="A-Derma Zestaw Exomega Control Zestaw: Balsam Emolient 200Ml + Olejek Emolient 100Ml" table:display="true" table:show-details="true"/>
                <table:data-pilot-member table:name="AFLOFARM Nivelium med krem dermatologiczny 250ml" table:display="true" table:show-details="true"/>
                <table:data-pilot-member table:name="ALLEVYN NON ADHESIVE Opatrunek hydropolowy 20x20cm" table:display="true" table:show-details="true"/>
                <table:data-pilot-member table:name="ALLEVYN NON-ADHESIVE opatrunek 10x10cm - 1 sztuka" table:display="true" table:show-details="true"/>
                <table:data-pilot-member table:name="ALOEPANTEN ŻEL DO PIELĘGNACJI SKÓRY SUCHEJ I WRAŻLIWEJ 40G" table:display="true" table:show-details="true"/>
                <table:data-pilot-member table:name="ANNA Wazelina kosmetyczna z witaminami A+E 50g" table:display="true" table:show-details="true"/>
                <table:data-pilot-member table:name="APAP Ból i Gorączka C Plus 10 tab. mus." table:display="true" table:show-details="true"/>
                <table:data-pilot-member table:name="AVENE BARDZO WYSOKA OCHRONA CLEANANCE Koloryzujący SPF50+ 50ml" table:display="true" table:show-details="true"/>
                <table:data-pilot-member table:name="Abbott Freestyle Libre 2 Sensor 1szt." table:display="true" table:show-details="true"/>
                <table:data-pilot-member table:name="Accu-Check Active" table:display="true" table:show-details="true"/>
                <table:data-pilot-member table:name="Accu-Chek Nakłuwacz FastClix + 6 lancetów" table:display="true" table:show-details="true"/>
                <table:data-pilot-member table:name="AeroChamber Plus Flow-Vu komora inhalacyjna z ustnikiem po 5 roku życia niebieska" table:display="true" table:show-details="true"/>
                <table:data-pilot-member table:name="Akutol Opatrunek plaster w sprayu 60ml" table:display="true" table:show-details="true"/>
                <table:data-pilot-member table:name="Alfofarm Sora Med płyn do zwalczania wszawicy 100ml" table:display="true" table:show-details="true"/>
                <table:data-pilot-member table:name="Alka-Seltzer 324 mg tabletki musujące 10 szt." table:display="true" table:show-details="true"/>
                <table:data-pilot-member table:name="Allergika Krem na powieki MED 15ml" table:display="true" table:show-details="true"/>
                <table:data-pilot-member table:name="Allergika, Krem do twarzy MED, 50 ml" table:display="true" table:show-details="true"/>
                <table:data-pilot-member table:name="Alugastrin 40 tabletek" table:display="true" table:show-details="true"/>
                <table:data-pilot-member table:name="Amaderm Szampon Przeciwłupieżowy 150ml" table:display="true" table:show-details="true"/>
                <table:data-pilot-member table:name="Amara Cynkokrem Go! 50ml" table:display="true" table:show-details="true"/>
                <table:data-pilot-member table:name="Anty Kleszcz Przyrząd Do Usuwania Kleszczy 1szt." table:display="true" table:show-details="true"/>
                <table:data-pilot-member table:name="Aqua Gel opatrunek hydrożelowy 10x12cm 1 szt." table:display="true" table:show-details="true"/>
                <table:data-pilot-member table:name="ArgenTussin Gardło, smak miętowo-cytrynowy 16 pastylek" table:display="true" table:show-details="true"/>
                <table:data-pilot-member table:name="Aronta 30 tabl" table:display="true" table:show-details="true"/>
                <table:data-pilot-member table:name="Aspirin 500mg 10 tabletek" table:display="true" table:show-details="true"/>
                <table:data-pilot-member table:name="Aspirin Cardio 100mg 28 tabl" table:display="true" table:show-details="true"/>
                <table:data-pilot-member table:name="Avene COLD CREAM Krem 40ml" table:display="true" table:show-details="true"/>
                <table:data-pilot-member table:name="Avene Dermabsolu Krem Na Noc 50ml + Pod Oczy 15ml" table:display="true" table:show-details="true"/>
                <table:data-pilot-member table:name="Avene HYALURON ACTIV B3 Krem odbudowujący komórki 50ml" table:display="true" table:show-details="true"/>
                <table:data-pilot-member table:name="Avene HYDRANCE Krem nawilżający bogata konsystencja 40ml" table:display="true" table:show-details="true"/>
                <table:data-pilot-member table:name="Avene HYDRANCE UV Lekki krem nawilżający SPF 30 40ml" table:display="true" table:show-details="true"/>
                <table:data-pilot-member table:name="Avene Hyaluron Activ B3 Krem Na Noc 50ml + Pod Oczy 15ml" table:display="true" table:show-details="true"/>
                <table:data-pilot-member table:name="Avene Sunsimed Ka Bardzo Wysoka Ochrona 80ml" table:display="true" table:show-details="true"/>
                <table:data-pilot-member table:name="Avene XERACALM NUTRITION Balsam nawilżający 200 ml" table:display="true" table:show-details="true"/>
                <table:data-pilot-member table:name="Avene Xeracalm A.D Krem uzupełniający lipidy 400ml" table:display="true" table:show-details="true"/>
                <table:data-pilot-member table:name="Avène Dermabsolu Redensifying Day Cream Krem  Modelujący Na Dzień Przeciw Zmarszczkom 50Ml" table:display="true" table:show-details="true"/>
                <table:data-pilot-member table:name="BACTIGRAS Opatrunek Gazowy Nasączony Parafiną I Chlorheksydyną 10cm x 10cm 10szt." table:display="true" table:show-details="true"/>
                <table:data-pilot-member table:name="BACTIGRAS Opatrunek parafinowy z chlorhexydyną  5cm * 5cm" table:display="true" table:show-details="true"/>
                <table:data-pilot-member table:name="BODYMAX PLUS Multiwitamina Odporność Energia 200 tab." table:display="true" table:show-details="true"/>
                <table:data-pilot-member table:name="BONIMED Pectobonisol 40gram" table:display="true" table:show-details="true"/>
                <table:data-pilot-member table:name="Balsam Koński-Żel chłodzący 500ml /Jardin Naturel/" table:display="true" table:show-details="true"/>
                <table:data-pilot-member table:name="Bd Becton Dickinson Becton Dickinson Igły Do Pena 100Szt. 0.23X4Mm 32G" table:display="true" table:show-details="true"/>
                <table:data-pilot-member table:name="Bebilon HMF Wzmacniacz mleka kobiecego 50x1g" table:display="true" table:show-details="true"/>
                <table:data-pilot-member table:name="Bebilon Nenatal Premium Płyn 24X70Ml" table:display="true" table:show-details="true"/>
                <table:data-pilot-member table:name="Bebon Colica! kateter rektalny na kolkę dla niemowląt 5 szt." table:display="true" table:show-details="true"/>
                <table:data-pilot-member table:name="Berimal Forte 60kaps." table:display="true" table:show-details="true"/>
                <table:data-pilot-member table:name="Biobaby Dentinox Żel Na Ząbkowanie Łagodzący" table:display="true" table:show-details="true"/>
                <table:data-pilot-member table:name="Bioderma Atoderm Intensive Żel Oczyszczający I Natłuszczający 1000ml" table:display="true" table:show-details="true"/>
                <table:data-pilot-member table:name="Biofarm Vigalex D3 + K2 Max 60 tabl." table:display="true" table:show-details="true"/>
                <table:data-pilot-member table:name="Biolevox HA 2,2% 2 ml żel dostawowy, 1 ampułkostrzykawka" table:display="true" table:show-details="true"/>
                <table:data-pilot-member table:name="Biovena Health Panthenol Krem 30g" table:display="true" table:show-details="true"/>
                <table:data-pilot-member table:name="Biovital Odporność Spray 10ml" table:display="true" table:show-details="true"/>
                <table:data-pilot-member table:name="Bisacodyl VP 5 mg 30 tabletek dojelitowych" table:display="true" table:show-details="true"/>
                <table:data-pilot-member table:name="Blephasol Płyn Micelarny Do Wrażliwych Powiek 100ml" table:display="true" table:show-details="true"/>
                <table:data-pilot-member table:name="Boiron Argentum Nitricum 15CH 4 g" table:display="true" table:show-details="true"/>
                <table:data-pilot-member table:name="Bonatium Karczoch 60 tabletek powlekanych" table:display="true" table:show-details="true"/>
                <table:data-pilot-member table:name="Bonimed Gastrobon Na Trawienie Zioła Ojca Grzegorza 60kaps." table:display="true" table:show-details="true"/>
                <table:data-pilot-member table:name="Borowina Lecznicza Pasta 1 Kg" table:display="true" table:show-details="true"/>
                <table:data-pilot-member table:name="Butosept Zestaw Do Dezynfekcji Stosowany Przy Grzybicy Stóp (Płyn 100Ml + Zasypka Dezynfekcyjna 50G)" table:display="true" table:show-details="true"/>
                <table:data-pilot-member table:name="Błonnik dla dzieci + probiotyki 100 g" table:display="true" table:show-details="true"/>
                <table:data-pilot-member table:name="CAUDALIE PREMIER CRU RICHE Krem o bogatej konsystencji Anti - Age 50 ml" table:display="true" table:show-details="true"/>
                <table:data-pilot-member table:name="CAUDALIE Samoopalające krople brązujące 15 ml" table:display="true" table:show-details="true"/>
                <table:data-pilot-member table:name="CLARITINE ALLERGY SYROP 60ML" table:display="true" table:show-details="true"/>
                <table:data-pilot-member table:name="CLARVOX Complex Spray do gardła, 30ml" table:display="true" table:show-details="true"/>
                <table:data-pilot-member table:name="CLARVOX Porzeczka 36 past." table:display="true" table:show-details="true"/>
                <table:data-pilot-member table:name="CLIMAFEM Plus 30 tabl." table:display="true" table:show-details="true"/>
                <table:data-pilot-member table:name="CONTROLY SMARKACZ Aspirator kataru dla dzieci, 1 szt." table:display="true" table:show-details="true"/>
                <table:data-pilot-member table:name="CONVATEC LTD. CONVATEC LTD. GRANUFLEX EXTRA THIN Opatrunek hydrokoloidowy 10cm x 10cm 1 szt." table:display="true" table:show-details="true"/>
                <table:data-pilot-member table:name="Caudalie Vinoperfect Glikolowy Krem Rozjaśniający na Noc Refill, 50ml" table:display="true" table:show-details="true"/>
                <table:data-pilot-member table:name="Caudalie Vinoperfect Krem na Przebarwienia z Niacynamidem Refill, 50ml" table:display="true" table:show-details="true"/>
                <table:data-pilot-member table:name="Caudalie Vinoperfect Radiance Serum Complexion Correcting Serum Rozjaśniające Przebarwienia 30 ml" table:display="true" table:show-details="true"/>
                <table:data-pilot-member table:name="Caudalie Vinoperfect Zestaw Wiosenny - Serum Rozjaśniające, 30ml + Krem na Dzień, 15ml + Krem na Noc, 15ml" table:display="true" table:show-details="true"/>
                <table:data-pilot-member table:name="Caudalie Vinopure Fluid matująco nawilżający 60 ml" table:display="true" table:show-details="true"/>
                <table:data-pilot-member table:name="Caudalie Vinopure Zestaw Startowy dla Skóry Trądzikowej" table:display="true" table:show-details="true"/>
                <table:data-pilot-member table:name="Caudalie Vinosun Protect Spf 30 Krem O Wysokiej Ochronie 50 ml" table:display="true" table:show-details="true"/>
                <table:data-pilot-member table:name="CeraVe Regenerujący krem do rąk 50ml" table:display="true" table:show-details="true"/>
                <table:data-pilot-member table:name="Cetaphil Pro Redness Control krem nawilżający na noc 50ml" table:display="true" table:show-details="true"/>
                <table:data-pilot-member table:name="Cetip 10 tabl." table:display="true" table:show-details="true"/>
                <table:data-pilot-member table:name="Cewnik Foleya urologiczny silikonowy CH 16/10ml Romed" table:display="true" table:show-details="true"/>
                <table:data-pilot-member table:name="Chema-Elektromet Atopigo koncentrat do koncentrat do kąpieli 100g" table:display="true" table:show-details="true"/>
                <table:data-pilot-member table:name="Cholinex Pastylki do ssania w stanach zapalnych gardła i jamy ustnej 16 szt." table:display="true" table:show-details="true"/>
                <table:data-pilot-member table:name="Clotrimazolum Krem przeciwgrzybiczy 10mg/g 20g" table:display="true" table:show-details="true"/>
                <table:data-pilot-member table:name="Contractubex 50g" table:display="true" table:show-details="true"/>
                <table:data-pilot-member table:name="Convatec Granuflex Obramowany Bordered Opatrunek Hydrokoloidowy 6X6Cm 1Szt" table:display="true" table:show-details="true"/>
                <table:data-pilot-member table:name="Czarnuszka 500Mg 60 Kaps" table:display="true" table:show-details="true"/>
                <table:data-pilot-member table:name="DIAGNOSTIC NC300" table:display="true" table:show-details="true"/>
                <table:data-pilot-member table:name="DUCRAY ANACAPS Reactiv, 3x30kapsułek" table:display="true" table:show-details="true"/>
                <table:data-pilot-member table:name="DUCRAY DEXYANE MED Wyrób medyczny krem kojąco-regenerujący 100ml" table:display="true" table:show-details="true"/>
                <table:data-pilot-member table:name="DUCRAY DEXYANE MED Wyrób medyczny krem kojąco-regenerujący 30ml" table:display="true" table:show-details="true"/>
                <table:data-pilot-member table:name="DUCRAY KERACNYL Repair Balsam do ust 15ml" table:display="true" table:show-details="true"/>
                <table:data-pilot-member table:name="Daktarin 20mg/g, krem 30g" table:display="true" table:show-details="true"/>
                <table:data-pilot-member table:name="Daopro 30 Minitabl. Dojelitowych" table:display="true" table:show-details="true"/>
                <table:data-pilot-member table:name="Delfarma Skinscabin Płyn 120ml" table:display="true" table:show-details="true"/>
                <table:data-pilot-member table:name="Dentbox pudełko na protezy zębowe" table:display="true" table:show-details="true"/>
                <table:data-pilot-member table:name="Depan 01004011" table:display="true" table:show-details="true"/>
                <table:data-pilot-member table:name="Dermedic Sunbrella Fotostabilny Krem Ochronny Do Twarzy SPF50+ Skóra tłusta i mieszana 50 g" table:display="true" table:show-details="true"/>
                <table:data-pilot-member table:name="Dexak 25mg 30 tabletek" table:display="true" table:show-details="true"/>
                <table:data-pilot-member table:name="Dexak SL 25mg granulat 10 saszetek" table:display="true" table:show-details="true"/>
                <table:data-pilot-member table:name="Dexak SL 25mg granulat 20 saszetek" table:display="true" table:show-details="true"/>
                <table:data-pilot-member table:name="Diaderma Olejek Marchewkowy Do Utrwalania Opalenizny 30 ml" table:display="true" table:show-details="true"/>
                <table:data-pilot-member table:name="Diagnosis TEST OWULACYJNY LH VITAM X 5 SzT" table:display="true" table:show-details="true"/>
                <table:data-pilot-member table:name="Diagnosis Zasilacz do ciśnieniomierzy AND" table:display="true" table:show-details="true"/>
                <table:data-pilot-member table:name="Diagnosis Zestaw Akcesoriów Do Inhalacji Dla Dorosłych Z Regulacją Wielkości Cząsteczek" table:display="true" table:show-details="true"/>
                <table:data-pilot-member table:name="Diagnostic Inhalator PRO Mesh" table:display="true" table:show-details="true"/>
                <table:data-pilot-member table:name="Drula Extra Forte krem depigmentacyjny 30ml" table:display="true" table:show-details="true"/>
                <table:data-pilot-member table:name="Ducray Keracnyl Reapir Krem Odbudowujący 50ml" table:display="true" table:show-details="true"/>
                <table:data-pilot-member table:name="Dulcobis Lek Na Zaparcia 5mg 40tabl." table:display="true" table:show-details="true"/>
                <table:data-pilot-member table:name="Dulcobis czopki na zaparcia 6 szt." table:display="true" table:show-details="true"/>
                <table:data-pilot-member table:name="ECTOGEL Żel do oczu z ektoiną 10ml" table:display="true" table:show-details="true"/>
                <table:data-pilot-member table:name="EctoAlerg krople do oczu 10ml" table:display="true" table:show-details="true"/>
                <table:data-pilot-member table:name="Elissa Maść majerankowa 25g" table:display="true" table:show-details="true"/>
                <table:data-pilot-member table:name="Eloderm Krem od 1. dnia życia 75 ml" table:display="true" table:show-details="true"/>
                <table:data-pilot-member table:name="Eloderm Szampon od 1. dnia życia 200ml" table:display="true" table:show-details="true"/>
                <table:data-pilot-member table:name="Emolium A -Topic Trójaktywna emulsja do ciała do skóry atopowej, 200 ml" table:display="true" table:show-details="true"/>
                <table:data-pilot-member table:name="Emolium DERMOCARE Emulsja na suchą skórę głowy 100ml" table:display="true" table:show-details="true"/>
                <table:data-pilot-member table:name="Emolium DERMOCARE Krem przeciw odparzeniom 75ml" table:display="true" table:show-details="true"/>
                <table:data-pilot-member table:name="Emolium Dermocare Nawilżający Olejek do mycia 400 ml" table:display="true" table:show-details="true"/>
                <table:data-pilot-member table:name="Emolium Dermocare emulsja do kąpieli 400ml" table:display="true" table:show-details="true"/>
                <table:data-pilot-member table:name="Emolium INTENSIVE Krem specjalny 75ml" table:display="true" table:show-details="true"/>
                <table:data-pilot-member table:name="Espumisan 40 Mg/Ml Krople Doustne Emulsja 30ml" table:display="true" table:show-details="true"/>
                <table:data-pilot-member table:name="Estabiom Junior 20kaps." table:display="true" table:show-details="true"/>
                <table:data-pilot-member table:name="Euphrasia Świetlik Krople Do Oczu 10ml" table:display="true" table:show-details="true"/>
                <table:data-pilot-member table:name="Eva/Qu czopki przeciw zaparciom 6 czopków" table:display="true" table:show-details="true"/>
                <table:data-pilot-member table:name="Excilor Leczenie grzybicy paznokci 3,3ml" table:display="true" table:show-details="true"/>
                <table:data-pilot-member table:name="FARMONA Jantar szampon enzymatyczny z wyciągiem z bursztynu 330ml" table:display="true" table:show-details="true"/>
                <table:data-pilot-member table:name="FUSSBAD Gehwol Sól ziołowa z lawendą do kąpieli stóp 10x20 g" table:display="true" table:show-details="true"/>
                <table:data-pilot-member table:name="Farmapia Maść Propolisowa Wspomagająca Gojenie Ran 7% 30g" table:display="true" table:show-details="true"/>
                <table:data-pilot-member table:name="Farmina Jodyna Hospital 800g" table:display="true" table:show-details="true"/>
                <table:data-pilot-member table:name="Feminum Nawilżający Żel Intymny 75g" table:display="true" table:show-details="true"/>
                <table:data-pilot-member table:name="Fenistil Krople doustne 1mg/1ml 20ml (Import równoległy)" table:display="true" table:show-details="true"/>
                <table:data-pilot-member table:name="Flos Ziele Macierzanki 50g" table:display="true" table:show-details="true"/>
                <table:data-pilot-member table:name="Flos: Brzoza liść (betulae folium) - 50g" table:display="true" table:show-details="true"/>
                <table:data-pilot-member table:name="Flos: Jemioła ziele (visci herba) - 50g" table:display="true" table:show-details="true"/>
                <table:data-pilot-member table:name="Fluimucil Forte 600mg 10tabl." table:display="true" table:show-details="true"/>
                <table:data-pilot-member table:name="Furaginum MAX 100 mg 30 tab." table:display="true" table:show-details="true"/>
                <table:data-pilot-member table:name="Fytofontana Gyntima Czopki Dopochwowe Probiotica 10szt." table:display="true" table:show-details="true"/>
                <table:data-pilot-member table:name="GORVITA Puder rodzinny pielęgnacyjny 50ml" table:display="true" table:show-details="true"/>
                <table:data-pilot-member table:name="Gal Tran 100kaps." table:display="true" table:show-details="true"/>
                <table:data-pilot-member table:name="Gelacet 120kaps." table:display="true" table:show-details="true"/>
                <table:data-pilot-member table:name="Genexo Ixell" table:display="true" table:show-details="true"/>
                <table:data-pilot-member table:name="Gensupen 2 wstrzykiwacz do insuliny  turkusowy 1szt." table:display="true" table:show-details="true"/>
                <table:data-pilot-member table:name="Go-On 25 Mg/2,5 ml Ampułko-Strzykawka 1 Szt." table:display="true" table:show-details="true"/>
                <table:data-pilot-member table:name="Goprazol Max 0,02g 14 kaps." table:display="true" table:show-details="true"/>
                <table:data-pilot-member table:name="Gorvita Babka Płesznik Mielona 150g" table:display="true" table:show-details="true"/>
                <table:data-pilot-member table:name="Gorvita Maść Rokitnikowa Z Ekstraktem Z Nagietka 140Ml" table:display="true" table:show-details="true"/>
                <table:data-pilot-member table:name="Gorvita Maść końska rozgrzewająca 250 ml" table:display="true" table:show-details="true"/>
                <table:data-pilot-member table:name="Gorvita Żel żywokostowy z jałowcem i MSM 200ml" table:display="true" table:show-details="true"/>
                <table:data-pilot-member table:name="Granudacyn Roztwór do płukania ran 1000 ml" table:display="true" table:show-details="true"/>
                <table:data-pilot-member table:name="Granuflex opatrunek hydrokoloidowy 20x20cm 1szt" table:display="true" table:show-details="true"/>
                <table:data-pilot-member table:name="Gynauxil 10 Globulek Dopochwowych" table:display="true" table:show-details="true"/>
                <table:data-pilot-member table:name="Gynoxin Optima 200mg 3kaps." table:display="true" table:show-details="true"/>
                <table:data-pilot-member table:name="Gynoxin Uno 0,6G 1kaps." table:display="true" table:show-details="true"/>
                <table:data-pilot-member table:name="Gynoxin Uno 1kaps." table:display="true" table:show-details="true"/>
                <table:data-pilot-member table:name="HASCO Maść tranowa 20g" table:display="true" table:show-details="true"/>
                <table:data-pilot-member table:name="HASCO VITAMINIUM A+E x 30 tabl. HASCO" table:display="true" table:show-details="true"/>
                <table:data-pilot-member table:name="HEEL Nervoheel N 50 tabl." table:display="true" table:show-details="true"/>
                <table:data-pilot-member table:name="HIRUPAR żel do nóg z wyciągiem z pijawek 100 g" table:display="true" table:show-details="true"/>
                <table:data-pilot-member table:name="HYDROCOLL Thin opatrunek hydrokoloidowy 10cmx10cm - 1 sztuka" table:display="true" table:show-details="true"/>
                <table:data-pilot-member table:name="HYDROCOLL opatrunek hydrokoloidowy jałowy 10cmx10cm - 1 sztuka" table:display="true" table:show-details="true"/>
                <table:data-pilot-member table:name="HYDROSAL 24 tabl. musujące" table:display="true" table:show-details="true"/>
                <table:data-pilot-member table:name="HYDROSLIMMER 30 tabl." table:display="true" table:show-details="true"/>
                <table:data-pilot-member table:name="Hartmann Atrauman Ag opatrunek z maścią 5cm x 5cm 1szt." table:display="true" table:show-details="true"/>
                <table:data-pilot-member table:name="Healing Herbal Szampon Leczniczy Przeciwłupieżowy 200ml" table:display="true" table:show-details="true"/>
                <table:data-pilot-member table:name="Heel-Nux Vomica krople zaburzenia żoładkowo jelitowe 30 ml" table:display="true" table:show-details="true"/>
                <table:data-pilot-member table:name="Hepa Complex 60tabl." table:display="true" table:show-details="true"/>
                <table:data-pilot-member table:name="Heparol 30tabl." table:display="true" table:show-details="true"/>
                <table:data-pilot-member table:name="Hevipoint Lek przeciw opryszczce warg i twarzy 30 tabletek" table:display="true" table:show-details="true"/>
                <table:data-pilot-member table:name="Hirudoid Żel na krwiaki i obrzęki oraz zapalenie żył 40 g" table:display="true" table:show-details="true"/>
                <table:data-pilot-member table:name="Hydronea Citron Baby 10sasz." table:display="true" table:show-details="true"/>
                <table:data-pilot-member table:name="IBUPROM REGULAR 10 tabl." table:display="true" table:show-details="true"/>
                <table:data-pilot-member table:name="Infarma Trading Atoxil Enterosorbent 10sasz." table:display="true" table:show-details="true"/>
                <table:data-pilot-member table:name="Inpharm Betadine Roztwór Na Skórę 0,1g/ml 30ml" table:display="true" table:show-details="true"/>
                <table:data-pilot-member table:name="Intec Medical Zestaw Akcesoriów Do Inhalatora Pro Intec Z Maską Dla Dzieci" table:display="true" table:show-details="true"/>
                <table:data-pilot-member table:name="Inversion Femme Complex 90kaps." table:display="true" table:show-details="true"/>
                <table:data-pilot-member table:name="Iwostin Capillin krem wzmacniający na naczynka SPF20 bogata konsystencja 40ml" table:display="true" table:show-details="true"/>
                <table:data-pilot-member table:name="Iwostin Hydro Sensitia Intensywnie nawilżające serum, 30 ml" table:display="true" table:show-details="true"/>
                <table:data-pilot-member table:name="Juvit Multi krople doustne 10ml" table:display="true" table:show-details="true"/>
                <table:data-pilot-member table:name="KARPAL AKUT maść, 50ml" table:display="true" table:show-details="true"/>
                <table:data-pilot-member table:name="KRAUTERHOF żel z żywokostem 250ml" table:display="true" table:show-details="true"/>
                <table:data-pilot-member table:name="Kailas Ajurwedyjski Krem Z Himalajskich Ziół Na Problemy Skórne 8 G" table:display="true" table:show-details="true"/>
                <table:data-pilot-member table:name="Kapsułki Herbapol na Uspokojenie 30 szt." table:display="true" table:show-details="true"/>
                <table:data-pilot-member table:name="Kebene Plus 20 tabl" table:display="true" table:show-details="true"/>
                <table:data-pilot-member table:name="Kej Gruszka z kanką nr 9" table:display="true" table:show-details="true"/>
                <table:data-pilot-member table:name="Ketoxin Forte Wzmacniający Szampon Przeciwłupieżowy 6 ml" table:display="true" table:show-details="true"/>
                <table:data-pilot-member table:name="Kikgel Microdacyn Hydrogel Żel Do Dezynfekcji Ran 60G" table:display="true" table:show-details="true"/>
                <table:data-pilot-member table:name="Klorane Chinina Zestaw Przeciw Wypadaniu Włosów – Szampon, 400 ml + Odżywka, 200 ml" table:display="true" table:show-details="true"/>
                <table:data-pilot-member table:name="Komfortowe Majteczki Jednorazowe Dla Kobiet Rozmiar 38 X 7 Sztuk" table:display="true" table:show-details="true"/>
                <table:data-pilot-member table:name="Komora inhalacyjna AeroChamber Plus Flow" table:display="true" table:show-details="true"/>
                <table:data-pilot-member table:name="Kosmed Spray Na Komary Kleszcze I Meszki Powyżej 1. Roku Życia 100ml" table:display="true" table:show-details="true"/>
                <table:data-pilot-member table:name="Krem ANIDA odżywczo-regenerujący olejek arganowy na dzień i noc 100ml" table:display="true" table:show-details="true"/>
                <table:data-pilot-member table:name="Krem Allergika z olejkiem z wiesiołka 20% na dzień i noc 100ml" table:display="true" table:show-details="true"/>
                <table:data-pilot-member table:name="Krem Avena Ochronny Z Witaminą A Tuba Na Dzień I Noc 25g" table:display="true" table:show-details="true"/>
                <table:data-pilot-member table:name="Krem Naturalis Wiesiołkowy Półtłusty na dzień i noc 50ml" table:display="true" table:show-details="true"/>
                <table:data-pilot-member table:name="Krem Nuxe Prodigieuse Florale Zestaw z kosmetyczką podróżną 2024" table:display="true" table:show-details="true"/>
                <table:data-pilot-member table:name="Krem ochronny z witaminą A 20g" table:display="true" table:show-details="true"/>
                <table:data-pilot-member table:name="Kropia Plus krople do oczu nawilżające 10ml" table:display="true" table:show-details="true"/>
                <table:data-pilot-member table:name="Krynica Zdrój Kryniczanka Lekko Gazowana 18 x 1,5L" table:display="true" table:show-details="true"/>
                <table:data-pilot-member table:name="LABORATORIA POLFA ŁÓDŹ SP. Z O.O. OPATRUNEK URGOCLEAN AG 10 X 10CM" table:display="true" table:show-details="true"/>
                <table:data-pilot-member table:name="LEHNING Urarthone krople 250 ml" table:display="true" table:show-details="true"/>
                <table:data-pilot-member table:name="La Roche-Posay Hyalu B5 Aquagel Żel Nawilżający Spf 30 50Ml" table:display="true" table:show-details="true"/>
                <table:data-pilot-member table:name="La Roche-Posay Toleriane Ultra Dermallergo serum nawilżająco-kojące do skóry wrażliwej i alergicznej 20 ml" table:display="true" table:show-details="true"/>
                <table:data-pilot-member table:name="Lactulose-MIP syrop 9,75g/15ml 1000ml" table:display="true" table:show-details="true"/>
                <table:data-pilot-member table:name="Lamisilatt Krem 10 mg/g 15g" table:display="true" table:show-details="true"/>
                <table:data-pilot-member table:name="Leukoplast Cuticell Paraffin Plaster Impregnowany Parafiną 5szt" table:display="true" table:show-details="true"/>
                <table:data-pilot-member table:name="Lisc senesu ziolo pojed. Kawon 50g" table:display="true" table:show-details="true"/>
                <table:data-pilot-member table:name="Livenorm 30kaps." table:display="true" table:show-details="true"/>
                <table:data-pilot-member table:name="MAŚĆ KOŃSKA chłodząca Dr.Natura 350g+150g" table:display="true" table:show-details="true"/>
                <table:data-pilot-member table:name="MED SYSTEM Pompka do baniek bezogniowych 1 szt." table:display="true" table:show-details="true"/>
                <table:data-pilot-member table:name="MULTIVITAMINUM AMS FORTE Tabletki zwiększony niedobór witamin 90tabl." table:display="true" table:show-details="true"/>
                <table:data-pilot-member table:name="MYLAN Legalon 140 20 kaps" table:display="true" table:show-details="true"/>
                <table:data-pilot-member table:name="Maga-Herba Benzyna apteczna, Maga-Herba, 100 ml" table:display="true" table:show-details="true"/>
                <table:data-pilot-member table:name="Maść Szałwiowa 25 G" table:display="true" table:show-details="true"/>
                <table:data-pilot-member table:name="Maść ichtiolowa 30g" table:display="true" table:show-details="true"/>
                <table:data-pilot-member table:name="Microlife MT 16C2" table:display="true" table:show-details="true"/>
                <table:data-pilot-member table:name="Microlife Termometr NC 200" table:display="true" table:show-details="true"/>
                <table:data-pilot-member table:name="Mieloguard Glyco 30 kaps." table:display="true" table:show-details="true"/>
                <table:data-pilot-member table:name="Miovelia Nac 15 kaps." table:display="true" table:show-details="true"/>
                <table:data-pilot-member table:name="Mosbito Opaska Odstraszająca Komary i Meszki 1szt" table:display="true" table:show-details="true"/>
                <table:data-pilot-member table:name="NESTLE NAN OPTIPRO Plus 1 HM-O Mleko Początkowe dla niemowląt od urodzenia 400g" table:display="true" table:show-details="true"/>
                <table:data-pilot-member table:name="NESTLE NAN OPTIPRO Plus 1 HM-O Mleko Początkowe dla niemowląt od urodzenia W Płynie 32x70ml" table:display="true" table:show-details="true"/>
                <table:data-pilot-member table:name="NIQUITIN przezroczysty, plastry transdermalne, 21 mg / 24 h, 7 szt" table:display="true" table:show-details="true"/>
                <table:data-pilot-member table:name="NORIS PHARMA Vitaprim D3 Forte 4000 + K2, 60 kaps. -&gt; Wysyłka w 24h już za 3,99zł! [Odbiór w Żabce]" table:display="true" table:show-details="true"/>
                <table:data-pilot-member table:name="NOVATIV Grinotussan syrop 120ml" table:display="true" table:show-details="true"/>
                <table:data-pilot-member table:name="Nakłuwacz AccuChek Softclix KIT + 25 lancetów" table:display="true" table:show-details="true"/>
                <table:data-pilot-member table:name="Natur C Active 500mg 100 tabletek" table:display="true" table:show-details="true"/>
                <table:data-pilot-member table:name="Natur Produkt Vedixin Intense 10ml" table:display="true" table:show-details="true"/>
                <table:data-pilot-member table:name="Natuwit, Olej z czarnuszki egipskiej 250ml" table:display="true" table:show-details="true"/>
                <table:data-pilot-member table:name="Nexon Pharma Islandzki Medic+ Spray Do Gardła Z Nanosrebrem 30ml" table:display="true" table:show-details="true"/>
                <table:data-pilot-member table:name="Niacynobaza 25% Skoncentrowane serum z niacynamidem 30g" table:display="true" table:show-details="true"/>
                <table:data-pilot-member table:name="Nizoral Krem 20mg/g 30 g" table:display="true" table:show-details="true"/>
                <table:data-pilot-member table:name="NordFarm Glukozamina 500 Plus 90tabl." table:display="true" table:show-details="true"/>
                <table:data-pilot-member table:name="Noris Pharma Enteroflor 20kaps." table:display="true" table:show-details="true"/>
                <table:data-pilot-member table:name="Nova T 380 Cu380Ag Wkładka Antykoncepcyjna 1szt." table:display="true" table:show-details="true"/>
                <table:data-pilot-member table:name="Nurofen Forte dla dzieci 200 mg/5 ml Zawiesina o smaku truskawkowym 150 ml" table:display="true" table:show-details="true"/>
                <table:data-pilot-member table:name="Nutramigen 3 LGG Complete proszek 400g" table:display="true" table:show-details="true"/>
                <table:data-pilot-member table:name="Nutricia Nutrison Protein Intense Butelka 500ml" table:display="true" table:show-details="true"/>
                <table:data-pilot-member table:name="Nutridrink preparat odżywczy smak owoce leśne 4x125ml" table:display="true" table:show-details="true"/>
                <table:data-pilot-member table:name="Nuxe Hair Prodigieux Odżywcza Maska 30ml + Nabłyszczający Szampon 50ml + Nabłyszczająca Odżywka 30ml" table:display="true" table:show-details="true"/>
                <table:data-pilot-member table:name="Nuxe Nuxuriance Gold Ultraodżywczy Krem Do Twarzy 50ml + Balsam Pod Oczy 15ml" table:display="true" table:show-details="true"/>
                <table:data-pilot-member table:name="Nuxe Zestaw - Huile Prodigieuse" table:display="true" table:show-details="true"/>
                <table:data-pilot-member table:name="OPTICall Plus maść na powieki 20 g" table:display="true" table:show-details="true"/>
                <table:data-pilot-member table:name="OROGERMINA Spray do gardła 1 zestaw" table:display="true" table:show-details="true"/>
                <table:data-pilot-member table:name="Obesimed Forte 42 kaps" table:display="true" table:show-details="true"/>
                <table:data-pilot-member table:name="Oktaseptal – aerozol z oktenidyną do dezynfekcji i odkażania ran, 250 ml" table:display="true" table:show-details="true"/>
                <table:data-pilot-member table:name="Omron M2+ Ciśnieniomierz naramienny HEM-7188" table:display="true" table:show-details="true"/>
                <table:data-pilot-member table:name="Omron M4 Intelli It" table:display="true" table:show-details="true"/>
                <table:data-pilot-member table:name="One Touch Delica Plus Lancety 100Szt." table:display="true" table:show-details="true"/>
                <table:data-pilot-member table:name="Opatr.AQUACEL Ag Foam 10x10cm nieprzyl.x1" table:display="true" table:show-details="true"/>
                <table:data-pilot-member table:name="Opatr.BACTIGRAS z chlorhex. 15x20 1 szt." table:display="true" table:show-details="true"/>
                <table:data-pilot-member table:name="Opatr.Vliwazell wysoce chłonny 10x20 25szt" table:display="true" table:show-details="true"/>
                <table:data-pilot-member table:name="Optive Fusion Krople Do Oczu 10ml" table:display="true" table:show-details="true"/>
                <table:data-pilot-member table:name="Orsalit tabs 24 tabl musujące + Magnez z wit.B6 10 tabl musujących" table:display="true" table:show-details="true"/>
                <table:data-pilot-member table:name="Oscillococcinum na przeziębienie i grypę 30 dawek x 1 g" table:display="true" table:show-details="true"/>
                <table:data-pilot-member table:name="Otinum 0,2g/g Krople Do Uszu 10g" table:display="true" table:show-details="true"/>
                <table:data-pilot-member table:name="Otrivin 1mg/ml 10ml" table:display="true" table:show-details="true"/>
                <table:data-pilot-member table:name="Otrivin Ipra Max 0,5mg + 0,6mg Aerozol do nosa 10ml" table:display="true" table:show-details="true"/>
                <table:data-pilot-member table:name="Otrivin Menthol 1mg/ml Aerozol do nosa 10 ml" table:display="true" table:show-details="true"/>
                <table:data-pilot-member table:name="Ozonella Oliwka Ozonowana 100 ml" table:display="true" table:show-details="true"/>
                <table:data-pilot-member table:name="PANI TERESA®  PT 0306 Opaska elastyczna stawu nadgarstkowego - krótka" table:display="true" table:show-details="true"/>
                <table:data-pilot-member table:name="PANI TERESA® CLASSIC PT 0403 Pończochy medyczne uciskowe 2 klasa kompresji (czubek otwarty, długie, beż, rozm. XL)" table:display="true" table:show-details="true"/>
                <table:data-pilot-member table:name="Pani Teresa Opaska Elastyczna Nadgarstek Długa M" table:display="true" table:show-details="true"/>
                <table:data-pilot-member table:name="Pantoprazol Teva 20 mg 14 tabl." table:display="true" table:show-details="true"/>
                <table:data-pilot-member table:name="Paraderm Psoric D krem 85 g" table:display="true" table:show-details="true"/>
                <table:data-pilot-member table:name="Paramedica Paraderm Forte Szampon Z Dziegciem Ichtiolem I Cyclopiroxem 150g" table:display="true" table:show-details="true"/>
                <table:data-pilot-member table:name="Paski One Touch Select test 50szt." table:display="true" table:show-details="true"/>
                <table:data-pilot-member table:name="Permen Med Forte Tabletki powlekane, na zaburzenia erekcji 4 szt." table:display="true" table:show-details="true"/>
                <table:data-pilot-member table:name="Pharmapoint Legalon 140, 20kaps" table:display="true" table:show-details="true"/>
                <table:data-pilot-member table:name="Pharmatech Olejek dla zakatarzonych 10ml" table:display="true" table:show-details="true"/>
                <table:data-pilot-member table:name="Pharmnew Urocal SD 40 tabletek" table:display="true" table:show-details="true"/>
                <table:data-pilot-member table:name="PhytoPharm Dentosept PEN ulga w bólu żel 3,3ml" table:display="true" table:show-details="true"/>
                <table:data-pilot-member table:name="Phytomedica Promyalgan 120tabl." table:display="true" table:show-details="true"/>
                <table:data-pilot-member table:name="Pierre Fabre Elgydium Pasta Do Zębów Z Kompleksem Fluorinol Protect + 75ml" table:display="true" table:show-details="true"/>
                <table:data-pilot-member table:name="Polcrom Krople do oczu 10ml 2x5ml" table:display="true" table:show-details="true"/>
                <table:data-pilot-member table:name="Polfarmex Calcifos 500 Mg X 150 Tabl" table:display="true" table:show-details="true"/>
                <table:data-pilot-member table:name="Polopiryna S 300mg 10 tabl." table:display="true" table:show-details="true"/>
                <table:data-pilot-member table:name="Pozytywne Konopie Maść Konopna Cbd 30ml" table:display="true" table:show-details="true"/>
                <table:data-pilot-member table:name="Primaflor Multi 10kaps." table:display="true" table:show-details="true"/>
                <table:data-pilot-member table:name="Procto-Glyvenol 30g" table:display="true" table:show-details="true"/>
                <table:data-pilot-member table:name="Proderma Mazidło Gojące Na Suchą Popękaną Skórę 30G" table:display="true" table:show-details="true"/>
                <table:data-pilot-member table:name="Produkt" table:display="true" table:show-details="true"/>
                <table:data-pilot-member table:name="Profarm - Olejek Manuka 10 ml." table:display="true" table:show-details="true"/>
                <table:data-pilot-member table:name="Proskin Lf 30szt." table:display="true" table:show-details="true"/>
                <table:data-pilot-member table:name="Prurifem Kadefarm 30ml" table:display="true" table:show-details="true"/>
                <table:data-pilot-member table:name="Puwer Slim Liver 30tabl." table:display="true" table:show-details="true"/>
                <table:data-pilot-member table:name="R-Flex Ultra Hydrolize 30sasz." table:display="true" table:show-details="true"/>
                <table:data-pilot-member table:name="Rabka Spa Minerale Spray Mgiełka Solankowa 200 ml" table:display="true" table:show-details="true"/>
                <table:data-pilot-member table:name="Rada Blistex Balsam Do Ust Nourish sztyft 3,7G" table:display="true" table:show-details="true"/>
                <table:data-pilot-member table:name="RatuŻel, 50ml" table:display="true" table:show-details="true"/>
                <table:data-pilot-member table:name="Reckitt Benckiser Nurofen Dla Dzieci Forte Trus 150ml" table:display="true" table:show-details="true"/>
                <table:data-pilot-member table:name="Regulobon Prosz. 200g" table:display="true" table:show-details="true"/>
                <table:data-pilot-member table:name="Rennie Antacidum Smak Miętowy 24 Tabl. Do Rozgryzania I Żucia Inpharm" table:display="true" table:show-details="true"/>
                <table:data-pilot-member table:name="Rennie Antiacidum o smaku miętowym 24 tabletki do ssania" table:display="true" table:show-details="true"/>
                <table:data-pilot-member table:name="Rennie Antiacidum o smaku miętowym 48 tabletek do ssania" table:display="true" table:show-details="true"/>
                <table:data-pilot-member table:name="Reprintic Krem ochronny do codziennej pielęgnacji tatuaży SPF 15 100 ml" table:display="true" table:show-details="true"/>
                <table:data-pilot-member table:name="Resvega 60 kaps." table:display="true" table:show-details="true"/>
                <table:data-pilot-member table:name="Roche Diabetes Care Paski Do Glukozy Accu Check Instant 100 szt" table:display="true" table:show-details="true"/>
                <table:data-pilot-member table:name="Romed Igła ROMED 0,5 x 16mm 100 szt." table:display="true" table:show-details="true"/>
                <table:data-pilot-member table:name="Romed Worek Na Mocz Ze Spustem 2,0 L 1 Szt" table:display="true" table:show-details="true"/>
                <table:data-pilot-member table:name="SIROWA POLAND SP. Z O.O. PIC OPTISOFT COMFORT PLASTER NA OKO 10 SZTUK" table:display="true" table:show-details="true"/>
                <table:data-pilot-member table:name="SOLGAR WITAMINY I MINERAŁY PRENATALNE 60 tabl" table:display="true" table:show-details="true"/>
                <table:data-pilot-member table:name="Salviafarm Żel z kasztanowcem na przemęczone nogi 200ml" table:display="true" table:show-details="true"/>
                <table:data-pilot-member table:name="Saridon 20 tabl" table:display="true" table:show-details="true"/>
                <table:data-pilot-member table:name="Schulke Octenident Mouthwash Płyn Do Higieny Jamy Ustnej 250ml" table:display="true" table:show-details="true"/>
                <table:data-pilot-member table:name="Seboradin Spray Odsiwiający Do Włosów Forte 200ml" table:display="true" table:show-details="true"/>
                <table:data-pilot-member table:name="Senes liść FIX 1 g 50 sasz." table:display="true" table:show-details="true"/>
                <table:data-pilot-member table:name="Skinoren Krem 30g" table:display="true" table:show-details="true"/>
                <table:data-pilot-member table:name="Skinsept Pur 1000ml" table:display="true" table:show-details="true"/>
                <table:data-pilot-member table:name="Skinsept Pur Płyn do odkażania skóry 350ml" table:display="true" table:show-details="true"/>
                <table:data-pilot-member table:name="Smith Nephew Bactigras z chlorhexyd. 15x20cm 10 szt." table:display="true" table:show-details="true"/>
                <table:data-pilot-member table:name="Softeye Duo Krople Do Oczu 10ml" table:display="true" table:show-details="true"/>
                <table:data-pilot-member table:name="Solinea Ferivag 14 Kaps Dopochwowe" table:display="true" table:show-details="true"/>
                <table:data-pilot-member table:name="Sora Protect - aerozol na włosy zapobiegający wszawicy 50ml" table:display="true" table:show-details="true"/>
                <table:data-pilot-member table:name="Stanmark Stopper MDW 11 1 szt." table:display="true" table:show-details="true"/>
                <table:data-pilot-member table:name="Stop Hemo Tampony hemostatyczne  5szt." table:display="true" table:show-details="true"/>
                <table:data-pilot-member table:name="Strzykawka Cewnikowa Janetta 50Ml" table:display="true" table:show-details="true"/>
                <table:data-pilot-member table:name="Sufrin 60tabl." table:display="true" table:show-details="true"/>
                <table:data-pilot-member table:name="Suplasyn 1-Shot 60 mg/6ml 1 ampułko-strzykawka" table:display="true" table:show-details="true"/>
                <table:data-pilot-member table:name="Sylimarol Gastro 30kaps." table:display="true" table:show-details="true"/>
                <table:data-pilot-member table:name="TZMO Pojemnik do dobowej zbiórki moczu tulipan 2,5 l" table:display="true" table:show-details="true"/>
                <table:data-pilot-member table:name="Tabletki MAGPRIM Skurcz 30 szt." table:display="true" table:show-details="true"/>
                <table:data-pilot-member table:name="Tabletki NEOSEN Forte 30 szt." table:display="true" table:show-details="true"/>
                <table:data-pilot-member table:name="Tabletki NervoCalm Forte 20 szt." table:display="true" table:show-details="true"/>
                <table:data-pilot-member table:name="Tabletki Neurotynox D 30 szt." table:display="true" table:show-details="true"/>
                <table:data-pilot-member table:name="Tabletki uspokajające AMS 30 szt." table:display="true" table:show-details="true"/>
                <table:data-pilot-member table:name="Tanakan 40 Mg 30 Tabl." table:display="true" table:show-details="true"/>
                <table:data-pilot-member table:name="Tanakan 90 tabletek" table:display="true" table:show-details="true"/>
                <table:data-pilot-member table:name="Tecweld Icemix sztuczny lód w aerozolu 400ml" table:display="true" table:show-details="true"/>
                <table:data-pilot-member table:name="Test OraQuick na obecność wirusa HIV" table:display="true" table:show-details="true"/>
                <table:data-pilot-member table:name="Tiorfan 10 kapsułek" table:display="true" table:show-details="true"/>
                <table:data-pilot-member table:name="Tisane FARM Żel propolisowy 6g" table:display="true" table:show-details="true"/>
                <table:data-pilot-member table:name="Tisane balsam do ust 4,7g" table:display="true" table:show-details="true"/>
                <table:data-pilot-member table:name="Travislim x 30tabl." table:display="true" table:show-details="true"/>
                <table:data-pilot-member table:name="Trb Chemedica Artivit 2x15 Fiolek" table:display="true" table:show-details="true"/>
                <table:data-pilot-member table:name="Triflora 40kaps." table:display="true" table:show-details="true"/>
                <table:data-pilot-member table:name="Troxerutin żel 0,02 g/1g 30g" table:display="true" table:show-details="true"/>
                <table:data-pilot-member table:name="UPSARIN C, 20 tabletek musujących" table:display="true" table:show-details="true"/>
                <table:data-pilot-member table:name="UROFEM Control 60 tabl." table:display="true" table:show-details="true"/>
                <table:data-pilot-member table:name="UROFEM Żurawina 60 tabl." table:display="true" table:show-details="true"/>
                <table:data-pilot-member table:name="Ultraflex 60kaps." table:display="true" table:show-details="true"/>
                <table:data-pilot-member table:name="Uniben Silver aerozol 30ml" table:display="true" table:show-details="true"/>
                <table:data-pilot-member table:name="Urgo Opryszczka 3ml" table:display="true" table:show-details="true"/>
                <table:data-pilot-member table:name="UroLact doustny Probiotyk Urologiczny 400mg, 10 kaps." table:display="true" table:show-details="true"/>
                <table:data-pilot-member table:name="Uzdrowisko Krynica Zdrój Kryniczanka lekko gazowana 0,5l" table:display="true" table:show-details="true"/>
                <table:data-pilot-member table:name="VIS Dolomit 0,5 g 100 tabletek" table:display="true" table:show-details="true"/>
                <table:data-pilot-member table:name="VITAPRIM Senior 60 tabl." table:display="true" table:show-details="true"/>
                <table:data-pilot-member table:name="VITTER Calcium z Vit. C FORTE o smaku pomarańczowym, 20 tab. musujących" table:display="true" table:show-details="true"/>
                <table:data-pilot-member table:name="Van Oostveen Medical Strzykawka Tuberkulinowa 1ml + Igła 0,3x13 Szt" table:display="true" table:show-details="true"/>
                <table:data-pilot-member table:name="Venoruton Gel 40 g" table:display="true" table:show-details="true"/>
                <table:data-pilot-member table:name="Verdin Fix Zioła Z Owocami Leśnymi 20 saszetek" table:display="true" table:show-details="true"/>
                <table:data-pilot-member table:name="Vichy Dercos Szampon Przeciwłupieżowy Włosy Suche Uzupełnienie 500ml" table:display="true" table:show-details="true"/>
                <table:data-pilot-member table:name="Vichy Neovadiol Magistral Zestaw Xmass 2025 (krem na dzień, 50 ml + krem na noc, 50 ml)" table:display="true" table:show-details="true"/>
                <table:data-pilot-member table:name="Vicks Vaporub maść 100g" table:display="true" table:show-details="true"/>
                <table:data-pilot-member table:name="Vigantol 10ml" table:display="true" table:show-details="true"/>
                <table:data-pilot-member table:name="Vinsvin Mydełko naturalne z nanosrebrem w płynie 500Ml" table:display="true" table:show-details="true"/>
                <table:data-pilot-member table:name="Vita-miner Prenatal 60 tabl" table:display="true" table:show-details="true"/>
                <table:data-pilot-member table:name="Vitrum D3 Forte 2000 J.M. 120 kaps." table:display="true" table:show-details="true"/>
                <table:data-pilot-member table:name="Vivomixx Mikrokapsułki 10 mld 30 kapsułek" table:display="true" table:show-details="true"/>
                <table:data-pilot-member table:name="Voltaren Emulgel 1% żel 0,01 g/g 100 g (Import równoległy)" table:display="true" table:show-details="true"/>
                <table:data-pilot-member table:name="Voltaren Emulgel 11,6mg/g żel 50g" table:display="true" table:show-details="true"/>
                <table:data-pilot-member table:name="WALMARK Omega 3-6-9 Kapsułki z kompleksem olejów rybiego, lnianego i z ogórecznika 30 szt." table:display="true" table:show-details="true"/>
                <table:data-pilot-member table:name="Wellion Symphar Test Paskowy 50 szt." table:display="true" table:show-details="true"/>
                <table:data-pilot-member table:name="XENNA balance 6 sasz." table:display="true" table:show-details="true"/>
                <table:data-pilot-member table:name="ZYSKAJ ZDROWIE Multioptic 30 tabl" table:display="true" table:show-details="true"/>
                <table:data-pilot-member table:name="Zambon Fluimucil Forte 600 Mg 10 Tabl." table:display="true" table:show-details="true"/>
                <table:data-pilot-member table:name="Zarys Worek Do Zbiórki Moczu Odpływ T 2l" table:display="true" table:show-details="true"/>
                <table:data-pilot-member table:name="Zatoxin Katar I Alergia Spray Do Nosa 30Ml" table:display="true" table:show-details="true"/>
                <table:data-pilot-member table:name="Ziaja Sopot Sun Krem Przeciw Zmarszczkom Spf30 60 ml" table:display="true" table:show-details="true"/>
                <table:data-pilot-member table:name="Zioł.Koszyczek Arniki zioło pojed. 25 g" table:display="true" table:show-details="true"/>
                <table:data-pilot-member table:name="Zioła Mnicha Na cholesterol 20tbx2g" table:display="true" table:show-details="true"/>
                <table:data-pilot-member table:name="Zioła Mnicha Na cukier 20tbx2g" table:display="true" table:show-details="true"/>
                <table:data-pilot-member table:name="Zioła Mnicha Na odchudzanie 20tbx2g" table:display="true" table:show-details="true"/>
                <table:data-pilot-member table:name="Zioła Mnicha Na trawienie 20tbx2g" table:display="true" table:show-details="true"/>
                <table:data-pilot-member table:name="Zoxin-med Szampon leczniczy przeciwłupieżowy 60ml" table:display="true" table:show-details="true"/>
                <table:data-pilot-member table:name="Zyskaj Zdrowie Magnez+B1 B6 B12 30 tabl." table:display="true" table:show-details="true"/>
                <table:data-pilot-member table:name="Zyskaj Zdrowie Żel kasztanowy z rutyną 350g" table:display="true" table:show-details="true"/>
                <table:data-pilot-member table:name="trilac 20 kaps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d_produktu_w_sklepie" table:orientation="row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  <table:data-pilot-member table:name="Id_produktu_w_sklepie" table:display="true" table:show-details="true"/>
                <table:data-pilot-member table:name="12" table:display="true" table:show-details="true"/>
                <table:data-pilot-member table:name="72" table:display="true" table:show-details="true"/>
                <table:data-pilot-member table:name="247" table:display="true" table:show-details="true"/>
                <table:data-pilot-member table:name="248" table:display="true" table:show-details="true"/>
                <table:data-pilot-member table:name="283" table:display="true" table:show-details="true"/>
                <table:data-pilot-member table:name="295" table:display="true" table:show-details="true"/>
                <table:data-pilot-member table:name="326" table:display="true" table:show-details="true"/>
                <table:data-pilot-member table:name="335" table:display="true" table:show-details="true"/>
                <table:data-pilot-member table:name="337" table:display="true" table:show-details="true"/>
                <table:data-pilot-member table:name="369" table:display="true" table:show-details="true"/>
                <table:data-pilot-member table:name="394" table:display="true" table:show-details="true"/>
                <table:data-pilot-member table:name="578" table:display="true" table:show-details="true"/>
                <table:data-pilot-member table:name="596" table:display="true" table:show-details="true"/>
                <table:data-pilot-member table:name="658" table:display="true" table:show-details="true"/>
                <table:data-pilot-member table:name="740" table:display="true" table:show-details="true"/>
                <table:data-pilot-member table:name="886" table:display="true" table:show-details="true"/>
                <table:data-pilot-member table:name="3183" table:display="true" table:show-details="true"/>
                <table:data-pilot-member table:name="3191" table:display="true" table:show-details="true"/>
                <table:data-pilot-member table:name="3429" table:display="true" table:show-details="true"/>
                <table:data-pilot-member table:name="3432" table:display="true" table:show-details="true"/>
                <table:data-pilot-member table:name="3515" table:display="true" table:show-details="true"/>
                <table:data-pilot-member table:name="3574" table:display="true" table:show-details="true"/>
                <table:data-pilot-member table:name="3703" table:display="true" table:show-details="true"/>
                <table:data-pilot-member table:name="3728" table:display="true" table:show-details="true"/>
                <table:data-pilot-member table:name="3813" table:display="true" table:show-details="true"/>
                <table:data-pilot-member table:name="3892" table:display="true" table:show-details="true"/>
                <table:data-pilot-member table:name="3918" table:display="true" table:show-details="true"/>
                <table:data-pilot-member table:name="3920" table:display="true" table:show-details="true"/>
                <table:data-pilot-member table:name="3997" table:display="true" table:show-details="true"/>
                <table:data-pilot-member table:name="4022" table:display="true" table:show-details="true"/>
                <table:data-pilot-member table:name="4048" table:display="true" table:show-details="true"/>
                <table:data-pilot-member table:name="4109" table:display="true" table:show-details="true"/>
                <table:data-pilot-member table:name="4136" table:display="true" table:show-details="true"/>
                <table:data-pilot-member table:name="4164" table:display="true" table:show-details="true"/>
                <table:data-pilot-member table:name="4234" table:display="true" table:show-details="true"/>
                <table:data-pilot-member table:name="4273" table:display="true" table:show-details="true"/>
                <table:data-pilot-member table:name="4274" table:display="true" table:show-details="true"/>
                <table:data-pilot-member table:name="4515" table:display="true" table:show-details="true"/>
                <table:data-pilot-member table:name="4597" table:display="true" table:show-details="true"/>
                <table:data-pilot-member table:name="4626" table:display="true" table:show-details="true"/>
                <table:data-pilot-member table:name="4684" table:display="true" table:show-details="true"/>
                <table:data-pilot-member table:name="4751" table:display="true" table:show-details="true"/>
                <table:data-pilot-member table:name="4799" table:display="true" table:show-details="true"/>
                <table:data-pilot-member table:name="4856" table:display="true" table:show-details="true"/>
                <table:data-pilot-member table:name="4899" table:display="true" table:show-details="true"/>
                <table:data-pilot-member table:name="5129" table:display="true" table:show-details="true"/>
                <table:data-pilot-member table:name="5291" table:display="true" table:show-details="true"/>
                <table:data-pilot-member table:name="5345" table:display="true" table:show-details="true"/>
                <table:data-pilot-member table:name="5406" table:display="true" table:show-details="true"/>
                <table:data-pilot-member table:name="5416" table:display="true" table:show-details="true"/>
                <table:data-pilot-member table:name="5427" table:display="true" table:show-details="true"/>
                <table:data-pilot-member table:name="5438" table:display="true" table:show-details="true"/>
                <table:data-pilot-member table:name="5579" table:display="true" table:show-details="true"/>
                <table:data-pilot-member table:name="5632" table:display="true" table:show-details="true"/>
                <table:data-pilot-member table:name="5749" table:display="true" table:show-details="true"/>
                <table:data-pilot-member table:name="5827" table:display="true" table:show-details="true"/>
                <table:data-pilot-member table:name="5864" table:display="true" table:show-details="true"/>
                <table:data-pilot-member table:name="5940" table:display="true" table:show-details="true"/>
                <table:data-pilot-member table:name="5948" table:display="true" table:show-details="true"/>
                <table:data-pilot-member table:name="6099" table:display="true" table:show-details="true"/>
                <table:data-pilot-member table:name="6122" table:display="true" table:show-details="true"/>
                <table:data-pilot-member table:name="6148" table:display="true" table:show-details="true"/>
                <table:data-pilot-member table:name="6211" table:display="true" table:show-details="true"/>
                <table:data-pilot-member table:name="6243" table:display="true" table:show-details="true"/>
                <table:data-pilot-member table:name="6364" table:display="true" table:show-details="true"/>
                <table:data-pilot-member table:name="6384" table:display="true" table:show-details="true"/>
                <table:data-pilot-member table:name="6404" table:display="true" table:show-details="true"/>
                <table:data-pilot-member table:name="6579" table:display="true" table:show-details="true"/>
                <table:data-pilot-member table:name="6611" table:display="true" table:show-details="true"/>
                <table:data-pilot-member table:name="6772" table:display="true" table:show-details="true"/>
                <table:data-pilot-member table:name="6881" table:display="true" table:show-details="true"/>
                <table:data-pilot-member table:name="6908" table:display="true" table:show-details="true"/>
                <table:data-pilot-member table:name="6953" table:display="true" table:show-details="true"/>
                <table:data-pilot-member table:name="6979" table:display="true" table:show-details="true"/>
                <table:data-pilot-member table:name="7178" table:display="true" table:show-details="true"/>
                <table:data-pilot-member table:name="7238" table:display="true" table:show-details="true"/>
                <table:data-pilot-member table:name="7288" table:display="true" table:show-details="true"/>
                <table:data-pilot-member table:name="7649" table:display="true" table:show-details="true"/>
                <table:data-pilot-member table:name="7660" table:display="true" table:show-details="true"/>
                <table:data-pilot-member table:name="7681" table:display="true" table:show-details="true"/>
                <table:data-pilot-member table:name="7724" table:display="true" table:show-details="true"/>
                <table:data-pilot-member table:name="7758" table:display="true" table:show-details="true"/>
                <table:data-pilot-member table:name="7759" table:display="true" table:show-details="true"/>
                <table:data-pilot-member table:name="7852" table:display="true" table:show-details="true"/>
                <table:data-pilot-member table:name="7939" table:display="true" table:show-details="true"/>
                <table:data-pilot-member table:name="8114" table:display="true" table:show-details="true"/>
                <table:data-pilot-member table:name="8214" table:display="true" table:show-details="true"/>
                <table:data-pilot-member table:name="8247" table:display="true" table:show-details="true"/>
                <table:data-pilot-member table:name="8304" table:display="true" table:show-details="true"/>
                <table:data-pilot-member table:name="8335" table:display="true" table:show-details="true"/>
                <table:data-pilot-member table:name="8340" table:display="true" table:show-details="true"/>
                <table:data-pilot-member table:name="8385" table:display="true" table:show-details="true"/>
                <table:data-pilot-member table:name="8472" table:display="true" table:show-details="true"/>
                <table:data-pilot-member table:name="8494" table:display="true" table:show-details="true"/>
                <table:data-pilot-member table:name="8496" table:display="true" table:show-details="true"/>
                <table:data-pilot-member table:name="8563" table:display="true" table:show-details="true"/>
                <table:data-pilot-member table:name="8585" table:display="true" table:show-details="true"/>
                <table:data-pilot-member table:name="8601" table:display="true" table:show-details="true"/>
                <table:data-pilot-member table:name="8641" table:display="true" table:show-details="true"/>
                <table:data-pilot-member table:name="9007" table:display="true" table:show-details="true"/>
                <table:data-pilot-member table:name="9164" table:display="true" table:show-details="true"/>
                <table:data-pilot-member table:name="9185" table:display="true" table:show-details="true"/>
                <table:data-pilot-member table:name="9226" table:display="true" table:show-details="true"/>
                <table:data-pilot-member table:name="9256" table:display="true" table:show-details="true"/>
                <table:data-pilot-member table:name="9262" table:display="true" table:show-details="true"/>
                <table:data-pilot-member table:name="9326" table:display="true" table:show-details="true"/>
                <table:data-pilot-member table:name="9499" table:display="true" table:show-details="true"/>
                <table:data-pilot-member table:name="9548" table:display="true" table:show-details="true"/>
                <table:data-pilot-member table:name="9568" table:display="true" table:show-details="true"/>
                <table:data-pilot-member table:name="9579" table:display="true" table:show-details="true"/>
                <table:data-pilot-member table:name="9593" table:display="true" table:show-details="true"/>
                <table:data-pilot-member table:name="9594" table:display="true" table:show-details="true"/>
                <table:data-pilot-member table:name="9695" table:display="true" table:show-details="true"/>
                <table:data-pilot-member table:name="9721" table:display="true" table:show-details="true"/>
                <table:data-pilot-member table:name="9761" table:display="true" table:show-details="true"/>
                <table:data-pilot-member table:name="9836" table:display="true" table:show-details="true"/>
                <table:data-pilot-member table:name="9877" table:display="true" table:show-details="true"/>
                <table:data-pilot-member table:name="9907" table:display="true" table:show-details="true"/>
                <table:data-pilot-member table:name="9938" table:display="true" table:show-details="true"/>
                <table:data-pilot-member table:name="9958" table:display="true" table:show-details="true"/>
                <table:data-pilot-member table:name="10087" table:display="true" table:show-details="true"/>
                <table:data-pilot-member table:name="10145" table:display="true" table:show-details="true"/>
                <table:data-pilot-member table:name="10151" table:display="true" table:show-details="true"/>
                <table:data-pilot-member table:name="10167" table:display="true" table:show-details="true"/>
                <table:data-pilot-member table:name="10260" table:display="true" table:show-details="true"/>
                <table:data-pilot-member table:name="10366" table:display="true" table:show-details="true"/>
                <table:data-pilot-member table:name="10415" table:display="true" table:show-details="true"/>
                <table:data-pilot-member table:name="10464" table:display="true" table:show-details="true"/>
                <table:data-pilot-member table:name="10494" table:display="true" table:show-details="true"/>
                <table:data-pilot-member table:name="10512" table:display="true" table:show-details="true"/>
                <table:data-pilot-member table:name="10516" table:display="true" table:show-details="true"/>
                <table:data-pilot-member table:name="10517" table:display="true" table:show-details="true"/>
                <table:data-pilot-member table:name="10586" table:display="true" table:show-details="true"/>
                <table:data-pilot-member table:name="10602" table:display="true" table:show-details="true"/>
                <table:data-pilot-member table:name="10620" table:display="true" table:show-details="true"/>
                <table:data-pilot-member table:name="10623" table:display="true" table:show-details="true"/>
                <table:data-pilot-member table:name="10626" table:display="true" table:show-details="true"/>
                <table:data-pilot-member table:name="10698" table:display="true" table:show-details="true"/>
                <table:data-pilot-member table:name="10753" table:display="true" table:show-details="true"/>
                <table:data-pilot-member table:name="10768" table:display="true" table:show-details="true"/>
                <table:data-pilot-member table:name="10861" table:display="true" table:show-details="true"/>
                <table:data-pilot-member table:name="10956" table:display="true" table:show-details="true"/>
                <table:data-pilot-member table:name="11025" table:display="true" table:show-details="true"/>
                <table:data-pilot-member table:name="11050" table:display="true" table:show-details="true"/>
                <table:data-pilot-member table:name="11065" table:display="true" table:show-details="true"/>
                <table:data-pilot-member table:name="11086" table:display="true" table:show-details="true"/>
                <table:data-pilot-member table:name="11252" table:display="true" table:show-details="true"/>
                <table:data-pilot-member table:name="11269" table:display="true" table:show-details="true"/>
                <table:data-pilot-member table:name="11273" table:display="true" table:show-details="true"/>
                <table:data-pilot-member table:name="11377" table:display="true" table:show-details="true"/>
                <table:data-pilot-member table:name="11457" table:display="true" table:show-details="true"/>
                <table:data-pilot-member table:name="11524" table:display="true" table:show-details="true"/>
                <table:data-pilot-member table:name="11530" table:display="true" table:show-details="true"/>
                <table:data-pilot-member table:name="11589" table:display="true" table:show-details="true"/>
                <table:data-pilot-member table:name="11602" table:display="true" table:show-details="true"/>
                <table:data-pilot-member table:name="11603" table:display="true" table:show-details="true"/>
                <table:data-pilot-member table:name="11607" table:display="true" table:show-details="true"/>
                <table:data-pilot-member table:name="11706" table:display="true" table:show-details="true"/>
                <table:data-pilot-member table:name="11733" table:display="true" table:show-details="true"/>
                <table:data-pilot-member table:name="11734" table:display="true" table:show-details="true"/>
                <table:data-pilot-member table:name="11735" table:display="true" table:show-details="true"/>
                <table:data-pilot-member table:name="11751" table:display="true" table:show-details="true"/>
                <table:data-pilot-member table:name="11787" table:display="true" table:show-details="true"/>
                <table:data-pilot-member table:name="11789" table:display="true" table:show-details="true"/>
                <table:data-pilot-member table:name="11821" table:display="true" table:show-details="true"/>
                <table:data-pilot-member table:name="11848" table:display="true" table:show-details="true"/>
                <table:data-pilot-member table:name="11857" table:display="true" table:show-details="true"/>
                <table:data-pilot-member table:name="11947" table:display="true" table:show-details="true"/>
                <table:data-pilot-member table:name="11956" table:display="true" table:show-details="true"/>
                <table:data-pilot-member table:name="12016" table:display="true" table:show-details="true"/>
                <table:data-pilot-member table:name="12019" table:display="true" table:show-details="true"/>
                <table:data-pilot-member table:name="12034" table:display="true" table:show-details="true"/>
                <table:data-pilot-member table:name="12132" table:display="true" table:show-details="true"/>
                <table:data-pilot-member table:name="12210" table:display="true" table:show-details="true"/>
                <table:data-pilot-member table:name="12347" table:display="true" table:show-details="true"/>
                <table:data-pilot-member table:name="12494" table:display="true" table:show-details="true"/>
                <table:data-pilot-member table:name="12509" table:display="true" table:show-details="true"/>
                <table:data-pilot-member table:name="12540" table:display="true" table:show-details="true"/>
                <table:data-pilot-member table:name="12744" table:display="true" table:show-details="true"/>
                <table:data-pilot-member table:name="12823" table:display="true" table:show-details="true"/>
                <table:data-pilot-member table:name="12932" table:display="true" table:show-details="true"/>
                <table:data-pilot-member table:name="13242" table:display="true" table:show-details="true"/>
                <table:data-pilot-member table:name="13334" table:display="true" table:show-details="true"/>
                <table:data-pilot-member table:name="13430" table:display="true" table:show-details="true"/>
                <table:data-pilot-member table:name="13442" table:display="true" table:show-details="true"/>
                <table:data-pilot-member table:name="13502" table:display="true" table:show-details="true"/>
                <table:data-pilot-member table:name="13551" table:display="true" table:show-details="true"/>
                <table:data-pilot-member table:name="13559" table:display="true" table:show-details="true"/>
                <table:data-pilot-member table:name="13610" table:display="true" table:show-details="true"/>
                <table:data-pilot-member table:name="13662" table:display="true" table:show-details="true"/>
                <table:data-pilot-member table:name="13664" table:display="true" table:show-details="true"/>
                <table:data-pilot-member table:name="13732" table:display="true" table:show-details="true"/>
                <table:data-pilot-member table:name="13773" table:display="true" table:show-details="true"/>
                <table:data-pilot-member table:name="13776" table:display="true" table:show-details="true"/>
                <table:data-pilot-member table:name="13784" table:display="true" table:show-details="true"/>
                <table:data-pilot-member table:name="13815" table:display="true" table:show-details="true"/>
                <table:data-pilot-member table:name="13834" table:display="true" table:show-details="true"/>
                <table:data-pilot-member table:name="13949" table:display="true" table:show-details="true"/>
                <table:data-pilot-member table:name="13970" table:display="true" table:show-details="true"/>
                <table:data-pilot-member table:name="13971" table:display="true" table:show-details="true"/>
                <table:data-pilot-member table:name="13982" table:display="true" table:show-details="true"/>
                <table:data-pilot-member table:name="13988" table:display="true" table:show-details="true"/>
                <table:data-pilot-member table:name="14067" table:display="true" table:show-details="true"/>
                <table:data-pilot-member table:name="14083" table:display="true" table:show-details="true"/>
                <table:data-pilot-member table:name="14209" table:display="true" table:show-details="true"/>
                <table:data-pilot-member table:name="14231" table:display="true" table:show-details="true"/>
                <table:data-pilot-member table:name="14480" table:display="true" table:show-details="true"/>
                <table:data-pilot-member table:name="14536" table:display="true" table:show-details="true"/>
                <table:data-pilot-member table:name="14569" table:display="true" table:show-details="true"/>
                <table:data-pilot-member table:name="14669" table:display="true" table:show-details="true"/>
                <table:data-pilot-member table:name="14672" table:display="true" table:show-details="true"/>
                <table:data-pilot-member table:name="14716" table:display="true" table:show-details="true"/>
                <table:data-pilot-member table:name="14829" table:display="true" table:show-details="true"/>
                <table:data-pilot-member table:name="14886" table:display="true" table:show-details="true"/>
                <table:data-pilot-member table:name="14970" table:display="true" table:show-details="true"/>
                <table:data-pilot-member table:name="14984" table:display="true" table:show-details="true"/>
                <table:data-pilot-member table:name="15022" table:display="true" table:show-details="true"/>
                <table:data-pilot-member table:name="15027" table:display="true" table:show-details="true"/>
                <table:data-pilot-member table:name="15060" table:display="true" table:show-details="true"/>
                <table:data-pilot-member table:name="15153" table:display="true" table:show-details="true"/>
                <table:data-pilot-member table:name="15208" table:display="true" table:show-details="true"/>
                <table:data-pilot-member table:name="15330" table:display="true" table:show-details="true"/>
                <table:data-pilot-member table:name="15339" table:display="true" table:show-details="true"/>
                <table:data-pilot-member table:name="15373" table:display="true" table:show-details="true"/>
                <table:data-pilot-member table:name="15403" table:display="true" table:show-details="true"/>
                <table:data-pilot-member table:name="15747" table:display="true" table:show-details="true"/>
                <table:data-pilot-member table:name="15762" table:display="true" table:show-details="true"/>
                <table:data-pilot-member table:name="15795" table:display="true" table:show-details="true"/>
                <table:data-pilot-member table:name="15846" table:display="true" table:show-details="true"/>
                <table:data-pilot-member table:name="15926" table:display="true" table:show-details="true"/>
                <table:data-pilot-member table:name="15983" table:display="true" table:show-details="true"/>
                <table:data-pilot-member table:name="16033" table:display="true" table:show-details="true"/>
                <table:data-pilot-member table:name="16094" table:display="true" table:show-details="true"/>
                <table:data-pilot-member table:name="16095" table:display="true" table:show-details="true"/>
                <table:data-pilot-member table:name="16104" table:display="true" table:show-details="true"/>
                <table:data-pilot-member table:name="16180" table:display="true" table:show-details="true"/>
                <table:data-pilot-member table:name="16242" table:display="true" table:show-details="true"/>
                <table:data-pilot-member table:name="16252" table:display="true" table:show-details="true"/>
                <table:data-pilot-member table:name="16508" table:display="true" table:show-details="true"/>
                <table:data-pilot-member table:name="16539" table:display="true" table:show-details="true"/>
                <table:data-pilot-member table:name="16603" table:display="true" table:show-details="true"/>
                <table:data-pilot-member table:name="16606" table:display="true" table:show-details="true"/>
                <table:data-pilot-member table:name="16650" table:display="true" table:show-details="true"/>
                <table:data-pilot-member table:name="16741" table:display="true" table:show-details="true"/>
                <table:data-pilot-member table:name="16814" table:display="true" table:show-details="true"/>
                <table:data-pilot-member table:name="16836" table:display="true" table:show-details="true"/>
                <table:data-pilot-member table:name="16873" table:display="true" table:show-details="true"/>
                <table:data-pilot-member table:name="16874" table:display="true" table:show-details="true"/>
                <table:data-pilot-member table:name="16885" table:display="true" table:show-details="true"/>
                <table:data-pilot-member table:name="16950" table:display="true" table:show-details="true"/>
                <table:data-pilot-member table:name="16987" table:display="true" table:show-details="true"/>
                <table:data-pilot-member table:name="17004" table:display="true" table:show-details="true"/>
                <table:data-pilot-member table:name="17011" table:display="true" table:show-details="true"/>
                <table:data-pilot-member table:name="17015" table:display="true" table:show-details="true"/>
                <table:data-pilot-member table:name="17151" table:display="true" table:show-details="true"/>
                <table:data-pilot-member table:name="17199" table:display="true" table:show-details="true"/>
                <table:data-pilot-member table:name="17225" table:display="true" table:show-details="true"/>
                <table:data-pilot-member table:name="17239" table:display="true" table:show-details="true"/>
                <table:data-pilot-member table:name="17250" table:display="true" table:show-details="true"/>
                <table:data-pilot-member table:name="17309" table:display="true" table:show-details="true"/>
                <table:data-pilot-member table:name="17311" table:display="true" table:show-details="true"/>
                <table:data-pilot-member table:name="17320" table:display="true" table:show-details="true"/>
                <table:data-pilot-member table:name="17321" table:display="true" table:show-details="true"/>
                <table:data-pilot-member table:name="17350" table:display="true" table:show-details="true"/>
                <table:data-pilot-member table:name="17354" table:display="true" table:show-details="true"/>
                <table:data-pilot-member table:name="17394" table:display="true" table:show-details="true"/>
                <table:data-pilot-member table:name="17493" table:display="true" table:show-details="true"/>
                <table:data-pilot-member table:name="17538" table:display="true" table:show-details="true"/>
                <table:data-pilot-member table:name="17594" table:display="true" table:show-details="true"/>
                <table:data-pilot-member table:name="17842" table:display="true" table:show-details="true"/>
                <table:data-pilot-member table:name="17905" table:display="true" table:show-details="true"/>
                <table:data-pilot-member table:name="17911" table:display="true" table:show-details="true"/>
                <table:data-pilot-member table:name="17996" table:display="true" table:show-details="true"/>
                <table:data-pilot-member table:name="18130" table:display="true" table:show-details="true"/>
                <table:data-pilot-member table:name="18161" table:display="true" table:show-details="true"/>
                <table:data-pilot-member table:name="18200" table:display="true" table:show-details="true"/>
                <table:data-pilot-member table:name="18210" table:display="true" table:show-details="true"/>
                <table:data-pilot-member table:name="18277" table:display="true" table:show-details="true"/>
                <table:data-pilot-member table:name="18301" table:display="true" table:show-details="true"/>
                <table:data-pilot-member table:name="18328" table:display="true" table:show-details="true"/>
                <table:data-pilot-member table:name="18355" table:display="true" table:show-details="true"/>
                <table:data-pilot-member table:name="18365" table:display="true" table:show-details="true"/>
                <table:data-pilot-member table:name="18442" table:display="true" table:show-details="true"/>
                <table:data-pilot-member table:name="18444" table:display="true" table:show-details="true"/>
                <table:data-pilot-member table:name="18460" table:display="true" table:show-details="true"/>
                <table:data-pilot-member table:name="18486" table:display="true" table:show-details="true"/>
                <table:data-pilot-member table:name="18515" table:display="true" table:show-details="true"/>
                <table:data-pilot-member table:name="18525" table:display="true" table:show-details="true"/>
                <table:data-pilot-member table:name="18545" table:display="true" table:show-details="true"/>
                <table:data-pilot-member table:name="18546" table:display="true" table:show-details="true"/>
                <table:data-pilot-member table:name="18574" table:display="true" table:show-details="true"/>
                <table:data-pilot-member table:name="18684" table:display="true" table:show-details="true"/>
                <table:data-pilot-member table:name="18852" table:display="true" table:show-details="true"/>
                <table:data-pilot-member table:name="18914" table:display="true" table:show-details="true"/>
                <table:data-pilot-member table:name="18922" table:display="true" table:show-details="true"/>
                <table:data-pilot-member table:name="18941" table:display="true" table:show-details="true"/>
                <table:data-pilot-member table:name="19009" table:display="true" table:show-details="true"/>
                <table:data-pilot-member table:name="19043" table:display="true" table:show-details="true"/>
                <table:data-pilot-member table:name="19109" table:display="true" table:show-details="true"/>
                <table:data-pilot-member table:name="19230" table:display="true" table:show-details="true"/>
                <table:data-pilot-member table:name="19267" table:display="true" table:show-details="true"/>
                <table:data-pilot-member table:name="19282" table:display="true" table:show-details="true"/>
                <table:data-pilot-member table:name="19374" table:display="true" table:show-details="true"/>
                <table:data-pilot-member table:name="19392" table:display="true" table:show-details="true"/>
                <table:data-pilot-member table:name="19417" table:display="true" table:show-details="true"/>
                <table:data-pilot-member table:name="19446" table:display="true" table:show-details="true"/>
                <table:data-pilot-member table:name="19454" table:display="true" table:show-details="true"/>
                <table:data-pilot-member table:name="19520" table:display="true" table:show-details="true"/>
                <table:data-pilot-member table:name="19537" table:display="true" table:show-details="true"/>
                <table:data-pilot-member table:name="19586" table:display="true" table:show-details="true"/>
                <table:data-pilot-member table:name="19588" table:display="true" table:show-details="true"/>
                <table:data-pilot-member table:name="19605" table:display="true" table:show-details="true"/>
                <table:data-pilot-member table:name="19643" table:display="true" table:show-details="true"/>
                <table:data-pilot-member table:name="19670" table:display="true" table:show-details="true"/>
                <table:data-pilot-member table:name="19672" table:display="true" table:show-details="true"/>
                <table:data-pilot-member table:name="19673" table:display="true" table:show-details="true"/>
                <table:data-pilot-member table:name="19702" table:display="true" table:show-details="true"/>
                <table:data-pilot-member table:name="19736" table:display="true" table:show-details="true"/>
                <table:data-pilot-member table:name="19762" table:display="true" table:show-details="true"/>
                <table:data-pilot-member table:name="21024" table:display="true" table:show-details="true"/>
                <table:data-pilot-member table:name="21233" table:display="true" table:show-details="true"/>
                <table:data-pilot-member table:name="22101" table:display="true" table:show-details="true"/>
                <table:data-pilot-member table:name="23286" table:display="true" table:show-details="true"/>
                <table:data-pilot-member table:name="24778" table:display="true" table:show-details="true"/>
                <table:data-pilot-member table:name="25920" table:display="true" table:show-details="true"/>
                <table:data-pilot-member table:name="26469" table:display="true" table:show-details="true"/>
                <table:data-pilot-member table:name="26817" table:display="true" table:show-details="true"/>
                <table:data-pilot-member table:name="26968" table:display="true" table:show-details="true"/>
                <table:data-pilot-member table:name="27922" table:display="true" table:show-details="true"/>
                <table:data-pilot-member table:name="27925" table:display="true" table:show-details="true"/>
                <table:data-pilot-member table:name="28021" table:display="true" table:show-details="true"/>
                <table:data-pilot-member table:name="28091" table:display="true" table:show-details="true"/>
                <table:data-pilot-member table:name="28241" table:display="true" table:show-details="true"/>
                <table:data-pilot-member table:name="28278" table:display="true" table:show-details="true"/>
                <table:data-pilot-member table:name="28305" table:display="true" table:show-details="true"/>
                <table:data-pilot-member table:name="28311" table:display="true" table:show-details="true"/>
                <table:data-pilot-member table:name="28345" table:display="true" table:show-details="true"/>
                <table:data-pilot-member table:name="28365" table:display="true" table:show-details="true"/>
                <table:data-pilot-member table:name="28426" table:display="true" table:show-details="true"/>
                <table:data-pilot-member table:name="29313" table:display="true" table:show-details="true"/>
                <table:data-pilot-member table:name="29699" table:display="true" table:show-details="true"/>
                <table:data-pilot-member table:name="29833" table:display="true" table:show-details="true"/>
                <table:data-pilot-member table:name="30023" table:display="true" table:show-details="true"/>
                <table:data-pilot-member table:name="31901" table:display="true" table:show-details="true"/>
                <table:data-pilot-member table:name="31926" table:display="true" table:show-details="true"/>
                <table:data-pilot-member table:name="31945" table:display="true" table:show-details="true"/>
                <table:data-pilot-member table:name="31946" table:display="true" table:show-details="true"/>
                <table:data-pilot-member table:name="31961" table:display="true" table:show-details="true"/>
                <table:data-pilot-member table:name="31976" table:display="true" table:show-details="true"/>
                <table:data-pilot-member table:name="31983" table:display="true" table:show-details="true"/>
                <table:data-pilot-member table:name="32071" table:display="true" table:show-details="true"/>
                <table:data-pilot-member table:name="32154" table:display="true" table:show-details="true"/>
                <table:data-pilot-member table:name="32165" table:display="true" table:show-details="true"/>
                <table:data-pilot-member table:name="32166" table:display="true" table:show-details="true"/>
                <table:data-pilot-member table:name="32202" table:display="true" table:show-details="true"/>
                <table:data-pilot-member table:name="32268" table:display="true" table:show-details="true"/>
                <table:data-pilot-member table:name="32270" table:display="true" table:show-details="true"/>
                <table:data-pilot-member table:name="32274" table:display="true" table:show-details="true"/>
                <table:data-pilot-member table:name="32275" table:display="true" table:show-details="true"/>
                <table:data-pilot-member table:name="32281" table:display="true" table:show-details="true"/>
                <table:data-pilot-member table:name="32282" table:display="true" table:show-details="true"/>
                <table:data-pilot-member table:name="32288" table:display="true" table:show-details="true"/>
                <table:data-pilot-member table:name="32291" table:display="true" table:show-details="true"/>
                <table:data-pilot-member table:name="32298" table:display="true" table:show-details="true"/>
                <table:data-pilot-member table:name="32304" table:display="true" table:show-details="true"/>
                <table:data-pilot-member table:name="32305" table:display="true" table:show-details="true"/>
                <table:data-pilot-member table:name="32306" table:display="true" table:show-details="true"/>
                <table:data-pilot-member table:name="32307" table:display="true" table:show-details="true"/>
                <table:data-pilot-member table:name="32311" table:display="true" table:show-details="true"/>
                <table:data-pilot-member table:name="32314" table:display="true" table:show-details="true"/>
                <table:data-pilot-member table:name="32413" table:display="true" table:show-details="true"/>
                <table:data-pilot-member table:name="32416" table:display="true" table:show-details="true"/>
                <table:data-pilot-member table:name="32421" table:display="true" table:show-details="true"/>
                <table:data-pilot-member table:name="32607" table:display="true" table:show-details="true"/>
                <table:data-pilot-member table:name="32640" table:display="true" table:show-details="true"/>
                <table:data-pilot-member table:name="32643" table:display="true" table:show-details="true"/>
                <table:data-pilot-member table:name="32646" table:display="true" table:show-details="true"/>
                <table:data-pilot-member table:name="32656" table:display="true" table:show-details="true"/>
                <table:data-pilot-member table:name="33270" table:display="true" table:show-details="true"/>
                <table:data-pilot-member table:name="35697" table:display="true" table:show-details="true"/>
                <table:data-pilot-member table:name="35829" table:display="true" table:show-details="true"/>
                <table:data-pilot-member table:name="36451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tawka_przekliku" table:orientation="data" table:used-hierarchy="-1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">
      <number:number number:decimal-places="2" number:min-integer-digits="1"/>
      <number:text> </number:text>
      <number:currency-symbol number:language="pl" number:country="PL">zł</number:currency-symbol>
    </number:currency-style>
    <number:number-style style:name="N8107P0" style:volatile="true" number:language="pl" number:country="PL">
      <number:number number:decimal-places="0" number:min-integer-digits="1" number:grouping="true"/>
      <number:text> zł</number:text>
    </number:number-style>
    <number:number-style style:name="N8107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8107P0"/>
    </number:number-style>
    <number:number-style style:name="N8108P0" style:volatile="true" number:language="pl" number:country="PL">
      <number:number number:decimal-places="0" number:min-integer-digits="1" number:grouping="true"/>
      <number:text> zł</number:text>
    </number:number-style>
    <number:number-style style:name="N8108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8108P0"/>
    </number:number-style>
    <number:number-style style:name="N8109P0" style:volatile="true" number:language="pl" number:country="PL">
      <number:number number:decimal-places="2" number:min-integer-digits="1" number:grouping="true"/>
      <number:text> zł</number:text>
    </number:number-style>
    <number:number-style style:name="N8109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8109P0"/>
    </number:number-style>
    <number:number-style style:name="N8110P0" style:volatile="true" number:language="pl" number:country="PL">
      <number:number number:decimal-places="2" number:min-integer-digits="1" number:grouping="true"/>
      <number:text> zł</number:text>
    </number:number-style>
    <number:number-style style:name="N8110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8110P0"/>
    </number:number-style>
    <number:date-style style:name="N8111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8112" number:language="pl" number:country="PL">
      <number:day number:style="long"/>
      <number:text>-</number:text>
      <number:month number:textual="true"/>
    </number:date-style>
    <number:date-style style:name="N8113" number:language="pl" number:country="PL">
      <number:month number:textual="true"/>
      <number:text>-</number:text>
      <number:year/>
    </number:date-style>
    <number:time-style style:name="N8114" number:language="pl" number:country="PL">
      <number:hours/>
      <number:text>:</number:text>
      <number:minutes number:style="long"/>
      <number:text> </number:text>
      <number:am-pm/>
    </number:time-style>
    <number:time-style style:name="N8115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6P0" style:volatile="true" number:language="pl" number:country="PL">
      <number:number number:decimal-places="0" number:min-integer-digits="1" number:grouping="true"/>
      <number:text>     </number:text>
    </number:number-style>
    <number:number-style style:name="N8116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8116P0"/>
    </number:number-style>
    <number:number-style style:name="N8117P0" style:volatile="true" number:language="pl" number:country="PL">
      <number:number number:decimal-places="0" number:min-integer-digits="1" number:grouping="true"/>
      <number:text>     </number:text>
    </number:number-style>
    <number:number-style style:name="N8117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17P0"/>
    </number:number-style>
    <number:number-style style:name="N8118P0" style:volatile="true" number:language="pl" number:country="PL">
      <number:number number:decimal-places="2" number:min-integer-digits="1" number:grouping="true"/>
      <number:text>     </number:text>
    </number:number-style>
    <number:number-style style:name="N8118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8118P0"/>
    </number:number-style>
    <number:number-style style:name="N8119P0" style:volatile="true" number:language="pl" number:country="PL">
      <number:number number:decimal-places="2" number:min-integer-digits="1" number:grouping="true"/>
      <number:text>     </number:text>
    </number:number-style>
    <number:number-style style:name="N8119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8120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8120P2" style:volatile="true" number:language="pl" number:country="PL">
      <number:text> -      </number:text>
    </number:number-style>
    <number:text-style style:name="N8120" number:language="pl" number:country="PL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812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8121P2" style:volatile="true" number:language="pl" number:country="PL">
      <number:text> - zł </number:text>
    </number:number-style>
    <number:text-style style:name="N8121" number:language="pl" number:country="PL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8122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8122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8122" number:language="pl" number:country="PL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8123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8123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8123" number:language="pl" number:country="PL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pl" number:country="PL">
      <number:minutes number:style="long"/>
      <number:text>:</number:text>
      <number:seconds number:style="long"/>
    </number:time-style>
    <number:time-style style:name="N8125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pl" number:country="PL">
      <number:minutes number:style="long"/>
      <number:text>:</number:text>
      <number:seconds number:style="long" number:decimal-places="1"/>
    </number:time-style>
    <number:number-style style:name="N8127" number:language="pl" number:country="PL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Narożnik_20_tabeli_20_przestawnej" style:display-name="Narożnik tabeli przestawnej" style:family="table-cell" style:parent-style-name="Default"/>
    <style:style style:name="Wartość_20_tabeli_20_przestawnej" style:display-name="Wartość tabeli przestawnej" style:family="table-cell" style:parent-style-name="Default"/>
    <style:style style:name="Pole_20_tabeli_20_przestawnej" style:display-name="Pole tabeli przestawnej" style:family="table-cell" style:parent-style-name="Default"/>
    <style:style style:name="Kategoria_20_tabeli_20_przestawnej" style:display-name="Kategoria tabeli przestawnej" style:family="table-cell" style:parent-style-name="Default">
      <style:table-cell-properties style:text-align-source="fix" style:repeat-content="false"/>
      <style:paragraph-properties fo:text-align="start"/>
    </style:style>
    <style:style style:name="Tytul_20_tabeli_20_przestawnej" style:display-name="Tytul tabeli przestawnej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Wynik_20_tabeli_20_przestawnej" style:display-name="Wynik tabeli przestawnej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0.635cm" fo:margin-left="2.54cm" fo:margin-right="2.54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905cm" fo:margin-left="0cm" fo:margin-right="0cm" fo:margin-top="1.482cm"/>
      </style:footer-style>
    </style:page-layout>
    <style:style style:name="MT1" style:family="text">
      <style:text-properties fo:color="#000000" style:text-outline="false" style:text-line-through-style="none" style:text-position="0% 100%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08">08.04.2026</text:date>, <text:time>13:36:1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Podsumowanie_20_eksportu" style:display-name="PageStyle_Podsumowanie eksport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eneo_20_całosć_20__20_-_20_Raport_5f_przejsc_5f_" style:display-name="PageStyle_ceneo całosć  - Raport_przejsc_" style:page-layout-name="Mpm4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Raport_5f_przejsc_5f_2026_5f_03_5f_15_5f_2026_5f_" style:display-name="PageStyle_Raport_przejsc_2026_03_15_2026_" style:page-layout-name="Mpm4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CENEO-obrobione_20_" style:display-name="PageStyle_CENEO-obrobione " style:page-layout-name="Mpm4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4-08T13:36:17.67</dc:date>
    <dc:creator>Jakub Najs</dc:creator>
    <meta:generator>OpenOffice/4.1.16$Win32 OpenOffice.org_project/4116m3$Build-9816</meta:generator>
    <meta:editing-duration>PT6M7S</meta:editing-duration>
    <meta:editing-cycles>1</meta:editing-cycles>
    <meta:document-statistic meta:table-count="4" meta:cell-count="12054" meta:object-count="0"/>
    <meta:user-defined meta:name="ProgId">Excel.Sheet</meta:user-defined>
  </office:meta>
</office:document-meta>
</file>